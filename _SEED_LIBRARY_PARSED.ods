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0.8492in"/>
    </style:style>
    <style:style style:name="co2" style:family="table-column">
      <style:table-column-properties fo:break-before="auto" style:column-width="2.3126in"/>
    </style:style>
    <style:style style:name="co3" style:family="table-column">
      <style:table-column-properties fo:break-before="auto" style:column-width="2.1583in"/>
    </style:style>
    <style:style style:name="co4" style:family="table-column">
      <style:table-column-properties fo:break-before="auto" style:column-width="4.6252in"/>
    </style:style>
    <style:style style:name="co5" style:family="table-column">
      <style:table-column-properties fo:break-before="auto" style:column-width="1.0791in"/>
    </style:style>
    <style:style style:name="co6" style:family="table-column">
      <style:table-column-properties fo:break-before="auto" style:column-width="1.3874in"/>
    </style:style>
    <style:style style:name="co7" style:family="table-column">
      <style:table-column-properties fo:break-before="auto" style:column-width="1.5417in"/>
    </style:style>
    <style:style style:name="co8" style:family="table-column">
      <style:table-column-properties fo:break-before="auto" style:column-width="0.6165in"/>
    </style:style>
    <style:style style:name="co9" style:family="table-column">
      <style:table-column-properties fo:break-before="auto" style:column-width="1.2335in"/>
    </style:style>
    <style:style style:name="co10" style:family="table-column">
      <style:table-column-properties fo:break-before="auto" style:column-width="1.6957in"/>
    </style:style>
    <style:style style:name="co11" style:family="table-column">
      <style:table-column-properties fo:break-before="auto" style:column-width="1.9272in"/>
    </style:style>
    <style:style style:name="co12" style:family="table-column">
      <style:table-column-properties fo:break-before="auto" style:column-width="0.6807in"/>
    </style:style>
    <style:style style:name="co13" style:family="table-column">
      <style:table-column-properties fo:break-before="auto" style:column-width="6.1665in"/>
    </style:style>
    <style:style style:name="co14" style:family="table-column">
      <style:table-column-properties fo:break-before="auto" style:column-width="3.4689in"/>
    </style:style>
    <style:style style:name="co15" style:family="table-column">
      <style:table-column-properties fo:break-before="auto" style:column-width="0.8402in"/>
    </style:style>
    <style:style style:name="ro1" style:family="table-row">
      <style:table-row-properties style:row-height="0.3583in" fo:break-before="auto" style:use-optimal-row-height="true"/>
    </style:style>
    <style:style style:name="ro2" style:family="table-row">
      <style:table-row-properties style:row-height="0.8736in" fo:break-before="auto" style:use-optimal-row-height="true"/>
    </style:style>
    <style:style style:name="ro3" style:family="table-row">
      <style:table-row-properties style:row-height="0.528in" fo:break-before="auto" style:use-optimal-row-height="true"/>
    </style:style>
    <style:style style:name="ro4" style:family="table-row">
      <style:table-row-properties style:row-height="0.6945in" fo:break-before="auto" style:use-optimal-row-height="true"/>
    </style:style>
    <style:style style:name="ro5" style:family="table-row">
      <style:table-row-properties style:row-height="0.702in" fo:break-before="auto" style:use-optimal-row-height="true"/>
    </style:style>
    <style:style style:name="ro6" style:family="table-row">
      <style:table-row-properties style:row-height="1.0453in" fo:break-before="auto" style:use-optimal-row-height="true"/>
    </style:style>
    <style:style style:name="ro7" style:family="table-row">
      <style:table-row-properties style:row-height="1.5602in" fo:break-before="auto" style:use-optimal-row-height="true"/>
    </style:style>
    <style:style style:name="ro8" style:family="table-row">
      <style:table-row-properties style:row-height="1.389in" fo:break-before="auto" style:use-optimal-row-height="true"/>
    </style:style>
    <style:style style:name="ro9" style:family="table-row">
      <style:table-row-properties style:row-height="1.2165in" fo:break-before="auto" style:use-optimal-row-height="true"/>
    </style:style>
    <style:style style:name="ro10" style:family="table-row">
      <style:table-row-properties style:row-height="1.7319in" fo:break-before="auto" style:use-optimal-row-height="true"/>
    </style:style>
    <style:style style:name="ro11" style:family="table-row">
      <style:table-row-properties style:row-height="0.361in" fo:break-before="auto" style:use-optimal-row-height="true"/>
    </style:style>
    <style:style style:name="ro12" style:family="table-row">
      <style:table-row-properties style:row-height="0.5307in" fo:break-before="auto" style:use-optimal-row-height="true"/>
    </style:style>
    <style:style style:name="ro13" style:family="table-row">
      <style:table-row-properties style:row-height="0.1917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8335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807in" fo:break-before="auto" style:use-optimal-row-height="true"/>
    </style:style>
    <style:style style:name="ro18" style:family="table-row">
      <style:table-row-properties style:row-height="0.4134in" fo:break-before="auto" style:use-optimal-row-height="true"/>
    </style:style>
    <style:style style:name="ro19" style:family="table-row">
      <style:table-row-properties style:row-height="0.2083in" fo:break-before="auto" style:use-optimal-row-height="true"/>
    </style:style>
    <style:style style:name="ro20" style:family="table-row">
      <style:table-row-properties style:row-height="0.3055in" fo:break-before="auto" style:use-optimal-row-height="true"/>
    </style:style>
    <style:style style:name="ta1" style:family="table" style:master-page-name="PageStyle_5f_Parsed_20_Database">
      <style:table-properties table:display="true" style:writing-mode="lr-tb"/>
    </style:style>
    <style:style style:name="ta2" style:family="table" style:master-page-name="PageStyle_5f_Original_20_Labels">
      <style:table-properties table:display="true" style:writing-mode="lr-tb"/>
    </style:style>
    <style:style style:name="ta3" style:family="table" style:master-page-name="PageStyle_5f_Sheet1">
      <style:table-properties table:display="true" style:writing-mode="lr-tb"/>
    </style:style>
    <number:boolean-style style:name="N99">
      <number:boolean/>
    </number:boolean-style>
    <style:style style:name="ce1" style:family="table-cell" style:parent-style-name="Default">
      <style:table-cell-properties fo:background-color="#2e7d32"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fo:font-size="11pt" fo:font-weight="bold" style:font-size-asian="11pt" style:font-weight-asian="bold" style:font-size-complex="11pt" style:font-weight-complex="bold">
        <loext:char-complex-color loext:theme-type="dark1" loext:color-type="theme"/>
      </style:text-properties>
    </style:style>
    <style:style style:name="ce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font-size="11pt" style:font-size-asian="11pt" style:font-size-complex="11pt"/>
    </style:style>
    <style:style style:name="ce8" style:family="table-cell" style:parent-style-name="Default">
      <style:table-cell-properties fo:background-color="#2e7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5" style:family="table-cell" style:parent-style-name="Default">
      <style:table-cell-properties fo:background-color="#f1f8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7" style:family="table-cell" style:parent-style-name="Default" style:data-style-name="N99">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font-size="11pt" style:font-size-asian="11pt" style:font-size-complex="11pt"/>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font-size="11pt" style:font-size-asian="11pt" style:font-size-complex="11pt"/>
    </style:style>
    <style:style style:name="ce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cdd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7" style:family="table-cell" style:parent-style-name="Default">
      <style:table-cell-properties fo:background-color="#c8e6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8" style:family="table-cell" style:parent-style-name="Default">
      <style:table-cell-properties fo:background-color="#fff9c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40" style:family="table-cell" style:parent-style-name="Default">
      <style:table-cell-properties fo:background-color="#1b5e2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1" style:family="table-cell" style:parent-style-name="Default">
      <style:table-cell-properties fo:background-color="#f1f8e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1" style:family="table-cell" style:parent-style-name="Default">
      <style:table-cell-properties fo:background-color="#2e7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 style:family="table-cell" style:parent-style-name="Default">
      <style:table-cell-properties fo:background-color="#f1f8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style:style style:name="ce12" style:family="table-cell" style:parent-style-name="Default">
      <style:table-cell-properties fo:background-color="#c8e6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T1" style:family="text">
      <style:text-properties style:use-window-font-color="true" style:font-name="Arial" fo:font-size="9pt" fo:font-weight="bold" style:text-underline-style="none" style:text-underline-color="font-color" style:text-line-through-type="none" fo:font-style="normal" style:text-outline="false" fo:text-shadow="none" style:text-position="0% 100%" style:font-name-complex="Arial" style:font-size-asian="9pt" style:font-size-complex="9pt" style:font-weight-asian="bold" style:font-weight-complex="bold" style:font-style-asian="normal" style:font-style-complex="normal"/>
    </style:style>
    <style:style style:name="T2" style:family="text">
      <style:text-properties style:use-window-font-color="true" style:font-name="Arial" fo:font-size="9pt" style:text-underline-style="none" style:text-underline-color="font-color" style:text-line-through-type="none" fo:font-style="normal" style:text-outline="false" fo:text-shadow="none" style:text-position="0% 100%" style:font-name-complex="Arial" style:font-size-asian="9pt" style:font-size-complex="9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Parsed Database" table:style-name="ta1">
        <office:forms form:automatic-focus="false" form:apply-design-mode="false"/>
        <table:table-column table:style-name="co1" table:default-cell-style-name="ce6"/>
        <table:table-column table:style-name="co2" table:default-cell-style-name="ce6"/>
        <table:table-column table:style-name="co3" table:number-columns-repeated="2" table:default-cell-style-name="ce6"/>
        <table:table-column table:style-name="co4" table:default-cell-style-name="ce6"/>
        <table:table-column table:style-name="co5" table:number-columns-repeated="2" table:default-cell-style-name="ce6"/>
        <table:table-column table:style-name="co6" table:default-cell-style-name="ce6"/>
        <table:table-column table:style-name="co7" table:default-cell-style-name="ce6"/>
        <table:table-column table:style-name="co6" table:default-cell-style-name="ce6"/>
        <table:table-column table:style-name="co8" table:default-cell-style-name="ce6"/>
        <table:table-column table:style-name="co7" table:default-cell-style-name="ce6"/>
        <table:table-column table:style-name="co9" table:default-cell-style-name="ce6"/>
        <table:table-column table:style-name="co10" table:default-cell-style-name="ce6"/>
        <table:table-column table:style-name="co8" table:default-cell-style-name="ce6"/>
        <table:table-column table:style-name="co11" table:default-cell-style-name="ce6"/>
        <table:table-column table:style-name="co7" table:default-cell-style-name="ce6"/>
        <table:table-column table:style-name="co12" table:default-cell-style-name="Default"/>
        <table:table-column table:style-name="co12" table:number-columns-repeated="16366"/>
        <table:table-row table:style-name="ro1">
          <table:table-cell table:style-name="ce1" office:value-type="string" calcext:value-type="string">
            <text:p>FileNumber</text:p>
          </table:table-cell>
          <table:table-cell table:style-name="ce8" office:value-type="string" calcext:value-type="string">
            <text:p>Family</text:p>
          </table:table-cell>
          <table:table-cell table:style-name="ce8" office:value-type="string" calcext:value-type="string">
            <text:p>Variety</text:p>
          </table:table-cell>
          <table:table-cell table:style-name="ce8" office:value-type="string" calcext:value-type="string">
            <text:p>Seed Source</text:p>
          </table:table-cell>
          <table:table-cell table:style-name="ce8" office:value-type="string" calcext:value-type="string">
            <text:p>Comments</text:p>
          </table:table-cell>
          <table:table-cell table:style-name="ce31" office:value-type="string" calcext:value-type="string">
            <text:p>Background Info</text:p>
          </table:table-cell>
          <table:table-cell table:style-name="ce8" office:value-type="string" calcext:value-type="string">
            <text:p># of Seeds</text:p>
          </table:table-cell>
          <table:table-cell table:style-name="ce8" office:value-type="string" calcext:value-type="string">
            <text:p>Season</text:p>
          </table:table-cell>
          <table:table-cell table:style-name="ce8" office:value-type="string" calcext:value-type="string">
            <text:p>Seed Saver Level</text:p>
          </table:table-cell>
          <table:table-cell table:style-name="ce8" office:value-type="string" calcext:value-type="string">
            <text:p>Hybrid-Do Not Save</text:p>
          </table:table-cell>
          <table:table-cell table:style-name="ce8" office:value-type="string" calcext:value-type="string">
            <text:p>Edible</text:p>
          </table:table-cell>
          <table:table-cell table:style-name="ce8" office:value-type="string" calcext:value-type="string">
            <text:p>Where Grown</text:p>
          </table:table-cell>
          <table:table-cell table:style-name="ce8" office:value-type="string" calcext:value-type="string">
            <text:p>Perennial/Annual</text:p>
          </table:table-cell>
          <table:table-cell table:style-name="ce8" office:value-type="string" calcext:value-type="string">
            <text:p>Grown By</text:p>
          </table:table-cell>
          <table:table-cell table:style-name="ce8" office:value-type="string" calcext:value-type="string">
            <text:p>Year</text:p>
          </table:table-cell>
          <table:table-cell table:style-name="ce8" office:value-type="string" calcext:value-type="string">
            <text:p>Soil Temperature</text:p>
          </table:table-cell>
          <table:table-cell table:style-name="ce8" office:value-type="string" calcext:value-type="string">
            <text:p>Germination</text:p>
          </table:table-cell>
          <table:table-cell/>
          <table:table-cell table:style-name="ce6" table:number-columns-repeated="16366"/>
        </table:table-row>
        <table:table-row table:style-name="ro2">
          <table:table-cell office:value-type="float" office:value="1295" calcext:value-type="float">
            <text:p>1295</text:p>
          </table:table-cell>
          <table:table-cell table:style-name="ce14" office:value-type="string" calcext:value-type="string">
            <text:p>FLOWER Lavender (Consolida regalis)</text:p>
          </table:table-cell>
          <table:table-cell table:style-name="ce17" table:formula="of:=TRUE()" office:value-type="boolean" office:boolean-value="true" calcext:value-type="boolean">
            <text:p>TRUE</text:p>
          </table:table-cell>
          <table:table-cell table:style-name="ce14" office:value-type="string" calcext:value-type="string">
            <text:p>Botanical Interest, Inc</text:p>
          </table:table-cell>
          <table:table-cell table:style-name="ce14" office:value-type="string" calcext:value-type="string">
            <text:p>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490" calcext:value-type="float">
            <text:p>1490</text:p>
          </table:table-cell>
          <table:table-cell table:style-name="ce15" office:value-type="string" calcext:value-type="string">
            <text:p>LETTUCE Gourmet Blend (Lactuca sativa)</text:p>
          </table:table-cell>
          <table:table-cell table:style-name="ce15" office:value-type="string" calcext:value-type="string">
            <text:p>5 kinds of Lechuga</text:p>
          </table:table-cell>
          <table:table-cell table:style-name="ce15" office:value-type="string" calcext:value-type="string">
            <text:p>Tower Gardens</text:p>
          </table:table-cell>
          <table:table-cell table:style-name="ce15" office:value-type="string" calcext:value-type="string">
            <text:p>Includes: Prizeleaf, Royal Oak Leaf, Salad Bowl, Red Salad Bown, Ashley. <text:s/>Plant seeds 1/8” below soil surface. Rows should be 12-18” apart.</text:p>
          </table:table-cell>
          <table:table-cell table:style-name="ce15"/>
          <table:table-cell table:style-name="ce15" office:value-type="string" calcext:value-type="string">
            <text:p>10-2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3">
          <table:table-cell office:value-type="float" office:value="1703" calcext:value-type="float">
            <text:p>1703</text:p>
          </table:table-cell>
          <table:table-cell table:style-name="ce15" office:value-type="string" calcext:value-type="string">
            <text:p>TOMATO (Lycopersicon esculentum)</text:p>
          </table:table-cell>
          <table:table-cell table:style-name="ce15" office:value-type="string" calcext:value-type="string">
            <text:p>Abe Lincoln</text:p>
          </table:table-cell>
          <table:table-cell table:style-name="ce14" office:value-type="string" calcext:value-type="string">
            <text:p>Baker Creek Heirloom Seeds</text:p>
          </table:table-cell>
          <table:table-cell table:style-name="ce15" office:value-type="string" calcext:value-type="string">
            <text:p>Start indoors 4-6 weeks before transplant, 1/4” below surface; plant outdoors 24” apart. Large vining plant; full sun; 70-77 days; medium fruit that grows in clusters; great slicer.</text:p>
          </table:table-cell>
          <table:table-cell table:style-name="ce15"/>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table-cell table:style-name="ce6" table:number-columns-repeated="16366"/>
        </table:table-row>
        <table:table-row table:style-name="ro4">
          <table:table-cell office:value-type="float" office:value="1704" calcext:value-type="float">
            <text:p>1704</text:p>
          </table:table-cell>
          <table:table-cell table:style-name="ce14" office:value-type="string" calcext:value-type="string">
            <text:p>TOMATO (Lycopersicon esculentum)</text:p>
          </table:table-cell>
          <table:table-cell table:style-name="ce14" office:value-type="string" calcext:value-type="string">
            <text:p>Ace 55 (Determinate)</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Plant outdoors 24”-36” apart. 1/4” below surface; plant outdoors 36” apart. Majority of fruit ripens over a 1-2 week period about 80 days from transplant. Great for canning.</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4">
          <table:table-cell office:value-type="float" office:value="1677" calcext:value-type="float">
            <text:p>1677</text:p>
          </table:table-cell>
          <table:table-cell table:style-name="ce14" office:value-type="string" calcext:value-type="string">
            <text:p>SQUASH Acorn (Cucubirta pepo)</text:p>
          </table:table-cell>
          <table:table-cell table:style-name="ce14" office:value-type="string" calcext:value-type="string">
            <text:p>Acorn </text:p>
          </table:table-cell>
          <table:table-cell table:style-name="ce14" office:value-type="string" calcext:value-type="string">
            <text:p>Mary Jackson, Master Gardener</text:p>
          </table:table-cell>
          <table:table-cell table:style-name="ce14" office:value-type="string" calcext:value-type="string">
            <text:p>Direct sow outdoors 2-3 seeds <text:s/>1”deep, 3-4 feet apart; thin to 1 healthy plant. <text:s/>Full sun; 75-90 days; Winter squash with distinctive longitudinal ridges on its exterior and sweet yellow orange flesh inside.</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Mary Jackson, Master Gardener</text:p>
          </table:table-cell>
          <table:table-cell table:style-name="ce28" office:value-type="string" calcext:value-type="string">
            <text:p>2017</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2">
          <table:table-cell office:value-type="float" office:value="1521" calcext:value-type="float">
            <text:p>1521</text:p>
          </table:table-cell>
          <table:table-cell table:style-name="ce15" office:value-type="string" calcext:value-type="string">
            <text:p>MELON Kiwano (Cucumis metuliferus)</text:p>
          </table:table-cell>
          <table:table-cell table:style-name="ce15" office:value-type="string" calcext:value-type="string">
            <text:p>African Jelly Melon</text:p>
          </table:table-cell>
          <table:table-cell table:style-name="ce15" office:value-type="string" calcext:value-type="string">
            <text:p>Portal Seed Library</text:p>
          </table:table-cell>
          <table:table-cell table:style-name="ce15" office:value-type="string" calcext:value-type="string">
            <text:p>Also called African horned cucumber/melon. Fruit has horn-like spines. <text:s/>Ripe fruit has orange skin and lime green, jelly-like flesh, refreshingly fruity taste. <text:s/>Likes hottest location; lots of room; fiddles around at first then goes berserk! Soil Temp Range: 60°-100° Optimum: 90°</text:p>
          </table:table-cell>
          <table:table-cell table:style-name="ce15"/>
          <table:table-cell table:style-name="ce15" office:value-type="string" calcext:value-type="string">
            <text:p>10+ Seeds</text:p>
          </table:table-cell>
          <table:table-cell table:style-name="ce15" office:value-type="string" calcext:value-type="string">
            <text:p>Hot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ortal Seed Library</text:p>
          </table:table-cell>
          <table:table-cell table:style-name="ce15"/>
          <table:table-cell table:style-name="ce15" office:value-type="string" calcext:value-type="string">
            <text:p>Tammy Burcar</text:p>
          </table:table-cell>
          <table:table-cell table:style-name="ce28" office:value-type="string" calcext:value-type="string">
            <text:p>2016</text:p>
          </table:table-cell>
          <table:table-cell table:style-name="ce15" office:value-type="string" calcext:value-type="string">
            <text:p>60°-100° Optimum: 90°</text:p>
          </table:table-cell>
          <table:table-cell table:style-name="ce15" office:value-type="string" calcext:value-type="string">
            <text:p>3-4 days</text:p>
          </table:table-cell>
          <table:table-cell/>
          <table:table-cell table:style-name="ce6" table:number-columns-repeated="16366"/>
        </table:table-row>
        <table:table-row table:style-name="ro3">
          <table:table-cell office:value-type="float" office:value="1337" calcext:value-type="float">
            <text:p>1337</text:p>
          </table:table-cell>
          <table:table-cell table:style-name="ce14" office:value-type="string" calcext:value-type="string">
            <text:p>FLOWER Shasta Daisy (Leucanthemum superbum)</text:p>
          </table:table-cell>
          <table:table-cell table:style-name="ce14" office:value-type="string" calcext:value-type="string">
            <text:p>Alaska</text:p>
          </table:table-cell>
          <table:table-cell table:style-name="ce14" office:value-type="string" calcext:value-type="string">
            <text:p>American Seed</text:p>
          </table:table-cell>
          <table:table-cell table:style-name="ce14" office:value-type="string" calcext:value-type="string">
            <text:p>Direct sow outside, plant 1-2 weeks after last frost. Seed depth 1/8”, with 2-3” apart and thin to about 12 inches apart. Pollinator attractor. Fairly drought tolerant</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2">
          <table:table-cell office:value-type="float" office:value="1547" calcext:value-type="float">
            <text:p>1547</text:p>
          </table:table-cell>
          <table:table-cell table:style-name="ce15" office:value-type="string" calcext:value-type="string">
            <text:p>PEA Shell (Pisum sativum)</text:p>
          </table:table-cell>
          <table:table-cell table:style-name="ce15" office:value-type="string" calcext:value-type="string">
            <text:p>Alaska</text:p>
          </table:table-cell>
          <table:table-cell table:style-name="ce14" office:value-type="string" calcext:value-type="string">
            <text:p>American Seed</text:p>
          </table:table-cell>
          <table:table-cell table:style-name="ce15" office:value-type="string" calcext:value-type="string">
            <text:p>Direct sow outdoors; young plants can tolerate a light frost. <text:s/>Plant 1” deep, 2” apart, trellis. Keep weed free. Pick when seeds have enlarged in pod; hold vines when picking to prevent damage to vine. <text:s/>Early harvest; cold resistant; 55-60 days Soil Temp Range: 40°-85° Optimum: 75°</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6-7 days</text:p>
          </table:table-cell>
          <table:table-cell/>
          <table:table-cell table:style-name="ce6" table:number-columns-repeated="16366"/>
        </table:table-row>
        <table:table-row table:style-name="ro2">
          <table:table-cell office:value-type="float" office:value="1208" calcext:value-type="float">
            <text:p>1208</text:p>
          </table:table-cell>
          <table:table-cell table:style-name="ce14" office:value-type="string" calcext:value-type="string">
            <text:p>FLOWER <text:s/>Nasturtium (Tropaeolum majus)</text:p>
          </table:table-cell>
          <table:table-cell table:style-name="ce14" office:value-type="string" calcext:value-type="string">
            <text:p>Alaska Variegated</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Deters garden pests while attracting pollinators. Deer and rabbit resistant. Blossoms and leaves can also be eaten.</text:p>
          </table:table-cell>
          <table:table-cell table:style-name="ce14"/>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2">
          <table:table-cell office:value-type="float" office:value="1102" calcext:value-type="float">
            <text:p>1102</text:p>
          </table:table-cell>
          <table:table-cell table:style-name="ce15" office:value-type="string" calcext:value-type="string">
            <text:p>BEET (Beta vulgaris)</text:p>
          </table:table-cell>
          <table:table-cell table:style-name="ce15" office:value-type="string" calcext:value-type="string">
            <text:p>Albino</text:p>
          </table:table-cell>
          <table:table-cell table:style-name="ce14" office:value-type="string" calcext:value-type="string">
            <text:p>Baker Creek Heirloom Seeds</text:p>
          </table:table-cell>
          <table:table-cell table:style-name="ce15" office:value-type="string" calcext:value-type="string">
            <text:p>Super sweet, pure white heirloom from Holland; sow in ground 2-4 weeks before last frost 1/2 inch deep; 4-6 inches apart; thin to 1 plant every 4 inches; keep soil evenly moist; will cross with other beets or Swiss Chard; greens are good to eat. Soil Temp Range: 40°-95° Optimum: 85°</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table-cell table:style-name="ce6" table:number-columns-repeated="16366"/>
        </table:table-row>
        <table:table-row table:style-name="ro2">
          <table:table-cell office:value-type="float" office:value="1007" calcext:value-type="float">
            <text:p>1007</text:p>
          </table:table-cell>
          <table:table-cell table:style-name="ce15" office:value-type="string" calcext:value-type="string">
            <text:p>AMARANTH (Amaranthus cruentus)</text:p>
          </table:table-cell>
          <table:table-cell table:style-name="ce15" office:value-type="string" calcext:value-type="string">
            <text:p>Alegria</text:p>
          </table:table-cell>
          <table:table-cell table:style-name="ce15"/>
          <table:table-cell table:style-name="ce15" office:value-type="string" calcext:value-type="string">
            <text:p>Blond seeds are edible and rich in lysine, and young leaves are rich in iron and calcium. Plant in warm soil or with summer rains 1/4” deep in basins or rows. Thin to 10-15” apart. Grows taller (up to 9 feet) if soil is enriched with compost. Likes full sun. Used to make traditional confection, made with popped seed and honey.</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table-cell table:style-name="ce6" table:number-columns-repeated="16366"/>
        </table:table-row>
        <table:table-row table:style-name="ro4">
          <table:table-cell office:value-type="float" office:value="1279" calcext:value-type="float">
            <text:p>1279</text:p>
          </table:table-cell>
          <table:table-cell table:style-name="ce14" office:value-type="string" calcext:value-type="string">
            <text:p>FLOWER Hollyhock (Alcea rosea)</text:p>
          </table:table-cell>
          <table:table-cell table:style-name="ce14" office:value-type="string" calcext:value-type="string">
            <text:p>All Yellow Semi-double</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3">
          <table:table-cell office:value-type="float" office:value="1740" calcext:value-type="float">
            <text:p>1740</text:p>
          </table:table-cell>
          <table:table-cell table:style-name="ce15" office:value-type="string" calcext:value-type="string">
            <text:p>WATERMELON (Citrullus lanatus)</text:p>
          </table:table-cell>
          <table:table-cell table:style-name="ce15" office:value-type="string" calcext:value-type="string">
            <text:p>Allsweet</text:p>
          </table:table-cell>
          <table:table-cell table:style-name="ce14" office:value-type="string" calcext:value-type="string">
            <text:p>Ferry Morse</text:p>
          </table:table-cell>
          <table:table-cell table:style-name="ce15" office:value-type="string" calcext:value-type="string">
            <text:p>Direct sow outside after danger of frost. Plant 1/2” deep in hills 6’-8’ feet apart. Full sun; long growing season, rich soil (add compost as they grow). Varieties will cros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4">
          <table:table-cell office:value-type="float" office:value="1203" calcext:value-type="float">
            <text:p>1203</text:p>
          </table:table-cell>
          <table:table-cell table:style-name="ce15" office:value-type="string" calcext:value-type="string">
            <text:p>FLOWER <text:s/>ALYSSUM (Lobularia maritima)</text:p>
          </table:table-cell>
          <table:table-cell table:style-name="ce15" office:value-type="string" calcext:value-type="string">
            <text:p>Allure Pastel Blend</text:p>
          </table:table-cell>
          <table:table-cell table:style-name="ce14" office:value-type="string" calcext:value-type="string">
            <text:p>Botanical Interest, Inc</text:p>
          </table:table-cell>
          <table:table-cell table:style-name="ce15" office:value-type="string" calcext:value-type="string">
            <text:p>Outside, plant 1-2 weeks before average last frost. Fall planting in mild climates for winter bloom. Sow a pinch every 6”. <text:s/>Press seed lightly into soil surface. Light aids germination. Attracts pollinators and is drought and heat tolerant. Deer resistant.</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280" calcext:value-type="float">
            <text:p>1280</text:p>
          </table:table-cell>
          <table:table-cell table:style-name="ce14" office:value-type="string" calcext:value-type="string">
            <text:p>FLOWER Hollyhock (Alcea rosea)</text:p>
          </table:table-cell>
          <table:table-cell table:style-name="ce14" office:value-type="string" calcext:value-type="string">
            <text:p>ALMOST LAVENDER/PINK KISS</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3">
          <table:table-cell office:value-type="float" office:value="1016" calcext:value-type="float">
            <text:p>1016</text:p>
          </table:table-cell>
          <table:table-cell table:style-name="ce15" office:value-type="string" calcext:value-type="string">
            <text:p>AMARANTH (Amaranthus)</text:p>
          </table:table-cell>
          <table:table-cell table:style-name="ce15" office:value-type="string" calcext:value-type="string">
            <text:p>Amaranth</text:p>
          </table:table-cell>
          <table:table-cell table:style-name="ce15"/>
          <table:table-cell table:style-name="ce15" office:value-type="string" calcext:value-type="string">
            <text:p>White seeds are edible and rich in lysine, iron and calcium. Plant in warm soil or with summer rains 1/4” deep in basins or rows. Thin to 10-15” apart. Likes full sun. Crosses with wild A. powelli.</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2">
          <table:table-cell office:value-type="float" office:value="1524" calcext:value-type="float">
            <text:p>1524</text:p>
          </table:table-cell>
          <table:table-cell table:style-name="ce14" office:value-type="string" calcext:value-type="string">
            <text:p>Microgreens (Halian Amaro Blends)</text:p>
          </table:table-cell>
          <table:table-cell table:style-name="ce14" office:value-type="string" calcext:value-type="string">
            <text:p>Amaro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hickly, about 1/2” apart. Press seeds firmly into soil mix and cover about 1/8” with sowing mix. Move containers as need for best light exposure. Harvest about 10-15 days after sowing.</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3">
          <table:table-cell office:value-type="float" office:value="1215" calcext:value-type="float">
            <text:p>1215</text:p>
          </table:table-cell>
          <table:table-cell table:style-name="ce15" office:value-type="string" calcext:value-type="string">
            <text:p>FLOWER <text:s/>Poppy Corn (Papaver rhoeas)</text:p>
          </table:table-cell>
          <table:table-cell table:style-name="ce15" office:value-type="string" calcext:value-type="string">
            <text:p>Amazing Grey</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Attracts pollinators. Deer resistant. Drought and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369" calcext:value-type="float">
            <text:p>1369</text:p>
          </table:table-cell>
          <table:table-cell table:style-name="ce15" office:value-type="string" calcext:value-type="string">
            <text:p>FLOWER Wisteria (Wisteria frutescens)</text:p>
          </table:table-cell>
          <table:table-cell table:style-name="ce15" office:value-type="string" calcext:value-type="string">
            <text:p>American</text:p>
          </table:table-cell>
          <table:table-cell table:style-name="ce15" office:value-type="string" calcext:value-type="string">
            <text:p>Holly Haupt (Master Gardener) </text:p>
          </table:table-cell>
          <table:table-cell table:style-name="ce15" office:value-type="string" calcext:value-type="string">
            <text:p>Soak seeds overnight in warm water before planting 1” in well draining soil in pots. Plant outside after soil is 65 F and plants have 2 sets of leaves and are 4-5” tall. Plant where they have at least 6 hrs of sun and next to a fence or wall. May take several years to bloom.</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table:number-columns-repeated="3"/>
          <table:table-cell table:style-name="ce15" office:value-type="string" calcext:value-type="string">
            <text:p>Sierra Vista, AZ</text:p>
          </table:table-cell>
          <table:table-cell table:style-name="ce15"/>
          <table:table-cell table:style-name="ce15" office:value-type="string" calcext:value-type="string">
            <text:p>Holly Haupt (Master Gardener) Where Grown: Sierra Vista, AZ</text:p>
          </table:table-cell>
          <table:table-cell table:style-name="ce28" office:value-type="string" calcext:value-type="string">
            <text:p>2022</text:p>
          </table:table-cell>
          <table:table-cell table:style-name="ce15"/>
          <table:table-cell table:style-name="ce15" office:value-type="string" calcext:value-type="string">
            <text:p>may take up to 2 months</text:p>
          </table:table-cell>
          <table:table-cell/>
          <table:table-cell table:style-name="ce6" table:number-columns-repeated="16366"/>
        </table:table-row>
        <table:table-row table:style-name="ro3">
          <table:table-cell office:value-type="float" office:value="1216" calcext:value-type="float">
            <text:p>1216</text:p>
          </table:table-cell>
          <table:table-cell table:style-name="ce14" office:value-type="string" calcext:value-type="string">
            <text:p>FLOWER <text:s/>Poppy Corn (Papaver rhoeas)</text:p>
          </table:table-cell>
          <table:table-cell table:style-name="ce14" office:value-type="string" calcext:value-type="string">
            <text:p>American Legion</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633" calcext:value-type="float">
            <text:p>1633</text:p>
          </table:table-cell>
          <table:table-cell table:style-name="ce15" office:value-type="string" calcext:value-type="string">
            <text:p>RUTABAGA (Brassica napus susp. rapifera)</text:p>
          </table:table-cell>
          <table:table-cell table:style-name="ce15" office:value-type="string" calcext:value-type="string">
            <text:p>American Purple Top</text:p>
          </table:table-cell>
          <table:table-cell table:style-name="ce14" office:value-type="string" calcext:value-type="string">
            <text:p>Botanical Interest, Inc</text:p>
          </table:table-cell>
          <table:table-cell table:style-name="ce15" office:value-type="string" calcext:value-type="string">
            <text:p>Sow 1/4” deep, 6-8” apart with rows 18” apart. 30-40 days. Harvest when fully formed, usually about 3-4 inches in diameter. Sweet and rich tasting.</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4-7 days</text:p>
          </table:table-cell>
          <table:table-cell/>
          <table:table-cell table:style-name="ce6" table:number-columns-repeated="16366"/>
        </table:table-row>
        <table:table-row table:style-name="ro5">
          <table:table-cell office:value-type="float" office:value="1597" calcext:value-type="float">
            <text:p>1597</text:p>
          </table:table-cell>
          <table:table-cell table:style-name="ce15" office:value-type="string" calcext:value-type="string">
            <text:p>Pepper Chili (Capsicum annuum)</text:p>
          </table:table-cell>
          <table:table-cell table:style-name="ce15" office:value-type="string" calcext:value-type="string">
            <text:p>Anaheim</text:p>
          </table:table-cell>
          <table:table-cell table:style-name="ce14" office:value-type="string" calcext:value-type="string">
            <text:p>Mary Jackson, Master Gardener</text:p>
          </table:table-cell>
          <table:table-cell table:style-name="ce15" office:value-type="string" calcext:value-type="string">
            <text:p>Start inside 1/4” deep in loose soil 8-10 weeks before last frost. <text:s/>Slow to germinate; need warmth; plant 12- 16” apart in full sun. Size to 6”; 70 to 80 days. <text:s/>Save seeds from fully ripe, slightly shriveled fruit. Can cross pollinate.</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8-10 days</text:p>
          </table:table-cell>
          <table:table-cell/>
          <table:table-cell table:style-name="ce6" table:number-columns-repeated="16366"/>
        </table:table-row>
        <table:table-row table:style-name="ro5">
          <table:table-cell office:value-type="float" office:value="1567" calcext:value-type="float">
            <text:p>1567</text:p>
          </table:table-cell>
          <table:table-cell table:style-name="ce15" office:value-type="string" calcext:value-type="string">
            <text:p>Pepper CHILE (Capsicum annuum)</text:p>
          </table:table-cell>
          <table:table-cell table:style-name="ce14" office:value-type="string" calcext:value-type="string">
            <text:p>Anaheim NuMex Joe E Parker</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2- 16” apart in full sun. Size to 6”; 70 to 80 days. <text:s/>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2">
          <table:table-cell office:value-type="float" office:value="1288" calcext:value-type="float">
            <text:p>1288</text:p>
          </table:table-cell>
          <table:table-cell table:style-name="ce14" office:value-type="string" calcext:value-type="string">
            <text:p>FLOWER Hyssop (Agastache foeniculum)</text:p>
          </table:table-cell>
          <table:table-cell table:style-name="ce14" office:value-type="string" calcext:value-type="string">
            <text:p>Anise Hyssop</text:p>
          </table:table-cell>
          <table:table-cell table:style-name="ce14" office:value-type="string" calcext:value-type="string">
            <text:p>Botanical Interest, Inc</text:p>
          </table:table-cell>
          <table:table-cell table:style-name="ce14" office:value-type="string" calcext:value-type="string">
            <text:p>Sow outside 1 to 2 weeks after last frost. Light aids germination, lightly press into surface and do not cover. May also be sown in late fall for spring germination. Space 12” apart. Attracts pollinators especially bees. <text:s/>Deer resistant. Leaves and flowers can make refreshing, tea. Minty, anise-scented flowers.</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5">
          <table:table-cell office:value-type="float" office:value="1235" calcext:value-type="float">
            <text:p>1235</text:p>
          </table:table-cell>
          <table:table-cell table:style-name="ce15" office:value-type="string" calcext:value-type="string">
            <text:p>FLOWER A Seed Library Variety</text:p>
          </table:table-cell>
          <table:table-cell table:style-name="ce15" office:value-type="string" calcext:value-type="string">
            <text:p>Annual Cut Flower Mix</text:p>
          </table:table-cell>
          <table:table-cell table:style-name="ce15" office:value-type="string" calcext:value-type="string">
            <text:p>Ferry Morse</text:p>
          </table:table-cell>
          <table:table-cell table:style-name="ce15" office:value-type="string" calcext:value-type="string">
            <text:p>Scatter seeds 2-4 weeks before average last frost. Rake seeds in to 1/8”-1/4” depth and water gently and keep moist until plants are established. Varieties include calendula, batchelor button, zinnia, delphinium, baby’s breath, soapwort and more.</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5">
          <table:table-cell office:value-type="float" office:value="1513" calcext:value-type="float">
            <text:p>1513</text:p>
          </table:table-cell>
          <table:table-cell table:style-name="ce14" office:value-type="string" calcext:value-type="string">
            <text:p>Melon - Muskmelon (Cucumis melo var. flexousus)</text:p>
          </table:table-cell>
          <table:table-cell table:style-name="ce14" office:value-type="string" calcext:value-type="string">
            <text:p>Armenian Long</text:p>
          </table:table-cell>
          <table:table-cell table:style-name="ce14"/>
          <table:table-cell table:style-name="ce14" office:value-type="string" calcext:value-type="string">
            <text:p>Closely related to the cucumber that tastes and looks somewhat like a pale cucumber. Plant 1/2” deep in hills 12-24” <text:s/>apart. Fruit can grow up to 24 inches long but is best if harvested at about 12 inche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4 to 6 days</text:p>
          </table:table-cell>
          <table:table-cell/>
          <table:table-cell table:style-name="ce6" table:number-columns-repeated="16366"/>
        </table:table-row>
        <table:table-row table:style-name="ro6">
          <table:table-cell office:value-type="float" office:value="1604" calcext:value-type="float">
            <text:p>1604</text:p>
          </table:table-cell>
          <table:table-cell table:style-name="ce14" office:value-type="string" calcext:value-type="string">
            <text:p>PEPPER, SWEET (Capsicum annuum)</text:p>
          </table:table-cell>
          <table:table-cell table:style-name="ce14" office:value-type="string" calcext:value-type="string">
            <text:p>Arroz Con Pollo</text:p>
          </table:table-cell>
          <table:table-cell table:style-name="ce14" office:value-type="string" calcext:value-type="string">
            <text:p>Baker Creek Heirloom Seeds</text:p>
          </table:table-cell>
          <table:table-cell table:style-name="ce14" office:value-type="string" calcext:value-type="string">
            <text:p>Caribbean “seasoning pepper” - remove the seeds for no heat; harvest orange or red. <text:s/>Start indoors barely covering seeds in loose soil 8-10 weeks before last frost. <text:s/>Very Slow to germinate; need warmth and moisture; plant 12-16” apart in full sun. <text:s/>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3">
          <table:table-cell office:value-type="float" office:value="1026" calcext:value-type="float">
            <text:p>1026</text:p>
          </table:table-cell>
          <table:table-cell table:style-name="ce15" office:value-type="string" calcext:value-type="string">
            <text:p>ARUGULA (Eruca sativa)</text:p>
          </table:table-cell>
          <table:table-cell table:style-name="ce15" office:value-type="string" calcext:value-type="string">
            <text:p>Arugula</text:p>
          </table:table-cell>
          <table:table-cell table:style-name="ce15"/>
          <table:table-cell table:style-name="ce15" office:value-type="string" calcext:value-type="string">
            <text:p>Direct sow 1/4” deep; <text:s/>thin to 6” apart; size 6-12”; 40 days; sun/partial shade; grow year-round in the desert; leaves can be spicier in summertime. <text:s/>Easy to grow.</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3">
          <table:table-cell office:value-type="float" office:value="1042" calcext:value-type="float">
            <text:p>1042</text:p>
          </table:table-cell>
          <table:table-cell table:style-name="ce15" office:value-type="string" calcext:value-type="string">
            <text:p>Baby GREENS (Eruca vesicaria sativa)</text:p>
          </table:table-cell>
          <table:table-cell table:style-name="ce15" office:value-type="string" calcext:value-type="string">
            <text:p>Arugula</text:p>
          </table:table-cell>
          <table:table-cell table:style-name="ce14" office:value-type="string" calcext:value-type="string">
            <text:p>Botanical Interest, Inc</text:p>
          </table:table-cell>
          <table:table-cell table:style-name="ce15"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5"/>
          <table:table-cell table:style-name="ce15" office:value-type="string" calcext:value-type="string">
            <text:p>25-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398" calcext:value-type="float">
            <text:p>1398</text:p>
          </table:table-cell>
          <table:table-cell table:style-name="ce15" office:value-type="string" calcext:value-type="string">
            <text:p>GREENS (Eruca vescaria subsp. sativa)</text:p>
          </table:table-cell>
          <table:table-cell table:style-name="ce15" office:value-type="string" calcext:value-type="string">
            <text:p>Arugula, Baby (Rocket)</text:p>
          </table:table-cell>
          <table:table-cell table:style-name="ce14" office:value-type="string" calcext:value-type="string">
            <text:p>Botanical Interest, Inc</text:p>
          </table:table-cell>
          <table:table-cell table:style-name="ce15" office:value-type="string" calcext:value-type="string">
            <text:p>Plant 1/4” deep in a shallow container in cool season. Does not require thinning. Harvest individual leaves or cut bunches to add to salads or use in stir fry.</text:p>
          </table:table-cell>
          <table:table-cell table:style-name="ce15"/>
          <table:table-cell table:style-name="ce15" office:value-type="string" calcext:value-type="string">
            <text:p>15-18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025" calcext:value-type="float">
            <text:p>1025</text:p>
          </table:table-cell>
          <table:table-cell table:style-name="ce15" office:value-type="string" calcext:value-type="string">
            <text:p>ARUGULA (Eruca sativa)</text:p>
          </table:table-cell>
          <table:table-cell table:style-name="ce15" office:value-type="string" calcext:value-type="string">
            <text:p>ASTRO</text:p>
          </table:table-cell>
          <table:table-cell table:style-name="ce15" office:value-type="string" calcext:value-type="string">
            <text:p>High Mowing</text:p>
          </table:table-cell>
          <table:table-cell table:style-name="ce15" office:value-type="string" calcext:value-type="string">
            <text:p>Direct sow 1/4” deep; <text:s/>thin to 6” apart; size 6-12”; 21-40 days; sun/partial shade; grow year-round in the desert; leaves can be spicier in summertime. <text:s/>Easy to grow.</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1">
          <table:table-cell office:value-type="float" office:value="1615" calcext:value-type="float">
            <text:p>1615</text:p>
          </table:table-cell>
          <table:table-cell table:style-name="ce14" office:value-type="string" calcext:value-type="string">
            <text:p>PUMPKIN (Cucurbita maxima)</text:p>
          </table:table-cell>
          <table:table-cell table:style-name="ce14" office:value-type="string" calcext:value-type="string">
            <text:p>Atlantic Giant</text:p>
          </table:table-cell>
          <table:table-cell table:style-name="ce14" office:value-type="string" calcext:value-type="string">
            <text:p>Botanical Interest, Inc</text:p>
          </table:table-cell>
          <table:table-cell table:style-name="ce14" office:value-type="string" calcext:value-type="string">
            <text:p>Direct sow outdoors 1”deep 2-4 weeks after last frost. Full sun; 120 days. May be</text:p>
          </table:table-cell>
          <table:table-cell table:style-name="ce14" table:number-columns-repeated="3"/>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4 days</text:p>
          </table:table-cell>
          <table:table-cell/>
          <table:table-cell table:style-name="ce6" table:number-columns-repeated="16366"/>
        </table:table-row>
        <table:table-row table:style-name="ro3">
          <table:table-cell office:value-type="float" office:value="1104" calcext:value-type="float">
            <text:p>1104</text:p>
          </table:table-cell>
          <table:table-cell table:style-name="ce14" office:value-type="string" calcext:value-type="string">
            <text:p>BEET (Beta vulgaris)</text:p>
          </table:table-cell>
          <table:table-cell table:style-name="ce14" office:value-type="string" calcext:value-type="string">
            <text:p>Avalanche</text:p>
          </table:table-cell>
          <table:table-cell table:style-name="ce14" office:value-type="string" calcext:value-type="string">
            <text:p>Botanical Interest, Inc</text:p>
          </table:table-cell>
          <table:table-cell table:style-name="ce14" office:value-type="string" calcext:value-type="string">
            <text:p>Sweet, creamy white beet with mild flavor. Direct sow outside early spring or fall. Plant 1/2” deep, 4” apart, in rows 12” apart. Full Sun; 60 days. Fruit matures to 3” diameter.</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6 days</text:p>
          </table:table-cell>
          <table:table-cell/>
          <table:table-cell table:style-name="ce6" table:number-columns-repeated="16366"/>
        </table:table-row>
        <table:table-row table:style-name="ro4">
          <table:table-cell office:value-type="float" office:value="1608" calcext:value-type="float">
            <text:p>1608</text:p>
          </table:table-cell>
          <table:table-cell table:style-name="ce14" office:value-type="string" calcext:value-type="string">
            <text:p>PEPPER, SWEET (Capsicum annuum)</text:p>
          </table:table-cell>
          <table:table-cell table:style-name="ce14" office:value-type="string" calcext:value-type="string">
            <text:p>Banan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Transplant 12-16” apart in full sun/partial shade low desert. Glossy, yellow, sweet 6” fruit. <text:s/>Save seeds from fully ripe, slightly shriveled fruit. Can cross pollinate.</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8-10 days</text:p>
          </table:table-cell>
          <table:table-cell/>
          <table:table-cell table:style-name="ce6" table:number-columns-repeated="16366"/>
        </table:table-row>
        <table:table-row table:style-name="ro3">
          <table:table-cell office:value-type="float" office:value="1482" calcext:value-type="float">
            <text:p>1482</text:p>
          </table:table-cell>
          <table:table-cell table:style-name="ce15" office:value-type="string" calcext:value-type="string">
            <text:p>LEEK (Allium porrum)</text:p>
          </table:table-cell>
          <table:table-cell table:style-name="ce15" office:value-type="string" calcext:value-type="string">
            <text:p>BANDIT</text:p>
          </table:table-cell>
          <table:table-cell table:style-name="ce15" office:value-type="string" calcext:value-type="string">
            <text:p>Johnny’s Seed</text:p>
          </table:table-cell>
          <table:table-cell table:style-name="ce15" office:value-type="string" calcext:value-type="string">
            <text:p>Predominant choice for home gardeners; close relative to onion and garlic; used in soups and stews, salads. <text:s/>Sow indoors, 1/8-1/4” deep; transplant to 6” apart; full sun; 8-10” long, 90-120 days.</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1">
          <table:table-cell office:value-type="float" office:value="1118" calcext:value-type="float">
            <text:p>1118</text:p>
          </table:table-cell>
          <table:table-cell table:style-name="ce15" office:value-type="string" calcext:value-type="string">
            <text:p>BROCCOLI (Brassica oleracea var.italica)</text:p>
          </table:table-cell>
          <table:table-cell table:style-name="ce15" office:value-type="string" calcext:value-type="string">
            <text:p>Bay Meadows</text:p>
          </table:table-cell>
          <table:table-cell table:style-name="ce15" office:value-type="string" calcext:value-type="string">
            <text:p>Johnny’s Seed</text:p>
          </table:table-cell>
          <table:table-cell table:style-name="ce15" office:value-type="string" calcext:value-type="string">
            <text:p>Sow 1/4” deep, 18-24” apart. <text:s/>Full sun. Harvest the main head before the flowers open. Side shoots may be harvested continually.</text:p>
          </table:table-cell>
          <table:table-cell table:style-name="ce15"/>
          <table:table-cell table:style-name="ce15" office:value-type="string" calcext:value-type="string">
            <text:p>18+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7">
          <table:table-cell office:value-type="float" office:value="1699" calcext:value-type="float">
            <text:p>1699</text:p>
          </table:table-cell>
          <table:table-cell table:style-name="ce14" office:value-type="string" calcext:value-type="string">
            <text:p>Three Sisters</text:p>
          </table:table-cell>
          <table:table-cell table:style-name="ce18" office:value-type="string" calcext:value-type="string">
            <text:p>Bean, Common—Cherokee Trail of Tears, Corn, Sweet—Stowell’s Evergreen, Squash, C. moschata—Waltham Butternut </text:p>
          </table:table-cell>
          <table:table-cell table:style-name="ce14" office:value-type="string" calcext:value-type="string">
            <text:p>Bean - D. Hargrove (CCMGA Master Gardener) and seedsavers.org Corn - seedsavers.org Squash - Mary Jackson (CCMGA Master Gardener)</text:p>
          </table:table-cell>
          <table:table-cell table:style-name="ce14" table:number-columns-repeated="3"/>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and/or Original Seed Source: Bean - D. Hargrove (CCMGA Master Gardener) and seedsavers.org Corn - seedsavers.org Squash - Mary Jackson (CCMGA Master Gardener)</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8">
          <table:table-cell office:value-type="float" office:value="1698" calcext:value-type="float">
            <text:p>1698</text:p>
          </table:table-cell>
          <table:table-cell table:style-name="ce15" office:value-type="string" calcext:value-type="string">
            <text:p>Three Sisters</text:p>
          </table:table-cell>
          <table:table-cell table:style-name="ce18" office:value-type="string" calcext:value-type="string">
            <text:p>Bean, Common—Cherokee Trail of Tears, Corn, Sweet—Stowell’s Evergreen, Squash, C.maxima—Navajo Hubbard </text:p>
          </table:table-cell>
          <table:table-cell table:style-name="ce15" office:value-type="string" calcext:value-type="string">
            <text:p>Bean - D. Hargrove (CCMGA Master Gardener) and seedsavers.org Corn - seedsavers.org Squash - Linda Larson (CCMGA Master Gardener)</text:p>
          </table:table-cell>
          <table:table-cell table:style-name="ce15" table:number-columns-repeated="3"/>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and/or Original Seed Source: Bean - D. Hargrove (CCMGA Master Gardener) and seedsavers.org Corn - seedsavers.org Squash - Linda Larson (CCMGA Master Gardener)</text:p>
          </table:table-cell>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3">
          <table:table-cell office:value-type="float" office:value="1364" calcext:value-type="float">
            <text:p>1364</text:p>
          </table:table-cell>
          <table:table-cell table:style-name="ce15" office:value-type="string" calcext:value-type="string">
            <text:p>FLOWER Sweet Pea (Lathyrus odoratus)</text:p>
          </table:table-cell>
          <table:table-cell table:style-name="ce15" office:value-type="string" calcext:value-type="string">
            <text:p>Beaujolais</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7’ to 8’ vine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3">
          <table:table-cell office:value-type="float" office:value="1705" calcext:value-type="float">
            <text:p>1705</text:p>
          </table:table-cell>
          <table:table-cell table:style-name="ce14" office:value-type="string" calcext:value-type="string">
            <text:p>TOMATO (Lycopersicon esculentum)</text:p>
          </table:table-cell>
          <table:table-cell table:style-name="ce14" office:value-type="string" calcext:value-type="string">
            <text:p>Beefsteak</text:p>
          </table:table-cell>
          <table:table-cell table:style-name="ce14" office:value-type="string" calcext:value-type="string">
            <text:p>Botanical Interest, Inc</text:p>
          </table:table-cell>
          <table:table-cell table:style-name="ce14" office:value-type="string" calcext:value-type="string">
            <text:p>Start indoors 4-6 weeks before transplant, 1/4” below surface; plant outdoors 24” apart. Large vining plant; full sun; 80 days; Large fruit and great slicer.</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0 days</text:p>
          </table:table-cell>
          <table:table-cell/>
          <table:table-cell table:style-name="ce6" table:number-columns-repeated="16366"/>
        </table:table-row>
        <table:table-row table:style-name="ro1">
          <table:table-cell office:value-type="float" office:value="1189" calcext:value-type="float">
            <text:p>1189</text:p>
          </table:table-cell>
          <table:table-cell table:style-name="ce15" office:value-type="string" calcext:value-type="string">
            <text:p>CUCUMBER (Cucumis sativus)</text:p>
          </table:table-cell>
          <table:table-cell table:style-name="ce15" office:value-type="string" calcext:value-type="string">
            <text:p>Beit Alpha Grown</text:p>
          </table:table-cell>
          <table:table-cell table:style-name="ce14" office:value-type="string" calcext:value-type="string">
            <text:p>Native Seed/SEARCH <text:s/>www.nativeseeds.org</text:p>
          </table:table-cell>
          <table:table-cell table:style-name="ce15" office:value-type="string" calcext:value-type="string">
            <text:p>Heat tolerant, slicing/pickling, pick when 6-8” long, resists powdery mildew Soil Temp Range: 60°-105° Optimum: 9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60°-105° Optimum: 95°</text:p>
          </table:table-cell>
          <table:table-cell table:style-name="ce15" office:value-type="string" calcext:value-type="string">
            <text:p>4 to 6 days</text:p>
          </table:table-cell>
          <table:table-cell/>
          <table:table-cell table:style-name="ce6" table:number-columns-repeated="16366"/>
        </table:table-row>
        <table:table-row table:style-name="ro3">
          <table:table-cell office:value-type="float" office:value="1117" calcext:value-type="float">
            <text:p>1117</text:p>
          </table:table-cell>
          <table:table-cell table:style-name="ce14" office:value-type="string" calcext:value-type="string">
            <text:p>BROCCOLI (Brassica oleracea var. italica)</text:p>
          </table:table-cell>
          <table:table-cell table:style-name="ce14" office:value-type="string" calcext:value-type="string">
            <text:p>Belstar</text:p>
          </table:table-cell>
          <table:table-cell table:style-name="ce14" office:value-type="string" calcext:value-type="string">
            <text:p>Botanical Interest, Inc</text:p>
          </table:table-cell>
          <table:table-cell table:style-name="ce14" office:value-type="string" calcext:value-type="string">
            <text:p>Sow indoors 6 weeks before first <text:s/>frost, 1/8” deep. At transplant, plant 24-30” apart. 65-70 days, full sun. Handles heat stress better than most.</text:p>
          </table:table-cell>
          <table:table-cell table:style-name="ce14" table:number-columns-repeated="2"/>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7-14 days</text:p>
          </table:table-cell>
          <table:table-cell/>
          <table:table-cell table:style-name="ce6" table:number-columns-repeated="16366"/>
        </table:table-row>
        <table:table-row table:style-name="ro3">
          <table:table-cell office:value-type="float" office:value="1711" calcext:value-type="float">
            <text:p>1711</text:p>
          </table:table-cell>
          <table:table-cell table:style-name="ce15" office:value-type="string" calcext:value-type="string">
            <text:p>TOMATO (Lycopersicon esculentum)</text:p>
          </table:table-cell>
          <table:table-cell table:style-name="ce15" office:value-type="string" calcext:value-type="string">
            <text:p>Big Boy (indeterminate) Hybrid</text:p>
          </table:table-cell>
          <table:table-cell table:style-name="ce14" office:value-type="string" calcext:value-type="string">
            <text:p>Ferry Morse</text:p>
          </table:table-cell>
          <table:table-cell table:style-name="ce15" office:value-type="string" calcext:value-type="string">
            <text:p>Start indoors 4-6 weeks before transplant, 1/4” below surface; plant outdoors 24” apart. Large vining plant; full sun; 80 days; Large fruit and great slicer.</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table-cell table:style-name="ce6" table:number-columns-repeated="16366"/>
        </table:table-row>
        <table:table-row table:style-name="ro4">
          <table:table-cell office:value-type="float" office:value="1594" calcext:value-type="float">
            <text:p>1594</text:p>
          </table:table-cell>
          <table:table-cell table:style-name="ce14" office:value-type="string" calcext:value-type="string">
            <text:p>PEPPER CHILE (Capsicum chinense)</text:p>
          </table:table-cell>
          <table:table-cell table:style-name="ce14" office:value-type="string" calcext:value-type="string">
            <text:p>Biquinho Red &amp; Yellow Blend</text:p>
          </table:table-cell>
          <table:table-cell table:style-name="ce14" office:value-type="string" calcext:value-type="string">
            <text:p>Botanical Interest, Inc</text:p>
          </table:table-cell>
          <table:table-cell table:style-name="ce14" office:value-type="string" calcext:value-type="string">
            <text:p>Start inside 1/4” deep in loose soil 8- 10 weeks before last frost. Transplant outside 2-4 weeks after last frost 12-16” apart in full sun. Peppers turn either yellow or red with unique shape. Tangy &amp; sweet followed with a touch of hea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table-cell table:style-name="ce6" table:number-columns-repeated="16366"/>
        </table:table-row>
        <table:table-row table:style-name="ro4">
          <table:table-cell office:value-type="float" office:value="1389" calcext:value-type="float">
            <text:p>1389</text:p>
          </table:table-cell>
          <table:table-cell table:style-name="ce15" office:value-type="string" calcext:value-type="string">
            <text:p>GOURD (Lagenaria siceraria)</text:p>
          </table:table-cell>
          <table:table-cell table:style-name="ce15" office:value-type="string" calcext:value-type="string">
            <text:p>Birdhouse Bottle Gourd</text:p>
          </table:table-cell>
          <table:table-cell table:style-name="ce15" office:value-type="string" calcext:value-type="string">
            <text:p>Holly Vennum, Master Gardener</text:p>
          </table:table-cell>
          <table:table-cell table:style-name="ce15"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ierra Vista, AZ</text:p>
          </table:table-cell>
          <table:table-cell table:style-name="ce15"/>
          <table:table-cell table:style-name="ce15" office:value-type="string" calcext:value-type="string">
            <text:p>Holly Vennum, Master Gardener</text:p>
          </table:table-cell>
          <table:table-cell table:style-name="ce28" office:value-type="string" calcext:value-type="string">
            <text:p>2021</text:p>
          </table:table-cell>
          <table:table-cell table:style-name="ce15" office:value-type="string" calcext:value-type="string">
            <text:p>70– 85 Optimum: 85°</text:p>
          </table:table-cell>
          <table:table-cell table:style-name="ce15" office:value-type="string" calcext:value-type="string">
            <text:p>3-10 days</text:p>
          </table:table-cell>
          <table:table-cell/>
          <table:table-cell table:style-name="ce6" table:number-columns-repeated="16366"/>
        </table:table-row>
        <table:table-row table:style-name="ro2">
          <table:table-cell office:value-type="float" office:value="1192" calcext:value-type="float">
            <text:p>1192</text:p>
          </table:table-cell>
          <table:table-cell table:style-name="ce14" office:value-type="string" calcext:value-type="string">
            <text:p>EGGPLANT (Solanum melongena)</text:p>
          </table:table-cell>
          <table:table-cell table:style-name="ce14" office:value-type="string" calcext:value-type="string">
            <text:p>Black Beauty</text:p>
          </table:table-cell>
          <table:table-cell table:style-name="ce14" office:value-type="string" calcext:value-type="string">
            <text:p>Botanical Interest, Inc</text:p>
          </table:table-cell>
          <table:table-cell table:style-name="ce14" office:value-type="string" calcext:value-type="string">
            <text:p>Start indoors 8-10 weeks before last average frost or direct sow after frost. Sow seeds 1/2” deep. Transplant 24” apart. Full sun. Best when harvested at peak; when skin is tender no need to peel. Pick when glossy and dark purple. Skin should not spring back when pressed with thumb.</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20 days</text:p>
          </table:table-cell>
          <table:table-cell/>
          <table:table-cell table:style-name="ce6" table:number-columns-repeated="16366"/>
        </table:table-row>
        <table:table-row table:style-name="ro4">
          <table:table-cell office:value-type="float" office:value="1688" calcext:value-type="float">
            <text:p>1688</text:p>
          </table:table-cell>
          <table:table-cell table:style-name="ce15" office:value-type="string" calcext:value-type="string">
            <text:p>SQUASH Zucchini (Cucubirta pepo)</text:p>
          </table:table-cell>
          <table:table-cell table:style-name="ce15" office:value-type="string" calcext:value-type="string">
            <text:p>Black Beauty</text:p>
          </table:table-cell>
          <table:table-cell table:style-name="ce15" office:value-type="string" calcext:value-type="string">
            <text:p>Ferry Morse</text:p>
          </table:table-cell>
          <table:table-cell table:style-name="ce15" office:value-type="string" calcext:value-type="string">
            <text:p>Plant outdoors 2-3 seeds 1”deep, 3-4 feet apart; thin to 1 healthy plant. <text:s/>Prolific, long harvest. Pick regularly to encourage fruit development; best flavor when skin is thin. <text:s/>Will cross with other squash. <text:s/>55-60 days</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9">
          <table:table-cell office:value-type="float" office:value="1082" calcext:value-type="float">
            <text:p>1082</text:p>
          </table:table-cell>
          <table:table-cell table:style-name="ce15" office:value-type="string" calcext:value-type="string">
            <text:p>BEAN, RUNNER (Phaseolus coccineus)</text:p>
          </table:table-cell>
          <table:table-cell table:style-name="ce15" office:value-type="string" calcext:value-type="string">
            <text:p>Black Coat (Heirloom dating to 1600’s)</text:p>
          </table:table-cell>
          <table:table-cell table:style-name="ce14" office:value-type="string" calcext:value-type="string">
            <text:p>Baker Creek Heirloom Seeds</text:p>
          </table:table-cell>
          <table:table-cell table:style-name="ce15" office:value-type="string" calcext:value-type="string">
            <text:p>Produce 3-4” pods that can be eaten as snap bean or as a dry bean. Direct sow 2 weeks before last frost 1-2” deep, 6” apart, full sun. Must trellis. Keep snaps well picked; production slows as seeds mature. <text:s/>Gorgeous blooms of tangerine to cherry red that hummingbirds love! Mature beans change from pink to purple to ebony. <text:s/>Fantastic used like a kidney bean. <text:s/>Creamy texture. Soil Temp Range: 60°-95° Optimum: 80°</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table-cell table:style-name="ce6" table:number-columns-repeated="16366"/>
        </table:table-row>
        <table:table-row table:style-name="ro3">
          <table:table-cell office:value-type="float" office:value="1335" calcext:value-type="float">
            <text:p>1335</text:p>
          </table:table-cell>
          <table:table-cell table:style-name="ce15" office:value-type="string" calcext:value-type="string">
            <text:p>FLOWER Scabiosa Pincushion (Sixalix atropurpurea)</text:p>
          </table:table-cell>
          <table:table-cell table:style-name="ce15" office:value-type="string" calcext:value-type="string">
            <text:p>Black Knight</text:p>
          </table:table-cell>
          <table:table-cell table:style-name="ce14" office:value-type="string" calcext:value-type="string">
            <text:p>Botanical Interest, Inc</text:p>
          </table:table-cell>
          <table:table-cell table:style-name="ce15" office:value-type="string" calcext:value-type="string">
            <text:p>Plant in fine, moist soil, covering lightly with 1/8” soil. <text:s/>Plant 12” apart in full sun to part shade. <text:s/>Blooms all summer, is fairly drought tolerant and attractive to pollinators. Deer resistant.</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5">
          <table:table-cell office:value-type="float" office:value="1706" calcext:value-type="float">
            <text:p>1706</text:p>
          </table:table-cell>
          <table:table-cell table:style-name="ce15" office:value-type="string" calcext:value-type="string">
            <text:p>TOMATO (Lycopersicon esculentum)</text:p>
          </table:table-cell>
          <table:table-cell table:style-name="ce15" office:value-type="string" calcext:value-type="string">
            <text:p>Black Krim</text:p>
          </table:table-cell>
          <table:table-cell table:style-name="ce14" office:value-type="string" calcext:value-type="string">
            <text:p>Botanical Interest, Inc</text:p>
          </table:table-cell>
          <table:table-cell table:style-name="ce15" office:value-type="string" calcext:value-type="string">
            <text:p>Start indoors 4-6 weeks before transplant. Sow 1/4” below surface in containers. Transplant 1-2 weeks after last frost. ; plant outdoors 24”-36” apart. Matures 70-90 days from transplant. Best eaten fresh.</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2">
          <table:table-cell office:value-type="float" office:value="1239" calcext:value-type="float">
            <text:p>1239</text:p>
          </table:table-cell>
          <table:table-cell table:style-name="ce14" office:value-type="string" calcext:value-type="string">
            <text:p>FLOWER Bachelor’s Button (Centaurea cyanus)</text:p>
          </table:table-cell>
          <table:table-cell table:style-name="ce14" office:value-type="string" calcext:value-type="string">
            <text:p>Black Magic</text:p>
          </table:table-cell>
          <table:table-cell table:style-name="ce14" office:value-type="string" calcext:value-type="string">
            <text:p>Botanical Interest, Inc</text:p>
          </table:table-cell>
          <table:table-cell table:style-name="ce14" office:value-type="string" calcext:value-type="string">
            <text:p>Drought tolerant, deer resistant and makes great cut or dried flowers. Self sows for continual growing . Direct sow 1-2 weeks before average last frost or in late summer for winter blooms. For optimum germination, chill seeds in the refrigerator 5 days before planting. Sow 1/4” deep, 8”-10” apart.</text:p>
          </table:table-cell>
          <table:table-cell table:style-name="ce14"/>
          <table:table-cell table:style-name="ce14" office:value-type="string" calcext:value-type="string">
            <text:p>20-3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1</text:p>
          </table:table-cell>
          <table:table-cell table:style-name="ce14" table:number-columns-repeated="2"/>
          <table:table-cell/>
          <table:table-cell table:style-name="ce6" table:number-columns-repeated="16366"/>
        </table:table-row>
        <table:table-row table:style-name="ro3">
          <table:table-cell office:value-type="float" office:value="1338" calcext:value-type="float">
            <text:p>1338</text:p>
          </table:table-cell>
          <table:table-cell table:style-name="ce15" office:value-type="string" calcext:value-type="string">
            <text:p>FLOWER Snapdragon (Antirrhinum majus)</text:p>
          </table:table-cell>
          <table:table-cell table:style-name="ce15" office:value-type="string" calcext:value-type="string">
            <text:p>Black Prince</text:p>
          </table:table-cell>
          <table:table-cell table:style-name="ce14" office:value-type="string" calcext:value-type="string">
            <text:p>Botanical Interest, Inc</text:p>
          </table:table-cell>
          <table:table-cell table:style-name="ce15" office:value-type="string" calcext:value-type="string">
            <text:p>Sow outside late summer to early fall. Light aids germination. Press seeds into soil surface. Space 6” apart. Attracts pollinators. Deer resistant.</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4">
          <table:table-cell office:value-type="float" office:value="1087" calcext:value-type="float">
            <text:p>1087</text:p>
          </table:table-cell>
          <table:table-cell table:style-name="ce14" office:value-type="string" calcext:value-type="string">
            <text:p>BEAN, TEPARY (Phaseolus acutifolius)</text:p>
          </table:table-cell>
          <table:table-cell table:style-name="ce14" office:value-type="string" calcext:value-type="string">
            <text:p>Black S-Chuuk Bavi </text:p>
          </table:table-cell>
          <table:table-cell table:style-name="ce14" office:value-type="string" calcext:value-type="string">
            <text:p>Native Seed/SEARCH <text:s/>www.nativeseeds.org</text:p>
          </table:table-cell>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9</text:p>
          </table:table-cell>
          <table:table-cell table:style-name="ce14" table:number-columns-repeated="2"/>
          <table:table-cell/>
          <table:table-cell table:style-name="ce6" table:number-columns-repeated="16366"/>
        </table:table-row>
        <table:table-row table:style-name="ro4">
          <table:table-cell office:value-type="float" office:value="1327" calcext:value-type="float">
            <text:p>1327</text:p>
          </table:table-cell>
          <table:table-cell table:style-name="ce14" office:value-type="string" calcext:value-type="string">
            <text:p>FLOWER Poppy Breadseed (Papaver Somniferum)</text:p>
          </table:table-cell>
          <table:table-cell table:style-name="ce14" office:value-type="string" calcext:value-type="string">
            <text:p>Black Swan - Poppy Breadseed </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4"/>
          <table:table-cell table:style-name="ce14" office:value-type="string" calcext:value-type="string">
            <text:p>15-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070" calcext:value-type="float">
            <text:p>1070</text:p>
          </table:table-cell>
          <table:table-cell table:style-name="ce15" office:value-type="string" calcext:value-type="string">
            <text:p>BEAN, COMMON (Phaseolus vulgaris)</text:p>
          </table:table-cell>
          <table:table-cell table:style-name="ce15" office:value-type="string" calcext:value-type="string">
            <text:p>Black Turtle—Dry Bean</text:p>
          </table:table-cell>
          <table:table-cell table:style-name="ce15" office:value-type="string" calcext:value-type="string">
            <text:p>Patriot Seeds</text:p>
          </table:table-cell>
          <table:table-cell table:style-name="ce15" office:value-type="string" calcext:value-type="string">
            <text:p>Direct sow outdoors after last frost. <text:s/>Plant 1” deep, 4” apart; half-runner type (needs support). <text:s/>Used in Mexican, Creole, and Cajun recipes. Soil Temp Range: 60°-95° Optimum: 80°</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60°-95° Optimum: 80°</text:p>
          </table:table-cell>
          <table:table-cell table:style-name="ce15" office:value-type="string" calcext:value-type="string">
            <text:p>6-7 days</text:p>
          </table:table-cell>
          <table:table-cell/>
          <table:table-cell table:style-name="ce6" table:number-columns-repeated="16366"/>
        </table:table-row>
        <table:table-row table:style-name="ro1">
          <table:table-cell office:value-type="float" office:value="1367" calcext:value-type="float">
            <text:p>1367</text:p>
          </table:table-cell>
          <table:table-cell table:style-name="ce14" office:value-type="string" calcext:value-type="string">
            <text:p>FLOWER Thunbergia (Rudbeckia hirta)</text:p>
          </table:table-cell>
          <table:table-cell table:style-name="ce14" office:value-type="string" calcext:value-type="string">
            <text:p>Black-eyed Susan</text:p>
          </table:table-cell>
          <table:table-cell table:style-name="ce14" office:value-type="string" calcext:value-type="string">
            <text:p>Ferry Morse</text:p>
          </table:table-cell>
          <table:table-cell table:style-name="ce14" office:value-type="string" calcext:value-type="string">
            <text:p>Direct sow, pressing into surface about 18 inches apart. Start indoors, 8-10 weeks before last frost. Attracts pollinato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3">
          <table:table-cell office:value-type="float" office:value="1650" calcext:value-type="float">
            <text:p>1650</text:p>
          </table:table-cell>
          <table:table-cell table:style-name="ce14" office:value-type="string" calcext:value-type="string">
            <text:p>SPINACH (Spinacia oleracea)</text:p>
          </table:table-cell>
          <table:table-cell table:style-name="ce14" office:value-type="string" calcext:value-type="string">
            <text:p>Bloomsdale</text:p>
          </table:table-cell>
          <table:table-cell table:style-name="ce14" office:value-type="string" calcext:value-type="string">
            <text:p>Seed Treasures Open-Pollinated and Heirloom </text:p>
          </table:table-cell>
          <table:table-cell table:style-name="ce14" office:value-type="string" calcext:value-type="string">
            <text:p>Direct sow in early spring &amp; late summer, 1/2” deep, thin to 1” apart, rows 12” apart. Soil Temp Range: 35°-85° Optimum: 70°</text:p>
          </table:table-cell>
          <table:table-cell table:style-name="ce14"/>
          <table:table-cell table:style-name="ce14" office:value-type="string" calcext:value-type="string">
            <text:p>45-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table-cell table:style-name="ce6" table:number-columns-repeated="16366"/>
        </table:table-row>
        <table:table-row table:style-name="ro3">
          <table:table-cell office:value-type="float" office:value="1651" calcext:value-type="float">
            <text:p>1651</text:p>
          </table:table-cell>
          <table:table-cell table:style-name="ce15" office:value-type="string" calcext:value-type="string">
            <text:p>SPINACH (Spinacia oleracea)</text:p>
          </table:table-cell>
          <table:table-cell table:style-name="ce15" office:value-type="string" calcext:value-type="string">
            <text:p>Bloomsdale Long Standing</text:p>
          </table:table-cell>
          <table:table-cell table:style-name="ce15"/>
          <table:table-cell table:style-name="ce15" office:value-type="string" calcext:value-type="string">
            <text:p>Direct sow in early spring &amp; late summer, 1/2” deep, thin to 12” apart, rows 12” apart. Harvest outer leaves when ready. Soil Temp Range: 35°-85° Optimum: 7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35°-85° Optimum: 70°</text:p>
          </table:table-cell>
          <table:table-cell table:style-name="ce15" office:value-type="string" calcext:value-type="string">
            <text:p>5-6 days</text:p>
          </table:table-cell>
          <table:table-cell/>
          <table:table-cell table:style-name="ce6" table:number-columns-repeated="16366"/>
        </table:table-row>
        <table:table-row table:style-name="ro4">
          <table:table-cell office:value-type="float" office:value="1199" calcext:value-type="float">
            <text:p>1199</text:p>
          </table:table-cell>
          <table:table-cell table:style-name="ce15" office:value-type="string" calcext:value-type="string">
            <text:p>Flax (Linum perenne)</text:p>
          </table:table-cell>
          <table:table-cell table:style-name="ce15" office:value-type="string" calcext:value-type="string">
            <text:p>Blue and Breezy</text:p>
          </table:table-cell>
          <table:table-cell table:style-name="ce14" office:value-type="string" calcext:value-type="string">
            <text:p>Botanical Interest, Inc</text:p>
          </table:table-cell>
          <table:table-cell table:style-name="ce15" office:value-type="string" calcext:value-type="string">
            <text:p>Press gently into soil, a pinch of seeds every 4-8 inches 4-6 weeks before average last frost or fall for spring germination. Grows well in poor, dry soil. Sky blue flowers attract pollinators and seeds attract wild birds.</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240" calcext:value-type="float">
            <text:p>1240</text:p>
          </table:table-cell>
          <table:table-cell table:style-name="ce14" office:value-type="string" calcext:value-type="string">
            <text:p>FLOWER Bachelor’s Button (Centaurea cyanus)</text:p>
          </table:table-cell>
          <table:table-cell table:style-name="ce15" office:value-type="string" calcext:value-type="string">
            <text:p>Blue Boy</text:p>
          </table:table-cell>
          <table:table-cell table:style-name="ce14" office:value-type="string" calcext:value-type="string">
            <text:p>Botanical Interest, Inc</text:p>
          </table:table-cell>
          <table:table-cell table:style-name="ce15" office:value-type="string" calcext:value-type="string">
            <text:p>Drought tolerant, deer resistant and makes great cut or dried flowers. Self sows for continual growing . Direct sow 1-2 weeks before average last frost or in late summer for winter blooms. For optimum germination, chill seeds in the refrigerator 5 days before planting. Sow 1/4” deep, 8”-10” apart.</text:p>
          </table:table-cell>
          <table:table-cell table:style-name="ce15"/>
          <table:table-cell table:style-name="ce15" office:value-type="string" calcext:value-type="string">
            <text:p>20-30 Seeds</text:p>
          </table:table-cell>
          <table:table-cell table:style-name="ce15" office:value-type="string" calcext:value-type="string">
            <text:p>Al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059" calcext:value-type="float">
            <text:p>1059</text:p>
          </table:table-cell>
          <table:table-cell table:style-name="ce14" office:value-type="string" calcext:value-type="string">
            <text:p>BEAN, COMMON (Phaseolus vulgaris)</text:p>
          </table:table-cell>
          <table:table-cell table:style-name="ce14" office:value-type="string" calcext:value-type="string">
            <text:p>Blue Lake - Green Bean, Pole Type</text:p>
          </table:table-cell>
          <table:table-cell table:style-name="ce14" office:value-type="string" calcext:value-type="string">
            <text:p>Ferry Morse</text:p>
          </table:table-cell>
          <table:table-cell table:style-name="ce14" office:value-type="string" calcext:value-type="string">
            <text:p>Plant early spring after frost and soil temp higher than 60 degrees. Direct sow 1-2” deep, 2-3” apart. Grow on trellis, 5-6” dark green pods; 55 days. <text:s/>Great for canning/freezing/eating raw. <text:s/>Will cross with other bean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number-columns-repeated="2" table:style-name="ce14" office:value-type="string" calcext:value-type="string">
            <text:p>6-7 days</text:p>
          </table:table-cell>
          <table:table-cell/>
          <table:table-cell table:style-name="ce6" table:number-columns-repeated="16366"/>
        </table:table-row>
        <table:table-row table:style-name="ro4">
          <table:table-cell office:value-type="float" office:value="1088" calcext:value-type="float">
            <text:p>1088</text:p>
          </table:table-cell>
          <table:table-cell table:style-name="ce15" office:value-type="string" calcext:value-type="string">
            <text:p>BEAN, TEPARY (Phaseolus acutifolius)</text:p>
          </table:table-cell>
          <table:table-cell table:style-name="ce15" office:value-type="string" calcext:value-type="string">
            <text:p>Blue Speckled</text:p>
          </table:table-cell>
          <table:table-cell table:style-name="ce14" office:value-type="string" calcext:value-type="string">
            <text:p>Native Seed/SEARCH <text:s/>www.nativeseeds.org</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table:number-columns-repeated="2"/>
          <table:table-cell/>
          <table:table-cell table:style-name="ce6" table:number-columns-repeated="16366"/>
        </table:table-row>
        <table:table-row table:style-name="ro4">
          <table:table-cell office:value-type="float" office:value="1333" calcext:value-type="float">
            <text:p>1333</text:p>
          </table:table-cell>
          <table:table-cell table:style-name="ce15" office:value-type="string" calcext:value-type="string">
            <text:p>FLOWER Salvia (Salvia farinacea)</text:p>
          </table:table-cell>
          <table:table-cell table:style-name="ce15" office:value-type="string" calcext:value-type="string">
            <text:p>Blue Victory</text:p>
          </table:table-cell>
          <table:table-cell table:style-name="ce14" office:value-type="string" calcext:value-type="string">
            <text:p>Botanical Interest, Inc</text:p>
          </table:table-cell>
          <table:table-cell table:style-name="ce15" office:value-type="string" calcext:value-type="string">
            <text:p>Sow outside 1 to 2 weeks after last average frost. Light aids germination. Press seeds into soil surface. Space 12” apart. Attracts pollinators. Deer resistant. Fairly drought tolerant once established. Makes excellent cut or dried flower.</text:p>
          </table:table-cell>
          <table:table-cell table:style-name="ce15"/>
          <table:table-cell table:style-name="ce15" office:value-type="string" calcext:value-type="string">
            <text:p>10-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232" calcext:value-type="float">
            <text:p>1232</text:p>
          </table:table-cell>
          <table:table-cell table:style-name="ce14" office:value-type="string" calcext:value-type="string">
            <text:p>FLOWER (Phacelia companularia)</text:p>
          </table:table-cell>
          <table:table-cell table:style-name="ce14" office:value-type="string" calcext:value-type="string">
            <text:p>Bluebells</text:p>
          </table:table-cell>
          <table:table-cell table:style-name="ce14" office:value-type="string" calcext:value-type="string">
            <text:p>Botanical Interest, Inc</text:p>
          </table:table-cell>
          <table:table-cell table:style-name="ce14" office:value-type="string" calcext:value-type="string">
            <text:p>Plant outside plant 2-4 weeks before average last frost. Plant 1/16” deep, 6” apart. Attracts bees. Drought tolerant once established. Deer resistant.</text:p>
          </table:table-cell>
          <table:table-cell table:style-name="ce14"/>
          <table:table-cell table:style-name="ce14" office:value-type="string" calcext:value-type="string">
            <text:p>4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128" calcext:value-type="float">
            <text:p>1128</text:p>
          </table:table-cell>
          <table:table-cell table:style-name="ce15" office:value-type="string" calcext:value-type="string">
            <text:p>CABBAGE (Brassica rapa subsp. narinosa)</text:p>
          </table:table-cell>
          <table:table-cell table:style-name="ce15" office:value-type="string" calcext:value-type="string">
            <text:p>Bok Choy Tatsoi</text:p>
          </table:table-cell>
          <table:table-cell table:style-name="ce14" office:value-type="string" calcext:value-type="string">
            <text:p>Botanical Interest, Inc</text:p>
          </table:table-cell>
          <table:table-cell table:style-name="ce15" office:value-type="string" calcext:value-type="string">
            <text:p>Quick growing, non-heading, ancient Chinese cabbage. Direct sow 1/4” under soil surface 24 inches apart. Frost and very cold tolerant. More flavorful than regular bok choy. Ready to harvest in about 45 days. Seed saving biennial from seed stalk the second year.</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6">
          <table:table-cell office:value-type="float" office:value="1078" calcext:value-type="float">
            <text:p>1078</text:p>
          </table:table-cell>
          <table:table-cell table:style-name="ce15" office:value-type="string" calcext:value-type="string">
            <text:p>BEAN, HALF-RUNNER (Phaseolus coccineus)</text:p>
          </table:table-cell>
          <table:table-cell table:style-name="ce15" office:value-type="string" calcext:value-type="string">
            <text:p>Bolita (original variety brought by Spanish to New Mexico)</text:p>
          </table:table-cell>
          <table:table-cell table:style-name="ce14" office:value-type="string" calcext:value-type="string">
            <text:p>Baker Creek Heirloom Seeds</text:p>
          </table:table-cell>
          <table:table-cell table:style-name="ce15" office:value-type="string" calcext:value-type="string">
            <text:p>Early producing vines. <text:s/>As dry bean, better than Pinto, cooks fast with creamy texture. <text:s/>Can be eaten as snap bean. Direct sow 1- 2” deep, 6” apart after last frost in full sun. Must trellis. Keep snaps picked or let pods dry on vine for dry bean. <text:s/>This small, creamy tan bean is the tastiest part of several centuries of New Mexico history.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table-cell table:style-name="ce6" table:number-columns-repeated="16366"/>
        </table:table-row>
        <table:table-row table:style-name="ro2">
          <table:table-cell office:value-type="float" office:value="1423" calcext:value-type="float">
            <text:p>1423</text:p>
          </table:table-cell>
          <table:table-cell table:style-name="ce15" office:value-type="string" calcext:value-type="string">
            <text:p>HERB Borage (Borage officinalis)</text:p>
          </table:table-cell>
          <table:table-cell table:style-name="ce15" office:value-type="string" calcext:value-type="string">
            <text:p>BORAGE</text:p>
          </table:table-cell>
          <table:table-cell table:style-name="ce14" office:value-type="string" calcext:value-type="string">
            <text:p>Botanical Interest, Inc</text:p>
          </table:table-cell>
          <table:table-cell table:style-name="ce15" office:value-type="string" calcext:value-type="string">
            <text:p>Direct sow early spring to mid-summer; sow NO DEEPER than 1/2 inch; prefers full sun and fairly rich, well drained soil. Plant with tomatoes to deter bugs. Cucumber-flavored fresh leaves add to salads, cooked, or made into a cooling drink. Beautiful blue flowers. <text:s/>Also used medicinall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6">
          <table:table-cell office:value-type="float" office:value="1048" calcext:value-type="float">
            <text:p>1048</text:p>
          </table:table-cell>
          <table:table-cell table:style-name="ce14" office:value-type="string" calcext:value-type="string">
            <text:p>BEAN, COMMON (Phaseolus vulgaris)</text:p>
          </table:table-cell>
          <table:table-cell table:style-name="ce14" office:value-type="string" calcext:value-type="string">
            <text:p>Borlotto di Vigevano Nano, Bush Type </text:p>
          </table:table-cell>
          <table:table-cell table:style-name="ce14" office:value-type="string" calcext:value-type="string">
            <text:p>Baker Creek Heirloom Seeds</text:p>
          </table:table-cell>
          <table:table-cell table:style-name="ce14" office:value-type="string" calcext:value-type="string">
            <text:p>Straight, round pods splashed with red. Plant early spring after frost and soil temp higher than 60 degrees. Soak beans for 2 hours before planting speeds germination. Direct sow 1-2” deep, 6-12” apart, full sun. Use as snap or dry bean. Keep snap beans well picked since production slows with maturity. 60 day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4">
          <table:table-cell office:value-type="float" office:value="1434" calcext:value-type="float">
            <text:p>1434</text:p>
          </table:table-cell>
          <table:table-cell table:style-name="ce15" office:value-type="string" calcext:value-type="string">
            <text:p>HERB Dill (Anethum graveolens)</text:p>
          </table:table-cell>
          <table:table-cell table:style-name="ce15" office:value-type="string" calcext:value-type="string">
            <text:p>Bouquet</text:p>
          </table:table-cell>
          <table:table-cell table:style-name="ce14" office:value-type="string" calcext:value-type="string">
            <text:p>Botanical Interest, Inc</text:p>
          </table:table-cell>
          <table:table-cell table:style-name="ce15" office:value-type="string" calcext:value-type="string">
            <text:p>Large fragrant heads and abundant seeds. <text:s/>Great for pickling and fresh use. <text:s/>Direct sow by pressing into soil; thin to 8-12” apart; full sun; shelter from wind; will readily volunteer each year by dropping seeds.</text:p>
          </table:table-cell>
          <table:table-cell table:style-name="ce15"/>
          <table:table-cell table:style-name="ce15" office:value-type="string" calcext:value-type="string">
            <text:p>3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20-25 days</text:p>
          </table:table-cell>
          <table:table-cell/>
          <table:table-cell table:style-name="ce6" table:number-columns-repeated="16366"/>
        </table:table-row>
        <table:table-row table:style-name="ro3">
          <table:table-cell office:value-type="float" office:value="1358" calcext:value-type="float">
            <text:p>1358</text:p>
          </table:table-cell>
          <table:table-cell table:style-name="ce14" office:value-type="string" calcext:value-type="string">
            <text:p>FLOWER Sweet Pea (Lathyrus odoratus)</text:p>
          </table:table-cell>
          <table:table-cell table:style-name="ce14" office:value-type="string" calcext:value-type="string">
            <text:p>Bouquet Blend</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7’ to 8’ vines.</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720" calcext:value-type="float">
            <text:p>1720</text:p>
          </table:table-cell>
          <table:table-cell table:style-name="ce14" office:value-type="string" calcext:value-type="string">
            <text:p>TOMATO (Solanaceae)</text:p>
          </table:table-cell>
          <table:table-cell table:style-name="ce14" office:value-type="string" calcext:value-type="string">
            <text:p>Brad’s Atomic Grape</text:p>
          </table:table-cell>
          <table:table-cell table:style-name="ce14" office:value-type="string" calcext:value-type="string">
            <text:p>Baker Creek Heirloom Seeds</text:p>
          </table:table-cell>
          <table:table-cell table:style-name="ce14" office:value-type="string" calcext:value-type="string">
            <text:p>Full blown assault on the senses. <text:s/>Elongated clusters purple stripes turning green/red/brown/blue stripes when mature with green/yellow flesh interior; start indoors 6 weeks before last frost. Sweet, PROLIFIC, Indeterminate. Soil Temp Range: 75°-85° Optimum: 80°</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75°-85° Optimum: 80°</text:p>
          </table:table-cell>
          <table:table-cell table:style-name="ce14" office:value-type="string" calcext:value-type="string">
            <text:p>7 to 10 days</text:p>
          </table:table-cell>
          <table:table-cell/>
          <table:table-cell table:style-name="ce6" table:number-columns-repeated="16366"/>
        </table:table-row>
        <table:table-row table:style-name="ro3">
          <table:table-cell office:value-type="float" office:value="1707" calcext:value-type="float">
            <text:p>1707</text:p>
          </table:table-cell>
          <table:table-cell table:style-name="ce14" office:value-type="string" calcext:value-type="string">
            <text:p>TOMATO (Lycopersicon esculentum)</text:p>
          </table:table-cell>
          <table:table-cell table:style-name="ce14" office:value-type="string" calcext:value-type="string">
            <text:p>Brandywine: Red and Yellow Blend</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Sow 1/4” and thin to one healthy plant for transplant, Plant outdoors 24”-36” apart. <text:s/>76-110 days from transplant.</text:p>
          </table:table-cell>
          <table:table-cell table:style-name="ce14"/>
          <table:table-cell table:style-name="ce14" office:value-type="string" calcext:value-type="string">
            <text:p>6+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4">
          <table:table-cell office:value-type="float" office:value="1368" calcext:value-type="float">
            <text:p>1368</text:p>
          </table:table-cell>
          <table:table-cell table:style-name="ce14" office:value-type="string" calcext:value-type="string">
            <text:p>FLOWER Verbena (Verbena bonariensis)</text:p>
          </table:table-cell>
          <table:table-cell table:style-name="ce14" office:value-type="string" calcext:value-type="string">
            <text:p>Brazilian Vervain</text:p>
          </table:table-cell>
          <table:table-cell table:style-name="ce14" office:value-type="string" calcext:value-type="string">
            <text:p>Botanical Interest, Inc</text:p>
          </table:table-cell>
          <table:table-cell table:style-name="ce14" office:value-type="string" calcext:value-type="string">
            <text:p>Sow outside 2 to 4 weeks before last frost. Stratification (storing in a damp paper towel in refrigerator for 2-4 weeks) hastens germination. Barely cover with dirt. Space 18” to 24” apart. Drought tolerant. Deer resistant. 3’ to 4’ t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3">
          <table:table-cell office:value-type="float" office:value="1260" calcext:value-type="float">
            <text:p>1260</text:p>
          </table:table-cell>
          <table:table-cell table:style-name="ce14" office:value-type="string" calcext:value-type="string">
            <text:p>FLOWER Cosmos (Cosmos sulphureus)</text:p>
          </table:table-cell>
          <table:table-cell table:style-name="ce14" office:value-type="string" calcext:value-type="string">
            <text:p>Bright Lights</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Red, orange and yellow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692" calcext:value-type="float">
            <text:p>1692</text:p>
          </table:table-cell>
          <table:table-cell table:style-name="ce14" office:value-type="string" calcext:value-type="string">
            <text:p>SWISS CHARD (Beta vulgaris)</text:p>
          </table:table-cell>
          <table:table-cell table:style-name="ce14" office:value-type="string" calcext:value-type="string">
            <text:p>Bright Lights</text:p>
          </table:table-cell>
          <table:table-cell table:style-name="ce14" office:value-type="string" calcext:value-type="string">
            <text:p>Ferry Morse</text:p>
          </table:table-cell>
          <table:table-cell table:style-name="ce14" office:value-type="string" calcext:value-type="string">
            <text:p>Sow direct or indoors for transplant, 1/2” deep, 2-4” apart for baby leaf. Thin to 8-12” for full size. Sun/partial shade, 40-60 days. <text:s/>Stalks will be 8-10” tall. Harvest outer leaves as they are ready. Drought and frost tolerant.</text:p>
          </table:table-cell>
          <table:table-cell table:style-name="ce14"/>
          <table:table-cell table:style-name="ce14" office:value-type="string" calcext:value-type="string">
            <text:p>6-8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4">
          <table:table-cell office:value-type="float" office:value="1621" calcext:value-type="float">
            <text:p>1621</text:p>
          </table:table-cell>
          <table:table-cell table:style-name="ce15" office:value-type="string" calcext:value-type="string">
            <text:p>Quinoa (Chenopodium quinoa)</text:p>
          </table:table-cell>
          <table:table-cell table:style-name="ce15" office:value-type="string" calcext:value-type="string">
            <text:p>Brightest Brilliant Rainbow</text:p>
          </table:table-cell>
          <table:table-cell table:style-name="ce14" office:value-type="string" calcext:value-type="string">
            <text:p>Botanical Interest, Inc</text:p>
          </table:table-cell>
          <table:table-cell table:style-name="ce15" office:value-type="string" calcext:value-type="string">
            <text:p>Plant 1/4” deep 12”-18” apart 1-2 weeks after last frost or in winter for maturity prior to summer heat. Fairly drought tolerant. Deer resistant. Various colors like pink, burgundy, red, orange, yellow, white and green.</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4">
          <table:table-cell office:value-type="float" office:value="1219" calcext:value-type="float">
            <text:p>1219</text:p>
          </table:table-cell>
          <table:table-cell table:style-name="ce15" office:value-type="string" calcext:value-type="string">
            <text:p>FLOWER <text:s/>Poppy Oriental (Papaver orientale)</text:p>
          </table:table-cell>
          <table:table-cell table:style-name="ce15" office:value-type="string" calcext:value-type="string">
            <text:p>Brilliant Original</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382" calcext:value-type="float">
            <text:p>1382</text:p>
          </table:table-cell>
          <table:table-cell table:style-name="ce15" office:value-type="string" calcext:value-type="string">
            <text:p>FLOWER, Mixed Seed</text:p>
          </table:table-cell>
          <table:table-cell table:style-name="ce15" office:value-type="string" calcext:value-type="string">
            <text:p>Bring Home the Butterflies Mix </text:p>
          </table:table-cell>
          <table:table-cell table:style-name="ce14" office:value-type="string" calcext:value-type="string">
            <text:p>Botanical Interest, Inc</text:p>
          </table:table-cell>
          <table:table-cell table:style-name="ce15" office:value-type="string" calcext:value-type="string">
            <text:p>Scatter seeds 2-4 weeks before average last frost. Rake seeds in to 1/8”-1/4” depth and water gently and keep moist until plants are established. Varieties include Mexican lupine, Mexican sunflower, calendula, pincushion, coneflower and more.</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246" calcext:value-type="float">
            <text:p>1246</text:p>
          </table:table-cell>
          <table:table-cell table:style-name="ce14" office:value-type="string" calcext:value-type="string">
            <text:p>FLOWER Brittlebush (Encelia farinosa)</text:p>
          </table:table-cell>
          <table:table-cell table:style-name="ce14" office:value-type="string" calcext:value-type="string">
            <text:p>Brittlebush</text:p>
          </table:table-cell>
          <table:table-cell table:style-name="ce23" office:value-type="string" calcext:value-type="string">
            <text:p>Native Seed/SEARCH <text:s/>www.nativeseeds.org</text:p>
          </table:table-cell>
          <table:table-cell table:style-name="ce14" office:value-type="string" calcext:value-type="string">
            <text:p>Sow outside fall or spring. Scarify area to be seeded. Broadcast seed and cover with fine dusting of soil. Drought tolerant. Do not overwater. Seed heads are great for winter interest and birds love them, too.</text:p>
          </table:table-cell>
          <table:table-cell table:style-name="ce14"/>
          <table:table-cell table:style-name="ce14" office:value-type="string" calcext:value-type="string">
            <text:p>20+ Seeds</text:p>
          </table:table-cell>
          <table:table-cell table:style-name="ce14"/>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4">
          <table:table-cell office:value-type="float" office:value="1460" calcext:value-type="float">
            <text:p>1460</text:p>
          </table:table-cell>
          <table:table-cell table:style-name="ce14" office:value-type="string" calcext:value-type="string">
            <text:p>HERB Sage (Salvia officinalis)</text:p>
          </table:table-cell>
          <table:table-cell table:style-name="ce14" office:value-type="string" calcext:value-type="string">
            <text:p>Broadleaf</text:p>
          </table:table-cell>
          <table:table-cell table:style-name="ce14" office:value-type="string" calcext:value-type="string">
            <text:p>Ferry Morse</text:p>
          </table:table-cell>
          <table:table-cell table:style-name="ce14" office:value-type="string" calcext:value-type="string">
            <text:p>Start seed indoors in a sunny location 6 weeks before transplanting outdoors or sow directly in well drained soil. Plant 1/4 in deep and space 12 in apart. Pick leaves as needed. May be used fresh or dried.</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4">
          <table:table-cell office:value-type="float" office:value="1098" calcext:value-type="float">
            <text:p>1098</text:p>
          </table:table-cell>
          <table:table-cell table:style-name="ce16" office:value-type="string" calcext:value-type="string">
            <text:p>BEAN, TEPARY (Phaseolus acutifolius)</text:p>
          </table:table-cell>
          <table:table-cell table:style-name="ce14" office:value-type="string" calcext:value-type="string">
            <text:p>Brown</text:p>
          </table:table-cell>
          <table:table-cell table:style-name="ce14"/>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and let dry thoroughly.</text:p>
          </table:table-cell>
          <table:table-cell table:style-name="ce14"/>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157" calcext:value-type="float">
            <text:p>1157</text:p>
          </table:table-cell>
          <table:table-cell table:style-name="ce15" office:value-type="string" calcext:value-type="string">
            <text:p>CORN, DECORATIVE (Zea mays)</text:p>
          </table:table-cell>
          <table:table-cell table:style-name="ce15" office:value-type="string" calcext:value-type="string">
            <text:p>Brown</text:p>
          </table:table-cell>
          <table:table-cell table:style-name="ce15"/>
          <table:table-cell table:style-name="ce15" office:value-type="string" calcext:value-type="string">
            <text:p>Plant in spring 1” deep in rows or clusters. Plants should be no more than 8-12 inches apart to get best pollination. All species will cross pollinate so planting different species several weeks apart is recommended. Dark brown kernels typically for decorative purposes.</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2">
          <table:table-cell office:value-type="float" office:value="1125" calcext:value-type="float">
            <text:p>1125</text:p>
          </table:table-cell>
          <table:table-cell table:style-name="ce14" office:value-type="string" calcext:value-type="string">
            <text:p>CABBAGE (Brassica oleracea)</text:p>
          </table:table-cell>
          <table:table-cell table:style-name="ce14" office:value-type="string" calcext:value-type="string">
            <text:p>Brunswick</text:p>
          </table:table-cell>
          <table:table-cell table:style-name="ce14" office:value-type="string" calcext:value-type="string">
            <text:p>GMO Free USA</text:p>
          </table:table-cell>
          <table:table-cell table:style-name="ce14" office:value-type="string" calcext:value-type="string">
            <text:p>Sow indoors 4-6 weeks prior to desired transplant date: 4 weeks before last frost in spring or 6 weeks before first frost in fall. <text:s/>Plant 1/4” deep at no more than 75 degrees F daytime; 50 degrees at night, need lots of sunlight or grow light, transplant at 2-4 true leaves 24 inches apart. Full sun.</text:p>
          </table:table-cell>
          <table:table-cell table:style-name="ce14"/>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table-cell table:style-name="ce14" office:value-type="string" calcext:value-type="string">
            <text:p>4-5 days</text:p>
          </table:table-cell>
          <table:table-cell/>
          <table:table-cell table:style-name="ce6" table:number-columns-repeated="16366"/>
        </table:table-row>
        <table:table-row table:style-name="ro3">
          <table:table-cell office:value-type="float" office:value="1271" calcext:value-type="float">
            <text:p>1271</text:p>
          </table:table-cell>
          <table:table-cell table:style-name="ce15" office:value-type="string" calcext:value-type="string">
            <text:p>FLOWER Flower Mix (Assorted species)</text:p>
          </table:table-cell>
          <table:table-cell table:style-name="ce15" office:value-type="string" calcext:value-type="string">
            <text:p>Bulb Companions</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about 20 seeds per square foot and rake in. Attracts pollinato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3">
          <table:table-cell office:value-type="float" office:value="1115" calcext:value-type="float">
            <text:p>1115</text:p>
          </table:table-cell>
          <table:table-cell table:style-name="ce15" office:value-type="string" calcext:value-type="string">
            <text:p>BROCCOLI (Brassica oleracea var italica)</text:p>
          </table:table-cell>
          <table:table-cell table:style-name="ce15" office:value-type="string" calcext:value-type="string">
            <text:p>Burgundy</text:p>
          </table:table-cell>
          <table:table-cell table:style-name="ce14" office:value-type="string" calcext:value-type="string">
            <text:p>Botanical Interest, Inc</text:p>
          </table:table-cell>
          <table:table-cell table:style-name="ce15" office:value-type="string" calcext:value-type="string">
            <text:p>Sow 1/8” deep, 24-36”” apart. <text:s/>68-75 days, full sun. Harvest the main head before the flowers open. Purple broccoli are known to be quite tender and flavorful.</text:p>
          </table:table-cell>
          <table:table-cell table:style-name="ce15" table:number-columns-repeated="2"/>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7 days</text:p>
          </table:table-cell>
          <table:table-cell/>
          <table:table-cell table:style-name="ce6" table:number-columns-repeated="16366"/>
        </table:table-row>
        <table:table-row table:style-name="ro4">
          <table:table-cell office:value-type="float" office:value="1057" calcext:value-type="float">
            <text:p>1057</text:p>
          </table:table-cell>
          <table:table-cell table:style-name="ce15" office:value-type="string" calcext:value-type="string">
            <text:p>BEAN, COMMON (Phaseolus vulgaris)</text:p>
          </table:table-cell>
          <table:table-cell table:style-name="ce15" office:value-type="string" calcext:value-type="string">
            <text:p>Burpee Stringless - Green Bean, Bush Type</text:p>
          </table:table-cell>
          <table:table-cell table:style-name="ce15" office:value-type="string" calcext:value-type="string">
            <text:p>Burpee</text:p>
          </table:table-cell>
          <table:table-cell table:style-name="ce15" office:value-type="string" calcext:value-type="string">
            <text:p>Plant early spring after frost and soil temp higher than 60 degrees. Direct sow 1-2” deep, 2-3” apart. Compact bush to 16”; 5-6” dark green pods; 55 days. <text:s/>Great for canning/freezing/eating raw. <text:s/>Will cross with other beans. Soil Temp Range: 60°-95° Optimum: 80°</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60°-95° Optimum: 80°</text:p>
          </table:table-cell>
          <table:table-cell table:style-name="ce15" office:value-type="string" calcext:value-type="string">
            <text:p>6-7 days</text:p>
          </table:table-cell>
          <table:table-cell/>
          <table:table-cell table:style-name="ce6" table:number-columns-repeated="16366"/>
        </table:table-row>
        <table:table-row table:style-name="ro2">
          <table:table-cell office:value-type="float" office:value="1669" calcext:value-type="float">
            <text:p>1669</text:p>
          </table:table-cell>
          <table:table-cell table:style-name="ce14" office:value-type="string" calcext:value-type="string">
            <text:p>SQUASH (Cucurbirta maxima)</text:p>
          </table:table-cell>
          <table:table-cell table:style-name="ce14" office:value-type="string" calcext:value-type="string">
            <text:p>Buttercup</text:p>
          </table:table-cell>
          <table:table-cell table:style-name="ce14" office:value-type="string" calcext:value-type="string">
            <text:p>Ferry Morse</text:p>
          </table:table-cell>
          <table:table-cell table:style-name="ce14" office:value-type="string" calcext:value-type="string">
            <text:p>Direct sow outside after last frost. Plant 1” deep in hills of 2-3 plants per hill, 6 feet apart. Full sun; 95-100 days; fruit 5-8” diameter, up to 5 pounds. One of the finest winter squashes; sweet golden-yellow meat; thin skinned. <text:s/>Will cross with other maxima. Soil Temp Range: 60– 100 Optimum: 9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office:value-type="string" calcext:value-type="string">
            <text:p>60– 100 Optimum: 95°</text:p>
          </table:table-cell>
          <table:table-cell table:style-name="ce14" office:value-type="string" calcext:value-type="string">
            <text:p>3-4 days</text:p>
          </table:table-cell>
          <table:table-cell/>
          <table:table-cell table:style-name="ce6" table:number-columns-repeated="16366"/>
        </table:table-row>
        <table:table-row table:style-name="ro4">
          <table:table-cell office:value-type="float" office:value="1264" calcext:value-type="float">
            <text:p>1264</text:p>
          </table:table-cell>
          <table:table-cell table:style-name="ce14" office:value-type="string" calcext:value-type="string">
            <text:p>FLOWER Delphinium (Delphinium grandiflorum)</text:p>
          </table:table-cell>
          <table:table-cell table:style-name="ce14" office:value-type="string" calcext:value-type="string">
            <text:p>Butterfly Blend</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and in mild climates as late as 2 months before first frost. Plant 1/4” deep. Space 12” apart. Attracts pollinators. Lasts well as a cut flower. Deer resistant. Grows well in containers, small spaces or bord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6">
          <table:table-cell office:value-type="float" office:value="1315" calcext:value-type="float">
            <text:p>1315</text:p>
          </table:table-cell>
          <table:table-cell table:style-name="ce15" office:value-type="string" calcext:value-type="string">
            <text:p>FLOWER Milkweed (Asclepias tuberosa)</text:p>
          </table:table-cell>
          <table:table-cell table:style-name="ce15" office:value-type="string" calcext:value-type="string">
            <text:p>Butterfly Flower</text:p>
          </table:table-cell>
          <table:table-cell table:style-name="ce14" office:value-type="string" calcext:value-type="string">
            <text:p>Botanical Interest, Inc</text:p>
          </table:table-cell>
          <table:table-cell table:style-name="ce15" office:value-type="string" calcext:value-type="string">
            <text:p>Sow outside 2 to 4 weeks before average last frost date. Plant 1/4” deep. Space 12” to 16” apart. Drought tolerant when established. Attracts butterflies and habitat for monarch butterfly and their caterpillars. Deer resistant. Drought tolerant once established. Sap is toxic; avoid skin/eye contact. Do not eat. <text:s/>Vivid red orange flower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383" calcext:value-type="float">
            <text:p>1383</text:p>
          </table:table-cell>
          <table:table-cell table:style-name="ce15" office:value-type="string" calcext:value-type="string">
            <text:p>FLOWER, Mixed Seed</text:p>
          </table:table-cell>
          <table:table-cell table:style-name="ce15" office:value-type="string" calcext:value-type="string">
            <text:p>Butterfly Garden Mix Original</text:p>
          </table:table-cell>
          <table:table-cell table:style-name="ce14" office:value-type="string" calcext:value-type="string">
            <text:p>Botanical Interest, Inc</text:p>
          </table:table-cell>
          <table:table-cell table:style-name="ce15" office:value-type="string" calcext:value-type="string">
            <text:p>Scatter seeds 2-4 weeks before average last frost. Rake seeds in to 1/8”-1/4” depth and water gently and keep moist until plants are established. <text:s/>Approximately 13 varieties including Desert Lupine, Senna, Chia and Marigold, Globe Gilia, Firewheel, Dwarf Godetia, Coreopsis, Cornflower, and more.</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165" calcext:value-type="float">
            <text:p>1165</text:p>
          </table:table-cell>
          <table:table-cell table:style-name="ce14" office:value-type="string" calcext:value-type="string">
            <text:p>CORN, SWEET (Zea mays)</text:p>
          </table:table-cell>
          <table:table-cell table:style-name="ce14" office:value-type="string" calcext:value-type="string">
            <text:p>Buttergold Hybrid</text:p>
          </table:table-cell>
          <table:table-cell table:style-name="ce14" office:value-type="string" calcext:value-type="string">
            <text:p>Botanical Interest, Inc</text:p>
          </table:table-cell>
          <table:table-cell table:style-name="ce14" office:value-type="string" calcext:value-type="string">
            <text:p>Plant in spring after last frost 1”-1 1/2” deep, 8- 12” apart in rows, clumps, or basins. For best results plant a number of short rows together to ensure pollination. Harvest when kernels are full and juicy, about 63 days. Up to 8-9 inch ears, 85 days; wind pollinated; all varieties will cros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table-cell table:style-name="ce6" table:number-columns-repeated="16366"/>
        </table:table-row>
        <table:table-row table:style-name="ro1">
          <table:table-cell office:value-type="float" office:value="1119" calcext:value-type="float">
            <text:p>1119</text:p>
          </table:table-cell>
          <table:table-cell table:style-name="ce14" office:value-type="string" calcext:value-type="string">
            <text:p>BROCCOLI (Brassica oleracea)</text:p>
          </table:table-cell>
          <table:table-cell table:style-name="ce14" office:value-type="string" calcext:value-type="string">
            <text:p>Calabrese</text:p>
          </table:table-cell>
          <table:table-cell table:style-name="ce15" office:value-type="string" calcext:value-type="string">
            <text:p>Patriot Seeds</text:p>
          </table:table-cell>
          <table:table-cell table:style-name="ce14" office:value-type="string" calcext:value-type="string">
            <text:p>Sow indoors 6 weeks before last frost, 1/4” deep. At transplant, plant 24-30” apart. <text:s/>50 days, full sun Soil Temp Optimum: 85°</text:p>
          </table:table-cell>
          <table:table-cell table:style-name="ce14"/>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table:table-cell table:style-name="ce14" office:value-type="string" calcext:value-type="string">
            <text:p>4-5 days</text:p>
          </table:table-cell>
          <table:table-cell/>
          <table:table-cell table:style-name="ce6" table:number-columns-repeated="16366"/>
        </table:table-row>
        <table:table-row table:style-name="ro4">
          <table:table-cell office:value-type="float" office:value="1330" calcext:value-type="float">
            <text:p>1330</text:p>
          </table:table-cell>
          <table:table-cell table:style-name="ce15" office:value-type="string" calcext:value-type="string">
            <text:p>FLOWER Pot Marigold, (Calendula officinalis)</text:p>
          </table:table-cell>
          <table:table-cell table:style-name="ce14" office:value-type="string" calcext:value-type="string">
            <text:p>Calendula, Pot Marigold, Pacific Beauty</text:p>
          </table:table-cell>
          <table:table-cell table:style-name="ce14" office:value-type="string" calcext:value-type="string">
            <text:p>Botanical Interest, Inc</text:p>
          </table:table-cell>
          <table:table-cell table:style-name="ce14" office:value-type="string" calcext:value-type="string">
            <text:p>Direct sow 2-4 weeks before last frost in full sun. Plant every 12 inches, cover lightly with 1/4 in soil. Keep moist until germinated. Heat and drought tolerant. Deer resistant. Attracts pollinators. Dried petals can be used in baking or</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074" calcext:value-type="float">
            <text:p>1074</text:p>
          </table:table-cell>
          <table:table-cell table:style-name="ce15" office:value-type="string" calcext:value-type="string">
            <text:p>BEAN, COWPEA (Vigna unguiculata)</text:p>
          </table:table-cell>
          <table:table-cell table:style-name="ce15" office:value-type="string" calcext:value-type="string">
            <text:p>California Blackeye #5 Bush</text:p>
          </table:table-cell>
          <table:table-cell table:style-name="ce14" office:value-type="string" calcext:value-type="string">
            <text:p>Botanical Interest, Inc</text:p>
          </table:table-cell>
          <table:table-cell table:style-name="ce15" office:value-type="string" calcext:value-type="string">
            <text:p>Soak seeds for 1-2 hours before planting (speeds germination); plant 1” deep, full sun, 3-4” apart. 6-8 inch pods tinged with purple. Great shelled or dry.</text:p>
          </table:table-cell>
          <table:table-cell table:style-name="ce15"/>
          <table:table-cell table:style-name="ce15" office:value-type="string" calcext:value-type="string">
            <text:p>10-12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7 days</text:p>
          </table:table-cell>
          <table:table-cell/>
          <table:table-cell table:style-name="ce6" table:number-columns-repeated="16366"/>
        </table:table-row>
        <table:table-row table:style-name="ro1">
          <table:table-cell office:value-type="float" office:value="1272" calcext:value-type="float">
            <text:p>1272</text:p>
          </table:table-cell>
          <table:table-cell table:style-name="ce14" office:value-type="string" calcext:value-type="string">
            <text:p>FLOWER Flower Mix (Assorted species)</text:p>
          </table:table-cell>
          <table:table-cell table:style-name="ce14" office:value-type="string" calcext:value-type="string">
            <text:p>California Color</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nd rake in. Attracts pollinators.</text:p>
          </table:table-cell>
          <table:table-cell table:style-name="ce14"/>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613" calcext:value-type="float">
            <text:p>1613</text:p>
          </table:table-cell>
          <table:table-cell table:style-name="ce15" office:value-type="string" calcext:value-type="string">
            <text:p>PEPPER, SWEET (Capsicum annuum))</text:p>
          </table:table-cell>
          <table:table-cell table:style-name="ce15" office:value-type="string" calcext:value-type="string">
            <text:p>California Wonder</text:p>
          </table:table-cell>
          <table:table-cell table:style-name="ce14" office:value-type="string" calcext:value-type="string">
            <text:p>Ferry Morse</text:p>
          </table:table-cell>
          <table:table-cell table:style-name="ce15" office:value-type="string" calcext:value-type="string">
            <text:p>Sow indoors 6-8 weeks before last frost. <text:s/>Plant 1/4 inch below soil; transplant to garden 12” apart. <text:s/>Peppers are slow to germinate. Save seed from fully ripe, slightly shriveled frui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table-cell table:style-name="ce6" table:number-columns-repeated="16366"/>
        </table:table-row>
        <table:table-row table:style-name="ro3">
          <table:table-cell office:value-type="float" office:value="1433" calcext:value-type="float">
            <text:p>1433</text:p>
          </table:table-cell>
          <table:table-cell table:style-name="ce14" office:value-type="string" calcext:value-type="string">
            <text:p>HERB Cilantro (Coriandrum stivum)</text:p>
          </table:table-cell>
          <table:table-cell table:style-name="ce14" office:value-type="string" calcext:value-type="string">
            <text:p>Calypso</text:p>
          </table:table-cell>
          <table:table-cell table:style-name="ce14" office:value-type="string" calcext:value-type="string">
            <text:p>Native Seed/SEARCH <text:s/>www.nativeseeds.org</text:p>
          </table:table-cell>
          <table:table-cell table:style-name="ce14" office:value-type="string" calcext:value-type="string">
            <text:p>Plant fall thru early spring in low desert, spring thru summer in cooler climates. Most herbs happy in poor soil and easy to grow. Calypso is slowest bolt of all cilantro.</text:p>
          </table:table-cell>
          <table:table-cell table:style-name="ce14"/>
          <table:table-cell table:style-name="ce14" office:value-type="string" calcext:value-type="string">
            <text:p>15-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table-cell table:style-name="ce6" table:number-columns-repeated="16366"/>
        </table:table-row>
        <table:table-row table:style-name="ro7">
          <table:table-cell office:value-type="float" office:value="1464" calcext:value-type="float">
            <text:p>1464</text:p>
          </table:table-cell>
          <table:table-cell table:style-name="ce14" office:value-type="string" calcext:value-type="string">
            <text:p>HERB Stevia (Stevia rebaudiana)</text:p>
          </table:table-cell>
          <table:table-cell table:style-name="ce14" office:value-type="string" calcext:value-type="string">
            <text:p>Candy</text:p>
          </table:table-cell>
          <table:table-cell table:style-name="ce14" office:value-type="string" calcext:value-type="string">
            <text:p>Botanical Interest, Inc</text:p>
          </table:table-cell>
          <table:table-cell table:style-name="ce14" office:value-type="string" calcext:value-type="string">
            <text:p>Naturally low and slow germination of 7-21 days. Start indoors 8-10 weeks before last frost. Optimal soil temp 70°-75°. Sow 1/8” deep or barely cover. Leaves are sweetest just before flowering in late summ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of 7-21 days. Start indoors 8-10 weeks before last frost. Optimal soil temp 70°-75°. Sow 1/8” deep or barely cover. Leaves are sweetest just before flowering in late summer.</text:p>
          </table:table-cell>
          <table:table-cell/>
          <table:table-cell table:style-name="ce6" table:number-columns-repeated="16366"/>
        </table:table-row>
        <table:table-row table:style-name="ro3">
          <table:table-cell office:value-type="float" office:value="1256" calcext:value-type="float">
            <text:p>1256</text:p>
          </table:table-cell>
          <table:table-cell table:style-name="ce15" office:value-type="string" calcext:value-type="string">
            <text:p>FLOWER Cosmos (Cosmos bipinnatus)</text:p>
          </table:table-cell>
          <table:table-cell table:style-name="ce15" office:value-type="string" calcext:value-type="string">
            <text:p>Candy Stripe</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White petals with pink edge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236" calcext:value-type="float">
            <text:p>1236</text:p>
          </table:table-cell>
          <table:table-cell table:style-name="ce14" office:value-type="string" calcext:value-type="string">
            <text:p>FLOWER African Daisy (Dimorphotheca sinuata)</text:p>
          </table:table-cell>
          <table:table-cell table:style-name="ce14" office:value-type="string" calcext:value-type="string">
            <text:p>Cape Marigold</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Seed depth 1/8”, with 8” apart. Pollinator attractor. Fairly drought tolerant</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1">
          <table:table-cell office:value-type="float" office:value="1424" calcext:value-type="float">
            <text:p>1424</text:p>
          </table:table-cell>
          <table:table-cell table:style-name="ce15" office:value-type="string" calcext:value-type="string">
            <text:p>HERB Caraway (Carum carvi)</text:p>
          </table:table-cell>
          <table:table-cell table:style-name="ce15" office:value-type="string" calcext:value-type="string">
            <text:p>Caraway</text:p>
          </table:table-cell>
          <table:table-cell table:style-name="ce14" office:value-type="string" calcext:value-type="string">
            <text:p>Baker Creek Heirloom Seeds</text:p>
          </table:table-cell>
          <table:table-cell table:style-name="ce15" office:value-type="string" calcext:value-type="string">
            <text:p>Large fragrant heads and abundant seeds Direct sow cover with 1/4 inch soil Germinates in 10 to 20 days</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413" calcext:value-type="float">
            <text:p>1413</text:p>
          </table:table-cell>
          <table:table-cell table:style-name="ce15" office:value-type="string" calcext:value-type="string">
            <text:p>HERB BASIL (Ocimum basilicum)</text:p>
          </table:table-cell>
          <table:table-cell table:style-name="ce15" office:value-type="string" calcext:value-type="string">
            <text:p>Cardinal</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Richly colored blooms and robust flavo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1">
          <table:table-cell office:value-type="float" office:value="1225" calcext:value-type="float">
            <text:p>1225</text:p>
          </table:table-cell>
          <table:table-cell table:style-name="ce14" office:value-type="string" calcext:value-type="string">
            <text:p>FLOWER (DIANTHUS CRINITUS)</text:p>
          </table:table-cell>
          <table:table-cell table:style-name="ce14" office:value-type="string" calcext:value-type="string">
            <text:p>Carnation Family</text:p>
          </table:table-cell>
          <table:table-cell table:style-name="ce14" office:value-type="string" calcext:value-type="string">
            <text:p>Southern Spain (Andalucia)</text:p>
          </table:table-cell>
          <table:table-cell table:style-name="ce14" office:value-type="string" calcext:value-type="string">
            <text:p>Grows well in large pots, may not flower first year. <text:s/>Once established, very prolific. <text:s/>Light pink flowers; very fragr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uthern Spain (Andalucia)</text:p>
          </table:table-cell>
          <table:table-cell table:style-name="ce14"/>
          <table:table-cell table:style-name="ce14" office:value-type="string" calcext:value-type="string">
            <text:p>Gisa Krueger</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4">
          <table:table-cell office:value-type="float" office:value="1298" calcext:value-type="float">
            <text:p>1298</text:p>
          </table:table-cell>
          <table:table-cell table:style-name="ce14" office:value-type="string" calcext:value-type="string">
            <text:p>FLOWER Lobelia Trailing (Lobelia erinus)</text:p>
          </table:table-cell>
          <table:table-cell table:style-name="ce14" office:value-type="string" calcext:value-type="string">
            <text:p>Cascade of Color</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and in mild climates sow in late summer for winter color. Light aids germination, do not cover seed with soil and press lightly into surface. Space 4”to 6” apart. Attracts pollinators.</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557" calcext:value-type="float">
            <text:p>1557</text:p>
          </table:table-cell>
          <table:table-cell table:style-name="ce15" office:value-type="string" calcext:value-type="string">
            <text:p>PEA Sugar Snap (Pisum sativum)</text:p>
          </table:table-cell>
          <table:table-cell table:style-name="ce15" office:value-type="string" calcext:value-type="string">
            <text:p>Cascadia</text:p>
          </table:table-cell>
          <table:table-cell table:style-name="ce15" office:value-type="string" calcext:value-type="string">
            <text:p>Lilly Miller Seeds</text:p>
          </table:table-cell>
          <table:table-cell table:style-name="ce15" office:value-type="string" calcext:value-type="string">
            <text:p>Direct sow outdoors; young plants can tolerate a light frost. <text:s/>Plant 1” deep, 6” apart in full sun. Trellis. Keep weed free. <text:s/>Early harvest; cold resistant; 65 days; 3” pods. <text:s/>Consume raw soon after harvest or use in stir-fry. <text:s/>Very sweet. Soil Temp Range: 40°-85° Optimum: 75°</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6-7 days</text:p>
          </table:table-cell>
          <table:table-cell/>
          <table:table-cell table:style-name="ce6" table:number-columns-repeated="16366"/>
        </table:table-row>
        <table:table-row table:style-name="ro4">
          <table:table-cell office:value-type="float" office:value="1568" calcext:value-type="float">
            <text:p>1568</text:p>
          </table:table-cell>
          <table:table-cell table:style-name="ce14" office:value-type="string" calcext:value-type="string">
            <text:p>PEPPER CHILE (Capsicum annuum)</text:p>
          </table:table-cell>
          <table:table-cell table:style-name="ce14" office:value-type="string" calcext:value-type="string">
            <text:p>Cayenne</text:p>
          </table:table-cell>
          <table:table-cell table:style-name="ce14" office:value-type="string" calcext:value-type="string">
            <text:p>Botanical Interest, Inc</text:p>
          </table:table-cell>
          <table:table-cell table:style-name="ce14" office:value-type="string" calcext:value-type="string">
            <text:p>Start inside 1/4” deep in loose soil 8- 10 weeks before last frost. Transplant outside 2-4 weeks after last frost 12-16” apart in full sun. Green 4-6” peppers that turn either yellow or red; 68 days. <text:s/>Save seeds from fully ripe, slightly shriveled frui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table-cell table:style-name="ce6" table:number-columns-repeated="16366"/>
        </table:table-row>
        <table:table-row table:style-name="ro4">
          <table:table-cell office:value-type="float" office:value="1569" calcext:value-type="float">
            <text:p>1569</text:p>
          </table:table-cell>
          <table:table-cell table:style-name="ce15" office:value-type="string" calcext:value-type="string">
            <text:p>PEPPER CHILE (Capsicum annuum)</text:p>
          </table:table-cell>
          <table:table-cell table:style-name="ce15" office:value-type="string" calcext:value-type="string">
            <text:p>Cayenne Blend</text:p>
          </table:table-cell>
          <table:table-cell table:style-name="ce14" office:value-type="string" calcext:value-type="string">
            <text:p>Botanical Interest, Inc</text:p>
          </table:table-cell>
          <table:table-cell table:style-name="ce15" office:value-type="string" calcext:value-type="string">
            <text:p>Start inside 1/4” deep in loose soil 8-10 weeks before last frost. Transplant outside 2-4 weeks after last frost 12-16” apart in full sun. Green 4-6” peppers that turn either yellow or red; 68 days. <text:s/>Save seeds from fully ripe, slightly shriveled fruit.</text:p>
          </table:table-cell>
          <table:table-cell table:style-name="ce15"/>
          <table:table-cell table:style-name="ce15" office:value-type="string" calcext:value-type="string">
            <text:p>10-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10-25 days</text:p>
          </table:table-cell>
          <table:table-cell/>
          <table:table-cell table:style-name="ce6" table:number-columns-repeated="16366"/>
        </table:table-row>
        <table:table-row table:style-name="ro4">
          <table:table-cell office:value-type="float" office:value="1248" calcext:value-type="float">
            <text:p>1248</text:p>
          </table:table-cell>
          <table:table-cell table:style-name="ce15" office:value-type="string" calcext:value-type="string">
            <text:p>FLOWER CARNATION (Dianthus caryophyllus)</text:p>
          </table:table-cell>
          <table:table-cell table:style-name="ce15" office:value-type="string" calcext:value-type="string">
            <text:p>Chabaud Blend</text:p>
          </table:table-cell>
          <table:table-cell table:style-name="ce14" office:value-type="string" calcext:value-type="string">
            <text:p>Botanical Interest, Inc</text:p>
          </table:table-cell>
          <table:table-cell table:style-name="ce15" office:value-type="string" calcext:value-type="string">
            <text:p>Start inside 8-10 weeks before last frost. Press seed into soil surface and do not cover. Transplant or direct sow every 12”. Mixed colors. Pollinator. Petals make a colorful garnish to salads, desserts and cold drink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630" calcext:value-type="float">
            <text:p>1630</text:p>
          </table:table-cell>
          <table:table-cell table:style-name="ce14" office:value-type="string" calcext:value-type="string">
            <text:p>RADISH (Raphanus sativus)</text:p>
          </table:table-cell>
          <table:table-cell table:style-name="ce14" office:value-type="string" calcext:value-type="string">
            <text:p>Champion</text:p>
          </table:table-cell>
          <table:table-cell table:style-name="ce15" office:value-type="string" calcext:value-type="string">
            <text:p>Patriot Seeds</text:p>
          </table:table-cell>
          <table:table-cell table:style-name="ce14" office:value-type="string" calcext:value-type="string">
            <text:p>Direct sow in early spring and early fall, 1/2” deep, plant 2” apart (or closer and thinned later), rows 12-18” apart. Soil Temp Range: 40°-95° Optimum: 85°</text:p>
          </table:table-cell>
          <table:table-cell table:style-name="ce14"/>
          <table:table-cell table:style-name="ce14" office:value-type="string" calcext:value-type="string">
            <text:p>25-3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office:value-type="string" calcext:value-type="string">
            <text:p>40°-95° Optimum: 85°</text:p>
          </table:table-cell>
          <table:table-cell table:style-name="ce14" office:value-type="string" calcext:value-type="string">
            <text:p>3-4 days</text:p>
          </table:table-cell>
          <table:table-cell/>
          <table:table-cell table:style-name="ce6" table:number-columns-repeated="16366"/>
        </table:table-row>
        <table:table-row table:style-name="ro3">
          <table:table-cell office:value-type="float" office:value="1517" calcext:value-type="float">
            <text:p>1517</text:p>
          </table:table-cell>
          <table:table-cell table:style-name="ce15" office:value-type="string" calcext:value-type="string">
            <text:p>MELON Cantelope (Cucumis melo)</text:p>
          </table:table-cell>
          <table:table-cell table:style-name="ce15" office:value-type="string" calcext:value-type="string">
            <text:p>Charentais</text:p>
          </table:table-cell>
          <table:table-cell table:style-name="ce14" office:value-type="string" calcext:value-type="string">
            <text:p>Botanical Interest, Inc</text:p>
          </table:table-cell>
          <table:table-cell table:style-name="ce15" office:value-type="string" calcext:value-type="string">
            <text:p>Plant 1-2 weeks after last frost. Make mounds 4’-6’ apart. Sow 2-3 seeds in top of mound 1/4” deep. Thin to one plant per mound. Full sun, 90 day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3">
          <table:table-cell office:value-type="float" office:value="1741" calcext:value-type="float">
            <text:p>1741</text:p>
          </table:table-cell>
          <table:table-cell table:style-name="ce15" office:value-type="string" calcext:value-type="string">
            <text:p>WATERMELON (Citrullus lanatus)</text:p>
          </table:table-cell>
          <table:table-cell table:style-name="ce15" office:value-type="string" calcext:value-type="string">
            <text:p>Charleston Gray</text:p>
          </table:table-cell>
          <table:table-cell table:style-name="ce14" office:value-type="string" calcext:value-type="string">
            <text:p>Ferry Morse</text:p>
          </table:table-cell>
          <table:table-cell table:style-name="ce15" office:value-type="string" calcext:value-type="string">
            <text:p>Direct sow outside after danger of frost. Plant 1/2” deep in hills 6’-8’ feet apart. Full sun; long growing season, rich soil (add compost as they grow). Varieties will cros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4">
          <table:table-cell office:value-type="float" office:value="1731" calcext:value-type="float">
            <text:p>1731</text:p>
          </table:table-cell>
          <table:table-cell table:style-name="ce15" office:value-type="string" calcext:value-type="string">
            <text:p>TREE (Vitex agnus-castus)</text:p>
          </table:table-cell>
          <table:table-cell table:style-name="ce15" office:value-type="string" calcext:value-type="string">
            <text:p>Chaste Tree</text:p>
          </table:table-cell>
          <table:table-cell table:style-name="ce15" office:value-type="string" calcext:value-type="string">
            <text:p>Linda Lawson's Backyard</text:p>
          </table:table-cell>
          <table:table-cell table:style-name="ce15" office:value-type="string" calcext:value-type="string">
            <text:p>Also called Chasteberry, Abraham’s Balm, Monk’s Pepper. Native of Mediterranean region. <text:s/>Delicate- textured aromatic foliage and spikes of lavender flowers. Attracts butterflies. Full sun or partial shade, well drained soil. Size 1-5 meters, 3-15 feet.</text:p>
          </table:table-cell>
          <table:table-cell table:style-name="ce15"/>
          <table:table-cell table:style-name="ce15" office:value-type="string" calcext:value-type="string">
            <text:p>10+ Seeds</text:p>
          </table:table-cell>
          <table:table-cell table:style-name="ce15" table:number-columns-repeated="3"/>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1">
          <table:table-cell office:value-type="float" office:value="1242" calcext:value-type="float">
            <text:p>1242</text:p>
          </table:table-cell>
          <table:table-cell table:style-name="ce15" office:value-type="string" calcext:value-type="string">
            <text:p>FLOWER Black-eyed Susan (Rudbeckia hirta)</text:p>
          </table:table-cell>
          <table:table-cell table:style-name="ce15" office:value-type="string" calcext:value-type="string">
            <text:p>Cherokee Sunset</text:p>
          </table:table-cell>
          <table:table-cell table:style-name="ce15"/>
          <table:table-cell table:style-name="ce15" office:value-type="string" calcext:value-type="string">
            <text:p>Direct sow, pressing into surface about 18 inches apart. Start indoors, 8-10 weeks before last frost. Attracts pollinator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office:value-type="string" calcext:value-type="string">
            <text:p>Botanical Interests</text:p>
          </table:table-cell>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6">
          <table:table-cell office:value-type="float" office:value="1073" calcext:value-type="float">
            <text:p>1073</text:p>
          </table:table-cell>
          <table:table-cell table:style-name="ce14" office:value-type="string" calcext:value-type="string">
            <text:p>BEAN, COMMON (Phaseolus vulgaris)</text:p>
          </table:table-cell>
          <table:table-cell table:style-name="ce14" office:value-type="string" calcext:value-type="string">
            <text:p>Cherokee Trail of Tears (pole type)</text:p>
          </table:table-cell>
          <table:table-cell table:style-name="ce14" office:value-type="string" calcext:value-type="string">
            <text:p>Seed Treasures Open-Pollinated and Heirloom </text:p>
          </table:table-cell>
          <table:table-cell table:style-name="ce14" office:value-type="string" calcext:value-type="string">
            <text:p>Direct sow outdoors after last frost. <text:s/>Plant 1.5” deep, 4” apart; pole type. <text:s/>Sweet, purple-tinged snap bean at 70 days; matures to shiny black bean at 90 days dry. <text:s/>The Cherokee women sewed this bean into the hem of their skirts on the tragic forced march to Oklahoma. Will cross-pollinate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3">
          <table:table-cell office:value-type="float" office:value="1625" calcext:value-type="float">
            <text:p>1625</text:p>
          </table:table-cell>
          <table:table-cell table:style-name="ce15" office:value-type="string" calcext:value-type="string">
            <text:p>RADISH (Raphanus sativus)</text:p>
          </table:table-cell>
          <table:table-cell table:style-name="ce15" office:value-type="string" calcext:value-type="string">
            <text:p>Cherry Belle</text:p>
          </table:table-cell>
          <table:table-cell table:style-name="ce14" office:value-type="string" calcext:value-type="string">
            <text:p>Ferry Morse</text:p>
          </table:table-cell>
          <table:table-cell table:style-name="ce15" office:value-type="string" calcext:value-type="string">
            <text:p>Direct sow in early spring and early fall, 1/4-1/2” deep, plant 1” apart (or closer and thinned later), rows 12-18” apart. Harvest in 30 days or les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2">
          <table:table-cell office:value-type="float" office:value="1317" calcext:value-type="float">
            <text:p>1317</text:p>
          </table:table-cell>
          <table:table-cell table:style-name="ce15" office:value-type="string" calcext:value-type="string">
            <text:p>FLOWER Nasturtium (Tropaeolum majus)</text:p>
          </table:table-cell>
          <table:table-cell table:style-name="ce15" office:value-type="string" calcext:value-type="string">
            <text:p>Cherry Rose Jewel</text:p>
          </table:table-cell>
          <table:table-cell table:style-name="ce14" office:value-type="string" calcext:value-type="string">
            <text:p>Botanical Interest, Inc</text:p>
          </table:table-cell>
          <table:table-cell table:style-name="ce15" office:value-type="string" calcext:value-type="string">
            <text:p>Soak seed in water for 12 to 24 hours before sowing. Sow outside 1 to 2 weeks after average last frost date. Plant 1/2” to 1” deep. Space 8” to 12” apart. Deters garden pests while attracting pollinators. Deer and rabbit resistant. Blossoms have a peppery taste and leaves can also</text:p>
          </table:table-cell>
          <table:table-cell table:style-name="ce15" table:number-columns-repeated="3"/>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427" calcext:value-type="float">
            <text:p>1427</text:p>
          </table:table-cell>
          <table:table-cell table:style-name="ce14" office:value-type="string" calcext:value-type="string">
            <text:p>HERB Chervil (Anthriscus cerefolium)</text:p>
          </table:table-cell>
          <table:table-cell table:style-name="ce14" office:value-type="string" calcext:value-type="string">
            <text:p>Chervil</text:p>
          </table:table-cell>
          <table:table-cell table:style-name="ce14" office:value-type="string" calcext:value-type="string">
            <text:p>Botanical Interest, Inc</text:p>
          </table:table-cell>
          <table:table-cell table:style-name="ce14" office:value-type="string" calcext:value-type="string">
            <text:p>Sow outside 6-8 weeks before last frost. Tamp a small pinch of seeds lightly onto the soil as seeds require light to germinate. Mist lightly. Also called French Parsley and essential herb for French cooking. Fresh leaves mix in salads or sprinkled on meat and fish.</text:p>
          </table:table-cell>
          <table:table-cell table:style-name="ce14"/>
          <table:table-cell table:style-name="ce14" office:value-type="string" calcext:value-type="string">
            <text:p>10-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1</text:p>
          </table:table-cell>
          <table:table-cell table:style-name="ce14" table:number-columns-repeated="2"/>
          <table:table-cell/>
          <table:table-cell table:style-name="ce6" table:number-columns-repeated="16366"/>
        </table:table-row>
        <table:table-row table:style-name="ro2">
          <table:table-cell office:value-type="float" office:value="1332" calcext:value-type="float">
            <text:p>1332</text:p>
          </table:table-cell>
          <table:table-cell table:style-name="ce15" office:value-type="string" calcext:value-type="string">
            <text:p>FLOWER Salvia (Lamiaceae or Labiatae)</text:p>
          </table:table-cell>
          <table:table-cell table:style-name="ce15" office:value-type="string" calcext:value-type="string">
            <text:p>CHIA, Ziegler’s Sage</text:p>
          </table:table-cell>
          <table:table-cell table:style-name="ce15" office:value-type="string" calcext:value-type="string">
            <text:p>Wild Harvested</text:p>
          </table:table-cell>
          <table:table-cell table:style-name="ce15" office:value-type="string" calcext:value-type="string">
            <text:p>Annual/Perennial growing to 2ft high, 1.5 ft wide. <text:s/>Purple flowers July to September. <text:s/>Seeds ripen Aug- Sept. Cannot grow in shade; prefers dry or moist soil; drought tolerant. <text:s/>Seeds eaten raw, cooked or sprouted. High nutritional value: niacin, thiamine, zinc, calcium, manganese.</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Duncan, AZ</text:p>
          </table:table-cell>
          <table:table-cell table:style-name="ce15" office:value-type="string" calcext:value-type="string">
            <text:p>Perennial/Annual</text:p>
          </table:table-cell>
          <table:table-cell table:style-name="ce15"/>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2">
          <table:table-cell office:value-type="float" office:value="1075" calcext:value-type="float">
            <text:p>1075</text:p>
          </table:table-cell>
          <table:table-cell table:style-name="ce14" office:value-type="string" calcext:value-type="string">
            <text:p>BEAN, EDAMAME (Glycine max)</text:p>
          </table:table-cell>
          <table:table-cell table:style-name="ce14" office:value-type="string" calcext:value-type="string">
            <text:p>Chiba Green</text:p>
          </table:table-cell>
          <table:table-cell table:style-name="ce14" office:value-type="string" calcext:value-type="string">
            <text:p>Botanical Interest, Inc</text:p>
          </table:table-cell>
          <table:table-cell table:style-name="ce14" office:value-type="string" calcext:value-type="string">
            <text:p>Direct sow outdoors <text:s/>1-2 weeks after last frost; 4” apart and 1” deep; rows or basins. Large dark green pods with high percentage of three bean pods. Shell and add to pasta or stir fries. Cholesterol free soybeans that are rich in protein. 60-70 days. Above 90 F, beans don’t form.</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 days</text:p>
          </table:table-cell>
          <table:table-cell/>
          <table:table-cell table:style-name="ce6" table:number-columns-repeated="16366"/>
        </table:table-row>
        <table:table-row table:style-name="ro2">
          <table:table-cell office:value-type="float" office:value="1077" calcext:value-type="float">
            <text:p>1077</text:p>
          </table:table-cell>
          <table:table-cell table:style-name="ce14" office:value-type="string" calcext:value-type="string">
            <text:p>BEAN, GARBANZO (Cicer arietinum)</text:p>
          </table:table-cell>
          <table:table-cell table:style-name="ce14" office:value-type="string" calcext:value-type="string">
            <text:p>CHICKPEA</text:p>
          </table:table-cell>
          <table:table-cell table:style-name="ce14"/>
          <table:table-cell table:style-name="ce14" office:value-type="string" calcext:value-type="string">
            <text:p>Sow 1 1/2-2” deep about 6” apart directly in the ground in full sun about the date of average last frost or slightly earlier. Can be planted inside several weeks earlier. Grows about 18” tall. Harvest in about 100 days for dry chickpeas. Soil Temp: <text:s/>Range: 65-80 degrees</text:p>
          </table:table-cell>
          <table:table-cell table:style-name="ce14"/>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65-80 degrees</text:p>
          </table:table-cell>
          <table:table-cell table:style-name="ce14"/>
          <table:table-cell/>
          <table:table-cell table:style-name="ce6" table:number-columns-repeated="16366"/>
        </table:table-row>
        <table:table-row table:style-name="ro2">
          <table:table-cell office:value-type="float" office:value="1570" calcext:value-type="float">
            <text:p>1570</text:p>
          </table:table-cell>
          <table:table-cell table:style-name="ce15" office:value-type="string" calcext:value-type="string">
            <text:p>PEPPER CHILE (Capsicum annuum)</text:p>
          </table:table-cell>
          <table:table-cell table:style-name="ce15" office:value-type="string" calcext:value-type="string">
            <text:p>Chilaca Pasilla Bajio</text:p>
          </table:table-cell>
          <table:table-cell table:style-name="ce14" office:value-type="string" calcext:value-type="string">
            <text:p>Botanical Interest, Inc</text:p>
          </table:table-cell>
          <table:table-cell table:style-name="ce15" office:value-type="string" calcext:value-type="string">
            <text:p>Start inside 1/4” deep in loose soil 8-10 weeks before last frost. <text:s/>Slow to germinate; need warmth. Transplant 24”-36”” apart in full sun. Size to 2”; 80 to 90 days. <text:s text:c="2"/>Can <text:s/>cross pollinate. Dried is important ingredient in mole sauce and adobo. <text:s/>(smoky, mildly spicy)</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table-cell table:style-name="ce6" table:number-columns-repeated="16366"/>
        </table:table-row>
        <table:table-row table:style-name="ro2">
          <table:table-cell office:value-type="float" office:value="1578" calcext:value-type="float">
            <text:p>1578</text:p>
          </table:table-cell>
          <table:table-cell table:style-name="ce15" office:value-type="string" calcext:value-type="string">
            <text:p>Pepper CHILE (Capsicum annuum)</text:p>
          </table:table-cell>
          <table:table-cell table:style-name="ce15" office:value-type="string" calcext:value-type="string">
            <text:p>Chiltepin (glabriusculum)</text:p>
          </table:table-cell>
          <table:table-cell table:style-name="ce15" office:value-type="string" calcext:value-type="string">
            <text:p>Collected from the Pimas near the Rio Yaqui in Sonora, Mexico</text:p>
          </table:table-cell>
          <table:table-cell table:style-name="ce15" office:value-type="string" calcext:value-type="string">
            <text:p>Perennial Shrub, 3.5 to 9 feet. <text:s/>Plant in well- drained soil at 75 degrees+. <text:s/>Keep moist, NOT WET. Germination 4-8 weeks. Best to start indoors; transplant in shade or filtered light. In areas w/o hard frost, shrub can live 35-50 years. <text:s/>Wash hands after handling seed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office:value-type="string" calcext:value-type="string">
            <text:p>Native Seed/SEARCH Farm</text:p>
          </table:table-cell>
          <table:table-cell table:style-name="ce28" office:value-type="string" calcext:value-type="string">
            <text:p>2017</text:p>
          </table:table-cell>
          <table:table-cell table:style-name="ce15"/>
          <table:table-cell table:style-name="ce15" office:value-type="string" calcext:value-type="string">
            <text:p>4-8 weeks</text:p>
          </table:table-cell>
          <table:table-cell/>
          <table:table-cell table:style-name="ce6" table:number-columns-repeated="16366"/>
        </table:table-row>
        <table:table-row table:style-name="ro6">
          <table:table-cell office:value-type="float" office:value="1590" calcext:value-type="float">
            <text:p>1590</text:p>
          </table:table-cell>
          <table:table-cell table:style-name="ce15" office:value-type="string" calcext:value-type="string">
            <text:p>Pepper CHILE (Capsicum annuum)</text:p>
          </table:table-cell>
          <table:table-cell table:style-name="ce14" office:value-type="string" calcext:value-type="string">
            <text:p>Chiltepin (glabriusculum) Devil’s River</text:p>
          </table:table-cell>
          <table:table-cell table:style-name="ce14" office:value-type="string" calcext:value-type="string">
            <text:p>Wild Harvested</text:p>
          </table:table-cell>
          <table:table-cell table:style-name="ce14" office:value-type="string" calcext:value-type="string">
            <text:p>Original plants wild-harvested in 1952 near Del Rio, TX, a spot now under the Amistad Reservoir. Perennial Shrub, 3.5 to 9 feet. <text:s/>Plant in well-drained soil at 75 degrees+. <text:s/>Keep moist, NOT WET. Germination 4-8 weeks. Best to start indoors; transplant in shade or filtered light. In areas w/o hard frost, shrub can live 35-50 years. <text:s/>Wash hands after handling seed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office:value-type="string" calcext:value-type="string">
            <text:p>Native Seed/SEARCH Farm</text:p>
          </table:table-cell>
          <table:table-cell table:style-name="ce28" office:value-type="string" calcext:value-type="string">
            <text:p>2017</text:p>
          </table:table-cell>
          <table:table-cell table:style-name="ce14"/>
          <table:table-cell table:style-name="ce14" office:value-type="string" calcext:value-type="string">
            <text:p>4-8 weeks</text:p>
          </table:table-cell>
          <table:table-cell/>
          <table:table-cell table:style-name="ce6" table:number-columns-repeated="16366"/>
        </table:table-row>
        <table:table-row table:style-name="ro6">
          <table:table-cell office:value-type="float" office:value="1601" calcext:value-type="float">
            <text:p>1601</text:p>
          </table:table-cell>
          <table:table-cell table:style-name="ce14" office:value-type="string" calcext:value-type="string">
            <text:p>PEPPER, CHILE (Capsicum annuum)</text:p>
          </table:table-cell>
          <table:table-cell table:style-name="ce14" office:value-type="string" calcext:value-type="string">
            <text:p>Chiltepin (Phoenix) </text:p>
          </table:table-cell>
          <table:table-cell table:style-name="ce23" office:value-type="string" calcext:value-type="string">
            <text:p>Native Seed/SEARCH <text:s/>www.nativeseeds.org</text:p>
          </table:table-cell>
          <table:table-cell table:style-name="ce14" office:value-type="string" calcext:value-type="string">
            <text:p>Perennial Shrub, 3.5 to 9 feet or more. Start seeds inside in sandy soil, 8-10 weeks before last frost. <text:s text:c="2"/>Plant 1/4 in deep. <text:s/>Keep warm and moist, NOT WET. Germination 4-8 weeks. Transplant 12-16” apart in partial shade. In areas w/o hard frost, shrub can live 35-50 years. <text:s/>Wash hands after handling seeds. Allow fruit to ripen on the plant. VERY HOT 50K-100K SHU </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19</text:p>
          </table:table-cell>
          <table:table-cell table:style-name="ce14"/>
          <table:table-cell table:style-name="ce14" office:value-type="string" calcext:value-type="string">
            <text:p>4-8 weeks</text:p>
          </table:table-cell>
          <table:table-cell/>
          <table:table-cell table:style-name="ce6" table:number-columns-repeated="16366"/>
        </table:table-row>
        <table:table-row table:style-name="ro3">
          <table:table-cell office:value-type="float" office:value="1237" calcext:value-type="float">
            <text:p>1237</text:p>
          </table:table-cell>
          <table:table-cell table:style-name="ce15" office:value-type="string" calcext:value-type="string">
            <text:p>FLOWER Aster (Callistephus chinensis)</text:p>
          </table:table-cell>
          <table:table-cell table:style-name="ce15" office:value-type="string" calcext:value-type="string">
            <text:p>China Aster Blend</text:p>
          </table:table-cell>
          <table:table-cell table:style-name="ce14" office:value-type="string" calcext:value-type="string">
            <text:p>Botanical Interest, Inc</text:p>
          </table:table-cell>
          <table:table-cell table:style-name="ce15" office:value-type="string" calcext:value-type="string">
            <text:p>Start inside 6-8 weeks before last frost. Sow outside 1 to 2 weeks after last frost. Plant 1/8” deep every 6-12”. <text:s/>Makes wonderful cut flowers.</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629" calcext:value-type="float">
            <text:p>1629</text:p>
          </table:table-cell>
          <table:table-cell table:style-name="ce14" office:value-type="string" calcext:value-type="string">
            <text:p>RADISH (Raphanus sativus)</text:p>
          </table:table-cell>
          <table:table-cell table:style-name="ce14" office:value-type="string" calcext:value-type="string">
            <text:p>China Rose</text:p>
          </table:table-cell>
          <table:table-cell table:style-name="ce14" office:value-type="string" calcext:value-type="string">
            <text:p>Duncan, AZ Seed Library</text:p>
          </table:table-cell>
          <table:table-cell table:style-name="ce14" office:value-type="string" calcext:value-type="string">
            <text:p>Direct sow in early spring and early fall, 1/4” deep, plant 2” apart (or closer and thin later), rows 10-12” apart. <text:s/>50-60 days — this radish is SPICY Soil Temp Range: 40°-95° Optimum: 85°</text:p>
          </table:table-cell>
          <table:table-cell table:style-name="ce14"/>
          <table:table-cell table:style-name="ce14" office:value-type="string" calcext:value-type="string">
            <text:p>25-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40°-95° Optimum: 85°</text:p>
          </table:table-cell>
          <table:table-cell table:style-name="ce14" office:value-type="string" calcext:value-type="string">
            <text:p>3-4 days</text:p>
          </table:table-cell>
          <table:table-cell/>
          <table:table-cell table:style-name="ce6" table:number-columns-repeated="16366"/>
        </table:table-row>
        <table:table-row table:style-name="ro9">
          <table:table-cell office:value-type="float" office:value="1129" calcext:value-type="float">
            <text:p>1129</text:p>
          </table:table-cell>
          <table:table-cell table:style-name="ce15" office:value-type="string" calcext:value-type="string">
            <text:p>CABBAGE (Brassica rapa)</text:p>
          </table:table-cell>
          <table:table-cell table:style-name="ce15" office:value-type="string" calcext:value-type="string">
            <text:p>Chinese — Hilton</text:p>
          </table:table-cell>
          <table:table-cell table:style-name="ce14" office:value-type="string" calcext:value-type="string">
            <text:p>Baker Creek Heirloom Seeds</text:p>
          </table:table-cell>
          <table:table-cell table:style-name="ce15" office:value-type="string" calcext:value-type="string">
            <text:p>70 day Napa-type Chinese cabbage. Great raw, stir fried, or for kimchi. <text:s/>Start indoors 4-6 weeks prior to desired transplant date (4 wks before last frost in spring or 6 wks before first frost in fall). Plant 1/4” under soil surface; transplant ready when 2-4 true leaves have developed, 24 inches apart. <text:s/>Thrive best in temps between 45 and 75 degrees. <text:s/>Seed saving biennial from seed stalk the second year. Soil Temp Range: 45°-75° Optimum: 75°</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5°-75° Optimum: 75°</text:p>
          </table:table-cell>
          <table:table-cell table:style-name="ce15" office:value-type="string" calcext:value-type="string">
            <text:p>4-5 days</text:p>
          </table:table-cell>
          <table:table-cell/>
          <table:table-cell table:style-name="ce6" table:number-columns-repeated="16366"/>
        </table:table-row>
        <table:table-row table:style-name="ro6">
          <table:table-cell office:value-type="float" office:value="1131" calcext:value-type="float">
            <text:p>1131</text:p>
          </table:table-cell>
          <table:table-cell table:style-name="ce15" office:value-type="string" calcext:value-type="string">
            <text:p>CABBAGE (Brassica rapa)</text:p>
          </table:table-cell>
          <table:table-cell table:style-name="ce14" office:value-type="string" calcext:value-type="string">
            <text:p>Chinese — Pai Tsai</text:p>
          </table:table-cell>
          <table:table-cell table:style-name="ce14" office:value-type="string" calcext:value-type="string">
            <text:p>Baker Creek Heirloom Seeds</text:p>
          </table:table-cell>
          <table:table-cell table:style-name="ce15" office:value-type="string" calcext:value-type="string">
            <text:p>Quick growing, non-heading Chinese cabbage. Flowers have a candy-sweet, nutty flavor! <text:s/>Start indoors 4-6 weeks prior to desired transplant date. <text:s/>Plant 1/4” under soil surface; transplant ready when 2-4 true leaves have developed. Plant 24 inches apart in cold frame or garden. <text:s/>Thrive best in temps between 45 and 75 degrees. Seed saving biennial from seed stalk the second year.</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4-5 days</text:p>
          </table:table-cell>
          <table:table-cell/>
          <table:table-cell table:style-name="ce6" table:number-columns-repeated="16366"/>
        </table:table-row>
        <table:table-row table:style-name="ro4">
          <table:table-cell office:value-type="float" office:value="1116" calcext:value-type="float">
            <text:p>1116</text:p>
          </table:table-cell>
          <table:table-cell table:style-name="ce14" office:value-type="string" calcext:value-type="string">
            <text:p>BROCCOLI (Brassica oleracea var. alboglabra)</text:p>
          </table:table-cell>
          <table:table-cell table:style-name="ce14" office:value-type="string" calcext:value-type="string">
            <text:p>Chinese Broccoli Kailaan</text:p>
          </table:table-cell>
          <table:table-cell table:style-name="ce14" office:value-type="string" calcext:value-type="string">
            <text:p>Botanical Interest, Inc</text:p>
          </table:table-cell>
          <table:table-cell table:style-name="ce14" office:value-type="string" calcext:value-type="string">
            <text:p>Prefers a well drained, fertile soil high in organic matter. Sow directly in outside beds or in flats, 1/4” deep. Soil should be warm for germination and cool for growing. Prefers consistent moisture so irrigate regularly.</text:p>
          </table:table-cell>
          <table:table-cell table:style-name="ce14"/>
          <table:table-cell table:style-name="ce14" office:value-type="string" calcext:value-type="string">
            <text:p>12-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and cool for growing. Prefers consistent moisture so irrigate regularly.</text:p>
          </table:table-cell>
          <table:table-cell/>
          <table:table-cell table:style-name="ce6" table:number-columns-repeated="16366"/>
        </table:table-row>
        <table:table-row table:style-name="ro2">
          <table:table-cell office:value-type="float" office:value="1100" calcext:value-type="float">
            <text:p>1100</text:p>
          </table:table-cell>
          <table:table-cell table:style-name="ce15" office:value-type="string" calcext:value-type="string">
            <text:p>BEAN, YARDLONG (Vigna unguiculate Sesquipedalis)</text:p>
          </table:table-cell>
          <table:table-cell table:style-name="ce15" office:value-type="string" calcext:value-type="string">
            <text:p>Chinese Red Noodle</text:p>
          </table:table-cell>
          <table:table-cell table:style-name="ce14" office:value-type="string" calcext:value-type="string">
            <text:p>Baker Creek Heirloom Seeds</text:p>
          </table:table-cell>
          <table:table-cell table:style-name="ce15" office:value-type="string" calcext:value-type="string">
            <text:p>Deep red 18” pods keep most of their color when sautéed. <text:s/>This is a tender bean for stir fry (not boiled); do not overcook. <text:s/>LONG vines; trellis at least 8 feet! <text:s/>Plant in warm soil 1” deep, 4-6 inches apart in full sun; keep pods picked to encourage production. <text:s/>Pods are stringless.</text:p>
          </table:table-cell>
          <table:table-cell table:style-name="ce15" table:number-columns-repeated="9"/>
          <table:table-cell table:style-name="ce28"/>
          <table:table-cell table:style-name="ce15" table:number-columns-repeated="2"/>
          <table:table-cell/>
          <table:table-cell table:style-name="ce6" table:number-columns-repeated="16366"/>
        </table:table-row>
        <table:table-row table:style-name="ro3">
          <table:table-cell office:value-type="float" office:value="1472" calcext:value-type="float">
            <text:p>1472</text:p>
          </table:table-cell>
          <table:table-cell table:style-name="ce14" office:value-type="string" calcext:value-type="string">
            <text:p>KALE (Brassica oleracea var. alboglabra)</text:p>
          </table:table-cell>
          <table:table-cell table:style-name="ce14" office:value-type="string" calcext:value-type="string">
            <text:p>Chinese, Kailaan, White Flowered</text:p>
          </table:table-cell>
          <table:table-cell table:style-name="ce14" office:value-type="string" calcext:value-type="string">
            <text:p>Botanical Interest, Inc</text:p>
          </table:table-cell>
          <table:table-cell table:style-name="ce14" office:value-type="string" calcext:value-type="string">
            <text:p>Spring or fall plant; sow directly into soil at 1/2” depth; thin to 8-10” apart; rows 18” apart. Will cross pollinate. Can be substituted for broccoli in recipes. High in calcium, iron, and vitamins A &amp; C.</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3">
          <table:table-cell office:value-type="float" office:value="1105" calcext:value-type="float">
            <text:p>1105</text:p>
          </table:table-cell>
          <table:table-cell table:style-name="ce14" office:value-type="string" calcext:value-type="string">
            <text:p>BEET (Beta vulgaris)</text:p>
          </table:table-cell>
          <table:table-cell table:style-name="ce14" office:value-type="string" calcext:value-type="string">
            <text:p>Chioggia</text:p>
          </table:table-cell>
          <table:table-cell table:style-name="ce14" office:value-type="string" calcext:value-type="string">
            <text:p>Botanical Interest, Inc</text:p>
          </table:table-cell>
          <table:table-cell table:style-name="ce14" office:value-type="string" calcext:value-type="string">
            <text:p>Italian heirloom, alternating red/white concentric rings remain when cooked; sweet boiled/baked/pickled. Sow 1/2” in ground <text:s/>4 inches apart. 55 days. Will cross with other beets or Swiss Chard.</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21 days</text:p>
          </table:table-cell>
          <table:table-cell/>
          <table:table-cell table:style-name="ce6" table:number-columns-repeated="16366"/>
        </table:table-row>
        <table:table-row table:style-name="ro4">
          <table:table-cell office:value-type="float" office:value="1111" calcext:value-type="float">
            <text:p>1111</text:p>
          </table:table-cell>
          <table:table-cell table:style-name="ce15" office:value-type="string" calcext:value-type="string">
            <text:p>BEET (Beta vulgaris)</text:p>
          </table:table-cell>
          <table:table-cell table:style-name="ce15" office:value-type="string" calcext:value-type="string">
            <text:p>Chioggia Guardsmark</text:p>
          </table:table-cell>
          <table:table-cell table:style-name="ce15" office:value-type="string" calcext:value-type="string">
            <text:p>Johnny’s Seed</text:p>
          </table:table-cell>
          <table:table-cell table:style-name="ce15" office:value-type="string" calcext:value-type="string">
            <text:p>Italian heirloom, alternating red/white concentric rings remain when cooked; sweet, raw/boiled/baked/pickled; sow in ground 1/2 in deep 3-4 seeds per in. Thin to 2 in apart. Will cross with other beets or Swiss Chard. Soil Temp Range: 40°-95° Optimum: 85°</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table-cell table:style-name="ce6" table:number-columns-repeated="16366"/>
        </table:table-row>
        <table:table-row table:style-name="ro4">
          <table:table-cell office:value-type="float" office:value="1725" calcext:value-type="float">
            <text:p>1725</text:p>
          </table:table-cell>
          <table:table-cell table:style-name="ce15" office:value-type="string" calcext:value-type="string">
            <text:p>TOMATO CHERRY (Solanum lycopersicum)</text:p>
          </table:table-cell>
          <table:table-cell table:style-name="ce15" office:value-type="string" calcext:value-type="string">
            <text:p>Chocolate Cherry</text:p>
          </table:table-cell>
          <table:table-cell table:style-name="ce14" office:value-type="string" calcext:value-type="string">
            <text:p>Botanical Interest, Inc</text:p>
          </table:table-cell>
          <table:table-cell table:style-name="ce15" office:value-type="string" calcext:value-type="string">
            <text:p>Start indoors 4-6 weeks before transplant. Sow 1/8” below surface in containers. Transplant 1-2 weeks after last frost. ; plant outdoors 24”-36” apart. Matures 70 days from transplant. <text:s/>Classic cherry tomato, 3/4” - 1” in clusters. Purplish <text:s/>red, very swee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2">
          <table:table-cell office:value-type="float" office:value="1249" calcext:value-type="float">
            <text:p>1249</text:p>
          </table:table-cell>
          <table:table-cell table:style-name="ce15" office:value-type="string" calcext:value-type="string">
            <text:p>FLOWER Chocolate Flower (Berlandiera lyrata)</text:p>
          </table:table-cell>
          <table:table-cell table:style-name="ce15" office:value-type="string" calcext:value-type="string">
            <text:p>Chocolate Flower</text:p>
          </table:table-cell>
          <table:table-cell table:style-name="ce14" office:value-type="string" calcext:value-type="string">
            <text:p>Botanical Interest, Inc</text:p>
          </table:table-cell>
          <table:table-cell table:style-name="ce15" office:value-type="string" calcext:value-type="string">
            <text:p>Start inside 4-6 weeks before average last frost. Outside, plant 1-2 weeks before average last frost. Light aids germination. Press seeds into soil surface, do not cover. Plant about 16” apart. Attracts beneficial insects. Best in well- drained, average to poor quality, dry soil.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2">
          <table:table-cell office:value-type="float" office:value="1079" calcext:value-type="float">
            <text:p>1079</text:p>
          </table:table-cell>
          <table:table-cell table:style-name="ce14" office:value-type="string" calcext:value-type="string">
            <text:p>BEAN, LIMA (Phaseolus lunatus)</text:p>
          </table:table-cell>
          <table:table-cell table:style-name="ce14" office:value-type="string" calcext:value-type="string">
            <text:p>Christmas Pole (Heirloom)</text:p>
          </table:table-cell>
          <table:table-cell table:style-name="ce14" office:value-type="string" calcext:value-type="string">
            <text:p>Baker Creek Heirloom Seeds</text:p>
          </table:table-cell>
          <table:table-cell table:style-name="ce14" office:value-type="string" calcext:value-type="string">
            <text:p>Direct sow outdoors after last frost; 6” apart and 1” deep; full sun; trellis. <text:s/>Presoaking 1-2 hours speeds germination. <text:s/>Limas love it warm but won’t thrive in extreme heat. <text:s/>Beans will rot if soil is cold or very wet. These are very large white beans with beautiful dark red splashes. Soil Temp Range: 60°-9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2">
          <table:table-cell office:value-type="float" office:value="1525" calcext:value-type="float">
            <text:p>1525</text:p>
          </table:table-cell>
          <table:table-cell table:style-name="ce14" office:value-type="string" calcext:value-type="string">
            <text:p>Microgreens Basil (Ocimum basilicum)</text:p>
          </table:table-cell>
          <table:table-cell table:style-name="ce14" office:value-type="string" calcext:value-type="string">
            <text:p>Ciao Bella Basil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hickly, about 1/4”-1/2” apart. Press seeds firmly into soil mix and barely cover with sowing mix. Move containers as need for best light exposure. Harvest about 16-25 days after sowing.</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5-75 degrees</text:p>
          </table:table-cell>
          <table:table-cell table:style-name="ce14" office:value-type="string" calcext:value-type="string">
            <text:p>5-10 days</text:p>
          </table:table-cell>
          <table:table-cell/>
          <table:table-cell table:style-name="ce6" table:number-columns-repeated="16366"/>
        </table:table-row>
        <table:table-row table:style-name="ro5">
          <table:table-cell office:value-type="float" office:value="1500" calcext:value-type="float">
            <text:p>1500</text:p>
          </table:table-cell>
          <table:table-cell table:style-name="ce15" office:value-type="string" calcext:value-type="string">
            <text:p>LETTUCE Romaine (Latuca sativa)</text:p>
          </table:table-cell>
          <table:table-cell table:style-name="ce15" office:value-type="string" calcext:value-type="string">
            <text:p>Cimmaron</text:p>
          </table:table-cell>
          <table:table-cell table:style-name="ce14" office:value-type="string" calcext:value-type="string">
            <text:p>Native Seed/SEARCH <text:s/>www.nativeseeds.org</text:p>
          </table:table-cell>
          <table:table-cell table:style-name="ce15" office:value-type="string" calcext:value-type="string">
            <text:p>Broad, flat leaves range from dark red to bronze. Water at base to avoid rot. Stagger planting 10 days; thin to 8” for full head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5">
          <table:table-cell office:value-type="float" office:value="1616" calcext:value-type="float">
            <text:p>1616</text:p>
          </table:table-cell>
          <table:table-cell table:style-name="ce15" office:value-type="string" calcext:value-type="string">
            <text:p>PUMPKIN (Cucurbita maxima)</text:p>
          </table:table-cell>
          <table:table-cell table:style-name="ce15" office:value-type="string" calcext:value-type="string">
            <text:p>Cinderella</text:p>
          </table:table-cell>
          <table:table-cell table:style-name="ce14" office:value-type="string" calcext:value-type="string">
            <text:p>Botanical Interest, Inc</text:p>
          </table:table-cell>
          <table:table-cell table:style-name="ce15" office:value-type="string" calcext:value-type="string">
            <text:p>Direct sow outdoors 2-3 seeds 1”deep. Make mounds 4-6 feet apart; thin to 1 healthy plant per mound. Tolerates heat and humidity. Full sun; 110 days. Large, deeply ridged and good for eating.</text:p>
          </table:table-cell>
          <table:table-cell table:style-name="ce15" table:number-columns-repeated="3"/>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table-cell table:style-name="ce6" table:number-columns-repeated="16366"/>
        </table:table-row>
        <table:table-row table:style-name="ro3">
          <table:table-cell office:value-type="float" office:value="1535" calcext:value-type="float">
            <text:p>1535</text:p>
          </table:table-cell>
          <table:table-cell table:style-name="ce14" office:value-type="string" calcext:value-type="string">
            <text:p>OKRA (Abelmoschus esculentus)</text:p>
          </table:table-cell>
          <table:table-cell table:style-name="ce14" office:value-type="string" calcext:value-type="string">
            <text:p>Clemson Spineless</text:p>
          </table:table-cell>
          <table:table-cell table:style-name="ce14" office:value-type="string" calcext:value-type="string">
            <text:p>Ferry Morse</text:p>
          </table:table-cell>
          <table:table-cell table:style-name="ce14" office:value-type="string" calcext:value-type="string">
            <text:p>Soak 24 hrs before planting, direct sow or start indoors 3/4” deep and 18” apart. Harvest pods 2-4” long daily, as they grow quickly past stage of prime eating.</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2">
          <table:table-cell office:value-type="float" office:value="1582" calcext:value-type="float">
            <text:p>1582</text:p>
          </table:table-cell>
          <table:table-cell table:style-name="ce15" office:value-type="string" calcext:value-type="string">
            <text:p>Pepper CHILE (Capsicum annuum)</text:p>
          </table:table-cell>
          <table:table-cell table:style-name="ce15" office:value-type="string" calcext:value-type="string">
            <text:p>Cochiti (Medium to Medium Hot) </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table-cell table:style-name="ce6" table:number-columns-repeated="16366"/>
        </table:table-row>
        <table:table-row table:style-name="ro6">
          <table:table-cell office:value-type="float" office:value="1663" calcext:value-type="float">
            <text:p>1663</text:p>
          </table:table-cell>
          <table:table-cell table:style-name="ce15" office:value-type="string" calcext:value-type="string">
            <text:p>SQUASH (Cucubirta pepo)</text:p>
          </table:table-cell>
          <table:table-cell table:style-name="ce15" office:value-type="string" calcext:value-type="string">
            <text:p>Cocozella Di Napoli </text:p>
          </table:table-cell>
          <table:table-cell table:style-name="ce14" office:value-type="string" calcext:value-type="string">
            <text:p>Baker Creek Heirloom Seeds</text:p>
          </table:table-cell>
          <table:table-cell table:style-name="ce15" office:value-type="string" calcext:value-type="string">
            <text:p>(Italian Heirloom) Long, Slender fruit, ribbed, pale greenish- yellow, striped with dark green, firm &amp; flavorful. <text:s/>Direct sow 2-3 seeds 1”deep, 3-4 feet apart; thin to 1 healthy plant. <text:s/>Pick regularly to encourage fruit development; best flavor when skin is thin. <text:s/>Will cross with other Cucubirta pepo. <text:s/>55-60 days Soil Temp Range: 60°-100° Optimum: 9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100° Optimum: 90°</text:p>
          </table:table-cell>
          <table:table-cell table:style-name="ce15" office:value-type="string" calcext:value-type="string">
            <text:p>3-4 days</text:p>
          </table:table-cell>
          <table:table-cell/>
          <table:table-cell table:style-name="ce6" table:number-columns-repeated="16366"/>
        </table:table-row>
        <table:table-row table:style-name="ro4">
          <table:table-cell office:value-type="float" office:value="1090" calcext:value-type="float">
            <text:p>1090</text:p>
          </table:table-cell>
          <table:table-cell table:style-name="ce15" office:value-type="string" calcext:value-type="string">
            <text:p>BEAN, TEPARY (Phaseolus acutifolius)</text:p>
          </table:table-cell>
          <table:table-cell table:style-name="ce15" office:value-type="string" calcext:value-type="string">
            <text:p>Colonia Morelos, Speckled</text:p>
          </table:table-cell>
          <table:table-cell table:style-name="ce14" office:value-type="string" calcext:value-type="string">
            <text:p>Native Seed/SEARCH <text:s/>www.nativeseeds.org</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ierra Vista, AZ</text:p>
          </table:table-cell>
          <table:table-cell table:style-name="ce15"/>
          <table:table-cell table:style-name="ce15" office:value-type="string" calcext:value-type="string">
            <text:p>Andy Ward</text:p>
          </table:table-cell>
          <table:table-cell table:style-name="ce28" office:value-type="string" calcext:value-type="string">
            <text:p>2016</text:p>
          </table:table-cell>
          <table:table-cell table:style-name="ce15" table:number-columns-repeated="2"/>
          <table:table-cell/>
          <table:table-cell table:style-name="ce6" table:number-columns-repeated="16366"/>
        </table:table-row>
        <table:table-row table:style-name="ro4">
          <table:table-cell office:value-type="float" office:value="1370" calcext:value-type="float">
            <text:p>1370</text:p>
          </table:table-cell>
          <table:table-cell table:style-name="ce14" office:value-type="string" calcext:value-type="string">
            <text:p>FLOWER Yarrow (Achillea millefolium)</text:p>
          </table:table-cell>
          <table:table-cell table:style-name="ce14" office:value-type="string" calcext:value-type="string">
            <text:p>Colorado Blend</text:p>
          </table:table-cell>
          <table:table-cell table:style-name="ce14" office:value-type="string" calcext:value-type="string">
            <text:p>Botanical Interest, Inc</text:p>
          </table:table-cell>
          <table:table-cell table:style-name="ce14" office:value-type="string" calcext:value-type="string">
            <text:p>Sow outside 2 to 4 weeks after last frost. Light aids germination. Press gently into soil surface. Space 18” to 24” apart. Can grow in nearly any well drained soil. Drought tolerant. Attracts beneficial insects. Deer resistant. 3’ to 4’ tall. Make wonderful cut flow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343" calcext:value-type="float">
            <text:p>1343</text:p>
          </table:table-cell>
          <table:table-cell table:style-name="ce14" office:value-type="string" calcext:value-type="string">
            <text:p>FLOWER Stock (Matthiola incana)</text:p>
          </table:table-cell>
          <table:table-cell table:style-name="ce14" office:value-type="string" calcext:value-type="string">
            <text:p>Column Blend</text:p>
          </table:table-cell>
          <table:table-cell table:style-name="ce14" office:value-type="string" calcext:value-type="string">
            <text:p>Winnie Struse</text:p>
          </table:table-cell>
          <table:table-cell table:style-name="ce14" office:value-type="string" calcext:value-type="string">
            <text:p>Press into surface of soil: do not cover seeds with soil as light aids germination. Start inside <text:s/>8-10 weeks before average last frost or 8-10 weeks before planting outside in fall or winter for early spring bloom. For Continuous bloom, sow every 2-3 weeks. Attracts pollinators. Deer resistant.</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office:value-type="string" calcext:value-type="string">
            <text:p>Winnie Struse</text:p>
          </table:table-cell>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1">
          <table:table-cell office:value-type="float" office:value="1353" calcext:value-type="float">
            <text:p>1353</text:p>
          </table:table-cell>
          <table:table-cell table:style-name="ce14" office:value-type="string" calcext:value-type="string">
            <text:p>FLOWER Sunflower (Helianthus annuus)</text:p>
          </table:table-cell>
          <table:table-cell table:style-name="ce14" office:value-type="string" calcext:value-type="string">
            <text:p>Common</text:p>
          </table:table-cell>
          <table:table-cell table:style-name="ce14" office:value-type="string" calcext:value-type="string">
            <text:p>Native Seed/SEARCH <text:s/>www.nativeseeds.org</text:p>
          </table:table-cell>
          <table:table-cell table:style-name="ce14" office:value-type="string" calcext:value-type="string">
            <text:p>Wild in the SW; seen along the highway; multi-branched 3-6 foot plants with 2” flowers. <text:s/>Reseeds itself; can spread.</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table-cell table:style-name="ce6" table:number-columns-repeated="16366"/>
        </table:table-row>
        <table:table-row table:style-name="ro3">
          <table:table-cell office:value-type="float" office:value="1425" calcext:value-type="float">
            <text:p>1425</text:p>
          </table:table-cell>
          <table:table-cell table:style-name="ce15" office:value-type="string" calcext:value-type="string">
            <text:p>HERB Catnip (Nepeta cataria)</text:p>
          </table:table-cell>
          <table:table-cell table:style-name="ce15" office:value-type="string" calcext:value-type="string">
            <text:p>Common</text:p>
          </table:table-cell>
          <table:table-cell table:style-name="ce15" office:value-type="string" calcext:value-type="string">
            <text:p>Ferry Morse</text:p>
          </table:table-cell>
          <table:table-cell table:style-name="ce15" office:value-type="string" calcext:value-type="string">
            <text:p>Plant outdoors 2-4 weeks before last frost 1/8”-1/4” deep about 12” apart. Calming tea is pleasant. Dried leaves in toys will entertain felines for hours.</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4">
          <table:table-cell office:value-type="float" office:value="1429" calcext:value-type="float">
            <text:p>1429</text:p>
          </table:table-cell>
          <table:table-cell table:style-name="ce14" office:value-type="string" calcext:value-type="string">
            <text:p>HERB Chives (Allium schoenoprasum)</text:p>
          </table:table-cell>
          <table:table-cell table:style-name="ce14" office:value-type="string" calcext:value-type="string">
            <text:p>Common</text:p>
          </table:table-cell>
          <table:table-cell table:style-name="ce14"/>
          <table:table-cell table:style-name="ce14" office:value-type="string" calcext:value-type="string">
            <text:p>Direct sow or start indoors 6-8 weeks before last frost, several seeds 1/4 in deep in moist soil. Transplant 4-8” apart. Drought and heat tolerant. Foliage and flowers edible. Delicate onion flavor; wonderful flavor in many recipes.</text:p>
          </table:table-cell>
          <table:table-cell table:style-name="ce14"/>
          <table:table-cell table:style-name="ce14" office:value-type="string" calcext:value-type="string">
            <text:p>8-1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table-cell table:style-name="ce14" office:value-type="string" calcext:value-type="string">
            <text:p>15-21 days Perennial Full Sun</text:p>
          </table:table-cell>
          <table:table-cell/>
          <table:table-cell table:style-name="ce6" table:number-columns-repeated="16366"/>
        </table:table-row>
        <table:table-row table:style-name="ro4">
          <table:table-cell office:value-type="float" office:value="1432" calcext:value-type="float">
            <text:p>1432</text:p>
          </table:table-cell>
          <table:table-cell table:style-name="ce14" office:value-type="string" calcext:value-type="string">
            <text:p>HERB Cilantro (Coriandrum stivum)</text:p>
          </table:table-cell>
          <table:table-cell table:style-name="ce14" office:value-type="string" calcext:value-type="string">
            <text:p>Common</text:p>
          </table:table-cell>
          <table:table-cell table:style-name="ce14" office:value-type="string" calcext:value-type="string">
            <text:p>Baker Creek Heirloom Seeds</text:p>
          </table:table-cell>
          <table:table-cell table:style-name="ce14" office:value-type="string" calcext:value-type="string">
            <text:p>Plant fall thru early spring in low desert, spring thru summer in cooler climates. Sow 1/4-1” deep directly into well draining, rich soil. Leaves are called cilantro; seeds are called coriander. Germination 7-14 days.</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437" calcext:value-type="float">
            <text:p>1437</text:p>
          </table:table-cell>
          <table:table-cell table:style-name="ce15" office:value-type="string" calcext:value-type="string">
            <text:p>HERB Dill (Anethum graveolens)</text:p>
          </table:table-cell>
          <table:table-cell table:style-name="ce15" office:value-type="string" calcext:value-type="string">
            <text:p>Common</text:p>
          </table:table-cell>
          <table:table-cell table:style-name="ce15"/>
          <table:table-cell table:style-name="ce15" office:value-type="string" calcext:value-type="string">
            <text:p>Large fragrant heads and abundant seeds. <text:s/>Great for pickling and fresh use. <text:s/>Direct sow by pressing into soil; thin to 8-12” apart; full sun; shelter from wind; will readily volunteer each year by dropping seeds.</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20-25 days</text:p>
          </table:table-cell>
          <table:table-cell/>
          <table:table-cell table:style-name="ce6" table:number-columns-repeated="16366"/>
        </table:table-row>
        <table:table-row table:style-name="ro2">
          <table:table-cell office:value-type="float" office:value="1443" calcext:value-type="float">
            <text:p>1443</text:p>
          </table:table-cell>
          <table:table-cell table:style-name="ce14" office:value-type="string" calcext:value-type="string">
            <text:p>HERB Lemon Balm (Melissa officinalis)</text:p>
          </table:table-cell>
          <table:table-cell table:style-name="ce14" office:value-type="string" calcext:value-type="string">
            <text:p>Common</text:p>
          </table:table-cell>
          <table:table-cell table:style-name="ce15" office:value-type="string" calcext:value-type="string">
            <text:p>Territorial Seed Company</text:p>
          </table:table-cell>
          <table:table-cell table:style-name="ce15" office:value-type="string" calcext:value-type="string">
            <text:p>Sow in flats 6-8 weeks before last frost. Tamp seeds lightly onto the soil as seeds require light to germinate. Mist lightly. Transplant when seedlings have 4 true leaves, giving plants 12” spacing. Individual leaves may be picked as soon as plants become established. Best when used fresh.</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444" calcext:value-type="float">
            <text:p>1444</text:p>
          </table:table-cell>
          <table:table-cell table:style-name="ce15" office:value-type="string" calcext:value-type="string">
            <text:p>HERB Marjoram (Origanum majorana)</text:p>
          </table:table-cell>
          <table:table-cell table:style-name="ce15" office:value-type="string" calcext:value-type="string">
            <text:p>Common</text:p>
          </table:table-cell>
          <table:table-cell table:style-name="ce14" office:value-type="string" calcext:value-type="string">
            <text:p>Botanical Interest, Inc</text:p>
          </table:table-cell>
          <table:table-cell table:style-name="ce15" office:value-type="string" calcext:value-type="string">
            <text:p>Plant indoors 6-8 weeks before last frost by lightly pressing into top of soil. Light aids germination. Transplant outdoors 2-4 weeks after last frost or direct sow anytime up until 2 months before first fall frost. Space about 20” apart. Sweeter, milder taste than oregano. Drought tolerant. Deer resist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3">
          <table:table-cell office:value-type="float" office:value="1445" calcext:value-type="float">
            <text:p>1445</text:p>
          </table:table-cell>
          <table:table-cell table:style-name="ce14" office:value-type="string" calcext:value-type="string">
            <text:p>HERB Mint (Mentha sp)</text:p>
          </table:table-cell>
          <table:table-cell table:style-name="ce14" office:value-type="string" calcext:value-type="string">
            <text:p>Common</text:p>
          </table:table-cell>
          <table:table-cell table:style-name="ce14" office:value-type="string" calcext:value-type="string">
            <text:p>Botanical Interest, Inc</text:p>
          </table:table-cell>
          <table:table-cell table:style-name="ce14" office:value-type="string" calcext:value-type="string">
            <text:p>Plant outside1-2 weeks after last frost. Plant inside 6-8 weeks before last frost. Gently press into surface of soil, light aids germination. Keep moist. Flowers attract bees. Deer resistant.</text:p>
          </table:table-cell>
          <table:table-cell table:style-name="ce14"/>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452" calcext:value-type="float">
            <text:p>1452</text:p>
          </table:table-cell>
          <table:table-cell table:style-name="ce15" office:value-type="string" calcext:value-type="string">
            <text:p>HERB Oregano (Origanum vulgare)</text:p>
          </table:table-cell>
          <table:table-cell table:style-name="ce15" office:value-type="string" calcext:value-type="string">
            <text:p>Common</text:p>
          </table:table-cell>
          <table:table-cell table:style-name="ce14" office:value-type="string" calcext:value-type="string">
            <text:p>Botanical Interest, Inc</text:p>
          </table:table-cell>
          <table:table-cell table:style-name="ce15" office:value-type="string" calcext:value-type="string">
            <text:p>Plant indoors 6-8 weeks before last frost 1/8”-1/4” deep. Transplant outdoors 2-4 weeks after last frost or direct sow anytime up until 2 months before first fall frost. Space about 20” apart. Drought tolerant. Deer resist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3">
          <table:table-cell office:value-type="float" office:value="1456" calcext:value-type="float">
            <text:p>1456</text:p>
          </table:table-cell>
          <table:table-cell table:style-name="ce14" office:value-type="string" calcext:value-type="string">
            <text:p>HERB PARSLEY (Petroselinum crispum)</text:p>
          </table:table-cell>
          <table:table-cell table:style-name="ce14" office:value-type="string" calcext:value-type="string">
            <text:p>Common</text:p>
          </table:table-cell>
          <table:table-cell table:style-name="ce14"/>
          <table:table-cell table:style-name="ce14" office:value-type="string" calcext:value-type="string">
            <text:p>Soak seeds overnight before sowing. Direct sow in garden 4-6 weeks before last frost or start indoors 6-8 weeks before last frost. Plant 1/4 in deep, 8 in apart. Grow indoors for use year round.</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4-28 days</text:p>
          </table:table-cell>
          <table:table-cell/>
          <table:table-cell table:style-name="ce6" table:number-columns-repeated="16366"/>
        </table:table-row>
        <table:table-row table:style-name="ro2">
          <table:table-cell office:value-type="float" office:value="1459" calcext:value-type="float">
            <text:p>1459</text:p>
          </table:table-cell>
          <table:table-cell table:style-name="ce15" office:value-type="string" calcext:value-type="string">
            <text:p>HERB Rosemary (Rosmarinus officinalis)</text:p>
          </table:table-cell>
          <table:table-cell table:style-name="ce15" office:value-type="string" calcext:value-type="string">
            <text:p>Common</text:p>
          </table:table-cell>
          <table:table-cell table:style-name="ce14" office:value-type="string" calcext:value-type="string">
            <text:p>Ferry Morse</text:p>
          </table:table-cell>
          <table:table-cell table:style-name="ce15" office:value-type="string" calcext:value-type="string">
            <text:p>Start seed indoors in a sunny location 10-12 weeks before transplanting outdoors or sow directly in well drained soil. Plant by pressing seed into surface and space 12 in apart. Pick leaves as needed. May be used fresh or dried. Fairly drought tolerant and deer resistant.</text:p>
          </table:table-cell>
          <table:table-cell table:style-name="ce15"/>
          <table:table-cell table:style-name="ce15" office:value-type="string" calcext:value-type="string">
            <text:p>15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3">
          <table:table-cell office:value-type="float" office:value="1468" calcext:value-type="float">
            <text:p>1468</text:p>
          </table:table-cell>
          <table:table-cell table:style-name="ce14" office:value-type="string" calcext:value-type="string">
            <text:p>HERB Thyme (Thymus vulgaris)</text:p>
          </table:table-cell>
          <table:table-cell table:style-name="ce14" office:value-type="string" calcext:value-type="string">
            <text:p>Common</text:p>
          </table:table-cell>
          <table:table-cell table:style-name="ce14" office:value-type="string" calcext:value-type="string">
            <text:p>Ferry Morse</text:p>
          </table:table-cell>
          <table:table-cell table:style-name="ce14" office:value-type="string" calcext:value-type="string">
            <text:p>Plant early spring indoors, barely covering. <text:s/>Light aids in germination. Keep soil moist. Plant outdoors when plants are well established. Harvest in the morning for best flavor.</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6">
          <table:table-cell office:value-type="float" office:value="1485" calcext:value-type="float">
            <text:p>1485</text:p>
          </table:table-cell>
          <table:table-cell table:style-name="ce14" office:value-type="string" calcext:value-type="string">
            <text:p>LETTUCE Bibb (Latuca sativa)</text:p>
          </table:table-cell>
          <table:table-cell table:style-name="ce14" office:value-type="string" calcext:value-type="string">
            <text:p>Common</text:p>
          </table:table-cell>
          <table:table-cell table:style-name="ce14" office:value-type="string" calcext:value-type="string">
            <text:p>Ferry Morse</text:p>
          </table:table-cell>
          <table:table-cell table:style-name="ce14" office:value-type="string" calcext:value-type="string">
            <text:p>Head is small and loose butterhead variety. Buttery taste. Direct sow as early as soil can be madfe fine and loose. Plant seeds every 2” covering with 1/4” soil. Thin to 12” apart. Shade on very sunny days to keep soil cool. Germinates well in low temps but dormant above 75 degrees. Harvest entire head at maturity or about 57 days.</text:p>
          </table:table-cell>
          <table:table-cell table:style-name="ce14"/>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table-cell table:style-name="ce6" table:number-columns-repeated="16366"/>
        </table:table-row>
        <table:table-row table:style-name="ro2">
          <table:table-cell office:value-type="float" office:value="1487" calcext:value-type="float">
            <text:p>1487</text:p>
          </table:table-cell>
          <table:table-cell table:style-name="ce15" office:value-type="string" calcext:value-type="string">
            <text:p>LETTUCE Butterhead (Latuca sativa)</text:p>
          </table:table-cell>
          <table:table-cell table:style-name="ce15" office:value-type="string" calcext:value-type="string">
            <text:p>Common</text:p>
          </table:table-cell>
          <table:table-cell table:style-name="ce15" office:value-type="string" calcext:value-type="string">
            <text:p>Johnny’s Seed</text:p>
          </table:table-cell>
          <table:table-cell table:style-name="ce15" office:value-type="string" calcext:value-type="string">
            <text:p>Head is large and dense. Buttery taste. Sow indoors 3-4 weeks before last frost. Sow in flats barely covering seeds. Shade on very sunny days to keep soil cool. Germinates well in low temps but dormant above 75 degrees. Harvest leaves from outer edge so plant continues to grow from center.</text:p>
          </table:table-cell>
          <table:table-cell table:style-name="ce15"/>
          <table:table-cell table:style-name="ce15" office:value-type="string" calcext:value-type="string">
            <text:p>10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4">
          <table:table-cell office:value-type="float" office:value="1556" calcext:value-type="float">
            <text:p>1556</text:p>
          </table:table-cell>
          <table:table-cell table:style-name="ce14" office:value-type="string" calcext:value-type="string">
            <text:p>PEA Sugar Snap (Pisum sativum)</text:p>
          </table:table-cell>
          <table:table-cell table:style-name="ce14" office:value-type="string" calcext:value-type="string">
            <text:p>Common</text:p>
          </table:table-cell>
          <table:table-cell table:style-name="ce14" office:value-type="string" calcext:value-type="string">
            <text:p>Burpee</text:p>
          </table:table-cell>
          <table:table-cell table:style-name="ce14" office:value-type="string" calcext:value-type="string">
            <text:p>Direct sow outdoors; young plants can tolerate a light frost. <text:s/>Plant 1” deep, 6” apart in full sun. Trellsi. Keep weed free. <text:s/>Early harvest; cold resistant; 65 days; 3” pods. <text:s/>Consume raw soon after harvest or use in stir-fry. <text:s/>Very sweet.</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7-14 days</text:p>
          </table:table-cell>
          <table:table-cell/>
          <table:table-cell table:style-name="ce6" table:number-columns-repeated="16366"/>
        </table:table-row>
        <table:table-row table:style-name="ro10">
          <table:table-cell office:value-type="float" office:value="1172" calcext:value-type="float">
            <text:p>1172</text:p>
          </table:table-cell>
          <table:table-cell table:style-name="ce14" office:value-type="string" calcext:value-type="string">
            <text:p>Cover Crop</text:p>
          </table:table-cell>
          <table:table-cell table:style-name="ce14" office:value-type="string" calcext:value-type="string">
            <text:p>Common Buckwheat (Fagopyrum esculentum)</text:p>
          </table:table-cell>
          <table:table-cell table:style-name="ce14" office:value-type="string" calcext:value-type="string">
            <text:p>Botanical Interest, Inc</text:p>
          </table:table-cell>
          <table:table-cell table:style-name="ce14" office:value-type="string" calcext:value-type="string">
            <text:p>Not a wheat but an “ancient grain” related to rhubarb. Scatter seed spring through fall in full sun when soil is above 55 degrees. Requires little water after germination. <text:s/>Fast growing “smother” crop to inhibit growth of common garden weeds; easy to till into garden with shovel or rototiller; can use cut plants for mulch. <text:s/>POLLINATOR ATTRACTOR; especially bees. Late summer planting gives honeybees winter food supply. Buckwheat honey is exquisite! <text:s/>Plant has beautiful white flowers you can add to bouquets. <text:s/>Seeds are a powerhouse of protein, fiber, &amp; minerals—low glycemic index. Easy to use as sprouts.</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6 days</text:p>
          </table:table-cell>
          <table:table-cell/>
          <table:table-cell table:style-name="ce6" table:number-columns-repeated="16366"/>
        </table:table-row>
        <table:table-row table:style-name="ro2">
          <table:table-cell office:value-type="float" office:value="1316" calcext:value-type="float">
            <text:p>1316</text:p>
          </table:table-cell>
          <table:table-cell table:style-name="ce14" office:value-type="string" calcext:value-type="string">
            <text:p>FLOWER Milkweed (Asclepias tuberosa)</text:p>
          </table:table-cell>
          <table:table-cell table:style-name="ce14" office:value-type="string" calcext:value-type="string">
            <text:p>Common Butterfly Flower</text:p>
          </table:table-cell>
          <table:table-cell table:style-name="ce14" office:value-type="string" calcext:value-type="string">
            <text:p>Botanical Interest, Inc</text:p>
          </table:table-cell>
          <table:table-cell table:style-name="ce14" office:value-type="string" calcext:value-type="string">
            <text:p>Sow outside 2 to 4 weeks before average last frost date. Plant 1/4” deep. Space 12” to 16” apart. Drought tolerant when established. Attracts butterflies and habitat for monarch butterfly and their caterpillars. Deer resistant. Drought tolerant once established. Sap is toxic; avoid skin/eye contact. Do not ea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441" calcext:value-type="float">
            <text:p>1441</text:p>
          </table:table-cell>
          <table:table-cell table:style-name="ce15" office:value-type="string" calcext:value-type="string">
            <text:p>HERB Garlic (Allium sativum)</text:p>
          </table:table-cell>
          <table:table-cell table:style-name="ce15" office:value-type="string" calcext:value-type="string">
            <text:p>Common Hardneck</text:p>
          </table:table-cell>
          <table:table-cell table:style-name="ce15" office:value-type="string" calcext:value-type="string">
            <text:p>BJ Searcy, CCMGA Master Gardener, Whetstone</text:p>
          </table:table-cell>
          <table:table-cell table:style-name="ce15" office:value-type="string" calcext:value-type="string">
            <text:p>Plant the bulbils close together in the fall to grow into small single-clove garlic bulbs the first year. Use the individual cloves or the top greens as needed. Leave the remainder in the soil to grow into multi-cloved garlic heads in subsequent years. The bulbils are tiny cloves of garlic and also edible.</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4"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5</text:p>
          </table:table-cell>
          <table:table-cell table:style-name="ce15" table:number-columns-repeated="2"/>
          <table:table-cell/>
          <table:table-cell table:style-name="ce6" table:number-columns-repeated="16366"/>
        </table:table-row>
        <table:table-row table:style-name="ro3">
          <table:table-cell office:value-type="float" office:value="1639" calcext:value-type="float">
            <text:p>1639</text:p>
          </table:table-cell>
          <table:table-cell table:style-name="ce15" office:value-type="string" calcext:value-type="string">
            <text:p>SORREL (Rumex aacetosa)</text:p>
          </table:table-cell>
          <table:table-cell table:style-name="ce15" office:value-type="string" calcext:value-type="string">
            <text:p>Common Sorrel</text:p>
          </table:table-cell>
          <table:table-cell table:style-name="ce14" office:value-type="string" calcext:value-type="string">
            <text:p>Botanical Interest, Inc</text:p>
          </table:table-cell>
          <table:table-cell table:style-name="ce15" office:value-type="string" calcext:value-type="string">
            <text:p>Direct sow in early spring 1 to 2 weeks before average last frost. Plant 1/8” every 8”. Use as a salad green, as a compliment to fish or mixed with spinach or chard. Very high in Vitamin C.</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table-cell table:style-name="ce15" office:value-type="string" calcext:value-type="string">
            <text:p>Perennial in mild climates</text:p>
          </table:table-cell>
          <table:table-cell/>
          <table:table-cell table:style-name="ce6" table:number-columns-repeated="16366"/>
        </table:table-row>
        <table:table-row table:style-name="ro5">
          <table:table-cell office:value-type="float" office:value="1614" calcext:value-type="float">
            <text:p>1614</text:p>
          </table:table-cell>
          <table:table-cell table:style-name="ce14" office:value-type="string" calcext:value-type="string">
            <text:p>PUMPKIN (Cucurbita maxima)</text:p>
          </table:table-cell>
          <table:table-cell table:style-name="ce14" office:value-type="string" calcext:value-type="string">
            <text:p>Connecticut Field </text:p>
          </table:table-cell>
          <table:table-cell table:style-name="ce14" office:value-type="string" calcext:value-type="string">
            <text:p>American Seed</text:p>
          </table:table-cell>
          <table:table-cell table:style-name="ce14" office:value-type="string" calcext:value-type="string">
            <text:p>Direct sow outdoors 2-3 seeds 1”deep. Make mounds 4-6 feet apart; thin to 1 healthy plant per mound. Tolerates heat and humidity. Full sun; 110 days. Large, deeply ridged and good for eating or carving.</text:p>
          </table:table-cell>
          <table:table-cell table:style-name="ce14"/>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table-cell table:style-name="ce6" table:number-columns-repeated="16366"/>
        </table:table-row>
        <table:table-row table:style-name="ro2">
          <table:table-cell office:value-type="float" office:value="1349" calcext:value-type="float">
            <text:p>1349</text:p>
          </table:table-cell>
          <table:table-cell table:style-name="ce14" office:value-type="string" calcext:value-type="string">
            <text:p>FLOWER Sunflower (Helianthus annuus)</text:p>
          </table:table-cell>
          <table:table-cell table:style-name="ce15" office:value-type="string" calcext:value-type="string">
            <text:p>Conservation Farm Mix</text:p>
          </table:table-cell>
          <table:table-cell table:style-name="ce15" office:value-type="string" calcext:value-type="string">
            <text:p>Native Seed/SEARCH <text:s/>www.nativeseeds.org</text:p>
          </table:table-cell>
          <table:table-cell table:style-name="ce15" office:value-type="string" calcext:value-type="string">
            <text:p>Open pollinated mix of Native Seed/SEARCH varieties at the Conservation Farm. <text:s/>Heads can reach up to 12 inches in diameter and the plants up to 8 feet tall. <text:s/>Includes single flower heads and others that are branched with multiple smaller heads. <text:s/>Grow for wonderful, edible seed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table-cell table:style-name="ce6" table:number-columns-repeated="16366"/>
        </table:table-row>
        <table:table-row table:style-name="ro4">
          <table:table-cell office:value-type="float" office:value="1060" calcext:value-type="float">
            <text:p>1060</text:p>
          </table:table-cell>
          <table:table-cell table:style-name="ce15" office:value-type="string" calcext:value-type="string">
            <text:p>BEAN, COMMON (Phaseolus vulgaris)</text:p>
          </table:table-cell>
          <table:table-cell table:style-name="ce15" office:value-type="string" calcext:value-type="string">
            <text:p>Contender—Snap/Green Bean (Bush type)</text:p>
          </table:table-cell>
          <table:table-cell table:style-name="ce15" office:value-type="string" calcext:value-type="string">
            <text:p>Ferry Morse</text:p>
          </table:table-cell>
          <table:table-cell table:style-name="ce15" office:value-type="string" calcext:value-type="string">
            <text:p>Direct sow outdoors after last frost. <text:s/>Plant 1.5” deep, 4” apart; bush type. Early variety (40 days); large, stringless, tender, compact bush, tolerates heat. Full sun; 40 days. Will cross-pollinate with other bean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table-cell table:style-name="ce6" table:number-columns-repeated="16366"/>
        </table:table-row>
        <table:table-row table:style-name="ro3">
          <table:table-cell office:value-type="float" office:value="1591" calcext:value-type="float">
            <text:p>1591</text:p>
          </table:table-cell>
          <table:table-cell table:style-name="ce14" office:value-type="string" calcext:value-type="string">
            <text:p>PEPPER CHILE (Capsicum annuum)</text:p>
          </table:table-cell>
          <table:table-cell table:style-name="ce14" office:value-type="string" calcext:value-type="string">
            <text:p>Coolapeno (No Heat Jalapeno)</text:p>
          </table:table-cell>
          <table:table-cell table:style-name="ce14"/>
          <table:table-cell table:style-name="ce14" office:value-type="string" calcext:value-type="string">
            <text:p>Prolific, shiny, dark green to red pepper. Produces all season. <text:s/>Start inside 1/4” deep in loose soil 8-10 weeks before last frost. <text:s/>Slow to germinate; need warmth.</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table-cell table:style-name="ce14" office:value-type="string" calcext:value-type="string">
            <text:p>10-25 days</text:p>
          </table:table-cell>
          <table:table-cell/>
          <table:table-cell table:style-name="ce6" table:number-columns-repeated="16366"/>
        </table:table-row>
        <table:table-row table:style-name="ro3">
          <table:table-cell office:value-type="float" office:value="1127" calcext:value-type="float">
            <text:p>1127</text:p>
          </table:table-cell>
          <table:table-cell table:style-name="ce15" office:value-type="string" calcext:value-type="string">
            <text:p>CABBAGE (Brassica oleracea)</text:p>
          </table:table-cell>
          <table:table-cell table:style-name="ce15" office:value-type="string" calcext:value-type="string">
            <text:p>Copenhagen Market</text:p>
          </table:table-cell>
          <table:table-cell table:style-name="ce15"/>
          <table:table-cell table:style-name="ce15" office:value-type="string" calcext:value-type="string">
            <text:p>Sow indoors or directly into soil. <text:s/>Plant 1/4” under soil surface, 18 inches between plants. Full sun. Harvest when head is about 6-8 inches and feels firm to the touch. Soil Temp Range: 40°-10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40°-100°</text:p>
          </table:table-cell>
          <table:table-cell table:style-name="ce15" office:value-type="string" calcext:value-type="string">
            <text:p>4-5 days</text:p>
          </table:table-cell>
          <table:table-cell/>
          <table:table-cell table:style-name="ce6" table:number-columns-repeated="16366"/>
        </table:table-row>
        <table:table-row table:style-name="ro4">
          <table:table-cell office:value-type="float" office:value="1003" calcext:value-type="float">
            <text:p>1003</text:p>
          </table:table-cell>
          <table:table-cell table:style-name="ce14" office:value-type="string" calcext:value-type="string">
            <text:p>AMARANTH (Amaranthus caudatus)</text:p>
          </table:table-cell>
          <table:table-cell table:style-name="ce14" office:value-type="string" calcext:value-type="string">
            <text:p>Coral Fountain (Love-lies-bleeding)</text:p>
          </table:table-cell>
          <table:table-cell table:style-name="ce14" office:value-type="string" calcext:value-type="string">
            <text:p>Botanical Interest, Inc</text:p>
          </table:table-cell>
          <table:table-cell table:style-name="ce14" office:value-type="string" calcext:value-type="string">
            <text:p>Plant 1-2 weeks after last frost and soil is warm. Sow just under a light cover of soil, in basins or rows a pinch every 12”-15” . Thin to 1 plant per spot. Likes full sun. Seeds are edible and rich in lysine, iron and calcium. Tassels are beautiful in dry flower arrangements.</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509" calcext:value-type="float">
            <text:p>1509</text:p>
          </table:table-cell>
          <table:table-cell table:style-name="ce14" office:value-type="string" calcext:value-type="string">
            <text:p>LETTUCE Valemtin (Locusta valerianella)</text:p>
          </table:table-cell>
          <table:table-cell table:style-name="ce14" office:value-type="string" calcext:value-type="string">
            <text:p>Corn Salad</text:p>
          </table:table-cell>
          <table:table-cell table:style-name="ce14" office:value-type="string" calcext:value-type="string">
            <text:p>Elisabeth Brackelsberg</text:p>
          </table:table-cell>
          <table:table-cell table:style-name="ce14" office:value-type="string" calcext:value-type="string">
            <text:p>This seeds originated in Germany. <text:s/>Shiny dark green, spooned lamb’s lettuce type. <text:s/>Plant in cool season; may winter over in our desert environment. Very tasty and healthy gourmet salad.</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2">
          <table:table-cell office:value-type="float" office:value="1388" calcext:value-type="float">
            <text:p>1388</text:p>
          </table:table-cell>
          <table:table-cell table:style-name="ce15" office:value-type="string" calcext:value-type="string">
            <text:p>GOURD (Lagenaria siceraria)</text:p>
          </table:table-cell>
          <table:table-cell table:style-name="ce15" office:value-type="string" calcext:value-type="string">
            <text:p>Corsican</text:p>
          </table:table-cell>
          <table:table-cell table:style-name="ce14" office:value-type="string" calcext:value-type="string">
            <text:p>Botanical Interest, Inc</text:p>
          </table:table-cell>
          <table:table-cell table:style-name="ce15" office:value-type="string" calcext:value-type="string">
            <text:p>Start indoors or direct sow after frost. Slow to germinate; scarify or soak overnight. <text:s/>Plant 1” deep in hills 6 feet apart. Full sun; 140 days. Trellis on fence, arbor, or up a tree. <text:s/>Favored for crafting. Carve, cut or drill like wood. Soil Temp Range: 70– 85 Optimum: 85°</text:p>
          </table:table-cell>
          <table:table-cell table:style-name="ce15"/>
          <table:table-cell table:style-name="ce15" office:value-type="string" calcext:value-type="string">
            <text:p>3+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70– 85 Optimum: 85°</text:p>
          </table:table-cell>
          <table:table-cell table:style-name="ce15" office:value-type="string" calcext:value-type="string">
            <text:p>5-10 days</text:p>
          </table:table-cell>
          <table:table-cell/>
          <table:table-cell table:style-name="ce6" table:number-columns-repeated="16366"/>
        </table:table-row>
        <table:table-row table:style-name="ro3">
          <table:table-cell office:value-type="float" office:value="1678" calcext:value-type="float">
            <text:p>1678</text:p>
          </table:table-cell>
          <table:table-cell table:style-name="ce14" office:value-type="string" calcext:value-type="string">
            <text:p>SQUASH Summer (Cucubirta pepo)</text:p>
          </table:table-cell>
          <table:table-cell table:style-name="ce14" office:value-type="string" calcext:value-type="string">
            <text:p>Costata Romanesco</text:p>
          </table:table-cell>
          <table:table-cell table:style-name="ce14" office:value-type="string" calcext:value-type="string">
            <text:p>Botanical Interest, Inc</text:p>
          </table:table-cell>
          <table:table-cell table:style-name="ce14" office:value-type="string" calcext:value-type="string">
            <text:p>Plant outdoors1-2 weeks after last frost. Sow 1/2”-1”deep, on mounds spaced 3-4 feet apart. Pick regularly to encourage fruit development. <text:s/>Will cross with other squash. 52-60 day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4">
          <table:table-cell office:value-type="float" office:value="1342" calcext:value-type="float">
            <text:p>1342</text:p>
          </table:table-cell>
          <table:table-cell table:style-name="ce15" office:value-type="string" calcext:value-type="string">
            <text:p>FLOWER Statice (Limonium sinuatum)</text:p>
          </table:table-cell>
          <table:table-cell table:style-name="ce15" office:value-type="string" calcext:value-type="string">
            <text:p>Cotton candy blend</text:p>
          </table:table-cell>
          <table:table-cell table:style-name="ce15" office:value-type="string" calcext:value-type="string">
            <text:p>Winnie Struse</text:p>
          </table:table-cell>
          <table:table-cell table:style-name="ce15" office:value-type="string" calcext:value-type="string">
            <text:p>Press into surface of soil: do not cover seeds with soil as light aids germination. Start inside <text:s/>8-10 weeks before average last frost or 8-10 weeks before planting outside in fall or winter for early spring bloom. For Continuous bloom, sow every 2-3 weeks. Attracts</text:p>
          </table:table-cell>
          <table:table-cell table:style-name="ce15"/>
          <table:table-cell table:style-name="ce15" office:value-type="string" calcext:value-type="string">
            <text:p>30 Seeds</text:p>
          </table:table-cell>
          <table:table-cell table:style-name="ce15" office:value-type="string" calcext:value-type="string">
            <text:p>Cool Season</text:p>
          </table:table-cell>
          <table:table-cell table:style-name="ce14"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office:value-type="string" calcext:value-type="string">
            <text:p>Winnie Struse</text:p>
          </table:table-cell>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721" calcext:value-type="float">
            <text:p>1721</text:p>
          </table:table-cell>
          <table:table-cell table:style-name="ce14" office:value-type="string" calcext:value-type="string">
            <text:p>TOMATO (Solanaceae)</text:p>
          </table:table-cell>
          <table:table-cell table:style-name="ce14" office:value-type="string" calcext:value-type="string">
            <text:p>Coyote (Lycopersicum) </text:p>
          </table:table-cell>
          <table:table-cell table:style-name="ce14" office:value-type="string" calcext:value-type="string">
            <text:p>Seed Treasures Open-Pollinated and Heirloom </text:p>
          </table:table-cell>
          <table:table-cell table:style-name="ce14" office:value-type="string" calcext:value-type="string">
            <text:p>Originally from Vera Cruz, Mexico, cherry size, pale translucent yellow, prolific, <text:s/>start indoors 6 weeks before last frost. 70 days, indeterminate—wonderful for yellow salsa! Soil Temp Range: 75°-85° Optimum: 80°</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75°-85° Optimum: 80°</text:p>
          </table:table-cell>
          <table:table-cell table:style-name="ce14" office:value-type="string" calcext:value-type="string">
            <text:p>7 to 10 days</text:p>
          </table:table-cell>
          <table:table-cell/>
          <table:table-cell table:style-name="ce6" table:number-columns-repeated="16366"/>
        </table:table-row>
        <table:table-row table:style-name="ro2">
          <table:table-cell office:value-type="float" office:value="1303" calcext:value-type="float">
            <text:p>1303</text:p>
          </table:table-cell>
          <table:table-cell table:style-name="ce15" office:value-type="string" calcext:value-type="string">
            <text:p>FLOWER Marigold (Tagetes erecta)</text:p>
          </table:table-cell>
          <table:table-cell table:style-name="ce15" office:value-type="string" calcext:value-type="string">
            <text:p>Cracker Jack Mix</text:p>
          </table:table-cell>
          <table:table-cell table:style-name="ce15" office:value-type="string" calcext:value-type="string">
            <text:p>American Seed</text:p>
          </table:table-cell>
          <table:table-cell table:style-name="ce15" office:value-type="string" calcext:value-type="string">
            <text:p>Start indoors 3-4 weeks before setting out after frost using fine, moist soil, covering lightly. <text:s/>Plant one foot apart in full sun. <text:s/>Thrives in summer’s heat. Giant African type with big double blooms in shades of lemon yellow to deep orange. <text:s/>Plants are profuse to 30” tall.</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1</text:p>
          </table:table-cell>
          <table:table-cell table:style-name="ce15" table:number-columns-repeated="2"/>
          <table:table-cell/>
          <table:table-cell table:style-name="ce6" table:number-columns-repeated="16366"/>
        </table:table-row>
        <table:table-row table:style-name="ro1">
          <table:table-cell office:value-type="float" office:value="1277" calcext:value-type="float">
            <text:p>1277</text:p>
          </table:table-cell>
          <table:table-cell table:style-name="ce14" office:value-type="string" calcext:value-type="string">
            <text:p>FLOWER Hollyhock (Alcea rosea)</text:p>
          </table:table-cell>
          <table:table-cell table:style-name="ce14" office:value-type="string" calcext:value-type="string">
            <text:p>Creamy Yellow/Red Center</text:p>
          </table:table-cell>
          <table:table-cell table:style-name="ce14" office:value-type="string" calcext:value-type="string">
            <text:p>Ace Hardware</text:p>
          </table:table-cell>
          <table:table-cell table:style-name="ce14" office:value-type="string" calcext:value-type="string">
            <text:p>Biennial life cycle; grows 72-84 inches; direct sow; full sun; mid to late season, blooms summer into f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Sierra Vista, AZ</text:p>
          </table:table-cell>
          <table:table-cell table:style-name="ce14" table:number-columns-repeated="2"/>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2">
          <table:table-cell office:value-type="float" office:value="1233" calcext:value-type="float">
            <text:p>1233</text:p>
          </table:table-cell>
          <table:table-cell table:style-name="ce14" office:value-type="string" calcext:value-type="string">
            <text:p>FLOWER (Sonoran Desert Revegetation)</text:p>
          </table:table-cell>
          <table:table-cell table:style-name="ce14" office:value-type="string" calcext:value-type="string">
            <text:p>Creosote, Triangle Bursage, Enclla Farinosa, Desert Marigold, Cassia Covesil, Desert Globe Mallow, Needle Grama</text:p>
          </table:table-cell>
          <table:table-cell table:style-name="ce14"/>
          <table:table-cell table:style-name="ce14" office:value-type="string" calcext:value-type="string">
            <text:p>Plant anytime but optimum Spring or Fall. Scarify area to be seeded. Evenly broadcast seed over area. With backside of rake cover seed with a fine dusting of soil. Water with a light spray until saturated. Keep moist until germination is established. Water periodically until seedlings are established.</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9</text:p>
          </table:table-cell>
          <table:table-cell table:style-name="ce14"/>
          <table:table-cell table:style-name="ce14" office:value-type="string" calcext:value-type="string">
            <text:p>is established. Water periodically until seedlings are established.</text:p>
          </table:table-cell>
          <table:table-cell/>
          <table:table-cell table:style-name="ce6" table:number-columns-repeated="16366"/>
        </table:table-row>
        <table:table-row table:style-name="ro1">
          <table:table-cell office:value-type="float" office:value="1627" calcext:value-type="float">
            <text:p>1627</text:p>
          </table:table-cell>
          <table:table-cell table:style-name="ce15" office:value-type="string" calcext:value-type="string">
            <text:p>RADISH (Raphanus sativus)</text:p>
          </table:table-cell>
          <table:table-cell table:style-name="ce15" office:value-type="string" calcext:value-type="string">
            <text:p>Crimson Giant</text:p>
          </table:table-cell>
          <table:table-cell table:style-name="ce14" office:value-type="string" calcext:value-type="string">
            <text:p>Botanical Interest, Inc</text:p>
          </table:table-cell>
          <table:table-cell table:style-name="ce15" office:value-type="string" calcext:value-type="string">
            <text:p>Direct sow in early spring and early fall, 1/2” deep, plant 5” apart (or closer and thinned later), rows 12-18” apar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1">
          <table:table-cell office:value-type="float" office:value="1742" calcext:value-type="float">
            <text:p>1742</text:p>
          </table:table-cell>
          <table:table-cell table:style-name="ce14" office:value-type="string" calcext:value-type="string">
            <text:p>WATERMELON (Citrullus lanatus)</text:p>
          </table:table-cell>
          <table:table-cell table:style-name="ce14" office:value-type="string" calcext:value-type="string">
            <text:p>Crimson Sweet</text:p>
          </table:table-cell>
          <table:table-cell table:style-name="ce14" office:value-type="string" calcext:value-type="string">
            <text:p>Ferry Morse</text:p>
          </table:table-cell>
          <table:table-cell table:style-name="ce14" office:value-type="string" calcext:value-type="string">
            <text:p>Direct sow outside after danger of frost. Plant 1” deep in hills of 2 to 3 plants per hill at 3-5 feet apart. Full sun; 90 days; 25+pound fruit.</text:p>
          </table:table-cell>
          <table:table-cell table:style-name="ce14"/>
          <table:table-cell table:style-name="ce14" office:value-type="string" calcext:value-type="string">
            <text:p>4+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2">
          <table:table-cell office:value-type="float" office:value="1103" calcext:value-type="float">
            <text:p>1103</text:p>
          </table:table-cell>
          <table:table-cell table:style-name="ce15" office:value-type="string" calcext:value-type="string">
            <text:p>BEET (Beta vulgaris)</text:p>
          </table:table-cell>
          <table:table-cell table:style-name="ce15" office:value-type="string" calcext:value-type="string">
            <text:p>Crosby’s Egyptian</text:p>
          </table:table-cell>
          <table:table-cell table:style-name="ce14" office:value-type="string" calcext:value-type="string">
            <text:p>Baker Creek Heirloom Seeds</text:p>
          </table:table-cell>
          <table:table-cell table:style-name="ce15" office:value-type="string" calcext:value-type="string">
            <text:p>Red beet brought to U.S. in 1869. <text:s/>Sow in ground 2-4 weeks before last frost 1/2 inch deep; 4-6 inches apart; full sun; thin to 1 plant every 4 inches; keep soil evenly moist; will cross with other beets or Swiss Chard; greens are good to eat. <text:s/>Sow again in fall for late crop.r Soil Temp Range: 40°-95° Optimum: 85°</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table-cell table:style-name="ce6" table:number-columns-repeated="16366"/>
        </table:table-row>
        <table:table-row table:style-name="ro4">
          <table:table-cell office:value-type="float" office:value="1297" calcext:value-type="float">
            <text:p>1297</text:p>
          </table:table-cell>
          <table:table-cell table:style-name="ce15" office:value-type="string" calcext:value-type="string">
            <text:p>FLOWER Lobelia (Lobelia erinus)</text:p>
          </table:table-cell>
          <table:table-cell table:style-name="ce15" office:value-type="string" calcext:value-type="string">
            <text:p>Crystal Palace</text:p>
          </table:table-cell>
          <table:table-cell table:style-name="ce14" office:value-type="string" calcext:value-type="string">
            <text:p>Botanical Interest, Inc</text:p>
          </table:table-cell>
          <table:table-cell table:style-name="ce15" office:value-type="string" calcext:value-type="string">
            <text:p>Sow outside 1 to 2 weeks after last frost and in late summer for winter color. Light aids germination, press lightly into surface. Space 4”to 6” apart. Attracts pollinators. Deer resistant. Deep blue flowers over bronze tipped foliage.</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6">
          <table:table-cell office:value-type="float" office:value="1611" calcext:value-type="float">
            <text:p>1611</text:p>
          </table:table-cell>
          <table:table-cell table:style-name="ce14" office:value-type="string" calcext:value-type="string">
            <text:p>PEPPER, SWEET (Capsicum annuum)</text:p>
          </table:table-cell>
          <table:table-cell table:style-name="ce14" office:value-type="string" calcext:value-type="string">
            <text:p>Cubanelle (Italian Sweet)</text:p>
          </table:table-cell>
          <table:table-cell table:style-name="ce14" office:value-type="string" calcext:value-type="string">
            <text:p>Seed Treasures Open-Pollinated and Heirloom </text:p>
          </table:table-cell>
          <table:table-cell table:style-name="ce14" office:value-type="string" calcext:value-type="string">
            <text:p>Start inside 1/4” deep in loose soil 8-10 weeks before last frost. <text:s/>Slow to germinate; need warmth; plant 12- 16” apart in full sun/partial in shade low desert. Fruit is up to 5 inches long; 65 days. Save seeds from fully ripe, slightly shriveled fruit. Can cross pollinate. <text:s/>Great for frying. Soil Temp Range: 60°-95° Optimum: 8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Hargrove</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3">
          <table:table-cell office:value-type="float" office:value="1554" calcext:value-type="float">
            <text:p>1554</text:p>
          </table:table-cell>
          <table:table-cell table:style-name="ce14" office:value-type="string" calcext:value-type="string">
            <text:p>PEA Shell (Pisum stivum)</text:p>
          </table:table-cell>
          <table:table-cell table:style-name="ce14" office:value-type="string" calcext:value-type="string">
            <text:p>Cumpas Green</text:p>
          </table:table-cell>
          <table:table-cell table:style-name="ce14" office:value-type="string" calcext:value-type="string">
            <text:p>Native Seed/SEARCH <text:s/>www.nativeseeds.org</text:p>
          </table:table-cell>
          <table:table-cell table:style-name="ce14" office:value-type="string" calcext:value-type="string">
            <text:p>Introduced by Spanish; seed is eaten green or dried for soups or cooked beans. <text:s/>Plant 1/2” deep, 6” apart and trellis. Soil Temp: Range: 40—85 degrees Opt. 85</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Range: 40—85 degrees Opt. 85</text:p>
          </table:table-cell>
          <table:table-cell table:style-name="ce14"/>
          <table:table-cell/>
          <table:table-cell table:style-name="ce6" table:number-columns-repeated="16366"/>
        </table:table-row>
        <table:table-row table:style-name="ro3">
          <table:table-cell office:value-type="float" office:value="1421" calcext:value-type="float">
            <text:p>1421</text:p>
          </table:table-cell>
          <table:table-cell table:style-name="ce14" office:value-type="string" calcext:value-type="string">
            <text:p>HERB Basil (Ocimum spp.)</text:p>
          </table:table-cell>
          <table:table-cell table:style-name="ce14" office:value-type="string" calcext:value-type="string">
            <text:p>Custom Blend</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Up to 6 different flavor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2">
          <table:table-cell office:value-type="float" office:value="1371" calcext:value-type="float">
            <text:p>1371</text:p>
          </table:table-cell>
          <table:table-cell table:style-name="ce15" office:value-type="string" calcext:value-type="string">
            <text:p>FLOWER Zinnia (Zinnia elegans)</text:p>
          </table:table-cell>
          <table:table-cell table:style-name="ce15" office:value-type="string" calcext:value-type="string">
            <text:p>Cut and Come Again</text:p>
          </table:table-cell>
          <table:table-cell table:style-name="ce14" office:value-type="string" calcext:value-type="string">
            <text:p>Botanical Interest, Inc</text:p>
          </table:table-cell>
          <table:table-cell table:style-name="ce15" office:value-type="string" calcext:value-type="string">
            <text:p>Vibrant colors that the more you cut, the more they bloom. Great in the garden to attract pollinators! Direct sow 1-2 weeks after last frost. Plant 1/4” deep, (just cover lightly with a light cover of soil) and 12” apart in full sun. This annual can reseed in our high desert climate!</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262" calcext:value-type="float">
            <text:p>1262</text:p>
          </table:table-cell>
          <table:table-cell table:style-name="ce15" office:value-type="string" calcext:value-type="string">
            <text:p>FLOWER Dahlia</text:p>
          </table:table-cell>
          <table:table-cell table:style-name="ce15" office:value-type="string" calcext:value-type="string">
            <text:p>Dahlia Blend</text:p>
          </table:table-cell>
          <table:table-cell table:style-name="ce14" office:value-type="string" calcext:value-type="string">
            <text:p>Botanical Interest, Inc</text:p>
          </table:table-cell>
          <table:table-cell table:style-name="ce15" office:value-type="string" calcext:value-type="string">
            <text:p>Breathtaking Tall Blend Blooms appear 90 days after sowing. Perenial zone 7-10 When to sow: Outside 2 to 4 weeks after last average frost date. Inside (recommended) 8 to 10 weeks before average last fros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147" calcext:value-type="float">
            <text:p>1147</text:p>
          </table:table-cell>
          <table:table-cell table:style-name="ce15" office:value-type="string" calcext:value-type="string">
            <text:p>CARROT (Daucus carota)</text:p>
          </table:table-cell>
          <table:table-cell table:style-name="ce15" office:value-type="string" calcext:value-type="string">
            <text:p>Danvers Half Long</text:p>
          </table:table-cell>
          <table:table-cell table:style-name="ce14" office:value-type="string" calcext:value-type="string">
            <text:p>Ferry Morse</text:p>
          </table:table-cell>
          <table:table-cell table:style-name="ce15" office:value-type="string" calcext:value-type="string">
            <text:p>Very uniform; heavy cropping; 7 inches long. Sow direct into rich soil high in phosphorus &amp; potassium (moderate nitrogen); harvest 70 days. <text:s/>Excellent for freezing. <text:s/>Seeds are biennial.</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4-6 days</text:p>
          </table:table-cell>
          <table:table-cell/>
          <table:table-cell table:style-name="ce6" table:number-columns-repeated="16366"/>
        </table:table-row>
        <table:table-row table:style-name="ro6">
          <table:table-cell office:value-type="float" office:value="1716" calcext:value-type="float">
            <text:p>1716</text:p>
          </table:table-cell>
          <table:table-cell table:style-name="ce14" office:value-type="string" calcext:value-type="string">
            <text:p>TOMATO (Solanaceae lycopersicum)</text:p>
          </table:table-cell>
          <table:table-cell table:style-name="ce14" office:value-type="string" calcext:value-type="string">
            <text:p>Dark Galaxy</text:p>
          </table:table-cell>
          <table:table-cell table:style-name="ce14" office:value-type="string" calcext:value-type="string">
            <text:p>Baker Creek Heirloom Seeds</text:p>
          </table:table-cell>
          <table:table-cell table:style-name="ce14" office:value-type="string" calcext:value-type="string">
            <text:p>Stunning 2-8 oz fruits, flattened shape with red and orange stripes and random speckles layered by deep blue on 5-6ft vines. <text:s/>Start indoors 6-8 weeks before last frost. Cover seeds lightly to allow light to assist germination. <text:s/>Keep moist. Move to bright light after sprouted. <text:s/>After last frost, plant in garden 2 to 3 feet apart. Soil Temp Range: 75°-8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5°-85° Optimum: 80°</text:p>
          </table:table-cell>
          <table:table-cell table:style-name="ce14" office:value-type="string" calcext:value-type="string">
            <text:p>7 to 10 days</text:p>
          </table:table-cell>
          <table:table-cell/>
          <table:table-cell table:style-name="ce6" table:number-columns-repeated="16366"/>
        </table:table-row>
        <table:table-row table:style-name="ro4">
          <table:table-cell office:value-type="float" office:value="1689" calcext:value-type="float">
            <text:p>1689</text:p>
          </table:table-cell>
          <table:table-cell table:style-name="ce15" office:value-type="string" calcext:value-type="string">
            <text:p>SQUASH Zucchini (Cucubirta pepo)</text:p>
          </table:table-cell>
          <table:table-cell table:style-name="ce14" office:value-type="string" calcext:value-type="string">
            <text:p>Dark Green</text:p>
          </table:table-cell>
          <table:table-cell table:style-name="ce14" office:value-type="string" calcext:value-type="string">
            <text:p>Ferry Morse</text:p>
          </table:table-cell>
          <table:table-cell table:style-name="ce14" office:value-type="string" calcext:value-type="string">
            <text:p>Plant outdoors 2 seeds 1”deep, 3-4 feet apart; thin to 1 healthy plant. <text:s/>Prolific, long harvest. Pick regularly to encourage fruit development; best flavor when skin is thin. Will cross with other squash and cucumbers. 50 days to harves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4">
          <table:table-cell office:value-type="float" office:value="1417" calcext:value-type="float">
            <text:p>1417</text:p>
          </table:table-cell>
          <table:table-cell table:style-name="ce15" office:value-type="string" calcext:value-type="string">
            <text:p>HERB <text:span text:style-name="T1">Basil </text:span><text:span text:style-name="T2">(Ocimum basilicum)</text:span></text:p>
          </table:table-cell>
          <table:table-cell table:style-name="ce15" office:value-type="string" calcext:value-type="string">
            <text:p>Dark Opal</text:p>
          </table:table-cell>
          <table:table-cell table:style-name="ce14" office:value-type="string" calcext:value-type="string">
            <text:p>Ferry Morse</text:p>
          </table:table-cell>
          <table:table-cell table:style-name="ce15" office:value-type="string" calcext:value-type="string">
            <text:p>Start indoors 4-6 weeks before transplanting outdoors. Sow 1/4” deep in seed starting mix. Transplant outdoors 1-2 weeks after last frost about 12” apart. Mild sweet taste. Purple color contrasts in food. Good companion plant with tomato.</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1">
          <table:table-cell office:value-type="float" office:value="1278" calcext:value-type="float">
            <text:p>1278</text:p>
          </table:table-cell>
          <table:table-cell table:style-name="ce15" office:value-type="string" calcext:value-type="string">
            <text:p>FLOWER Hollyhock (Alcea rosea)</text:p>
          </table:table-cell>
          <table:table-cell table:style-name="ce15" office:value-type="string" calcext:value-type="string">
            <text:p>Dark Red</text:p>
          </table:table-cell>
          <table:table-cell table:style-name="ce15" office:value-type="string" calcext:value-type="string">
            <text:p>Avalon Gardens</text:p>
          </table:table-cell>
          <table:table-cell table:style-name="ce15" office:value-type="string" calcext:value-type="string">
            <text:p>Biennial life cycle; grows 72-84 inches; direct sow; full sun; mid to late season, blooms summer into fall.</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Avalon Gardens</text:p>
          </table:table-cell>
          <table:table-cell table:style-name="ce15"/>
          <table:table-cell table:style-name="ce15" office:value-type="string" calcext:value-type="string">
            <text:p>Tumacacori, AZ</text:p>
          </table:table-cell>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4">
          <table:table-cell office:value-type="float" office:value="1664" calcext:value-type="float">
            <text:p>1664</text:p>
          </table:table-cell>
          <table:table-cell table:style-name="ce15" office:value-type="string" calcext:value-type="string">
            <text:p>SQUASH (Cucubirta pepo)</text:p>
          </table:table-cell>
          <table:table-cell table:style-name="ce15" office:value-type="string" calcext:value-type="string">
            <text:p>Delicata (Honey Boat)</text:p>
          </table:table-cell>
          <table:table-cell table:style-name="ce15"/>
          <table:table-cell table:style-name="ce15" office:value-type="string" calcext:value-type="string">
            <text:p>Direct sow 1”deep in basins or 6-12 inches apart in rows; thin to healthiest plants. <text:s/>Full sun, ample moisture. <text:s/>Harvest in autumn when skins are too tough to be easily punctured with thumbnail. <text:s/>Will cross with other squash. Oblong, tan skin, green stripes.</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2">
          <table:table-cell office:value-type="float" office:value="1637" calcext:value-type="float">
            <text:p>1637</text:p>
          </table:table-cell>
          <table:table-cell table:style-name="ce15" office:value-type="string" calcext:value-type="string">
            <text:p>SHRUB <text:s/>(Gossypium thurberi) </text:p>
          </table:table-cell>
          <table:table-cell table:style-name="ce15" office:value-type="string" calcext:value-type="string">
            <text:p>Desert Cotton (Mallow Family: Malvaceae) </text:p>
          </table:table-cell>
          <table:table-cell table:style-name="ce15" office:value-type="string" calcext:value-type="string">
            <text:p>University of Arizona Discovery Garden</text:p>
          </table:table-cell>
          <table:table-cell table:style-name="ce15" office:value-type="string" calcext:value-type="string">
            <text:p>Plant 1” deep in moist soil. Do not overwater. May be planted inside to get a healthy start and transplanted outside when the weather is warm. This beautiful deciduous shrub blooms August through October at 2,500 to 5,000 feet. Grows to 7 feet with flowers that are white to very pale pink with crinkly petals.</text:p>
          </table:table-cell>
          <table:table-cell table:style-name="ce15"/>
          <table:table-cell table:style-name="ce15" office:value-type="string" calcext:value-type="string">
            <text:p>10-15 Seeds</text:p>
          </table:table-cell>
          <table:table-cell table:style-name="ce15" office:value-type="string" calcext:value-type="string">
            <text:p>Warm Season</text:p>
          </table:table-cell>
          <table:table-cell table:style-name="ce15" table:number-columns-repeated="6"/>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7">
          <table:table-cell office:value-type="float" office:value="1265" calcext:value-type="float">
            <text:p>1265</text:p>
          </table:table-cell>
          <table:table-cell table:style-name="ce14" office:value-type="string" calcext:value-type="string">
            <text:p>FLOWER Desert Lupine (Lupinus sparsiflorus)</text:p>
          </table:table-cell>
          <table:table-cell table:style-name="ce14" office:value-type="string" calcext:value-type="string">
            <text:p>Desert Lupine</text:p>
          </table:table-cell>
          <table:table-cell table:style-name="ce14"/>
          <table:table-cell table:style-name="ce14" office:value-type="string" calcext:value-type="string">
            <text:p>Native to southwest US &amp; Mexico; upright purple pollinator wildflower. Soak seeds in warm water overnight. Loosen soil to allow for a long taproot. Rake seeds into planting site early fall or freeze and plant early spring. Then cover seeds with about 1/2 inch soil. <text:s/>Water thoroughly and keep lightly moist until plants are established; once established, give deep water occasionally but are drought resistant and will reseed themselves. Needs well drained soil with little amendments. Thrives in full sun. Adds nitrogen to</text:p>
          </table:table-cell>
          <table:table-cell table:style-name="ce14"/>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table-cell table:style-name="ce6" table:number-columns-repeated="16366"/>
        </table:table-row>
        <table:table-row table:style-name="ro2">
          <table:table-cell office:value-type="float" office:value="1266" calcext:value-type="float">
            <text:p>1266</text:p>
          </table:table-cell>
          <table:table-cell table:style-name="ce15" office:value-type="string" calcext:value-type="string">
            <text:p>FLOWER Desert Marigold (Baileya multiradiata)</text:p>
          </table:table-cell>
          <table:table-cell table:style-name="ce15" office:value-type="string" calcext:value-type="string">
            <text:p>Desert Marigold</text:p>
          </table:table-cell>
          <table:table-cell table:style-name="ce23" office:value-type="string" calcext:value-type="string">
            <text:p>Native Seed/SEARCH <text:s/>www.nativeseeds.org</text:p>
          </table:table-cell>
          <table:table-cell table:style-name="ce15" office:value-type="string" calcext:value-type="string">
            <text:p>Work soil with a hard rake until loose. Work seeds into the top 1/2” in September through mid-February. Grows best as a late cool season. <text:s/>Time watering to coincide with moist, low pressure but do not overwater Scattering branches or rocks among planting will help seedlings become established</text:p>
          </table:table-cell>
          <table:table-cell table:style-name="ce15"/>
          <table:table-cell table:style-name="ce15" office:value-type="string" calcext:value-type="string">
            <text:p>20+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6">
          <table:table-cell office:value-type="float" office:value="1267" calcext:value-type="float">
            <text:p>1267</text:p>
          </table:table-cell>
          <table:table-cell table:style-name="ce14" office:value-type="string" calcext:value-type="string">
            <text:p>FLOWER Desert Senna (Cassia covessi)</text:p>
          </table:table-cell>
          <table:table-cell table:style-name="ce14" office:value-type="string" calcext:value-type="string">
            <text:p>Desert Senna</text:p>
          </table:table-cell>
          <table:table-cell table:style-name="ce14"/>
          <table:table-cell table:style-name="ce14" office:value-type="string" calcext:value-type="string">
            <text:p>Native to AZ &amp; Mexico; upright shrubby yellow wildflower. Rake seeds into planting site May-July. Water thoroughly and keep moist until plants are established; once established, give deep water occasionally but are drought resistant and will reseed themselves. Needs well drained soil with little or no amendments. Thrives in full sun.</text:p>
          </table:table-cell>
          <table:table-cell table:style-name="ce14"/>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table-cell table:style-name="ce6" table:number-columns-repeated="16366"/>
        </table:table-row>
        <table:table-row table:style-name="ro3">
          <table:table-cell office:value-type="float" office:value="1108" calcext:value-type="float">
            <text:p>1108</text:p>
          </table:table-cell>
          <table:table-cell table:style-name="ce14" office:value-type="string" calcext:value-type="string">
            <text:p>BEET (Beta vulgaris)</text:p>
          </table:table-cell>
          <table:table-cell table:style-name="ce14" office:value-type="string" calcext:value-type="string">
            <text:p>Detroit Dark Red</text:p>
          </table:table-cell>
          <table:table-cell table:style-name="ce14" office:value-type="string" calcext:value-type="string">
            <text:p>Ferry Morse</text:p>
          </table:table-cell>
          <table:table-cell table:style-name="ce14" office:value-type="string" calcext:value-type="string">
            <text:p>Direct sow outside early spring or fall. Plant 1/2” deep, 4” apart, in rows 12” apart. Full Sun; 60 days. Fruit matures to 3” diameter; deep red and sweet; great for canning and pickling.</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6 days</text:p>
          </table:table-cell>
          <table:table-cell/>
          <table:table-cell table:style-name="ce6" table:number-columns-repeated="16366"/>
        </table:table-row>
        <table:table-row table:style-name="ro3">
          <table:table-cell office:value-type="float" office:value="1261" calcext:value-type="float">
            <text:p>1261</text:p>
          </table:table-cell>
          <table:table-cell table:style-name="ce14" office:value-type="string" calcext:value-type="string">
            <text:p>FLOWER Cosmos (Cosmos sulphureus)</text:p>
          </table:table-cell>
          <table:table-cell table:style-name="ce14" office:value-type="string" calcext:value-type="string">
            <text:p>Diablo</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Orange and yellow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2">
          <table:table-cell office:value-type="float" office:value="1679" calcext:value-type="float">
            <text:p>1679</text:p>
          </table:table-cell>
          <table:table-cell table:style-name="ce15" office:value-type="string" calcext:value-type="string">
            <text:p>SQUASH Summer (Cucubirta pepo)</text:p>
          </table:table-cell>
          <table:table-cell table:style-name="ce15" office:value-type="string" calcext:value-type="string">
            <text:p>Dirani Hybrid</text:p>
          </table:table-cell>
          <table:table-cell table:style-name="ce14" office:value-type="string" calcext:value-type="string">
            <text:p>Botanical Interest, Inc</text:p>
          </table:table-cell>
          <table:table-cell table:style-name="ce15" office:value-type="string" calcext:value-type="string">
            <text:p>Plant outdoors1-2 weeks after last frost. Sow 2-3 seeds 1/2”deep, on mounds spaced 3-4 feet apart; thin to 1 healthy plant. Pick regularly to encourage fruit development. <text:s/>Harvest when small for fresh use or allow to grow for stuffing and baking. Will cross with other squash. <text:s/>50 days.</text:p>
          </table:table-cell>
          <table:table-cell table:style-name="ce15"/>
          <table:table-cell table:style-name="ce15" office:value-type="string" calcext:value-type="string">
            <text:p>Various</text:p>
            <text:p>Seeds</text:p>
          </table:table-cell>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table-cell table:style-name="ce6" table:number-columns-repeated="16366"/>
        </table:table-row>
        <table:table-row table:style-name="ro4">
          <table:table-cell office:value-type="float" office:value="1683" calcext:value-type="float">
            <text:p>1683</text:p>
          </table:table-cell>
          <table:table-cell table:style-name="ce14" office:value-type="string" calcext:value-type="string">
            <text:p>SQUASH Summer (Cucubirta pepo)</text:p>
          </table:table-cell>
          <table:table-cell table:style-name="ce14" office:value-type="string" calcext:value-type="string">
            <text:p>Dixie Hybrid</text:p>
          </table:table-cell>
          <table:table-cell table:style-name="ce14" office:value-type="string" calcext:value-type="string">
            <text:p>Ferry Morse</text:p>
          </table:table-cell>
          <table:table-cell table:style-name="ce14" office:value-type="string" calcext:value-type="string">
            <text:p>Plant outdoors1-2 weeks after last frost. Sow 2- 3 seeds 1”deep, on mounds spaced 3-4 feet apart; thin to 1 healthy plant. Pick regularly to encourage fruit development. Will cross with other squash. <text:s/>41 days. Hybrid yellow crookneck that is tastiest 4-6” long.</text:p>
          </table:table-cell>
          <table:table-cell table:style-name="ce14" table:number-columns-repeated="2"/>
          <table:table-cell table:style-name="ce14" office:value-type="string" calcext:value-type="string">
            <text:p>Warm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0 days</text:p>
          </table:table-cell>
          <table:table-cell/>
          <table:table-cell table:style-name="ce6" table:number-columns-repeated="16366"/>
        </table:table-row>
        <table:table-row table:style-name="ro3">
          <table:table-cell office:value-type="float" office:value="1365" calcext:value-type="float">
            <text:p>1365</text:p>
          </table:table-cell>
          <table:table-cell table:style-name="ce14" office:value-type="string" calcext:value-type="string">
            <text:p>FLOWER Sweet William (Dianthus barbatus)</text:p>
          </table:table-cell>
          <table:table-cell table:style-name="ce14" office:value-type="string" calcext:value-type="string">
            <text:p>Double Blend</text:p>
          </table:table-cell>
          <table:table-cell table:style-name="ce14" office:value-type="string" calcext:value-type="string">
            <text:p>Botanical Interest, Inc</text:p>
          </table:table-cell>
          <table:table-cell table:style-name="ce14" office:value-type="string" calcext:value-type="string">
            <text:p>Plant directly outside after last frost. Sow 1/4” deep 12-18” apart. Will bloom best in second year. 12-20” tall so will be good as a border behind shorter flowers. Long lasting cut flower.</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257" calcext:value-type="float">
            <text:p>1257</text:p>
          </table:table-cell>
          <table:table-cell table:style-name="ce15" office:value-type="string" calcext:value-type="string">
            <text:p>FLOWER Cosmos (Cosmos bipinnatus)</text:p>
          </table:table-cell>
          <table:table-cell table:style-name="ce15" office:value-type="string" calcext:value-type="string">
            <text:p>Double Click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Double pink, white and red flowe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255" calcext:value-type="float">
            <text:p>1255</text:p>
          </table:table-cell>
          <table:table-cell table:style-name="ce15" office:value-type="string" calcext:value-type="string">
            <text:p>FLOWER Coreopsis (Coreopsis lanceolata)</text:p>
          </table:table-cell>
          <table:table-cell table:style-name="ce15" office:value-type="string" calcext:value-type="string">
            <text:p>Double Sunburst</text:p>
          </table:table-cell>
          <table:table-cell table:style-name="ce14" office:value-type="string" calcext:value-type="string">
            <text:p>Botanical Interest, Inc</text:p>
          </table:table-cell>
          <table:table-cell table:style-name="ce15" office:value-type="string" calcext:value-type="string">
            <text:p>Sow outside 1 to 2 weeks before average last frost or until 8 weeks before first frost. Light aids germination. Press seed lightly into soil surface and keep moist. Space 12” apart. Thrives in heat, humidity and poor or dry soils. Pollinator and long lasting cut flower. Drought tolerant once established.</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626" calcext:value-type="float">
            <text:p>1626</text:p>
          </table:table-cell>
          <table:table-cell table:style-name="ce15" office:value-type="string" calcext:value-type="string">
            <text:p>RADISH (Raphanus sativus)</text:p>
          </table:table-cell>
          <table:table-cell table:style-name="ce15" office:value-type="string" calcext:value-type="string">
            <text:p>Dragon Hybrid</text:p>
          </table:table-cell>
          <table:table-cell table:style-name="ce15" office:value-type="string" calcext:value-type="string">
            <text:p>Territorial Seed Company</text:p>
          </table:table-cell>
          <table:table-cell table:style-name="ce15" office:value-type="string" calcext:value-type="string">
            <text:p>Direct sow in early spring and early fall, 1/2” deep, plant 2” apart (or closer and thin later), rows 10-12” apart. <text:s/>40 days — Fiery red skin with white interior and crisp mild flavor. Fine cylindrical roots, best harvested 4-5 inches long.</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3">
          <table:table-cell office:value-type="float" office:value="1477" calcext:value-type="float">
            <text:p>1477</text:p>
          </table:table-cell>
          <table:table-cell table:style-name="ce15" office:value-type="string" calcext:value-type="string">
            <text:p>KALE (Brassica oleracea)</text:p>
          </table:table-cell>
          <table:table-cell table:style-name="ce15" office:value-type="string" calcext:value-type="string">
            <text:p>Dwarf Blue Curled</text:p>
          </table:table-cell>
          <table:table-cell table:style-name="ce14" office:value-type="string" calcext:value-type="string">
            <text:p>Botanical Interest, Inc</text:p>
          </table:table-cell>
          <table:table-cell table:style-name="ce15" office:value-type="string" calcext:value-type="string">
            <text:p>Spring or fall plant; sow directly into soil at 1/4” depth; thin to 6-12” apart; rows 18” apart. Will cross pollinate. Save seeds from dried flowers.</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table-cell table:style-name="ce6" table:number-columns-repeated="16366"/>
        </table:table-row>
        <table:table-row table:style-name="ro4">
          <table:table-cell office:value-type="float" office:value="1476" calcext:value-type="float">
            <text:p>1476</text:p>
          </table:table-cell>
          <table:table-cell table:style-name="ce14" office:value-type="string" calcext:value-type="string">
            <text:p>KALE (Brassica oleracea)</text:p>
          </table:table-cell>
          <table:table-cell table:style-name="ce14" office:value-type="string" calcext:value-type="string">
            <text:p>Dwarf Siberian</text:p>
          </table:table-cell>
          <table:table-cell table:style-name="ce14" office:value-type="string" calcext:value-type="string">
            <text:p>Native Seed/SEARCH <text:s/>www.nativeseeds.org</text:p>
          </table:table-cell>
          <table:table-cell table:style-name="ce14" office:value-type="string" calcext:value-type="string">
            <text:p>Spring or fall plant; sow directly into soil at 1/4” depth; thin to 6-12” apart; rows 18” apart. Will cross pollinate. Save seeds from dried flowers. <text:s/>Seeds are mature when black and pods begin to dry. Careful: <text:s/>dry pods shatter easily.</text:p>
          </table:table-cell>
          <table:table-cell table:style-name="ce14"/>
          <table:table-cell table:style-name="ce14" office:value-type="string" calcext:value-type="string">
            <text:p>25-3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table:number-columns-repeated="2"/>
          <table:table-cell/>
          <table:table-cell table:style-name="ce6" table:number-columns-repeated="16366"/>
        </table:table-row>
        <table:table-row table:style-name="ro4">
          <table:table-cell office:value-type="float" office:value="1571" calcext:value-type="float">
            <text:p>1571</text:p>
          </table:table-cell>
          <table:table-cell table:style-name="ce14" office:value-type="string" calcext:value-type="string">
            <text:p>PEPPER CHILE (Capsicum annuum)</text:p>
          </table:table-cell>
          <table:table-cell table:style-name="ce14" office:value-type="string" calcext:value-type="string">
            <text:p>Early Jalapeno</text:p>
          </table:table-cell>
          <table:table-cell table:style-name="ce14" office:value-type="string" calcext:value-type="string">
            <text:p>Botanical Interest, Inc</text:p>
          </table:table-cell>
          <table:table-cell table:style-name="ce14" office:value-type="string" calcext:value-type="string">
            <text:p>Prolific, shiny, dark green hot pepper. Produces all season. <text:s/>Start inside 1/4” deep in loose soil 8-10 weeks before last frost. <text:s/>Slow to germinate; need warmth. Save seeds from fully ripe, slightly shriveled fruit. Can cross pollinate. <text:s/>(Hot 2,500-5,000 SHU)</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table-cell table:style-name="ce6" table:number-columns-repeated="16366"/>
        </table:table-row>
        <table:table-row table:style-name="ro2">
          <table:table-cell office:value-type="float" office:value="1589" calcext:value-type="float">
            <text:p>1589</text:p>
          </table:table-cell>
          <table:table-cell table:style-name="ce15" office:value-type="string" calcext:value-type="string">
            <text:p>Pepper CHILE (Capsicum annuum)</text:p>
          </table:table-cell>
          <table:table-cell table:style-name="ce15" office:value-type="string" calcext:value-type="string">
            <text:p>Early Jalapeno <text:s/>(HOT-Very Hot)</text:p>
          </table:table-cell>
          <table:table-cell table:style-name="ce14" office:value-type="string" calcext:value-type="string">
            <text:p>Seed Treasures Open-Pollinated and Heirloom </text:p>
          </table:table-cell>
          <table:table-cell table:style-name="ce15" office:value-type="string" calcext:value-type="string">
            <text:p>Prolific, shiny, dark green hot pepper. Produces all season. <text:s/>Start inside 1/4” deep in loose soil 8-10 weeks before last frost. <text:s/>Slow to germinate; need warmth. Save seeds from fully ripe, slightly shriveled fruit. Can cross pollinate. Soil Temp Range: 60°-95° Optimum: 8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Hargrove</text:p>
          </table:table-cell>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table-cell table:style-name="ce6" table:number-columns-repeated="16366"/>
        </table:table-row>
        <table:table-row table:style-name="ro3">
          <table:table-cell office:value-type="float" office:value="1359" calcext:value-type="float">
            <text:p>1359</text:p>
          </table:table-cell>
          <table:table-cell table:style-name="ce15" office:value-type="string" calcext:value-type="string">
            <text:p>FLOWER Sweet Pea (Lathyrus odoratus)</text:p>
          </table:table-cell>
          <table:table-cell table:style-name="ce15" office:value-type="string" calcext:value-type="string">
            <text:p>Early Multiflora Blend</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4">
          <table:table-cell office:value-type="float" office:value="1684" calcext:value-type="float">
            <text:p>1684</text:p>
          </table:table-cell>
          <table:table-cell table:style-name="ce15" office:value-type="string" calcext:value-type="string">
            <text:p>SQUASH Summer (Cucubirta pepo)</text:p>
          </table:table-cell>
          <table:table-cell table:style-name="ce15" office:value-type="string" calcext:value-type="string">
            <text:p>Early Prolific Straightneck</text:p>
          </table:table-cell>
          <table:table-cell table:style-name="ce14" office:value-type="string" calcext:value-type="string">
            <text:p>Ferry Morse</text:p>
          </table:table-cell>
          <table:table-cell table:style-name="ce15" office:value-type="string" calcext:value-type="string">
            <text:p>Plant outdoors1-2 weeks after last frost. Sow 2- 3 seeds 1/2”-1”deep, on mounds spaced 3-4 feet apart; thin to 1 healthy plant. Pick regularly to encourage fruit development. Will cross with other squash. <text:s/>55 days. Long straight fruit with small seed cavit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3">
          <table:table-cell office:value-type="float" office:value="1623" calcext:value-type="float">
            <text:p>1623</text:p>
          </table:table-cell>
          <table:table-cell table:style-name="ce14" office:value-type="string" calcext:value-type="string">
            <text:p>RADISH (Raphanus sativus)</text:p>
          </table:table-cell>
          <table:table-cell table:style-name="ce14" office:value-type="string" calcext:value-type="string">
            <text:p>Early Scarlet Globe </text:p>
          </table:table-cell>
          <table:table-cell table:style-name="ce14" office:value-type="string" calcext:value-type="string">
            <text:p>American Seed</text:p>
          </table:table-cell>
          <table:table-cell table:style-name="ce14" office:value-type="string" calcext:value-type="string">
            <text:p>Direct sow in early spring and early fall, 1/4-1/2” deep, plant 1” apart (or closer and thinned later), rows 12-18” apart. Harvest in 30 days or les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11">
          <table:table-cell office:value-type="float" office:value="1151" calcext:value-type="float">
            <text:p>1151</text:p>
          </table:table-cell>
          <table:table-cell table:style-name="ce14" office:value-type="string" calcext:value-type="string">
            <text:p>CAULIFLOWER (Brassica oleracea)</text:p>
          </table:table-cell>
          <table:table-cell table:style-name="ce14" office:value-type="string" calcext:value-type="string">
            <text:p>Early Snowball</text:p>
          </table:table-cell>
          <table:table-cell table:style-name="ce14" office:value-type="string" calcext:value-type="string">
            <text:p>Botanical Interest, Inc</text:p>
          </table:table-cell>
          <table:table-cell table:style-name="ce14" office:value-type="string" calcext:value-type="string">
            <text:p>Sow 1/4” deep with 12-16” between plants. Full Sun, 65 days. Harvest when head turns to bright white.</text:p>
          </table:table-cell>
          <table:table-cell table:style-name="ce14"/>
          <table:table-cell table:style-name="ce14" office:value-type="string" calcext:value-type="string">
            <text:p>22+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8-10 days</text:p>
          </table:table-cell>
          <table:table-cell/>
          <table:table-cell table:style-name="ce6" table:number-columns-repeated="16366"/>
        </table:table-row>
        <table:table-row table:style-name="ro3">
          <table:table-cell office:value-type="float" office:value="1479" calcext:value-type="float">
            <text:p>1479</text:p>
          </table:table-cell>
          <table:table-cell table:style-name="ce15" office:value-type="string" calcext:value-type="string">
            <text:p>KOHLRABI (Brassica oleracea var. gongylodes)</text:p>
          </table:table-cell>
          <table:table-cell table:style-name="ce15" office:value-type="string" calcext:value-type="string">
            <text:p>Early White Vienna</text:p>
          </table:table-cell>
          <table:table-cell table:style-name="ce14" office:value-type="string" calcext:value-type="string">
            <text:p>Ferry Morse</text:p>
          </table:table-cell>
          <table:table-cell table:style-name="ce15" office:value-type="string" calcext:value-type="string">
            <text:p>Cool season, full sun, start indoors at 1/4 inch depth, transplant to 4-6 inches apart. Harvest when size reaches 4 inches; 50-69 days. Contains 140% of the recommended daily allowance of vitamin C.</text:p>
          </table:table-cell>
          <table:table-cell table:style-name="ce15"/>
          <table:table-cell table:style-name="ce15" office:value-type="string" calcext:value-type="string">
            <text:p>12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4">
          <table:table-cell office:value-type="float" office:value="1109" calcext:value-type="float">
            <text:p>1109</text:p>
          </table:table-cell>
          <table:table-cell table:style-name="ce15" office:value-type="string" calcext:value-type="string">
            <text:p>BEET (Beta vulgaris)</text:p>
          </table:table-cell>
          <table:table-cell table:style-name="ce15" office:value-type="string" calcext:value-type="string">
            <text:p>Early Wonder</text:p>
          </table:table-cell>
          <table:table-cell table:style-name="ce14" office:value-type="string" calcext:value-type="string">
            <text:p>Ferry Morse</text:p>
          </table:table-cell>
          <table:table-cell table:style-name="ce15" office:value-type="string" calcext:value-type="string">
            <text:p>Direct sow outside early spring or fall. Plant 1/4”-1/2” deep, 3” apart, in rows 12” apart. Full Sun; 60 days. Fruit matures to 3” diameter; deep red and sweet; great for canning. Soil Temp Range: 40– 95 Optimum: 85°</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40– 95 Optimum: 85°</text:p>
          </table:table-cell>
          <table:table-cell table:style-name="ce15" office:value-type="string" calcext:value-type="string">
            <text:p>5-6 days</text:p>
          </table:table-cell>
          <table:table-cell/>
          <table:table-cell table:style-name="ce6" table:number-columns-repeated="16366"/>
        </table:table-row>
        <table:table-row table:style-name="ro2">
          <table:table-cell office:value-type="float" office:value="1526" calcext:value-type="float">
            <text:p>1526</text:p>
          </table:table-cell>
          <table:table-cell table:style-name="ce15" office:value-type="string" calcext:value-type="string">
            <text:p>Microgreens Beet (Beta vulgaris)</text:p>
          </table:table-cell>
          <table:table-cell table:style-name="ce15" office:value-type="string" calcext:value-type="string">
            <text:p>Early Wonder</text:p>
          </table:table-cell>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ext:s/>thickly, about 1/2” apart. Press seeds firmly into soil mix and cover about 1/2” with sowing mix. Move containers as need for best light exposure. Harvest about 15-25 days after sowing.</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5-75 degrees</text:p>
          </table:table-cell>
          <table:table-cell table:style-name="ce15" office:value-type="string" calcext:value-type="string">
            <text:p>5-8 days</text:p>
          </table:table-cell>
          <table:table-cell/>
          <table:table-cell table:style-name="ce6" table:number-columns-repeated="16366"/>
        </table:table-row>
        <table:table-row table:style-name="ro3">
          <table:table-cell office:value-type="float" office:value="1690" calcext:value-type="float">
            <text:p>1690</text:p>
          </table:table-cell>
          <table:table-cell table:style-name="ce15" office:value-type="string" calcext:value-type="string">
            <text:p>SQUASH Zucchini (Cucubirta pepo)</text:p>
          </table:table-cell>
          <table:table-cell table:style-name="ce15" office:value-type="string" calcext:value-type="string">
            <text:p>EasyPick Gold, Yellow Zucchini</text:p>
          </table:table-cell>
          <table:table-cell table:style-name="ce15" office:value-type="string" calcext:value-type="string">
            <text:p>Territorial Seed Company</text:p>
          </table:table-cell>
          <table:table-cell table:style-name="ce15" office:value-type="string" calcext:value-type="string">
            <text:p>Plant outdoors 2-3 seeds 1”deep, 3-4 feet apart; thin to 1 healthy plant. <text:s/>Prolific, long harvest. Pick regularly to encourage fruit development; best flavor when skin is thin.</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2">
          <table:table-cell office:value-type="float" office:value="1200" calcext:value-type="float">
            <text:p>1200</text:p>
          </table:table-cell>
          <table:table-cell table:style-name="ce15" office:value-type="string" calcext:value-type="string">
            <text:p>FLOWER</text:p>
          </table:table-cell>
          <table:table-cell table:style-name="ce15" office:value-type="string" calcext:value-type="string">
            <text:p>Edible Beauties</text:p>
          </table:table-cell>
          <table:table-cell table:style-name="ce14" office:value-type="string" calcext:value-type="string">
            <text:p>Botanical Interest, Inc</text:p>
          </table:table-cell>
          <table:table-cell table:style-name="ce15" office:value-type="string" calcext:value-type="string">
            <text:p>Approximately 11 varieties including borage, nasturtium, calendula, bachelor’s button, fennel, radish, arugula, marigold, basil, chives and Johnny jump-up. Sow directly 2-6 weeks before last frost. Scatter and rake into planting area about 20 seeds per foot. Enliven salads, herb butters and vinega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2">
          <table:table-cell office:value-type="float" office:value="1014" calcext:value-type="float">
            <text:p>1014</text:p>
          </table:table-cell>
          <table:table-cell table:style-name="ce15" office:value-type="string" calcext:value-type="string">
            <text:p>AMARANTH (Amaranthus tricolor)</text:p>
          </table:table-cell>
          <table:table-cell table:style-name="ce15" office:value-type="string" calcext:value-type="string">
            <text:p>Edible Red Leaf </text:p>
          </table:table-cell>
          <table:table-cell table:style-name="ce14" office:value-type="string" calcext:value-type="string">
            <text:p>Botanical Interest, Inc</text:p>
          </table:table-cell>
          <table:table-cell table:style-name="ce15" office:value-type="string" calcext:value-type="string">
            <text:p>Plant in warm soil or with summer rains 1/8”-1/4” deep in basins or rows 6”-12” apart. Likes full sun. Has a spinach like flavor that is sweet and slightly tangy. Makes a great salad ingredient or steam, stir-fry, saute or mix in dishes. Leaves mature about 49 days. Seeds ready about 90-110 days. Drought and heat toler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360" calcext:value-type="float">
            <text:p>1360</text:p>
          </table:table-cell>
          <table:table-cell table:style-name="ce14" office:value-type="string" calcext:value-type="string">
            <text:p>FLOWER Sweet Pea (Lathyrus odoratus)</text:p>
          </table:table-cell>
          <table:table-cell table:style-name="ce14" office:value-type="string" calcext:value-type="string">
            <text:p>Elegance Blend</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4"/>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536" calcext:value-type="float">
            <text:p>1536</text:p>
          </table:table-cell>
          <table:table-cell table:style-name="ce15" office:value-type="string" calcext:value-type="string">
            <text:p>OKRA (Abelmoschus esculentus)</text:p>
          </table:table-cell>
          <table:table-cell table:style-name="ce15" office:value-type="string" calcext:value-type="string">
            <text:p>Emerald</text:p>
          </table:table-cell>
          <table:table-cell table:style-name="ce15" office:value-type="string" calcext:value-type="string">
            <text:p>Ferry Morse</text:p>
          </table:table-cell>
          <table:table-cell table:style-name="ce15" office:value-type="string" calcext:value-type="string">
            <text:p>Soak 24 hrs before planting, direct sow or start indoors. Plant 3/4” deep about 3 feet apart. Harvest pods 2-4” long daily, as they grow quickly past stage of prime eating.</text:p>
          </table:table-cell>
          <table:table-cell table:style-name="ce15"/>
          <table:table-cell table:style-name="ce15" office:value-type="string" calcext:value-type="string">
            <text:p>10</text:p>
            <text:p>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3">
          <table:table-cell office:value-type="float" office:value="1467" calcext:value-type="float">
            <text:p>1467</text:p>
          </table:table-cell>
          <table:table-cell table:style-name="ce15" office:value-type="string" calcext:value-type="string">
            <text:p>HERB Thyme (Thymus vulgaris)</text:p>
          </table:table-cell>
          <table:table-cell table:style-name="ce15" office:value-type="string" calcext:value-type="string">
            <text:p>English</text:p>
          </table:table-cell>
          <table:table-cell table:style-name="ce14" office:value-type="string" calcext:value-type="string">
            <text:p>Botanical Interest, Inc</text:p>
          </table:table-cell>
          <table:table-cell table:style-name="ce15" office:value-type="string" calcext:value-type="string">
            <text:p>Plant indoors 6-8 weeks before last frost 1/8” deep. Transplant outdoors 1-2 weeks after last frost about 8”-16” apart. Drought tolerant. Attracts bees.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4">
          <table:table-cell office:value-type="float" office:value="1052" calcext:value-type="float">
            <text:p>1052</text:p>
          </table:table-cell>
          <table:table-cell table:style-name="ce14" office:value-type="string" calcext:value-type="string">
            <text:p>BEAN, COMMON (Phaseolus vulgaris)</text:p>
          </table:table-cell>
          <table:table-cell table:style-name="ce14" office:value-type="string" calcext:value-type="string">
            <text:p>Eureka, Bush Yellow Wax</text:p>
          </table:table-cell>
          <table:table-cell table:style-name="ce14" office:value-type="string" calcext:value-type="string">
            <text:p>Botanical Interest, Inc</text:p>
          </table:table-cell>
          <table:table-cell table:style-name="ce14" office:value-type="string" calcext:value-type="string">
            <text:p>Plant 1-2 weeks after frost and soil temp higher than 60 degrees. Direct sow 1” deep, 4-6” apart. Tender pods; heavy yielding; 5-6” pods; 50-55 days. <text:s/>Great for canning/freezing/eating raw. <text:s/>Will cross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office:value-type="string" calcext:value-type="string">
            <text:p>60°-95° Optimum: 80°</text:p>
          </table:table-cell>
          <table:table-cell table:style-name="ce14" office:value-type="string" calcext:value-type="string">
            <text:p>6-12 days</text:p>
          </table:table-cell>
          <table:table-cell/>
          <table:table-cell table:style-name="ce6" table:number-columns-repeated="16366"/>
        </table:table-row>
        <table:table-row table:style-name="ro4">
          <table:table-cell office:value-type="float" office:value="1350" calcext:value-type="float">
            <text:p>1350</text:p>
          </table:table-cell>
          <table:table-cell table:style-name="ce14" office:value-type="string" calcext:value-type="string">
            <text:p>FLOWER Sunflower (Helianthus annuus)</text:p>
          </table:table-cell>
          <table:table-cell table:style-name="ce14" office:value-type="string" calcext:value-type="string">
            <text:p>Evening Sun</text:p>
          </table:table-cell>
          <table:table-cell table:style-name="ce14" office:value-type="string" calcext:value-type="string">
            <text:p>Ferry Morse</text:p>
          </table:table-cell>
          <table:table-cell table:style-name="ce14" office:value-type="string" calcext:value-type="string">
            <text:p>Beautiful array of colors which may include red, bronze and crimson. <text:s/>Direct sow in full sun (sunflowers do not transplant well) after last frost, 1 inch deep, 18-24 inches apart. Germination takes 14-21 days. Great for cut flowers.</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takes 14-21 days. Great for cut flowers.</text:p>
          </table:table-cell>
          <table:table-cell/>
          <table:table-cell table:style-name="ce6" table:number-columns-repeated="16366"/>
        </table:table-row>
        <table:table-row table:style-name="ro3">
          <table:table-cell office:value-type="float" office:value="1414" calcext:value-type="float">
            <text:p>1414</text:p>
          </table:table-cell>
          <table:table-cell table:style-name="ce14" office:value-type="string" calcext:value-type="string">
            <text:p>HERB Basil (Ocimum basilicum)</text:p>
          </table:table-cell>
          <table:table-cell table:style-name="ce14" office:value-type="string" calcext:value-type="string">
            <text:p>Everleaf Emerald Towers</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488" calcext:value-type="float">
            <text:p>1488</text:p>
          </table:table-cell>
          <table:table-cell table:style-name="ce15" office:value-type="string" calcext:value-type="string">
            <text:p>LETTUCE Butterhead (Latuca sativa)</text:p>
          </table:table-cell>
          <table:table-cell table:style-name="ce15" office:value-type="string" calcext:value-type="string">
            <text:p>FAIRLY</text:p>
          </table:table-cell>
          <table:table-cell table:style-name="ce15"/>
          <table:table-cell table:style-name="ce15" office:value-type="string" calcext:value-type="string">
            <text:p>Greenhouse variety with smaller frame. Buttery taste.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4">
          <table:table-cell office:value-type="float" office:value="1220" calcext:value-type="float">
            <text:p>1220</text:p>
          </table:table-cell>
          <table:table-cell table:style-name="ce15" office:value-type="string" calcext:value-type="string">
            <text:p>FLOWER (Assorted species)</text:p>
          </table:table-cell>
          <table:table-cell table:style-name="ce15" office:value-type="string" calcext:value-type="string">
            <text:p>Fairy Meadow</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about 20 seeds per square foot and rake in. Attracts pollinators. Includes baby blue eyes, candytuft, California bluebells, poppies, pansey, snapdragon and others.</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558" calcext:value-type="float">
            <text:p>1558</text:p>
          </table:table-cell>
          <table:table-cell table:style-name="ce14" office:value-type="string" calcext:value-type="string">
            <text:p>PEANUT (Arachis hypogaea)</text:p>
          </table:table-cell>
          <table:table-cell table:style-name="ce14" office:value-type="string" calcext:value-type="string">
            <text:p>Fastigiata Pin Striped </text:p>
          </table:table-cell>
          <table:table-cell table:style-name="ce14" office:value-type="string" calcext:value-type="string">
            <text:p>Baker Creek Heirloom Seeds</text:p>
          </table:table-cell>
          <table:table-cell table:style-name="ce14" office:value-type="string" calcext:value-type="string">
            <text:p>Pin striped peanuts typically found in Ecuador. Easy to grow, require long season—120 days or more. <text:s/>Plant in or out of shell. <text:s/>Seeds are tender. Need fertile soil. Plant 1.5” deep, 6-8” apart in rows 2 ft apart after soil reaches 65 degrees. Keep free of weeds, but do not mulch! Dig peanuts when foliage begins to yellow.</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2">
          <table:table-cell office:value-type="float" office:value="1173" calcext:value-type="float">
            <text:p>1173</text:p>
          </table:table-cell>
          <table:table-cell table:style-name="ce14" office:value-type="string" calcext:value-type="string">
            <text:p>Cover Crop</text:p>
          </table:table-cell>
          <table:table-cell table:style-name="ce14" office:value-type="string" calcext:value-type="string">
            <text:p>Fava Bean (Vicia faba) Sweet <text:s/>Lorane Improved</text:p>
          </table:table-cell>
          <table:table-cell table:style-name="ce14" office:value-type="string" calcext:value-type="string">
            <text:p>Botanical Interest, Inc</text:p>
          </table:table-cell>
          <table:table-cell table:style-name="ce14" office:value-type="string" calcext:value-type="string">
            <text:p>Plant 6 to 8 weeks before last frost or 4 to 6 weeks before first frost. Soak seeds 12 to 24 hours before sowing. Plant seeds 3” deep with 2 to 4 seeds per square foot. For maximum nitrogen, harvest crop at peak bloom and work back into soil to increase organic matter. Cold hardy to 20F.</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653" calcext:value-type="float">
            <text:p>1653</text:p>
          </table:table-cell>
          <table:table-cell table:style-name="ce14" office:value-type="string" calcext:value-type="string">
            <text:p>Sprouts <text:s/>(Trigonella foenum-graecum)</text:p>
          </table:table-cell>
          <table:table-cell table:style-name="ce14" office:value-type="string" calcext:value-type="string">
            <text:p>Fenugreek</text:p>
          </table:table-cell>
          <table:table-cell table:style-name="ce22"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2-4 days until sprouts have roots 1/2” - 1” long.</text:p>
          </table:table-cell>
          <table:table-cell table:style-name="ce14"/>
          <table:table-cell table:style-name="ce14" office:value-type="string" calcext:value-type="string">
            <text:p>3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435" calcext:value-type="float">
            <text:p>1435</text:p>
          </table:table-cell>
          <table:table-cell table:style-name="ce14" office:value-type="string" calcext:value-type="string">
            <text:p>HERB Dill (Anethum graveolens)</text:p>
          </table:table-cell>
          <table:table-cell table:style-name="ce14" office:value-type="string" calcext:value-type="string">
            <text:p>Fernleaf</text:p>
          </table:table-cell>
          <table:table-cell table:style-name="ce14" office:value-type="string" calcext:value-type="string">
            <text:p>Ferry Morse</text:p>
          </table:table-cell>
          <table:table-cell table:style-name="ce14" office:value-type="string" calcext:value-type="string">
            <text:p>Finely cut foliage. Use fresh or dried. Sow when ground is warm, 1/4” deep, 9” apart. Plants reach 18-24” tall. Also easy to grow in containers.</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4 days</text:p>
          </table:table-cell>
          <table:table-cell/>
          <table:table-cell table:style-name="ce6" table:number-columns-repeated="16366"/>
        </table:table-row>
        <table:table-row table:style-name="ro4">
          <table:table-cell office:value-type="float" office:value="1053" calcext:value-type="float">
            <text:p>1053</text:p>
          </table:table-cell>
          <table:table-cell table:style-name="ce15" office:value-type="string" calcext:value-type="string">
            <text:p>BEAN, COMMON (Phaseolus vulgaris)</text:p>
          </table:table-cell>
          <table:table-cell table:style-name="ce15" office:value-type="string" calcext:value-type="string">
            <text:p>Ferrari - Bush Type</text:p>
          </table:table-cell>
          <table:table-cell table:style-name="ce14" office:value-type="string" calcext:value-type="string">
            <text:p>Botanical Interest, Inc</text:p>
          </table:table-cell>
          <table:table-cell table:style-name="ce15" office:value-type="string" calcext:value-type="string">
            <text:p>Plant early spring after frost and soil is temp higher than 60 degrees. Direct sow 4” apart. Compact bush to 16”; 5-6” dark green pods; 58 days. <text:s/>Great for canning/freezing/eating raw. Will cross with other bean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table-cell table:style-name="ce6" table:number-columns-repeated="16366"/>
        </table:table-row>
        <table:table-row table:style-name="ro4">
          <table:table-cell office:value-type="float" office:value="1438" calcext:value-type="float">
            <text:p>1438</text:p>
          </table:table-cell>
          <table:table-cell table:style-name="ce15" office:value-type="string" calcext:value-type="string">
            <text:p>HERB Fennel (Foeniculum vulgare var azoricum)</text:p>
          </table:table-cell>
          <table:table-cell table:style-name="ce15" office:value-type="string" calcext:value-type="string">
            <text:p>Finocchino</text:p>
          </table:table-cell>
          <table:table-cell table:style-name="ce14" office:value-type="string" calcext:value-type="string">
            <text:p>Botanical Interest, Inc</text:p>
          </table:table-cell>
          <table:table-cell table:style-name="ce15" office:value-type="string" calcext:value-type="string">
            <text:p>Start indoors 1/4” deep; darkness aids germination. Transplant <text:s/>4” apart; prefers well-drained, rich soil. <text:s/>Excellent additive to salads, fish, sauces (add seeds to spaghetti sauce!). <text:s/>Bulb can be eaten as a vegetable. Foliage and seeds can be used as herb.</text:p>
          </table:table-cell>
          <table:table-cell table:style-name="ce15"/>
          <table:table-cell table:style-name="ce15" office:value-type="string" calcext:value-type="string">
            <text:p>12-16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10-15 days</text:p>
          </table:table-cell>
          <table:table-cell/>
          <table:table-cell table:style-name="ce6" table:number-columns-repeated="16366"/>
        </table:table-row>
        <table:table-row table:style-name="ro2">
          <table:table-cell office:value-type="float" office:value="1325" calcext:value-type="float">
            <text:p>1325</text:p>
          </table:table-cell>
          <table:table-cell table:style-name="ce14" office:value-type="string" calcext:value-type="string">
            <text:p>FLOWER Penstemon (Penstemon strictus)</text:p>
          </table:table-cell>
          <table:table-cell table:style-name="ce14" office:value-type="string" calcext:value-type="string">
            <text:p>Firecracker</text:p>
          </table:table-cell>
          <table:table-cell table:style-name="ce14" office:value-type="string" calcext:value-type="string">
            <text:p>Native Seed/SEARCH <text:s/>www.nativeseeds.org</text:p>
          </table:table-cell>
          <table:table-cell table:style-name="ce14" office:value-type="string" calcext:value-type="string">
            <text:p>One of 250 species; native to AZ &amp; Mexico; bright red bloom; many flower stalks; self- sowing in Zones 10, 12, 13. <text:s/>Hummingbirds love it! Loosen soil with a rake or spade and work the seeds into the top 1/2 inch. Needs well drained soil with little or no amendments. Thrives in full sun. Do not overwater.</text:p>
          </table:table-cell>
          <table:table-cell table:style-name="ce14"/>
          <table:table-cell table:style-name="ce14" office:value-type="string" calcext:value-type="string">
            <text:p>1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3">
          <table:table-cell office:value-type="float" office:value="1270" calcext:value-type="float">
            <text:p>1270</text:p>
          </table:table-cell>
          <table:table-cell table:style-name="ce14" office:value-type="string" calcext:value-type="string">
            <text:p>FLOWER Firewheel (Gaillardia pulchella)</text:p>
          </table:table-cell>
          <table:table-cell table:style-name="ce14" office:value-type="string" calcext:value-type="string">
            <text:p>Firewheel</text:p>
          </table:table-cell>
          <table:table-cell table:style-name="ce23" office:value-type="string" calcext:value-type="string">
            <text:p>Native Seed/SEARCH <text:s/>www.nativeseeds.org</text:p>
          </table:table-cell>
          <table:table-cell table:style-name="ce14" office:value-type="string" calcext:value-type="string">
            <text:p>Work soil with a hard rake until loose. Work seeds into the top 1/2” in fall/winter and early spring. Water thoroughly and keep moist for the first few weeks. Once established, water occasionally.</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Beginner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table-cell table:style-name="ce6" table:number-columns-repeated="16366"/>
        </table:table-row>
        <table:table-row table:style-name="ro4">
          <table:table-cell office:value-type="float" office:value="1719" calcext:value-type="float">
            <text:p>1719</text:p>
          </table:table-cell>
          <table:table-cell table:style-name="ce15" office:value-type="string" calcext:value-type="string">
            <text:p>TOMATO (Solanaceae lycopersicum)</text:p>
          </table:table-cell>
          <table:table-cell table:style-name="ce15" office:value-type="string" calcext:value-type="string">
            <text:p>Flamenco</text:p>
          </table:table-cell>
          <table:table-cell table:style-name="ce15" office:value-type="string" calcext:value-type="string">
            <text:p>Native Seed/SEARCH <text:s/>www.nativeseeds.org</text:p>
          </table:table-cell>
          <table:table-cell table:style-name="ce15" office:value-type="string" calcext:value-type="string">
            <text:p>Originally domesticated in the Andes, South America. <text:s/>Start indoors 6-8 weeks before last frost. Semi-determinate 4 ft bush loaded with highly flavored 2” red round fruits. Continues to produce in hot weather. Soil Temp Range: 75°-85° Optimum: 8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75°-85° Optimum: 80°</text:p>
          </table:table-cell>
          <table:table-cell table:style-name="ce15" office:value-type="string" calcext:value-type="string">
            <text:p>7 to 10 days</text:p>
          </table:table-cell>
          <table:table-cell/>
          <table:table-cell table:style-name="ce6" table:number-columns-repeated="16366"/>
        </table:table-row>
        <table:table-row table:style-name="ro3">
          <table:table-cell office:value-type="float" office:value="1457" calcext:value-type="float">
            <text:p>1457</text:p>
          </table:table-cell>
          <table:table-cell table:style-name="ce15" office:value-type="string" calcext:value-type="string">
            <text:p>HERB PARSLEY (Petroselinum crispum)</text:p>
          </table:table-cell>
          <table:table-cell table:style-name="ce15" office:value-type="string" calcext:value-type="string">
            <text:p>Flat Leaf</text:p>
          </table:table-cell>
          <table:table-cell table:style-name="ce15"/>
          <table:table-cell table:style-name="ce15" office:value-type="string" calcext:value-type="string">
            <text:p>Soak seeds overnight before sowing. Direct sow in garden 4-6 weeks before last frost or start indoors 6-8 weeks before last frost. Plant 1/4 in deep, 8 in apart. Grow indoors for use year round.</text:p>
          </table:table-cell>
          <table:table-cell table:style-name="ce15"/>
          <table:table-cell table:style-name="ce15" office:value-type="string" calcext:value-type="string">
            <text:p>1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14-28 days</text:p>
          </table:table-cell>
          <table:table-cell/>
          <table:table-cell table:style-name="ce6" table:number-columns-repeated="16366"/>
        </table:table-row>
        <table:table-row table:style-name="ro4">
          <table:table-cell office:value-type="float" office:value="1163" calcext:value-type="float">
            <text:p>1163</text:p>
          </table:table-cell>
          <table:table-cell table:style-name="ce14" office:value-type="string" calcext:value-type="string">
            <text:p>CORN, POPCORN (Zea mays)</text:p>
          </table:table-cell>
          <table:table-cell table:style-name="ce14" office:value-type="string" calcext:value-type="string">
            <text:p>Flor del Rio</text:p>
          </table:table-cell>
          <table:table-cell table:style-name="ce14" office:value-type="string" calcext:value-type="string">
            <text:p>Native Seed/SEARCH <text:s/>www.nativeseeds.org</text:p>
          </table:table-cell>
          <table:table-cell table:style-name="ce14" office:value-type="string" calcext:value-type="string">
            <text:p>Multi colored kernels on ears from 2-6” in length. Leave on plant until husks are dry &amp; brown for most vivid color. <text:s/>Plant in spring 1” deep in rows 12” apart or 3-4 seeds in basins 18” apart. <text:s/>All species will cross pollinate. <text:s/>Grind for meal or pop. 110 day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4">
          <table:table-cell office:value-type="float" office:value="1440" calcext:value-type="float">
            <text:p>1440</text:p>
          </table:table-cell>
          <table:table-cell table:style-name="ce15" office:value-type="string" calcext:value-type="string">
            <text:p>HERB Fennel (Foeniculum vulgare)</text:p>
          </table:table-cell>
          <table:table-cell table:style-name="ce15" office:value-type="string" calcext:value-type="string">
            <text:p>Florence</text:p>
          </table:table-cell>
          <table:table-cell table:style-name="ce15"/>
          <table:table-cell table:style-name="ce15" office:value-type="string" calcext:value-type="string">
            <text:p>Called “finocchio” in Italian, excellent additive to salads, fish, sauces (add seeds to spaghetti sauce!). <text:s/>Start indoors 1/4” deep; transplant <text:s/>4” apart; prefers well-drained, rich soil. <text:s/>Light sun/partial shade, Tender perennial, 36°- 6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table-cell table:style-name="ce15" office:value-type="string" calcext:value-type="string">
            <text:p>10-15 days</text:p>
          </table:table-cell>
          <table:table-cell/>
          <table:table-cell table:style-name="ce6" table:number-columns-repeated="16366"/>
        </table:table-row>
        <table:table-row table:style-name="ro11">
          <table:table-cell office:value-type="float" office:value="1530" calcext:value-type="float">
            <text:p>1530</text:p>
          </table:table-cell>
          <table:table-cell table:style-name="ce15" office:value-type="string" calcext:value-type="string">
            <text:p>MUSTARD (Brassica juncea)</text:p>
          </table:table-cell>
          <table:table-cell table:style-name="ce15" office:value-type="string" calcext:value-type="string">
            <text:p>Florida Broadleaf </text:p>
          </table:table-cell>
          <table:table-cell table:style-name="ce14" office:value-type="string" calcext:value-type="string">
            <text:p>Botanical Interest, Inc</text:p>
          </table:table-cell>
          <table:table-cell table:style-name="ce15" office:value-type="string" calcext:value-type="string">
            <text:p>Direct sow 1/4” depth. Thin to 18” apart. Leaves can grow very large but are best harvested when young and tender.</text:p>
          </table:table-cell>
          <table:table-cell table:style-name="ce15"/>
          <table:table-cell table:style-name="ce15" office:value-type="string" calcext:value-type="string">
            <text:p>10+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4">
          <table:table-cell office:value-type="float" office:value="1174" calcext:value-type="float">
            <text:p>1174</text:p>
          </table:table-cell>
          <table:table-cell table:style-name="ce15" office:value-type="string" calcext:value-type="string">
            <text:p>COVER CROP Flower Crimson Clover (Trifolium incarnatum)</text:p>
          </table:table-cell>
          <table:table-cell table:style-name="ce15" office:value-type="string" calcext:value-type="string">
            <text:p>Flower Crimson Clover (Trifolium incarnatum) </text:p>
          </table:table-cell>
          <table:table-cell table:style-name="ce14" office:value-type="string" calcext:value-type="string">
            <text:p>Botanical Interest, Inc</text:p>
          </table:table-cell>
          <table:table-cell table:style-name="ce15" office:value-type="string" calcext:value-type="string">
            <text:p>Sow outside 4-6 weeks weeks before first fall frost. Has long elongated flower heads with deep red long-lasting blossoms that attracts <text:s/>beneficial insects. Like other clovers it fixes nitrogen but is fast growing for quick benefits. Deer resistant.</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696" calcext:value-type="float">
            <text:p>1696</text:p>
          </table:table-cell>
          <table:table-cell table:style-name="ce15" office:value-type="string" calcext:value-type="string">
            <text:p>SWISS CHARD (Beta vulgaris)</text:p>
          </table:table-cell>
          <table:table-cell table:style-name="ce15" office:value-type="string" calcext:value-type="string">
            <text:p>Fordhook Giant</text:p>
          </table:table-cell>
          <table:table-cell table:style-name="ce15" office:value-type="string" calcext:value-type="string">
            <text:p>Territorial Seed Company</text:p>
          </table:table-cell>
          <table:table-cell table:style-name="ce15" office:value-type="string" calcext:value-type="string">
            <text:p>Sow direct or indoors for transplant, 1/2” deep, 8” apart early spring. <text:s/>Sun/partial shade, 40-60 days. <text:s/>Stalks will be 8-10” tall. <text:s/>Begin harvesting when outer leaves are 6-8” tall; cut off individual leaves near the base to encourage new growth. Cold hardy variety that is tolerant to heat.</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2">
          <table:table-cell office:value-type="float" office:value="1346" calcext:value-type="float">
            <text:p>1346</text:p>
          </table:table-cell>
          <table:table-cell table:style-name="ce14" office:value-type="string" calcext:value-type="string">
            <text:p>FLOWER Sunflower (Helianthus annus)</text:p>
          </table:table-cell>
          <table:table-cell table:style-name="ce14" office:value-type="string" calcext:value-type="string">
            <text:p>Fort Apache</text:p>
          </table:table-cell>
          <table:table-cell table:style-name="ce23" office:value-type="string" calcext:value-type="string">
            <text:p>Native Seed/SEARCH <text:s/>www.nativeseeds.org</text:p>
          </table:table-cell>
          <table:table-cell table:style-name="ce14" office:value-type="string" calcext:value-type="string">
            <text:p>Produces medium to large, yellow heads and seeds for roasting or eaten raw. Direct sow in desired position, as sunflowers do not transplant well. <text:s/>Split or remove hard seed hulls. Plant 1” deep with 12-18 inches or more between plants. Sow in full sun in spring; tolerate heat and drought well.</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4">
          <table:table-cell office:value-type="float" office:value="1250" calcext:value-type="float">
            <text:p>1250</text:p>
          </table:table-cell>
          <table:table-cell table:style-name="ce15" office:value-type="string" calcext:value-type="string">
            <text:p>FLOWER Cleome (Cleome houtteana)</text:p>
          </table:table-cell>
          <table:table-cell table:style-name="ce15" office:value-type="string" calcext:value-type="string">
            <text:p>Fountain Blend</text:p>
          </table:table-cell>
          <table:table-cell table:style-name="ce14" office:value-type="string" calcext:value-type="string">
            <text:p>Botanical Interest, Inc</text:p>
          </table:table-cell>
          <table:table-cell table:style-name="ce15" office:value-type="string" calcext:value-type="string">
            <text:p>Sow outside 1 to 2 weeks after last average frost. Light aids germination. Press seeds into soil surface. Space 12” apart. Attracts pollinators. Deer resistant. Fairly drought tolerant once established. Makes excellent cut or dried flower.</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201" calcext:value-type="float">
            <text:p>1201</text:p>
          </table:table-cell>
          <table:table-cell table:style-name="ce14" office:value-type="string" calcext:value-type="string">
            <text:p>FLOWER</text:p>
          </table:table-cell>
          <table:table-cell table:style-name="ce14" office:value-type="string" calcext:value-type="string">
            <text:p>Four O’Clock</text:p>
          </table:table-cell>
          <table:table-cell table:style-name="ce14" office:value-type="string" calcext:value-type="string">
            <text:p>Botanical Interest, Inc</text:p>
          </table:table-cell>
          <table:table-cell table:style-name="ce14" office:value-type="string" calcext:value-type="string">
            <text:p>An old favorite with brilliant trumpet-shaped, remaining open all night and usually close before noon Scatter seeds 2-4 weeks before average last frost. Rake seeds in to 1/4” depth and water gently and keep moist until plants are 4inche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4">
          <table:table-cell office:value-type="float" office:value="1624" calcext:value-type="float">
            <text:p>1624</text:p>
          </table:table-cell>
          <table:table-cell table:style-name="ce15" office:value-type="string" calcext:value-type="string">
            <text:p>RADISH (Raphanus sativus)</text:p>
          </table:table-cell>
          <table:table-cell table:style-name="ce15" office:value-type="string" calcext:value-type="string">
            <text:p>French Breakfast</text:p>
          </table:table-cell>
          <table:table-cell table:style-name="ce15" office:value-type="string" calcext:value-type="string">
            <text:p>Burpee</text:p>
          </table:table-cell>
          <table:table-cell table:style-name="ce15" office:value-type="string" calcext:value-type="string">
            <text:p>Direct sow in early spring and early fall, 1/4” deep, plant 2” apart (or closer and thin later), rows 10-12” apart at 2-3 week intervals. <text:s/>50-60 days — a pre-1885 French heirloom, mild spicy flavor. <text:s/>Red top, white bottom. <text:s/>Attractive gourmet variety.</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11">
          <table:table-cell office:value-type="float" office:value="1138" calcext:value-type="float">
            <text:p>1138</text:p>
          </table:table-cell>
          <table:table-cell table:style-name="ce14" office:value-type="string" calcext:value-type="string">
            <text:p>CARROT (Bolero nantes)</text:p>
          </table:table-cell>
          <table:table-cell table:style-name="ce14" office:value-type="string" calcext:value-type="string">
            <text:p>French Carrots</text:p>
          </table:table-cell>
          <table:table-cell table:style-name="ce14"/>
          <table:table-cell table:style-name="ce14" office:value-type="string" calcext:value-type="string">
            <text:p>Plant 1/4” deep, thin to 2”. Harvest either as slim baby carrots or as full sized. Sweet flavored</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2"/>
          <table:table-cell table:style-name="ce15" office:value-type="string" calcext:value-type="string">
            <text:p>Holly Vennum, Master Gardener</text:p>
          </table:table-cell>
          <table:table-cell table:style-name="ce28" office:value-type="string" calcext:value-type="string">
            <text:p>2022</text:p>
          </table:table-cell>
          <table:table-cell table:style-name="ce14"/>
          <table:table-cell table:style-name="ce14" office:value-type="string" calcext:value-type="string">
            <text:p>10-21 days</text:p>
          </table:table-cell>
          <table:table-cell/>
          <table:table-cell table:style-name="ce6" table:number-columns-repeated="16366"/>
        </table:table-row>
        <table:table-row table:style-name="ro3">
          <table:table-cell office:value-type="float" office:value="1308" calcext:value-type="float">
            <text:p>1308</text:p>
          </table:table-cell>
          <table:table-cell table:style-name="ce15" office:value-type="string" calcext:value-type="string">
            <text:p>FLOWER Marigold (Tagetes erecta)</text:p>
          </table:table-cell>
          <table:table-cell table:style-name="ce14" office:value-type="string" calcext:value-type="string">
            <text:p>French Double Dwarf</text:p>
          </table:table-cell>
          <table:table-cell table:style-name="ce14" office:value-type="string" calcext:value-type="string">
            <text:p>Ferry Morse</text:p>
          </table:table-cell>
          <table:table-cell table:style-name="ce14" office:value-type="string" calcext:value-type="string">
            <text:p>Compact plants with double blooms in brilliant colors. <text:s/>Plant in fine, moist soil, covering lightly with 1/4” soil. <text:s/>Plant 8” apart in full sun. Thrives in summer’s heat. Also great in container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310" calcext:value-type="float">
            <text:p>1310</text:p>
          </table:table-cell>
          <table:table-cell table:style-name="ce15" office:value-type="string" calcext:value-type="string">
            <text:p>FLOWER Marigold (Tagetes patula)</text:p>
          </table:table-cell>
          <table:table-cell table:style-name="ce15" office:value-type="string" calcext:value-type="string">
            <text:p>French Favorite Blend</text:p>
          </table:table-cell>
          <table:table-cell table:style-name="ce14" office:value-type="string" calcext:value-type="string">
            <text:p>Botanical Interest, Inc</text:p>
          </table:table-cell>
          <table:table-cell table:style-name="ce15" office:value-type="string" calcext:value-type="string">
            <text:p>Compact lacy plant with bright mix of yellow, gold, red and bicolor flowers. <text:s/>Plant in fine, moist soil, covering lightly with 1/4” soil. <text:s/>Plant 6” apart in full sun. Fairly drought tolerant once established. Deer and rabbit resistant.</text:p>
          </table:table-cell>
          <table:table-cell table:style-name="ce15"/>
          <table:table-cell table:style-name="ce15" office:value-type="string" calcext:value-type="string">
            <text:p>15-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306" calcext:value-type="float">
            <text:p>1306</text:p>
          </table:table-cell>
          <table:table-cell table:style-name="ce15" office:value-type="string" calcext:value-type="string">
            <text:p>FLOWER Marigold (Tagetes erecta)</text:p>
          </table:table-cell>
          <table:table-cell table:style-name="ce14" office:value-type="string" calcext:value-type="string">
            <text:p>French Lemon Drop</text:p>
          </table:table-cell>
          <table:table-cell table:style-name="ce14" office:value-type="string" calcext:value-type="string">
            <text:p>Botanical Interest, Inc</text:p>
          </table:table-cell>
          <table:table-cell table:style-name="ce14" office:value-type="string" calcext:value-type="string">
            <text:p>Compact plants with sunny yellow flowers. Plant in fine, moist soil, covering lightly with 1/4” soil. <text:s/>Plant 6” apart in full sun. Fairly drought tolerant once established. Deer and rabbit resistant.</text:p>
          </table:table-cell>
          <table:table-cell table:style-name="ce14"/>
          <table:table-cell table:style-name="ce14" office:value-type="string" calcext:value-type="string">
            <text:p>15-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311" calcext:value-type="float">
            <text:p>1311</text:p>
          </table:table-cell>
          <table:table-cell table:style-name="ce15" office:value-type="string" calcext:value-type="string">
            <text:p>FLOWER Marigold (Tagetes patula)</text:p>
          </table:table-cell>
          <table:table-cell table:style-name="ce15" office:value-type="string" calcext:value-type="string">
            <text:p>French Naughty Marietta</text:p>
          </table:table-cell>
          <table:table-cell table:style-name="ce14" office:value-type="string" calcext:value-type="string">
            <text:p>Botanical Interest, Inc</text:p>
          </table:table-cell>
          <table:table-cell table:style-name="ce15" office:value-type="string" calcext:value-type="string">
            <text:p>Compact plants with bright colored flowers. <text:s/>Plant in fine, moist soil, covering lightly with 1/4” soil. <text:s/>Plant 6” apart in full sun. Low maintenance and fairly drought tolerant once established. Deer and rabbit resist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312" calcext:value-type="float">
            <text:p>1312</text:p>
          </table:table-cell>
          <table:table-cell table:style-name="ce14" office:value-type="string" calcext:value-type="string">
            <text:p>FLOWER Marigold (Tagetes patula)</text:p>
          </table:table-cell>
          <table:table-cell table:style-name="ce14" office:value-type="string" calcext:value-type="string">
            <text:p>French Red Metamorph</text:p>
          </table:table-cell>
          <table:table-cell table:style-name="ce14" office:value-type="string" calcext:value-type="string">
            <text:p>Botanical Interest, Inc</text:p>
          </table:table-cell>
          <table:table-cell table:style-name="ce14" office:value-type="string" calcext:value-type="string">
            <text:p>Compact plants with single blooms that as the weather gets warmer, the petals morph from burgundy to striped with yellow. <text:s/>Plant 1-2 weeks after last frost in fine, moist soil, covering lightly with 1/4” soil. <text:s/>Plant 6”-8” apart in full sun. <text:s/>Attracts beneficial insect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064" calcext:value-type="float">
            <text:p>1064</text:p>
          </table:table-cell>
          <table:table-cell table:style-name="ce14" office:value-type="string" calcext:value-type="string">
            <text:p>BEAN, COMMON (Phaseolus vulgaris)</text:p>
          </table:table-cell>
          <table:table-cell table:style-name="ce15" office:value-type="string" calcext:value-type="string">
            <text:p>Frijol Chivita (“Little Goat”)</text:p>
          </table:table-cell>
          <table:table-cell table:style-name="ce23" office:value-type="string" calcext:value-type="string">
            <text:p>Native Seed/SEARCH <text:s/>www.nativeseeds.org</text:p>
          </table:table-cell>
          <table:table-cell table:style-name="ce15" office:value-type="string" calcext:value-type="string">
            <text:p>Pole or bush bean; eaten young as green beans or dried and shelled; plant in spring or with summer rains 1” deep 6” apart. Separate varieties by 10 ft. <text:s/>Gold &amp; White Jacob’s Cattle bean from arid eastern Tarahumara; aka, Golondrina or Cinco Minutos Minuto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table-cell table:style-name="ce6" table:number-columns-repeated="16366"/>
        </table:table-row>
        <table:table-row table:style-name="ro4">
          <table:table-cell office:value-type="float" office:value="1066" calcext:value-type="float">
            <text:p>1066</text:p>
          </table:table-cell>
          <table:table-cell table:style-name="ce14" office:value-type="string" calcext:value-type="string">
            <text:p>BEAN, COMMON (Phaseolus vulgaris)</text:p>
          </table:table-cell>
          <table:table-cell table:style-name="ce14" office:value-type="string" calcext:value-type="string">
            <text:p>Frijol de Cerocahui</text:p>
          </table:table-cell>
          <table:table-cell table:style-name="ce14" office:value-type="string" calcext:value-type="string">
            <text:p>Native Seed/SEARCH <text:s/>www.nativeseeds.org</text:p>
          </table:table-cell>
          <table:table-cell table:style-name="ce14" office:value-type="string" calcext:value-type="string">
            <text:p>Pole or bush bean; eaten young as green beans or dried and shelled; plant with summer rains 1” deep 6” apart. Separate varieties by 10 ft. <text:s/>Smallish beige/tan bean from Barranca del Cobre from farmer who fled violence in region.</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table:number-columns-repeated="2"/>
          <table:table-cell/>
          <table:table-cell table:style-name="ce6" table:number-columns-repeated="16366"/>
        </table:table-row>
        <table:table-row table:style-name="ro3">
          <table:table-cell office:value-type="float" office:value="1243" calcext:value-type="float">
            <text:p>1243</text:p>
          </table:table-cell>
          <table:table-cell table:style-name="ce15" office:value-type="string" calcext:value-type="string">
            <text:p>FLOWER Blanket Flower (Gaillardia x grandiflora)</text:p>
          </table:table-cell>
          <table:table-cell table:style-name="ce15" office:value-type="string" calcext:value-type="string">
            <text:p>Gaillardia Goblin aka Blanket Flower</text:p>
          </table:table-cell>
          <table:table-cell table:style-name="ce14" office:value-type="string" calcext:value-type="string">
            <text:p>Botanical Interest, Inc</text:p>
          </table:table-cell>
          <table:table-cell table:style-name="ce15" office:value-type="string" calcext:value-type="string">
            <text:p>Plant seeds into the top 1/4” 4-6 weeks before last frost. Water thoroughly and keep moist for the first few weeks. Once established, water occasionally.</text:p>
          </table:table-cell>
          <table:table-cell table:style-name="ce15"/>
          <table:table-cell table:style-name="ce15" office:value-type="string" calcext:value-type="string">
            <text:p>15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641" calcext:value-type="float">
            <text:p>1641</text:p>
          </table:table-cell>
          <table:table-cell table:style-name="ce15" office:value-type="string" calcext:value-type="string">
            <text:p>SPINACH (Spinacia oleracea)</text:p>
          </table:table-cell>
          <table:table-cell table:style-name="ce15" office:value-type="string" calcext:value-type="string">
            <text:p>Galilee</text:p>
          </table:table-cell>
          <table:table-cell table:style-name="ce14" office:value-type="string" calcext:value-type="string">
            <text:p>Baker Creek Heirloom Seeds</text:p>
          </table:table-cell>
          <table:table-cell table:style-name="ce15" office:value-type="string" calcext:value-type="string">
            <text:p>Direct sow in early spring &amp; late summer, 1/2” deep, thin to 1” apart, rows 12” apart. <text:s/>35 days, heat tolerant, from Middle East, triangular light green leaves. <text:s/>Sweet, mild flavor. Soil Temp Range: 35°-85° Optimum: 70°</text:p>
          </table:table-cell>
          <table:table-cell table:style-name="ce15"/>
          <table:table-cell table:style-name="ce15" office:value-type="string" calcext:value-type="string">
            <text:p>45-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Avery-Hargrove (CCMGA Master Gardener) </text:p>
          </table:table-cell>
          <table:table-cell table:style-name="ce28" office:value-type="string" calcext:value-type="string">
            <text:p>2017</text:p>
          </table:table-cell>
          <table:table-cell table:style-name="ce15" office:value-type="string" calcext:value-type="string">
            <text:p>35°-85° Optimum: 70°</text:p>
          </table:table-cell>
          <table:table-cell table:style-name="ce15" office:value-type="string" calcext:value-type="string">
            <text:p>5-6 days</text:p>
          </table:table-cell>
          <table:table-cell/>
          <table:table-cell table:style-name="ce6" table:number-columns-repeated="16366"/>
        </table:table-row>
        <table:table-row table:style-name="ro1">
          <table:table-cell office:value-type="float" office:value="1291" calcext:value-type="float">
            <text:p>1291</text:p>
          </table:table-cell>
          <table:table-cell table:style-name="ce14" office:value-type="string" calcext:value-type="string">
            <text:p>FLOWER Larkspur (Consolida regalis)</text:p>
          </table:table-cell>
          <table:table-cell table:style-name="ce14" office:value-type="string" calcext:value-type="string">
            <text:p>Galilee Blend</text:p>
          </table:table-cell>
          <table:table-cell table:style-name="ce14" office:value-type="string" calcext:value-type="string">
            <text:p>Botanical Interest, Inc</text:p>
          </table:table-cell>
          <table:table-cell table:style-name="ce14" office:value-type="string" calcext:value-type="string">
            <text:p>Sow outside 4 to 6 weeks before last frost or in fall before first frost. Plant 1/4” deep. <text:s/>Space 12” apart. Deer resistant. Grows 3’ to 4’ t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1">
          <table:table-cell office:value-type="float" office:value="1726" calcext:value-type="float">
            <text:p>1726</text:p>
          </table:table-cell>
          <table:table-cell table:style-name="ce15" office:value-type="string" calcext:value-type="string">
            <text:p>TOMATO Cherry (Solanum lycopersiucm)</text:p>
          </table:table-cell>
          <table:table-cell table:style-name="ce15" office:value-type="string" calcext:value-type="string">
            <text:p>Gardener’s Delight Cherry Tomato</text:p>
          </table:table-cell>
          <table:table-cell table:style-name="ce14" office:value-type="string" calcext:value-type="string">
            <text:p>Botanical Interest, Inc</text:p>
          </table:table-cell>
          <table:table-cell table:style-name="ce15" office:value-type="string" calcext:value-type="string">
            <text:p>Start indoors 4-6 weeks before transplant, 1/4” deep; plant outdoors 36” apart, full sun. Vigorous vines reaching 6’ long</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2">
          <table:table-cell office:value-type="float" office:value="1431" calcext:value-type="float">
            <text:p>1431</text:p>
          </table:table-cell>
          <table:table-cell table:style-name="ce15" office:value-type="string" calcext:value-type="string">
            <text:p>HERB Chives (Allium tuberosum)</text:p>
          </table:table-cell>
          <table:table-cell table:style-name="ce15" office:value-type="string" calcext:value-type="string">
            <text:p>Garlic</text:p>
          </table:table-cell>
          <table:table-cell table:style-name="ce15" office:value-type="string" calcext:value-type="string">
            <text:p>Ferry Morse</text:p>
          </table:table-cell>
          <table:table-cell table:style-name="ce15" office:value-type="string" calcext:value-type="string">
            <text:p>Perennial, 12-18”, full sun or partial shade. Direct sow or start indoors 6-8 weeks before last frost, press gently in surface of moist soil. Transplant 4- 8” apart. Drought and heat tolerant. Foliage and flowers edible. Delicate garlic flavor; wonderful flavor in many recipe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table-cell table:style-name="ce15" office:value-type="string" calcext:value-type="string">
            <text:p>7-14 days</text:p>
          </table:table-cell>
          <table:table-cell/>
          <table:table-cell table:style-name="ce6" table:number-columns-repeated="16366"/>
        </table:table-row>
        <table:table-row table:style-name="ro3">
          <table:table-cell office:value-type="float" office:value="1409" calcext:value-type="float">
            <text:p>1409</text:p>
          </table:table-cell>
          <table:table-cell table:style-name="ce14" office:value-type="string" calcext:value-type="string">
            <text:p>HERB Basil (Ocimum basilicum “Genovese”)</text:p>
          </table:table-cell>
          <table:table-cell table:style-name="ce15" office:value-type="string" calcext:value-type="string">
            <text:p>Genovese</text:p>
          </table:table-cell>
          <table:table-cell table:style-name="ce14" office:value-type="string" calcext:value-type="string">
            <text:p>Ferry Morse</text:p>
          </table:table-cell>
          <table:table-cell table:style-name="ce15" office:value-type="string" calcext:value-type="string">
            <text:p>Start indoors 4-6 weeks before transplanting outdoors. Sow 1/4” deep in seed starting mix. Transplant outdoors 1-2 weeks after last frost about 12” apart.</text:p>
          </table:table-cell>
          <table:table-cell table:style-name="ce15"/>
          <table:table-cell table:style-name="ce15" office:value-type="string" calcext:value-type="string">
            <text:p>10-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11">
          <table:table-cell office:value-type="float" office:value="1155" calcext:value-type="float">
            <text:p>1155</text:p>
          </table:table-cell>
          <table:table-cell table:style-name="ce15" office:value-type="string" calcext:value-type="string">
            <text:p>COLLARD GREENS (Brassica oleracea)</text:p>
          </table:table-cell>
          <table:table-cell table:style-name="ce15" office:value-type="string" calcext:value-type="string">
            <text:p>Georgia Southern</text:p>
          </table:table-cell>
          <table:table-cell table:style-name="ce15"/>
          <table:table-cell table:style-name="ce15" office:value-type="string" calcext:value-type="string">
            <text:p>Direct sow 1/4” deep, <text:s/>12” apart. Best when harvested before the leaves are 10 inches in length.</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5-6 days</text:p>
          </table:table-cell>
          <table:table-cell/>
          <table:table-cell table:style-name="ce6" table:number-columns-repeated="16366"/>
        </table:table-row>
        <table:table-row table:style-name="ro2">
          <table:table-cell office:value-type="float" office:value="1426" calcext:value-type="float">
            <text:p>1426</text:p>
          </table:table-cell>
          <table:table-cell table:style-name="ce15" office:value-type="string" calcext:value-type="string">
            <text:p>HERB Chamomile (Matricaria recutita)</text:p>
          </table:table-cell>
          <table:table-cell table:style-name="ce15" office:value-type="string" calcext:value-type="string">
            <text:p>German</text:p>
          </table:table-cell>
          <table:table-cell table:style-name="ce14" office:value-type="string" calcext:value-type="string">
            <text:p>Botanical Interest, Inc</text:p>
          </table:table-cell>
          <table:table-cell table:style-name="ce15" office:value-type="string" calcext:value-type="string">
            <text:p>Sow inside 6-8 weeks before last frost. Tamp a small pinch of seeds lightly onto the soil as seeds require light to germinate. Mist lightly. Transplant when seedlings have 4 true leaves, giving plants 8” spacing. Flowers can be used fresh in tea, in salads or dried for floral arrangements.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377" calcext:value-type="float">
            <text:p>1377</text:p>
          </table:table-cell>
          <table:table-cell table:style-name="ce15" office:value-type="string" calcext:value-type="string">
            <text:p>FLOWER Zinnia (Zinnia elegans)</text:p>
          </table:table-cell>
          <table:table-cell table:style-name="ce15" office:value-type="string" calcext:value-type="string">
            <text:p>Giant Double Scarlet Flame</text:p>
          </table:table-cell>
          <table:table-cell table:style-name="ce15" office:value-type="string" calcext:value-type="string">
            <text:p>Ferry Morse</text:p>
          </table:table-cell>
          <table:table-cell table:style-name="ce15" office:value-type="string" calcext:value-type="string">
            <text:p>Sow outside 2 to 4 weeks after last frost. Plant 1/4” deep. Space 8” apart. Heat loving. Attracts pollinators. Deer resistant. Large blossoms in a rich, purple hue on strong, tall plant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3">
          <table:table-cell office:value-type="float" office:value="1378" calcext:value-type="float">
            <text:p>1378</text:p>
          </table:table-cell>
          <table:table-cell table:style-name="ce14" office:value-type="string" calcext:value-type="string">
            <text:p>FLOWER Zinnia (Zinnia elegans)</text:p>
          </table:table-cell>
          <table:table-cell table:style-name="ce14" office:value-type="string" calcext:value-type="string">
            <text:p>Giant Double Violet Queen</text:p>
          </table:table-cell>
          <table:table-cell table:style-name="ce14" office:value-type="string" calcext:value-type="string">
            <text:p>Ferry Morse</text:p>
          </table:table-cell>
          <table:table-cell table:style-name="ce14" office:value-type="string" calcext:value-type="string">
            <text:p>Sow outside 2 to 4 weeks after last frost. Plant 1/4” deep. Space 8” apart. Heat loving. Attracts pollinators. Deer resistant. Large blossoms in a rich, purple hue on strong, tall plant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348" calcext:value-type="float">
            <text:p>1348</text:p>
          </table:table-cell>
          <table:table-cell table:style-name="ce14" office:value-type="string" calcext:value-type="string">
            <text:p>FLOWER Sunflower (Helianthus annuus)</text:p>
          </table:table-cell>
          <table:table-cell table:style-name="ce14" office:value-type="string" calcext:value-type="string">
            <text:p>Giant Hybrid</text:p>
          </table:table-cell>
          <table:table-cell table:style-name="ce14" office:value-type="string" calcext:value-type="string">
            <text:p>Ferry Morse</text:p>
          </table:table-cell>
          <table:table-cell table:style-name="ce14" office:value-type="string" calcext:value-type="string">
            <text:p>Large blooms with large seeds for roasting. Plants can grow up p to 14’-16’ tall. <text:s/>Direct sow (sunflowers do not transplant well) after last frost, 1 inch deep, thin to 18”-24” inches apart. Because of the size, needs lots of water.</text:p>
          </table:table-cell>
          <table:table-cell table:style-name="ce14" table:number-columns-repeated="2"/>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4-21 days</text:p>
          </table:table-cell>
          <table:table-cell/>
          <table:table-cell table:style-name="ce6" table:number-columns-repeated="16366"/>
        </table:table-row>
        <table:table-row table:style-name="ro3">
          <table:table-cell office:value-type="float" office:value="1640" calcext:value-type="float">
            <text:p>1640</text:p>
          </table:table-cell>
          <table:table-cell table:style-name="ce14" office:value-type="string" calcext:value-type="string">
            <text:p>SPINACH (Spinacia oleracea)</text:p>
          </table:table-cell>
          <table:table-cell table:style-name="ce14" office:value-type="string" calcext:value-type="string">
            <text:p>Giant Noble</text:p>
          </table:table-cell>
          <table:table-cell table:style-name="ce14" office:value-type="string" calcext:value-type="string">
            <text:p>American Seed</text:p>
          </table:table-cell>
          <table:table-cell table:style-name="ce14" office:value-type="string" calcext:value-type="string">
            <text:p>Direct sow in early spring &amp; late summer, 1/2” deep, thin to 1” apart, rows 12” apart. <text:s/>High yields, rich flavor, tender, slow to bolt; maturity 45 days. Soil Temp Range: 35°-85° Optimum: 70°</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table-cell table:style-name="ce6" table:number-columns-repeated="16366"/>
        </table:table-row>
        <table:table-row table:style-name="ro9">
          <table:table-cell office:value-type="float" office:value="1153" calcext:value-type="float">
            <text:p>1153</text:p>
          </table:table-cell>
          <table:table-cell table:style-name="ce14" office:value-type="string" calcext:value-type="string">
            <text:p>CELERIAC (Apium graveolens)</text:p>
          </table:table-cell>
          <table:table-cell table:style-name="ce14" office:value-type="string" calcext:value-type="string">
            <text:p>Giant Prague (Root Celery)</text:p>
          </table:table-cell>
          <table:table-cell table:style-name="ce14" office:value-type="string" calcext:value-type="string">
            <text:p>Baker Creek Heirloom Seeds</text:p>
          </table:table-cell>
          <table:table-cell table:style-name="ce14" office:value-type="string" calcext:value-type="string">
            <text:p>Root celery with large white roots superb for frying or in soup. <text:s/>Taste is much like regular celery. <text:s/>Needs mild weather. Start indoors up to 8 weeks before last frost. <text:s/>Tiny seeds should be surface- sown and not covered (or covered very lightly); important: <text:s/>keep uniformly moist until seedlings are strong. <text:s/>Keep at 70-75 degrees to germinate. <text:s/>Germination will take from 2 to 3 weeks. Soil Temp Range: 70-75° Optimum: 75°</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0-75° Optimum: 75°</text:p>
          </table:table-cell>
          <table:table-cell table:style-name="ce14" office:value-type="string" calcext:value-type="string">
            <text:p>2-3 weeks</text:p>
          </table:table-cell>
          <table:table-cell/>
          <table:table-cell table:style-name="ce6" table:number-columns-repeated="16366"/>
        </table:table-row>
        <table:table-row table:style-name="ro2">
          <table:table-cell office:value-type="float" office:value="1356" calcext:value-type="float">
            <text:p>1356</text:p>
          </table:table-cell>
          <table:table-cell table:style-name="ce15" office:value-type="string" calcext:value-type="string">
            <text:p>FLOWER Sunflower (Helianthus uniflorus Giganteus)</text:p>
          </table:table-cell>
          <table:table-cell table:style-name="ce15" office:value-type="string" calcext:value-type="string">
            <text:p>Giant White-Seeded</text:p>
          </table:table-cell>
          <table:table-cell table:style-name="ce14" office:value-type="string" calcext:value-type="string">
            <text:p>Baker Creek Heirloom Seeds</text:p>
          </table:table-cell>
          <table:table-cell table:style-name="ce15" office:value-type="string" calcext:value-type="string">
            <text:p>Classic giant variety to 12 feet tall! <text:s/>Produces large, yellow heads and big delicious white seeds for roasting. Direct sow in desired position, as sunflowers do not transplant well. <text:s/>Allow 12-18 inches or more between plants. <text:s/>Sow in full sun 2-3 weeks BEFORE last frost of spring; tolerate heat and drought well.</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3">
          <table:table-cell office:value-type="float" office:value="1379" calcext:value-type="float">
            <text:p>1379</text:p>
          </table:table-cell>
          <table:table-cell table:style-name="ce14" office:value-type="string" calcext:value-type="string">
            <text:p>FLOWER Zinnia (Zinnia elegans)</text:p>
          </table:table-cell>
          <table:table-cell table:style-name="ce14" office:value-type="string" calcext:value-type="string">
            <text:p>Giants of California Mixed Colors</text:p>
          </table:table-cell>
          <table:table-cell table:style-name="ce14" office:value-type="string" calcext:value-type="string">
            <text:p>Ferry Morse</text:p>
          </table:table-cell>
          <table:table-cell table:style-name="ce14" office:value-type="string" calcext:value-type="string">
            <text:p>Sow outside 2 to 4 weeks after last frost. Plant 1/4” deep. Space 8” apart. Heat loving. Attracts pollinators. Deer resistant. Make wonderful cut flowers with a wide range of bright shades of colo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667" calcext:value-type="float">
            <text:p>1667</text:p>
          </table:table-cell>
          <table:table-cell table:style-name="ce14" office:value-type="string" calcext:value-type="string">
            <text:p>SQUASH (Cucurbirta argyrosperma)</text:p>
          </table:table-cell>
          <table:table-cell table:style-name="ce14" office:value-type="string" calcext:value-type="string">
            <text:p>Gila Pima HA:l </text:p>
          </table:table-cell>
          <table:table-cell table:style-name="ce15" office:value-type="string" calcext:value-type="string">
            <text:p>BJ Searcy, CCMGA Master Gardener, Whetstone</text:p>
          </table:table-cell>
          <table:table-cell table:style-name="ce14" office:value-type="string" calcext:value-type="string">
            <text:p>Summer squash if eaten young. Winter squash when mature. Direct sow outside after last frost. Plant 1” deep in hills of 2-3 plants per hill, 6-10 feet apart. Full sun; 92-105 days; fruit 15” long and 8” wide when mature. Will cross with other squash, gourds or cucumb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J Searcy, Master Gardener</text:p>
          </table:table-cell>
          <table:table-cell table:style-name="ce28" office:value-type="string" calcext:value-type="string">
            <text:p>2022</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6">
          <table:table-cell office:value-type="float" office:value="1164" calcext:value-type="float">
            <text:p>1164</text:p>
          </table:table-cell>
          <table:table-cell table:style-name="ce15" office:value-type="string" calcext:value-type="string">
            <text:p>CORN, POPCORN (Zea mays)</text:p>
          </table:table-cell>
          <table:table-cell table:style-name="ce15" office:value-type="string" calcext:value-type="string">
            <text:p>Glass Gem</text:p>
          </table:table-cell>
          <table:table-cell table:style-name="ce15"/>
          <table:table-cell table:style-name="ce15" office:value-type="string" calcext:value-type="string">
            <text:p>Plant in spring 1” deep in rows or clusters. Plants should be no more than 8-12 inches apart to get best pollination. <text:s/>Plants height is typically 6-9 ft; 110-120 days to dried ears. <text:s/>Leave on plant until husks are dry &amp; brown for most vivid color. Jewel-colored ears from 3-5” in length. All species will cross pollinate. <text:s/>Use ears as decoration or pop.</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2">
          <table:table-cell office:value-type="float" office:value="1275" calcext:value-type="float">
            <text:p>1275</text:p>
          </table:table-cell>
          <table:table-cell table:style-name="ce15" office:value-type="string" calcext:value-type="string">
            <text:p>FLOWER Globe Mallow (Sphaeralcea ambigua)</text:p>
          </table:table-cell>
          <table:table-cell table:style-name="ce15" office:value-type="string" calcext:value-type="string">
            <text:p>Globemallow Colors</text:p>
          </table:table-cell>
          <table:table-cell table:style-name="ce23" office:value-type="string" calcext:value-type="string">
            <text:p>Native Seed/SEARCH <text:s/>www.nativeseeds.org</text:p>
          </table:table-cell>
          <table:table-cell table:style-name="ce15" office:value-type="string" calcext:value-type="string">
            <text:p>Work soil with a hard rake until loose. Work seeds into the top 1/2” at anytime throughout the year. Germinates late spring or late summer although may germinate sporadically. Time watering to coincide with moist low pressure fronts. Scattering branches or rocks among planting helps seedlings become established.</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table-cell table:style-name="ce6" table:number-columns-repeated="16366"/>
        </table:table-row>
        <table:table-row table:style-name="ro2">
          <table:table-cell office:value-type="float" office:value="1274" calcext:value-type="float">
            <text:p>1274</text:p>
          </table:table-cell>
          <table:table-cell table:style-name="ce14" office:value-type="string" calcext:value-type="string">
            <text:p>FLOWER Foxglove (Digitalis purpurea)</text:p>
          </table:table-cell>
          <table:table-cell table:style-name="ce14" office:value-type="string" calcext:value-type="string">
            <text:p>Gloxiniiflora</text:p>
          </table:table-cell>
          <table:table-cell table:style-name="ce14" office:value-type="string" calcext:value-type="string">
            <text:p>Botanical Interest, Inc</text:p>
          </table:table-cell>
          <table:table-cell table:style-name="ce14" office:value-type="string" calcext:value-type="string">
            <text:p>Sow outside 1 to 2 weeks after last frost or as late as 2 months before first frost. Light aids germination, lightly press seeds into surface and do not cover. Space 18” apart. Attracts pollinators. Lasts well as a cut flower. Deer resistant. Grows 3’ to 5’ tall. Caution: poisonous if ingested!</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054" calcext:value-type="float">
            <text:p>1054</text:p>
          </table:table-cell>
          <table:table-cell table:style-name="ce14" office:value-type="string" calcext:value-type="string">
            <text:p>BEAN, COMMON (Phaseolus vulgaris)</text:p>
          </table:table-cell>
          <table:table-cell table:style-name="ce14" office:value-type="string" calcext:value-type="string">
            <text:p>Gold Rush, Bush Yellow Wax</text:p>
          </table:table-cell>
          <table:table-cell table:style-name="ce14" office:value-type="string" calcext:value-type="string">
            <text:p>Botanical Interest, Inc</text:p>
          </table:table-cell>
          <table:table-cell table:style-name="ce14" office:value-type="string" calcext:value-type="string">
            <text:p>Plant 1-2 weeks after frost and soil temp higher than 60 degrees. Direct sow 1” deep, 4-6” apart. Tender pods; heavy yielding; 5-6” pods; 50-55 days. Great for canning/freezing/eating raw. <text:s/>Will cross with other bean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number-columns-repeated="2" table:style-name="ce14" office:value-type="string" calcext:value-type="string">
            <text:p>6-12 days</text:p>
          </table:table-cell>
          <table:table-cell/>
          <table:table-cell table:style-name="ce6" table:number-columns-repeated="16366"/>
        </table:table-row>
        <table:table-row table:style-name="ro11">
          <table:table-cell office:value-type="float" office:value="1198" calcext:value-type="float">
            <text:p>1198</text:p>
          </table:table-cell>
          <table:table-cell table:style-name="ce15" office:value-type="string" calcext:value-type="string">
            <text:p>Flax (Linaceae linum)</text:p>
          </table:table-cell>
          <table:table-cell table:style-name="ce15" office:value-type="string" calcext:value-type="string">
            <text:p>GOLDEN</text:p>
          </table:table-cell>
          <table:table-cell table:style-name="ce15" office:value-type="string" calcext:value-type="string">
            <text:p>One Degree Organics</text:p>
          </table:table-cell>
          <table:table-cell table:style-name="ce15" office:value-type="string" calcext:value-type="string">
            <text:p>Plant 1/8” deep thickly in full sun. Grows best in poor, dry soil. Germinates in about a month.</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4">
          <table:table-cell office:value-type="float" office:value="1126" calcext:value-type="float">
            <text:p>1126</text:p>
          </table:table-cell>
          <table:table-cell table:style-name="ce15" office:value-type="string" calcext:value-type="string">
            <text:p>CABBAGE (Brassica oleracea)</text:p>
          </table:table-cell>
          <table:table-cell table:style-name="ce15" office:value-type="string" calcext:value-type="string">
            <text:p>Golden Acre</text:p>
          </table:table-cell>
          <table:table-cell table:style-name="ce15" office:value-type="string" calcext:value-type="string">
            <text:p>Patriot Seeds</text:p>
          </table:table-cell>
          <table:table-cell table:style-name="ce15" office:value-type="string" calcext:value-type="string">
            <text:p>Sow indoors or directly into soil. <text:s/>Plant 1/4” under soil surface, 24-30 inches between plants. Full sun. Seed saving biennial from seed stalk the second year. 65-70 days, 3 pounds Soil Temp Range: 40°-100° Optimum: 8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40°-100° Optimum: 80°</text:p>
          </table:table-cell>
          <table:table-cell table:style-name="ce15" office:value-type="string" calcext:value-type="string">
            <text:p>4-5 days</text:p>
          </table:table-cell>
          <table:table-cell/>
          <table:table-cell table:style-name="ce6" table:number-columns-repeated="16366"/>
        </table:table-row>
        <table:table-row table:style-name="ro2">
          <table:table-cell office:value-type="float" office:value="1171" calcext:value-type="float">
            <text:p>1171</text:p>
          </table:table-cell>
          <table:table-cell table:style-name="ce15" office:value-type="string" calcext:value-type="string">
            <text:p>CORN, SWEET (Zea mays)</text:p>
          </table:table-cell>
          <table:table-cell table:style-name="ce15" office:value-type="string" calcext:value-type="string">
            <text:p>Golden Bantam</text:p>
          </table:table-cell>
          <table:table-cell table:style-name="ce15" office:value-type="string" calcext:value-type="string">
            <text:p>Patriot Seeds</text:p>
          </table:table-cell>
          <table:table-cell table:style-name="ce15" office:value-type="string" calcext:value-type="string">
            <text:p>Plant in loose, well worked soil after soil warms above 65 degrees. <text:s/>Heavy feeder. <text:s/>Direct sow 1-1.5 inches deep, 5-10 inches apart in rows 3 feet apart. Thin to 6-8” apart. Keep weed free. <text:s/>Full sun; 88 days. <text:s/>The rule: The sweeter the corn the more water it needs and the warmer the soil temp must be.</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table:number-columns-repeated="2"/>
          <table:table-cell/>
          <table:table-cell table:style-name="ce6" table:number-columns-repeated="16366"/>
        </table:table-row>
        <table:table-row table:style-name="ro2">
          <table:table-cell office:value-type="float" office:value="1106" calcext:value-type="float">
            <text:p>1106</text:p>
          </table:table-cell>
          <table:table-cell table:style-name="ce14" office:value-type="string" calcext:value-type="string">
            <text:p>BEET (Beta vulgaris)</text:p>
          </table:table-cell>
          <table:table-cell table:style-name="ce14" office:value-type="string" calcext:value-type="string">
            <text:p>Golden Boy</text:p>
          </table:table-cell>
          <table:table-cell table:style-name="ce14" office:value-type="string" calcext:value-type="string">
            <text:p>Botanical Interest, Inc</text:p>
          </table:table-cell>
          <table:table-cell table:style-name="ce14" office:value-type="string" calcext:value-type="string">
            <text:p>Golden-orange meat, sweet raw or cooked; sow in ground 2-4 weeks before last frost 1/2 inch deep; 4-6 inches apart; thin to 1 plant every 4 inches; will cross with other beets or Swiss Chard; good for pickling; 55 days. Won’t “bleed” like red beets; greens are good to eat.</text:p>
          </table:table-cell>
          <table:table-cell table:style-name="ce14"/>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7 days</text:p>
          </table:table-cell>
          <table:table-cell/>
          <table:table-cell table:style-name="ce6" table:number-columns-repeated="16366"/>
        </table:table-row>
        <table:table-row table:style-name="ro4">
          <table:table-cell office:value-type="float" office:value="1723" calcext:value-type="float">
            <text:p>1723</text:p>
          </table:table-cell>
          <table:table-cell table:style-name="ce15" office:value-type="string" calcext:value-type="string">
            <text:p>TOMATO (Solanum lycopersiucm)</text:p>
          </table:table-cell>
          <table:table-cell table:style-name="ce15" office:value-type="string" calcext:value-type="string">
            <text:p>Golden Jubilee</text:p>
          </table:table-cell>
          <table:table-cell table:style-name="ce14" office:value-type="string" calcext:value-type="string">
            <text:p>Botanical Interest, Inc</text:p>
          </table:table-cell>
          <table:table-cell table:style-name="ce15" office:value-type="string" calcext:value-type="string">
            <text:p>Start indoors 4-6 weeks before transplant, 1/4” deep; plant outdoors 36” apart, full sun. Bright golden-orange tomato, mild delectable flavor, great for fresh eating; rich in lycopene. <text:s/>Small seed cavities with solid meaty slices. High yield.</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4">
          <table:table-cell office:value-type="float" office:value="1738" calcext:value-type="float">
            <text:p>1738</text:p>
          </table:table-cell>
          <table:table-cell table:style-name="ce14" office:value-type="string" calcext:value-type="string">
            <text:p>WATERMELON (Citrullus lanatus)</text:p>
          </table:table-cell>
          <table:table-cell table:style-name="ce14" office:value-type="string" calcext:value-type="string">
            <text:p>Golden Midget</text:p>
          </table:table-cell>
          <table:table-cell table:style-name="ce14" office:value-type="string" calcext:value-type="string">
            <text:p>Baker Creek Heirloom Seeds</text:p>
          </table:table-cell>
          <table:table-cell table:style-name="ce14" office:value-type="string" calcext:value-type="string">
            <text:p>A fun &amp; easy early novelty melon with yellow skin and pink flesh. <text:s/>Direct sow outside after danger of frost. Plant 1” deep in hills of 2 to 3 plants per hill at 3 feet apart. Full sun; 70 days; up to 3 pound fruit. Vines tend to be about 6’. Soil Temp Range: 60– 105 Optimum: 9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Lois Litvak, Sierra Vista, AZ</text:p>
          </table:table-cell>
          <table:table-cell table:style-name="ce28" office:value-type="string" calcext:value-type="string">
            <text:p>2014</text:p>
          </table:table-cell>
          <table:table-cell table:style-name="ce14" office:value-type="string" calcext:value-type="string">
            <text:p>60– 105 Optimum: 95°</text:p>
          </table:table-cell>
          <table:table-cell table:style-name="ce14" office:value-type="string" calcext:value-type="string">
            <text:p>3-4 days</text:p>
          </table:table-cell>
          <table:table-cell/>
          <table:table-cell table:style-name="ce6" table:number-columns-repeated="16366"/>
        </table:table-row>
        <table:table-row table:style-name="ro2">
          <table:table-cell office:value-type="float" office:value="1493" calcext:value-type="float">
            <text:p>1493</text:p>
          </table:table-cell>
          <table:table-cell table:style-name="ce14" office:value-type="string" calcext:value-type="string">
            <text:p>LETTUCE Mesclun (Lactuca sativa)</text:p>
          </table:table-cell>
          <table:table-cell table:style-name="ce14" office:value-type="string" calcext:value-type="string">
            <text:p>Gourmet Baby Greens</text:p>
          </table:table-cell>
          <table:table-cell table:style-name="ce14" office:value-type="string" calcext:value-type="string">
            <text:p>Botanical Interest, Inc</text:p>
          </table:table-cell>
          <table:table-cell table:style-name="ce14" office:value-type="string" calcext:value-type="string">
            <text:p>Plant seeds 1/8” below soil surface, broadcast over an area instead of a row. Sow in fall for winter harvest or 2-4 weeks before last frost in spring. Harvest anytime from baby greens to full size. Contains buttercrunch, black seeded Simpson, green salad bowl, Lola Rossa, red oak leaf and rouge d’Hiver.</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5-14 days</text:p>
          </table:table-cell>
          <table:table-cell/>
          <table:table-cell table:style-name="ce6" table:number-columns-repeated="16366"/>
        </table:table-row>
        <table:table-row table:style-name="ro2">
          <table:table-cell office:value-type="float" office:value="1107" calcext:value-type="float">
            <text:p>1107</text:p>
          </table:table-cell>
          <table:table-cell table:style-name="ce15" office:value-type="string" calcext:value-type="string">
            <text:p>BEET (Beta vulgaris)</text:p>
          </table:table-cell>
          <table:table-cell table:style-name="ce15" office:value-type="string" calcext:value-type="string">
            <text:p>Gourmet Blend</text:p>
          </table:table-cell>
          <table:table-cell table:style-name="ce14" office:value-type="string" calcext:value-type="string">
            <text:p>Botanical Interest, Inc</text:p>
          </table:table-cell>
          <table:table-cell table:style-name="ce15" office:value-type="string" calcext:value-type="string">
            <text:p>Direct sow outside early spring or fall. Plant 1/4”-1/2” deep, 3” apart, in rows 12” apart. Full Sun; 60 days. Fruit matures to 3” diameter. Blend includes Detroit Dark Red with deep red roots, Chiogga with interior rings of bright pink and white, and Golden with bright yellow flesh.</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6 days</text:p>
          </table:table-cell>
          <table:table-cell/>
          <table:table-cell table:style-name="ce6" table:number-columns-repeated="16366"/>
        </table:table-row>
        <table:table-row table:style-name="ro2">
          <table:table-cell office:value-type="float" office:value="1492" calcext:value-type="float">
            <text:p>1492</text:p>
          </table:table-cell>
          <table:table-cell table:style-name="ce14" office:value-type="string" calcext:value-type="string">
            <text:p>LETTUCE Leaf (Latuca sativa)</text:p>
          </table:table-cell>
          <table:table-cell table:style-name="ce14" office:value-type="string" calcext:value-type="string">
            <text:p>Grand Rapids</text:p>
          </table:table-cell>
          <table:table-cell table:style-name="ce14" office:value-type="string" calcext:value-type="string">
            <text:p>American Seed</text:p>
          </table:table-cell>
          <table:table-cell table:style-name="ce14" office:value-type="string" calcext:value-type="string">
            <text:p>Light green large leaves with frilled margins. Disease resistant. Germinate well in low temps but dormant above 75 degrees. Plant seeds 1/4 in deep, 1 in apart and thin to 6-8 in. Keep soil moderately moist, Harvest leaves from outer edge so plant continues to grow from center.</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701" calcext:value-type="float">
            <text:p>1701</text:p>
          </table:table-cell>
          <table:table-cell table:style-name="ce14" office:value-type="string" calcext:value-type="string">
            <text:p>TOMATILLO (Physalis philadelphica)</text:p>
          </table:table-cell>
          <table:table-cell table:style-name="ce14" office:value-type="string" calcext:value-type="string">
            <text:p>Grande Rio Verde</text:p>
          </table:table-cell>
          <table:table-cell table:style-name="ce14" office:value-type="string" calcext:value-type="string">
            <text:p>Botanical Interest, Inc</text:p>
          </table:table-cell>
          <table:table-cell table:style-name="ce14" office:value-type="string" calcext:value-type="string">
            <text:p>Start indoors 4-6 weeks before transplant, 1/4” below surface; plant outdoors 36” apart, full sun; 80 days; up to <text:s/>3 ounce green fruit. Makes a tangy salsa verde or enchilada sauce.</text:p>
          </table:table-cell>
          <table:table-cell table:style-name="ce14"/>
          <table:table-cell table:style-name="ce14" office:value-type="string" calcext:value-type="string">
            <text:p>18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6-7 days</text:p>
          </table:table-cell>
          <table:table-cell/>
          <table:table-cell table:style-name="ce6" table:number-columns-repeated="16366"/>
        </table:table-row>
        <table:table-row table:style-name="ro4">
          <table:table-cell office:value-type="float" office:value="1489" calcext:value-type="float">
            <text:p>1489</text:p>
          </table:table-cell>
          <table:table-cell table:style-name="ce14" office:value-type="string" calcext:value-type="string">
            <text:p>LETTUCE Crisphead (Latuca sativa)</text:p>
          </table:table-cell>
          <table:table-cell table:style-name="ce14" office:value-type="string" calcext:value-type="string">
            <text:p>Great Lakes 118</text:p>
          </table:table-cell>
          <table:table-cell table:style-name="ce14" office:value-type="string" calcext:value-type="string">
            <text:p>Botanical Interest, Inc</text:p>
          </table:table-cell>
          <table:table-cell table:style-name="ce14" office:value-type="string" calcext:value-type="string">
            <text:p>Also known as Iceberg. Heat tolerant and bolt resistant. Sow in fall and winter for cool season harvest. Light aids germination so press seeds gently into surface of soil. Plant 3 seeds every 8 inches and thin when plants are about 1/2”.</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so press seeds gently</text:p>
          </table:table-cell>
          <table:table-cell/>
          <table:table-cell table:style-name="ce6" table:number-columns-repeated="16366"/>
        </table:table-row>
        <table:table-row table:style-name="ro2">
          <table:table-cell office:value-type="float" office:value="1501" calcext:value-type="float">
            <text:p>1501</text:p>
          </table:table-cell>
          <table:table-cell table:style-name="ce14" office:value-type="string" calcext:value-type="string">
            <text:p>LETTUCE Salad Bowl (Lactuca sativa)</text:p>
          </table:table-cell>
          <table:table-cell table:style-name="ce14" office:value-type="string" calcext:value-type="string">
            <text:p>Green</text:p>
          </table:table-cell>
          <table:table-cell table:style-name="ce14" office:value-type="string" calcext:value-type="string">
            <text:p>Botanical Interest, Inc</text:p>
          </table:table-cell>
          <table:table-cell table:style-name="ce14" office:value-type="string" calcext:value-type="string">
            <text:p>Leaf style, sow outside in early spring; may be fall planted. <text:s/>Plant seeds 1/8” below soil surface. Rows should be 12-18” apart. Harvest by removing outside leaves; plant will continue to grow. <text:s/>Tender, frilly leaves, light green. Soil Temp Range: 35°-85° Optimum: 75°</text:p>
          </table:table-cell>
          <table:table-cell table:style-name="ce14"/>
          <table:table-cell table:style-name="ce14" office:value-type="string" calcext:value-type="string">
            <text:p>5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35°-85° Optimum: 75°</text:p>
          </table:table-cell>
          <table:table-cell table:style-name="ce14" office:value-type="string" calcext:value-type="string">
            <text:p>3-4 days</text:p>
          </table:table-cell>
          <table:table-cell/>
          <table:table-cell table:style-name="ce6" table:number-columns-repeated="16366"/>
        </table:table-row>
        <table:table-row table:style-name="ro3">
          <table:table-cell office:value-type="float" office:value="1543" calcext:value-type="float">
            <text:p>1543</text:p>
          </table:table-cell>
          <table:table-cell table:style-name="ce14" office:value-type="string" calcext:value-type="string">
            <text:p>ONION (Allium fistulosum)</text:p>
          </table:table-cell>
          <table:table-cell table:style-name="ce14" office:value-type="string" calcext:value-type="string">
            <text:p>Green</text:p>
          </table:table-cell>
          <table:table-cell table:style-name="ce14" office:value-type="string" calcext:value-type="string">
            <text:p>Donated by Master Gardener </text:p>
          </table:table-cell>
          <table:table-cell table:style-name="ce14" office:value-type="string" calcext:value-type="string">
            <text:p>Start indoors, 1/2” deep, 4-6 weeks before transplant; plant outdoors 6” apart, full sun; uncover most of bulb to form. 110 days; biennial seed stalk.</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4-5 days</text:p>
          </table:table-cell>
          <table:table-cell/>
          <table:table-cell table:style-name="ce6" table:number-columns-repeated="16366"/>
        </table:table-row>
        <table:table-row table:style-name="ro4">
          <table:table-cell office:value-type="float" office:value="1507" calcext:value-type="float">
            <text:p>1507</text:p>
          </table:table-cell>
          <table:table-cell table:style-name="ce15" office:value-type="string" calcext:value-type="string">
            <text:p>LETTUCE Salanova (Latuca sativa)</text:p>
          </table:table-cell>
          <table:table-cell table:style-name="ce15" office:value-type="string" calcext:value-type="string">
            <text:p>Green Butter</text:p>
          </table:table-cell>
          <table:table-cell table:style-name="ce15"/>
          <table:table-cell table:style-name="ce15" office:value-type="string" calcext:value-type="string">
            <text:p>Dense rosette heads. Delicate buttery taste.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2">
          <table:table-cell office:value-type="float" office:value="1498" calcext:value-type="float">
            <text:p>1498</text:p>
          </table:table-cell>
          <table:table-cell table:style-name="ce15" office:value-type="string" calcext:value-type="string">
            <text:p>LETTUCE Romaine (Latuca sativa)</text:p>
          </table:table-cell>
          <table:table-cell table:style-name="ce15" office:value-type="string" calcext:value-type="string">
            <text:p>Green Forest </text:p>
          </table:table-cell>
          <table:table-cell table:style-name="ce15" office:value-type="string" calcext:value-type="string">
            <text:p>Johnny’s Seed</text:p>
          </table:table-cell>
          <table:table-cell table:style-name="ce15" office:value-type="string" calcext:value-type="string">
            <text:p>Plant indoors in flats, barely covering with vermiculite. Keep the soil temp below 75 degrees. Stagger planting 10 days; thin to 8” for full heads. Harvest leaves from outer edge so plant continues to grow from center. Early, tall, bright green romaine; origin Israel (heat tolerant) but <text:s text:c="2"/>does well in cool temps. Water at base to avoid rot.</text:p>
          </table:table-cell>
          <table:table-cell table:style-name="ce15"/>
          <table:table-cell table:style-name="ce15" office:value-type="string" calcext:value-type="string">
            <text:p>25-3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6">
          <table:table-cell office:value-type="float" office:value="1017" calcext:value-type="float">
            <text:p>1017</text:p>
          </table:table-cell>
          <table:table-cell table:style-name="ce15" office:value-type="string" calcext:value-type="string">
            <text:p>ARTICHOKE (Cynara scolymus)</text:p>
          </table:table-cell>
          <table:table-cell table:style-name="ce15" office:value-type="string" calcext:value-type="string">
            <text:p>Green Globe</text:p>
          </table:table-cell>
          <table:table-cell table:style-name="ce15" office:value-type="string" calcext:value-type="string">
            <text:p>BJ Searcy, CCMGA Master Gardener, Whetstone</text:p>
          </table:table-cell>
          <table:table-cell table:style-name="ce15" office:value-type="string" calcext:value-type="string">
            <text:p>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2">
          <table:table-cell office:value-type="float" office:value="1502" calcext:value-type="float">
            <text:p>1502</text:p>
          </table:table-cell>
          <table:table-cell table:style-name="ce15" office:value-type="string" calcext:value-type="string">
            <text:p>LETTUCE Salanova (Latuca sativa)</text:p>
          </table:table-cell>
          <table:table-cell table:style-name="ce14" office:value-type="string" calcext:value-type="string">
            <text:p>Green Incised</text:p>
          </table:table-cell>
          <table:table-cell table:style-name="ce15" office:value-type="string" calcext:value-type="string">
            <text:p>Johnny’s Seed</text:p>
          </table:table-cell>
          <table:table-cell table:style-name="ce14" office:value-type="string" calcext:value-type="string">
            <text:p>Deeply incised, double green leaves with heavily frilled margins. Mildew resistant.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4">
          <table:table-cell office:value-type="float" office:value="1503" calcext:value-type="float">
            <text:p>1503</text:p>
          </table:table-cell>
          <table:table-cell table:style-name="ce15" office:value-type="string" calcext:value-type="string">
            <text:p>LETTUCE Salanova (Latuca sativa)</text:p>
          </table:table-cell>
          <table:table-cell table:style-name="ce15" office:value-type="string" calcext:value-type="string">
            <text:p>Green Oakleaf</text:p>
          </table:table-cell>
          <table:table-cell table:style-name="ce15" office:value-type="string" calcext:value-type="string">
            <text:p>Johnny’s Seed</text:p>
          </table:table-cell>
          <table:table-cell table:style-name="ce15" office:value-type="string" calcext:value-type="string">
            <text:p>Fine lobed saladbowl type oakleaf. Mildew resistant.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3">
          <table:table-cell office:value-type="float" office:value="1403" calcext:value-type="float">
            <text:p>1403</text:p>
          </table:table-cell>
          <table:table-cell table:style-name="ce15" office:value-type="string" calcext:value-type="string">
            <text:p>GREENS Purslane (Portulacaceae verdolga)</text:p>
          </table:table-cell>
          <table:table-cell table:style-name="ce15" office:value-type="string" calcext:value-type="string">
            <text:p>Green Purslane</text:p>
          </table:table-cell>
          <table:table-cell table:style-name="ce15"/>
          <table:table-cell table:style-name="ce15" office:value-type="string" calcext:value-type="string">
            <text:p>Annual succulent. Direct sow 1/4” deep in warm, moist soil; thin to 4-6” apart. When picking, leave 2” of stem so plant will regrow. <text:s/>Add to salads. High source of vitamins, calcium &amp; iron.</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table-cell table:style-name="ce15" office:value-type="string" calcext:value-type="string">
            <text:p>Warm moist soil</text:p>
          </table:table-cell>
          <table:table-cell/>
          <table:table-cell table:style-name="ce6" table:number-columns-repeated="16366"/>
        </table:table-row>
        <table:table-row table:style-name="ro4">
          <table:table-cell office:value-type="float" office:value="1508" calcext:value-type="float">
            <text:p>1508</text:p>
          </table:table-cell>
          <table:table-cell table:style-name="ce15" office:value-type="string" calcext:value-type="string">
            <text:p>LETTUCE Salanova (Latuca sativa)</text:p>
          </table:table-cell>
          <table:table-cell table:style-name="ce14" office:value-type="string" calcext:value-type="string">
            <text:p>GREEN SWEET CRISP</text:p>
          </table:table-cell>
          <table:table-cell table:style-name="ce14"/>
          <table:table-cell table:style-name="ce14" office:value-type="string" calcext:value-type="string">
            <text:p>Sweet almost romaine flavor. Medium dark green with defined 3-D shape.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2">
          <table:table-cell office:value-type="float" office:value="1708" calcext:value-type="float">
            <text:p>1708</text:p>
          </table:table-cell>
          <table:table-cell table:style-name="ce14" office:value-type="string" calcext:value-type="string">
            <text:p>TOMATO (Lycopersicon esculentum)</text:p>
          </table:table-cell>
          <table:table-cell table:style-name="ce14" office:value-type="string" calcext:value-type="string">
            <text:p>Green Zebra</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90 days from transplant. Best eaten fresh. Slight amber blush when ripe. Crack resistant. Drought and heat toleran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4">
          <table:table-cell office:value-type="float" office:value="1691" calcext:value-type="float">
            <text:p>1691</text:p>
          </table:table-cell>
          <table:table-cell table:style-name="ce15" office:value-type="string" calcext:value-type="string">
            <text:p>SQUASH Zucchini (Cucubirta pepo)</text:p>
          </table:table-cell>
          <table:table-cell table:style-name="ce14" office:value-type="string" calcext:value-type="string">
            <text:p>Grey</text:p>
          </table:table-cell>
          <table:table-cell table:style-name="ce14"/>
          <table:table-cell table:style-name="ce14" office:value-type="string" calcext:value-type="string">
            <text:p>Plant outdoors 2-3 seeds 1”deep, 3-4 feet apart; thin to 1 healthy plant. <text:s/>Prolific, long harvest. Pick regularly to encourage fruit development; best flavor when skin is thin. 55-60 days Soil Temp Range: 60°-100° Optimum: 9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60°-100° Optimum: 95°</text:p>
          </table:table-cell>
          <table:table-cell table:style-name="ce14" office:value-type="string" calcext:value-type="string">
            <text:p>3-4 days</text:p>
          </table:table-cell>
          <table:table-cell/>
          <table:table-cell table:style-name="ce6" table:number-columns-repeated="16366"/>
        </table:table-row>
        <table:table-row table:style-name="ro3">
          <table:table-cell office:value-type="float" office:value="1012" calcext:value-type="float">
            <text:p>1012</text:p>
          </table:table-cell>
          <table:table-cell table:style-name="ce14" office:value-type="string" calcext:value-type="string">
            <text:p>AMARANTH (Amaranthus hypochondriacus)</text:p>
          </table:table-cell>
          <table:table-cell table:style-name="ce14" office:value-type="string" calcext:value-type="string">
            <text:p>Guarijio Grain</text:p>
          </table:table-cell>
          <table:table-cell table:style-name="ce14"/>
          <table:table-cell table:style-name="ce14" office:value-type="string" calcext:value-type="string">
            <text:p>White seeds are edible and rich in lysine, iron and calcium. Plant in warm soil or with summer rains 1/4” deep in basins or rows. Thin to 10-15” apart. Likes full sun. Crosses with wild A. powelli.</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2">
          <table:table-cell office:value-type="float" office:value="1520" calcext:value-type="float">
            <text:p>1520</text:p>
          </table:table-cell>
          <table:table-cell table:style-name="ce14" office:value-type="string" calcext:value-type="string">
            <text:p>MELON Ha Ogen (Cucumis melo)</text:p>
          </table:table-cell>
          <table:table-cell table:style-name="ce14" office:value-type="string" calcext:value-type="string">
            <text:p>Ha Ogen </text:p>
          </table:table-cell>
          <table:table-cell table:style-name="ce14" office:value-type="string" calcext:value-type="string">
            <text:p>Baker Creek Heirloom Seeds</text:p>
          </table:table-cell>
          <table:table-cell table:style-name="ce14" office:value-type="string" calcext:value-type="string">
            <text:p>(aka Israel Melon meaning “Anchor”) Early, flavorful green flesh melon, 3-4 pound fruit, very fragrant. <text:s/>Direct Sow 3-5 seeds in basin 1” deep, 12” apart with basins 5 feet apart, sprawling vine. <text:s/>Or plant in rows, 1” deep, 12” apart, with rows 5 feet apart. <text:s/>Full sun, 75-80 days. Soil Temp Range: 60°-100° Optimum: 9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100° Optimum: 90°</text:p>
          </table:table-cell>
          <table:table-cell table:style-name="ce14" office:value-type="string" calcext:value-type="string">
            <text:p>3-4 days</text:p>
          </table:table-cell>
          <table:table-cell/>
          <table:table-cell table:style-name="ce6" table:number-columns-repeated="16366"/>
        </table:table-row>
        <table:table-row table:style-name="ro2">
          <table:table-cell office:value-type="float" office:value="1599" calcext:value-type="float">
            <text:p>1599</text:p>
          </table:table-cell>
          <table:table-cell table:style-name="ce14" office:value-type="string" calcext:value-type="string">
            <text:p>PEPPER SWEET (Capsicum chinense)</text:p>
          </table:table-cell>
          <table:table-cell table:style-name="ce14" office:value-type="string" calcext:value-type="string">
            <text:p>Habanad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8”-24” apart in full sun. Size to 2”-3” that taste like habanero flavor without the heat. <text:s/>Typically harvested yellow; tasty when red. <text:s/>Save seeds from fully ripe, slightly shriveled fruit. Can cross pollinate.</text:p>
          </table:table-cell>
          <table:table-cell table:style-name="ce14"/>
          <table:table-cell table:style-name="ce14" office:value-type="string" calcext:value-type="string">
            <text:p>3+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table-cell table:style-name="ce6" table:number-columns-repeated="16366"/>
        </table:table-row>
        <table:table-row table:style-name="ro2">
          <table:table-cell office:value-type="float" office:value="1595" calcext:value-type="float">
            <text:p>1595</text:p>
          </table:table-cell>
          <table:table-cell table:style-name="ce15" office:value-type="string" calcext:value-type="string">
            <text:p>PEPPER CHILE (Capsicum chinense)</text:p>
          </table:table-cell>
          <table:table-cell table:style-name="ce15" office:value-type="string" calcext:value-type="string">
            <text:p>Habanero</text:p>
          </table:table-cell>
          <table:table-cell table:style-name="ce15" office:value-type="string" calcext:value-type="string">
            <text:p>Ferry Morse</text:p>
          </table:table-cell>
          <table:table-cell table:style-name="ce15" office:value-type="string" calcext:value-type="string">
            <text:p>Start inside 1/4” deep in loose soil 8- 10 weeks before last frost. <text:s/>Slow to germinate; need warmth; plant 18”-24” apart in full sun. <text:s/>Ripe when yellow to orange. Save seeds from fully ripe, slightly shriveled fruit. Can cross pollinate. <text:s/>(Very Hot 100,000-350,000 SHU)</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0-25 days</text:p>
          </table:table-cell>
          <table:table-cell/>
          <table:table-cell table:style-name="ce6" table:number-columns-repeated="16366"/>
        </table:table-row>
        <table:table-row table:style-name="ro11">
          <table:table-cell office:value-type="float" office:value="1515" calcext:value-type="float">
            <text:p>1515</text:p>
          </table:table-cell>
          <table:table-cell table:style-name="ce15" office:value-type="string" calcext:value-type="string">
            <text:p>MELON Cantelope (Cucumis melo)</text:p>
          </table:table-cell>
          <table:table-cell table:style-name="ce15" office:value-type="string" calcext:value-type="string">
            <text:p>Hales Best Jumbo</text:p>
          </table:table-cell>
          <table:table-cell table:style-name="ce15" office:value-type="string" calcext:value-type="string">
            <text:p>American Seed</text:p>
          </table:table-cell>
          <table:table-cell table:style-name="ce15" office:value-type="string" calcext:value-type="string">
            <text:p>Plant 3-5 seeds in basin 1” deep 5 feet apart, sprawling vine. Full sun, 90 days, up to 5 pounds.</text:p>
          </table:table-cell>
          <table:table-cell table:style-name="ce15"/>
          <table:table-cell table:style-name="ce15" office:value-type="string" calcext:value-type="string">
            <text:p>6+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2">
          <table:table-cell office:value-type="float" office:value="1045" calcext:value-type="float">
            <text:p>1045</text:p>
          </table:table-cell>
          <table:table-cell table:style-name="ce15" office:value-type="string" calcext:value-type="string">
            <text:p>BEAN, COMMON (Phaseolus vulgaris)</text:p>
          </table:table-cell>
          <table:table-cell table:style-name="ce15" office:value-type="string" calcext:value-type="string">
            <text:p>Harvester—Snap/Green Bean (Bush type)</text:p>
          </table:table-cell>
          <table:table-cell table:style-name="ce14" office:value-type="string" calcext:value-type="string">
            <text:p>American Seed</text:p>
          </table:table-cell>
          <table:table-cell table:style-name="ce15" office:value-type="string" calcext:value-type="string">
            <text:p>Direct sow outdoors after last frost. <text:s/>Plant 1.5” deep, 4” apart; bush type. Straight, smooth pods, compact bush; disease resistant. <text:s/>Full sun; 55 days. <text:s/>To freeze, blanch 3 minutes, ice bath to cool, drain, freeze. Will cross-pollinate with other beans.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95° Optimum: 80°</text:p>
          </table:table-cell>
          <table:table-cell table:style-name="ce15" office:value-type="string" calcext:value-type="string">
            <text:p>6-7 days</text:p>
          </table:table-cell>
          <table:table-cell/>
          <table:table-cell table:style-name="ce6" table:number-columns-repeated="16366"/>
        </table:table-row>
        <table:table-row table:style-name="ro2">
          <table:table-cell office:value-type="float" office:value="1562" calcext:value-type="float">
            <text:p>1562</text:p>
          </table:table-cell>
          <table:table-cell table:style-name="ce15" office:value-type="string" calcext:value-type="string">
            <text:p>Pepper CHILE (Capsicum annuum)</text:p>
          </table:table-cell>
          <table:table-cell table:style-name="ce14" office:value-type="string" calcext:value-type="string">
            <text:p>Havasu Hot (Medium heat, 3,000 to 5,000 SHU)</text:p>
          </table:table-cell>
          <table:table-cell table:style-name="ce24" office:value-type="string" calcext:value-type="string">
            <text:p>Bonnie Plants</text:p>
          </table:table-cell>
          <table:table-cell table:style-name="ce14" office:value-type="string" calcext:value-type="string">
            <text:p>Start inside 1/4” deep in loose soil 8-10 weeks before last frost. <text:s/>Slow to germinate; need warmth; plant 12- 16” apart in full sun. Size to 3.5”; good for stuffing, pickling, frying. <text:s/>Typically harvested yellow; tasty when red. <text:s/>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2">
          <table:table-cell office:value-type="float" office:value="1497" calcext:value-type="float">
            <text:p>1497</text:p>
          </table:table-cell>
          <table:table-cell table:style-name="ce14" office:value-type="string" calcext:value-type="string">
            <text:p>LETTUCE Romaine (Lactuca sativa)</text:p>
          </table:table-cell>
          <table:table-cell table:style-name="ce14" office:value-type="string" calcext:value-type="string">
            <text:p>Heirloom Speckled “Freckles”</text:p>
          </table:table-cell>
          <table:table-cell table:style-name="ce14" office:value-type="string" calcext:value-type="string">
            <text:p>Mary Lou Spurgeon</text:p>
          </table:table-cell>
          <table:table-cell table:style-name="ce14" office:value-type="string" calcext:value-type="string">
            <text:p>Romaine style with brown to redish “freckles”, sow outside in early spring; may be fall planted. <text:s/>Plant seeds 1/8” below soil surface. Rows should be 12-18” apart. Harvest by removing outside leaves; plant will continue to grow. <text:s/>25-55 days, all-around favorite. Soil Temp Range: 35°-85° Optimum: 75°</text:p>
          </table:table-cell>
          <table:table-cell table:style-name="ce14"/>
          <table:table-cell table:style-name="ce14" office:value-type="string" calcext:value-type="string">
            <text:p>20-25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Mary Lou Spurgeon </text:p>
          </table:table-cell>
          <table:table-cell table:style-name="ce28" office:value-type="string" calcext:value-type="string">
            <text:p>2019</text:p>
          </table:table-cell>
          <table:table-cell table:style-name="ce14" office:value-type="string" calcext:value-type="string">
            <text:p>35°-85° Optimum: 75°</text:p>
          </table:table-cell>
          <table:table-cell table:style-name="ce14" office:value-type="string" calcext:value-type="string">
            <text:p>3-4 days</text:p>
          </table:table-cell>
          <table:table-cell/>
          <table:table-cell table:style-name="ce6" table:number-columns-repeated="16366"/>
        </table:table-row>
        <table:table-row table:style-name="ro4">
          <table:table-cell office:value-type="float" office:value="1181" calcext:value-type="float">
            <text:p>1181</text:p>
          </table:table-cell>
          <table:table-cell table:style-name="ce14" office:value-type="string" calcext:value-type="string">
            <text:p>CUCUMBER (Cucumis sativus)</text:p>
          </table:table-cell>
          <table:table-cell table:style-name="ce14" office:value-type="string" calcext:value-type="string">
            <text:p>Hokus (Gherkin)</text:p>
          </table:table-cell>
          <table:table-cell table:style-name="ce14" office:value-type="string" calcext:value-type="string">
            <text:p>Botanical Interest, Inc</text:p>
          </table:table-cell>
          <table:table-cell table:style-name="ce14" office:value-type="string" calcext:value-type="string">
            <text:p>Direct sow outside 1-2 weeks after danger of frost. <text:s/>Plant 1/2” deep with 2-3 seeds per hill if sprawling, 12” apart if trellising. <text:s/>Full sun; 55-60 days. Dark green 1 1/2” to 4” fruit. <text:s/>A favorite for making sweet pickles. Soil Temp Range: 70– 90°</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70– 90°</text:p>
          </table:table-cell>
          <table:table-cell table:style-name="ce14" office:value-type="string" calcext:value-type="string">
            <text:p>5-6 days</text:p>
          </table:table-cell>
          <table:table-cell/>
          <table:table-cell table:style-name="ce6" table:number-columns-repeated="16366"/>
        </table:table-row>
        <table:table-row table:style-name="ro2">
          <table:table-cell office:value-type="float" office:value="1176" calcext:value-type="float">
            <text:p>1176</text:p>
          </table:table-cell>
          <table:table-cell table:style-name="ce14" office:value-type="string" calcext:value-type="string">
            <text:p>COWPEA (Vigna unguiculata)</text:p>
          </table:table-cell>
          <table:table-cell table:style-name="ce14" office:value-type="string" calcext:value-type="string">
            <text:p>Holstein Black-eyed Peas</text:p>
          </table:table-cell>
          <table:table-cell table:style-name="ce14"/>
          <table:table-cell table:style-name="ce14" office:value-type="string" calcext:value-type="string">
            <text:p>Soak seeds for 1-2 hours before planting (speeds germination); plant 1” deep, full sun, 6” apart (seeds will rot if too cold or wet). <text:s/>Trellis for runners up to 5 feet; 7-8 inch pods. Beans have the mottled look of Holstein cows. Great shelled or dry. Soil Temp Range: 65°-85° Optimum: 75°</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65°-85° Optimum: 75°</text:p>
          </table:table-cell>
          <table:table-cell table:style-name="ce14" office:value-type="string" calcext:value-type="string">
            <text:p>6-7 days</text:p>
          </table:table-cell>
          <table:table-cell/>
          <table:table-cell table:style-name="ce6" table:number-columns-repeated="16366"/>
        </table:table-row>
        <table:table-row table:style-name="ro4">
          <table:table-cell office:value-type="float" office:value="1675" calcext:value-type="float">
            <text:p>1675</text:p>
          </table:table-cell>
          <table:table-cell table:style-name="ce15" office:value-type="string" calcext:value-type="string">
            <text:p>SQUASH (Cucurbita pepo)</text:p>
          </table:table-cell>
          <table:table-cell table:style-name="ce15" office:value-type="string" calcext:value-type="string">
            <text:p>Honey Boat</text:p>
          </table:table-cell>
          <table:table-cell table:style-name="ce14" office:value-type="string" calcext:value-type="string">
            <text:p>Botanical Interest, Inc</text:p>
          </table:table-cell>
          <table:table-cell table:style-name="ce15" office:value-type="string" calcext:value-type="string">
            <text:p>Winter squash with sweet flavor and full of vitamins. Direct sow outside after last frost. Plant 1” deep in hills of 2-3 plants per hill, 4-6 feet apart. Full sun; 90 days. Soil Temp Range: 60– 100 Optimum: 9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0– 100 Optimum: 95°</text:p>
          </table:table-cell>
          <table:table-cell table:style-name="ce15" office:value-type="string" calcext:value-type="string">
            <text:p>5-10 days</text:p>
          </table:table-cell>
          <table:table-cell/>
          <table:table-cell table:style-name="ce6" table:number-columns-repeated="16366"/>
        </table:table-row>
        <table:table-row table:style-name="ro3">
          <table:table-cell office:value-type="float" office:value="1516" calcext:value-type="float">
            <text:p>1516</text:p>
          </table:table-cell>
          <table:table-cell table:style-name="ce15" office:value-type="string" calcext:value-type="string">
            <text:p>MELON Cantelope (Cucumis melo)</text:p>
          </table:table-cell>
          <table:table-cell table:style-name="ce14" office:value-type="string" calcext:value-type="string">
            <text:p>Honey Rock</text:p>
          </table:table-cell>
          <table:table-cell table:style-name="ce14" office:value-type="string" calcext:value-type="string">
            <text:p>Avalon Gardens</text:p>
          </table:table-cell>
          <table:table-cell table:style-name="ce14" office:value-type="string" calcext:value-type="string">
            <text:p>Direct Sow 3-5 seeds in basin 1” deep 3 feet apart, sprawling vine. Full sun, 75-90 days, up to 7 pounds. Soil Temp Range: 60°-100° Optimum: 9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Tumacacori, AZ</text:p>
          </table:table-cell>
          <table:table-cell table:style-name="ce14"/>
          <table:table-cell table:style-name="ce14" office:value-type="string" calcext:value-type="string">
            <text:p>Avalon Gardens</text:p>
          </table:table-cell>
          <table:table-cell table:style-name="ce28" office:value-type="string" calcext:value-type="string">
            <text:p>2016</text:p>
          </table:table-cell>
          <table:table-cell table:style-name="ce14" office:value-type="string" calcext:value-type="string">
            <text:p>60°-100° Optimum: 90°</text:p>
          </table:table-cell>
          <table:table-cell table:style-name="ce14" office:value-type="string" calcext:value-type="string">
            <text:p>3-4 days</text:p>
          </table:table-cell>
          <table:table-cell/>
          <table:table-cell table:style-name="ce6" table:number-columns-repeated="16366"/>
        </table:table-row>
        <table:table-row table:style-name="ro4">
          <table:table-cell office:value-type="float" office:value="1671" calcext:value-type="float">
            <text:p>1671</text:p>
          </table:table-cell>
          <table:table-cell table:style-name="ce14" office:value-type="string" calcext:value-type="string">
            <text:p>SQUASH (Cucurbirta moschata)</text:p>
          </table:table-cell>
          <table:table-cell table:style-name="ce14" office:value-type="string" calcext:value-type="string">
            <text:p>Honeynut</text:p>
          </table:table-cell>
          <table:table-cell table:style-name="ce14" office:value-type="string" calcext:value-type="string">
            <text:p>Botanical Interest, Inc</text:p>
          </table:table-cell>
          <table:table-cell table:style-name="ce14" office:value-type="string" calcext:value-type="string">
            <text:p>Direct sow outside after last frost. Plant 1” deep in hills of 2-3 plants per hill, 6 feet apart. Full sun; 95-100 days; fruit 5-8” diameter, up to 5 pounds. One of the finest winter squashes; sweet golden-yellow meat; thin skinned. Soil Temp Range: 60– 100 Optimum: 95°</text:p>
          </table:table-cell>
          <table:table-cell table:style-name="ce14"/>
          <table:table-cell table:style-name="ce14" office:value-type="string" calcext:value-type="string">
            <text:p>2+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 100 Optimum: 95°</text:p>
          </table:table-cell>
          <table:table-cell table:style-name="ce14" office:value-type="string" calcext:value-type="string">
            <text:p>5-10 days</text:p>
          </table:table-cell>
          <table:table-cell/>
          <table:table-cell table:style-name="ce6" table:number-columns-repeated="16366"/>
        </table:table-row>
        <table:table-row table:style-name="ro2">
          <table:table-cell office:value-type="float" office:value="1227" calcext:value-type="float">
            <text:p>1227</text:p>
          </table:table-cell>
          <table:table-cell table:style-name="ce14" office:value-type="string" calcext:value-type="string">
            <text:p>FLOWER (Helianthus annua)</text:p>
          </table:table-cell>
          <table:table-cell table:style-name="ce15" office:value-type="string" calcext:value-type="string">
            <text:p>Hope Black Dye</text:p>
          </table:table-cell>
          <table:table-cell table:style-name="ce15" office:value-type="string" calcext:value-type="string">
            <text:p>Native Seed/SEARCH <text:s/>www.nativeseeds.org</text:p>
          </table:table-cell>
          <table:table-cell table:style-name="ce15" office:value-type="string" calcext:value-type="string">
            <text:p>Called “tceqa” by the Hopi, the blue/black hull traditionally used for wool and basket dye as well as eye medicine. <text:s/>Direct sow 1/2 inch deep 24 inches apart. Do not overwater. <text:s/>Please grow these out specifically for some seed saving (do not grow any other sunflower at the same time.)</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table-cell table:style-name="ce6" table:number-columns-repeated="16366"/>
        </table:table-row>
        <table:table-row table:style-name="ro3">
          <table:table-cell office:value-type="float" office:value="1067" calcext:value-type="float">
            <text:p>1067</text:p>
          </table:table-cell>
          <table:table-cell table:style-name="ce14" office:value-type="string" calcext:value-type="string">
            <text:p>BEAN, COMMON (Phaseolus vulgaris)</text:p>
          </table:table-cell>
          <table:table-cell table:style-name="ce14" office:value-type="string" calcext:value-type="string">
            <text:p>Hopi Black</text:p>
          </table:table-cell>
          <table:table-cell table:style-name="ce14" office:value-type="string" calcext:value-type="string">
            <text:p>Native Seed/SEARCH <text:s/>www.nativeseeds.org</text:p>
          </table:table-cell>
          <table:table-cell table:style-name="ce14" office:value-type="string" calcext:value-type="string">
            <text:p>Pole bean; eaten young as green beans or dried and shelled; plant with summer rains 1” deep 6” apart. Separate varieties by 10 ft. <text:s/>Small round bean, dark lilac flowers. Can cross with other bean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Sierra Vista, AZ</text:p>
          </table:table-cell>
          <table:table-cell table:style-name="ce14"/>
          <table:table-cell table:style-name="ce14" office:value-type="string" calcext:value-type="string">
            <text:p>Linda Lawson, CC Master Gardener</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2">
          <table:table-cell office:value-type="float" office:value="1162" calcext:value-type="float">
            <text:p>1162</text:p>
          </table:table-cell>
          <table:table-cell table:style-name="ce15" office:value-type="string" calcext:value-type="string">
            <text:p>CORN, FLOUR (Zea mays)</text:p>
          </table:table-cell>
          <table:table-cell table:style-name="ce15" office:value-type="string" calcext:value-type="string">
            <text:p>Hopi Blue (Sakwapu)</text:p>
          </table:table-cell>
          <table:table-cell table:style-name="ce15"/>
          <table:table-cell table:style-name="ce15" office:value-type="string" calcext:value-type="string">
            <text:p>Blue kernels ground to make ceremonial piki bread, cornmeal and hominy. <text:s/>Plants height is less than 5ft with tassels - early maturing <text:s/>62 days to pollination; 106 days to dried ears. <text:s/>Plant in spring 1” deep in rows or basin. <text:s/>Needs rich soil and moisture. All species will cross pollinate.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1</text:p>
          </table:table-cell>
          <table:table-cell table:style-name="ce15" table:number-columns-repeated="2"/>
          <table:table-cell/>
          <table:table-cell table:style-name="ce6" table:number-columns-repeated="16366"/>
        </table:table-row>
        <table:table-row table:style-name="ro2">
          <table:table-cell office:value-type="float" office:value="1161" calcext:value-type="float">
            <text:p>1161</text:p>
          </table:table-cell>
          <table:table-cell table:style-name="ce14" office:value-type="string" calcext:value-type="string">
            <text:p>CORN, FLOUR (Zea mays)</text:p>
          </table:table-cell>
          <table:table-cell table:style-name="ce14" office:value-type="string" calcext:value-type="string">
            <text:p>Hopi Greasy Head (Wiekte)</text:p>
          </table:table-cell>
          <table:table-cell table:style-name="ce14" office:value-type="string" calcext:value-type="string">
            <text:p>Native Seed/SEARCH <text:s/>www.nativeseeds.org</text:p>
          </table:table-cell>
          <table:table-cell table:style-name="ce14" office:value-type="string" calcext:value-type="string">
            <text:p>Plum-colored kernels on 10-12” ears <text:s/>Plants <text:s/>are short (3ft) - early maturing <text:s/>56 days to pollination; 103 days to dried ears. <text:s/>Kernels have an oily, or “greasy” appearance.Plant in spring 1” deep in rows or basis. <text:s/>Hopi use for Home Dance Ceremony in July. All species will cross pollinate. <text:s/>Rare seed.</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 </text:p>
          </table:table-cell>
          <table:table-cell table:style-name="ce14"/>
          <table:table-cell table:style-name="ce14" office:value-type="string" calcext:value-type="string">
            <text:p>Andy Ward</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3">
          <table:table-cell office:value-type="float" office:value="1068" calcext:value-type="float">
            <text:p>1068</text:p>
          </table:table-cell>
          <table:table-cell table:style-name="ce14" office:value-type="string" calcext:value-type="string">
            <text:p>BEAN, COMMON (Phaseolus vulgaris)</text:p>
          </table:table-cell>
          <table:table-cell table:style-name="ce15" office:value-type="string" calcext:value-type="string">
            <text:p>Hopi Red</text:p>
          </table:table-cell>
          <table:table-cell table:style-name="ce15" office:value-type="string" calcext:value-type="string">
            <text:p>Native Seed/SEARCH <text:s/>www.nativeseeds.org</text:p>
          </table:table-cell>
          <table:table-cell table:style-name="ce15" office:value-type="string" calcext:value-type="string">
            <text:p>Pole bean; eaten young as green beans or dried and shelled; plant with summer rains 1” deep 6” apart. Separate varieties by 10 ft. <text:s/>Early maturing; white flowers. Can cross with other beans.</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table:number-columns-repeated="2"/>
          <table:table-cell/>
          <table:table-cell table:style-name="ce6" table:number-columns-repeated="16366"/>
        </table:table-row>
        <table:table-row table:style-name="ro4">
          <table:table-cell office:value-type="float" office:value="1005" calcext:value-type="float">
            <text:p>1005</text:p>
          </table:table-cell>
          <table:table-cell table:style-name="ce15" office:value-type="string" calcext:value-type="string">
            <text:p>AMARANTH (Amaranthus cruentus)</text:p>
          </table:table-cell>
          <table:table-cell table:style-name="ce15" office:value-type="string" calcext:value-type="string">
            <text:p>Hopi Red Dye </text:p>
          </table:table-cell>
          <table:table-cell table:style-name="ce15" office:value-type="string" calcext:value-type="string">
            <text:p>Native Seed/SEARCH <text:s/>www.nativeseeds.org</text:p>
          </table:table-cell>
          <table:table-cell table:style-name="ce15" office:value-type="string" calcext:value-type="string">
            <text:p>Grows 6ft tall with 1-2 ft long inflorescence. Young tender leaves are edible. Small black seeds are edible and rich in lysine. Plant in warm soil or with summer rains 1/4” deep in basins or rows. Thin to 10-15” apart. Likes full sun. Crosses easily with wild amaranth.</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4" office:value-type="string" calcext:value-type="string">
            <text:p>Native Seed/SEARCH Farm</text:p>
          </table:table-cell>
          <table:table-cell table:style-name="ce28" office:value-type="string" calcext:value-type="string">
            <text:p>2019</text:p>
          </table:table-cell>
          <table:table-cell table:style-name="ce15" table:number-columns-repeated="2"/>
          <table:table-cell/>
          <table:table-cell table:style-name="ce6" table:number-columns-repeated="16366"/>
        </table:table-row>
        <table:table-row table:style-name="ro4">
          <table:table-cell office:value-type="float" office:value="1080" calcext:value-type="float">
            <text:p>1080</text:p>
          </table:table-cell>
          <table:table-cell table:style-name="ce15" office:value-type="string" calcext:value-type="string">
            <text:p>BEAN, LIMA (Phaseolus lunatus)</text:p>
          </table:table-cell>
          <table:table-cell table:style-name="ce15" office:value-type="string" calcext:value-type="string">
            <text:p>Hopi Yellow</text:p>
          </table:table-cell>
          <table:table-cell table:style-name="ce14" office:value-type="string" calcext:value-type="string">
            <text:p>Native Seed/SEARCH <text:s/>www.nativeseeds.org</text:p>
          </table:table-cell>
          <table:table-cell table:style-name="ce15" office:value-type="string" calcext:value-type="string">
            <text:p>Direct sow outdoors after last frost; 6” apart and 1” deep; rows or basins; trellis. <text:s/>Beans are shades of orange with black mottling. Eaten green, dried and sprouted or dried. Tolerant of salt and alkaline soils. Soil Temp Range: 60°-95° Optimum: 8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4" office:value-type="string" calcext:value-type="string">
            <text:p>Native Seed/SEARCH Farm</text:p>
          </table:table-cell>
          <table:table-cell table:style-name="ce28" office:value-type="string" calcext:value-type="string">
            <text:p>2020</text:p>
          </table:table-cell>
          <table:table-cell table:style-name="ce15" office:value-type="string" calcext:value-type="string">
            <text:p>60°-95° Optimum: 80°</text:p>
          </table:table-cell>
          <table:table-cell table:style-name="ce15" office:value-type="string" calcext:value-type="string">
            <text:p>6-7 days</text:p>
          </table:table-cell>
          <table:table-cell/>
          <table:table-cell table:style-name="ce6" table:number-columns-repeated="16366"/>
        </table:table-row>
        <table:table-row table:style-name="ro2">
          <table:table-cell office:value-type="float" office:value="1010" calcext:value-type="float">
            <text:p>1010</text:p>
          </table:table-cell>
          <table:table-cell table:style-name="ce14" office:value-type="string" calcext:value-type="string">
            <text:p>AMARANTH (Amaranthus cruentus)</text:p>
          </table:table-cell>
          <table:table-cell table:style-name="ce14" office:value-type="string" calcext:value-type="string">
            <text:p>Hot Biscuits</text:p>
          </table:table-cell>
          <table:table-cell table:style-name="ce14" office:value-type="string" calcext:value-type="string">
            <text:p>Botanical Interest, Inc</text:p>
          </table:table-cell>
          <table:table-cell table:style-name="ce14" office:value-type="string" calcext:value-type="string">
            <text:p>Plant 1-2 weeks after last frost and soil is warm. Sow just under a light cover of soil, in basins or rows a pinch every 12”-15” . Thin to 1 plant per spot. Likes full sun. To <text:s/>create fuller plants, pinch tips when young. Seeds are edible and rich in lysine, iron and calcium. Tassels are beautiful in dry flower arrangement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328" calcext:value-type="float">
            <text:p>1328</text:p>
          </table:table-cell>
          <table:table-cell table:style-name="ce15" office:value-type="string" calcext:value-type="string">
            <text:p>FLOWER Poppy Breadseed (Papaver somniferum)</text:p>
          </table:table-cell>
          <table:table-cell table:style-name="ce15" office:value-type="string" calcext:value-type="string">
            <text:p>Hungarian Blue - Poppy Breadseed </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Fluttery lavendar flowers. Seed pods are interesting in dried flower arrangements and use seeds for baking. Attracts pollinators. Deer resistant. Drought tolerant.</text:p>
          </table:table-cell>
          <table:table-cell table:style-name="ce15"/>
          <table:table-cell table:style-name="ce15" office:value-type="string" calcext:value-type="string">
            <text:p>5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296" calcext:value-type="float">
            <text:p>1296</text:p>
          </table:table-cell>
          <table:table-cell table:style-name="ce14" office:value-type="string" calcext:value-type="string">
            <text:p>FLOWER Livingstone Daisy (Cleretum bellidiforme)</text:p>
          </table:table-cell>
          <table:table-cell table:style-name="ce14" office:value-type="string" calcext:value-type="string">
            <text:p>Iceplant, Sparkle Blend</text:p>
          </table:table-cell>
          <table:table-cell table:style-name="ce14" office:value-type="string" calcext:value-type="string">
            <text:p>Botanical Interest, Inc</text:p>
          </table:table-cell>
          <table:table-cell table:style-name="ce14" office:value-type="string" calcext:value-type="string">
            <text:p>Start inside 6-8 weeks before average last frost. Outside, plant 1-2 weeks before last frost. Press into soil surface, 3 seeds every 10”. Light aids germination. Pollinator attractor. Bright flowers with dense, spreading, succulent foliage. Heat &amp; drought tolerant.</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11">
          <table:table-cell office:value-type="float" office:value="1292" calcext:value-type="float">
            <text:p>1292</text:p>
          </table:table-cell>
          <table:table-cell table:style-name="ce15" office:value-type="string" calcext:value-type="string">
            <text:p>FLOWER Larkspur (Consolida regalis)</text:p>
          </table:table-cell>
          <table:table-cell table:style-name="ce15" office:value-type="string" calcext:value-type="string">
            <text:p>Imperial Blend</text:p>
          </table:table-cell>
          <table:table-cell table:style-name="ce14" office:value-type="string" calcext:value-type="string">
            <text:p>Botanical Interest, Inc</text:p>
          </table:table-cell>
          <table:table-cell table:style-name="ce15" office:value-type="string" calcext:value-type="string">
            <text:p>Sow outside 4 to 6 weeks before last frost or in fall before first frost. Plant 1/4” deep. <text:s/>Space 12” apart. Deer resistant. Grows 3’ to 4’ tall.</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6">
          <table:table-cell office:value-type="float" office:value="1019" calcext:value-type="float">
            <text:p>1019</text:p>
          </table:table-cell>
          <table:table-cell table:style-name="ce14" office:value-type="string" calcext:value-type="string">
            <text:p>ARTICHOKE (Cynara scolymus)</text:p>
          </table:table-cell>
          <table:table-cell table:style-name="ce14" office:value-type="string" calcext:value-type="string">
            <text:p>Imperial Star Original</text:p>
          </table:table-cell>
          <table:table-cell table:style-name="ce15" office:value-type="string" calcext:value-type="string">
            <text:p>Johnny’s Seed</text:p>
          </table:table-cell>
          <table:table-cell table:style-name="ce14" office:value-type="string" calcext:value-type="string">
            <text:p>Artichokes require fertile, well-drained soil with a pH of 6.5-7. Sow indoors 8-12 weeks before last frost. Plant 2-3 seeds 1/4” deep in individual containers. Transplant 2-3’ apart in rows 4-6’ apart. Time transplant so plants receive 10 days 45-50 degrees to induce budding. Protect from frost. Days to mature 85. Soil Temp: <text:s/>Range: 45-95 degrees Optimum: 77 degree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45-95 degrees Optimum: 77 degrees</text:p>
          </table:table-cell>
          <table:table-cell table:style-name="ce14"/>
          <table:table-cell/>
          <table:table-cell table:style-name="ce6" table:number-columns-repeated="16366"/>
        </table:table-row>
        <table:table-row table:style-name="ro4">
          <table:table-cell office:value-type="float" office:value="1319" calcext:value-type="float">
            <text:p>1319</text:p>
          </table:table-cell>
          <table:table-cell table:style-name="ce15" office:value-type="string" calcext:value-type="string">
            <text:p>FLOWER Nicotiana (Nicotiana sylvestris)</text:p>
          </table:table-cell>
          <table:table-cell table:style-name="ce15" office:value-type="string" calcext:value-type="string">
            <text:p>Indian Peace Pipe</text:p>
          </table:table-cell>
          <table:table-cell table:style-name="ce14" office:value-type="string" calcext:value-type="string">
            <text:p>Botanical Interest, Inc</text:p>
          </table:table-cell>
          <table:table-cell table:style-name="ce15" office:value-type="string" calcext:value-type="string">
            <text:p>Sow outside 1 to 2 weeks after average last frost date. Seeds are tiny. Press lightly into surface and water very gently or mist to not disturb seeds. Space 24” apart. Attracts pollinators. Deer resistant. Grows 4’ to 6’ tall.</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3">
          <table:table-cell office:value-type="float" office:value="1548" calcext:value-type="float">
            <text:p>1548</text:p>
          </table:table-cell>
          <table:table-cell table:style-name="ce15" office:value-type="string" calcext:value-type="string">
            <text:p>PEA Shell (Pisum sativum)</text:p>
          </table:table-cell>
          <table:table-cell table:style-name="ce15" office:value-type="string" calcext:value-type="string">
            <text:p>Iona</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4-6” apart. Trellsi. Sweet, dependable, small pods, 68 days. <text:s/>Easy to grow; freeze well.</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table-cell table:style-name="ce6" table:number-columns-repeated="16366"/>
        </table:table-row>
        <table:table-row table:style-name="ro4">
          <table:table-cell office:value-type="float" office:value="1602" calcext:value-type="float">
            <text:p>1602</text:p>
          </table:table-cell>
          <table:table-cell table:style-name="ce14" office:value-type="string" calcext:value-type="string">
            <text:p>Pepper, CHILE (Capsicum annuum)</text:p>
          </table:table-cell>
          <table:table-cell table:style-name="ce14" office:value-type="string" calcext:value-type="string">
            <text:p>Isleta</text:p>
          </table:table-cell>
          <table:table-cell table:style-name="ce23" office:value-type="string" calcext:value-type="string">
            <text:p>Native Seed/SEARCH <text:s/>www.nativeseeds.org</text:p>
          </table:table-cell>
          <table:table-cell table:style-name="ce14" office:value-type="string" calcext:value-type="string">
            <text:p>Start inside 1/4” deep in loose soil 8- 10 weeks before last frost. <text:s/>Slow to germinate; need warmth; plant 12-16” apart in full sun/partial in shade low desert. Save seeds from fully ripe, slightly shriveled fruit. Can cross pollinate. <text:s/>(mild to medium)</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table-cell table:style-name="ce14" office:value-type="string" calcext:value-type="string">
            <text:p>8-10 days</text:p>
          </table:table-cell>
          <table:table-cell/>
          <table:table-cell table:style-name="ce6" table:number-columns-repeated="16366"/>
        </table:table-row>
        <table:table-row table:style-name="ro3">
          <table:table-cell office:value-type="float" office:value="1451" calcext:value-type="float">
            <text:p>1451</text:p>
          </table:table-cell>
          <table:table-cell table:style-name="ce15" office:value-type="string" calcext:value-type="string">
            <text:p>HERB Oregano (Origanum vulgare hirtum)</text:p>
          </table:table-cell>
          <table:table-cell table:style-name="ce15" office:value-type="string" calcext:value-type="string">
            <text:p>Italian</text:p>
          </table:table-cell>
          <table:table-cell table:style-name="ce15"/>
          <table:table-cell table:style-name="ce15" office:value-type="string" calcext:value-type="string">
            <text:p>Sow on surface of soil as seeds require light to germinate. Start indoors or direct sow. Most herbs are happy in poor soil and easy to grow.</text:p>
          </table:table-cell>
          <table:table-cell table:style-name="ce15"/>
          <table:table-cell table:style-name="ce15" office:value-type="string" calcext:value-type="string">
            <text:p>15-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2">
          <table:table-cell office:value-type="float" office:value="1528" calcext:value-type="float">
            <text:p>1528</text:p>
          </table:table-cell>
          <table:table-cell table:style-name="ce15" office:value-type="string" calcext:value-type="string">
            <text:p>Microgreens Chicory (Cichorium endivia, C. intybus)</text:p>
          </table:table-cell>
          <table:table-cell table:style-name="ce15" office:value-type="string" calcext:value-type="string">
            <text:p>Italian Amaro Blend</text:p>
          </table:table-cell>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ext:s/>thickly, about 1/2” apart. Press seeds firmly into soil mix and cover about 1/2” with sowing mix. Move containers as need for best light exposure. Harvest about 15-25 days after sowing.</text:p>
          </table:table-cell>
          <table:table-cell table:style-name="ce15"/>
          <table:table-cell table:style-name="ce15" office:value-type="string" calcext:value-type="string">
            <text:p>50-10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65-75 degrees</text:p>
          </table:table-cell>
          <table:table-cell table:style-name="ce15" office:value-type="string" calcext:value-type="string">
            <text:p>7-10 days</text:p>
          </table:table-cell>
          <table:table-cell/>
          <table:table-cell table:style-name="ce6" table:number-columns-repeated="16366"/>
        </table:table-row>
        <table:table-row table:style-name="ro4">
          <table:table-cell office:value-type="float" office:value="1454" calcext:value-type="float">
            <text:p>1454</text:p>
          </table:table-cell>
          <table:table-cell table:style-name="ce14" office:value-type="string" calcext:value-type="string">
            <text:p>HERB PARSLEY (Petroselinum crispum latifolium)</text:p>
          </table:table-cell>
          <table:table-cell table:style-name="ce14" office:value-type="string" calcext:value-type="string">
            <text:p>Italian Flat Leaf</text:p>
          </table:table-cell>
          <table:table-cell table:style-name="ce14" office:value-type="string" calcext:value-type="string">
            <text:p>Ferry Morse</text:p>
          </table:table-cell>
          <table:table-cell table:style-name="ce14" office:value-type="string" calcext:value-type="string">
            <text:p>Soak seeds overnight in warm water. Plant indoors 6 weeks before planting outdoors. Plant 1/4” deep. Direct sow in garden or transplant 10” apart. <text:s/>Height to 15 inches. <text:s/>For seed saving, this is a biennial plant producing seeds the second year in ground.</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21-28 days</text:p>
          </table:table-cell>
          <table:table-cell/>
          <table:table-cell table:style-name="ce6" table:number-columns-repeated="16366"/>
        </table:table-row>
        <table:table-row table:style-name="ro4">
          <table:table-cell office:value-type="float" office:value="1420" calcext:value-type="float">
            <text:p>1420</text:p>
          </table:table-cell>
          <table:table-cell table:style-name="ce15" office:value-type="string" calcext:value-type="string">
            <text:p>HERB Basil (Ocimum spp)</text:p>
          </table:table-cell>
          <table:table-cell table:style-name="ce15" office:value-type="string" calcext:value-type="string">
            <text:p>Italian Large Leaf</text:p>
          </table:table-cell>
          <table:table-cell table:style-name="ce15" office:value-type="string" calcext:value-type="string">
            <text:p>Johnny’s Seed</text:p>
          </table:table-cell>
          <table:table-cell table:style-name="ce15" office:value-type="string" calcext:value-type="string">
            <text:p>Classic large-leaved Italian sweet basil prized for its spicy flavor and wonderful <text:s/>aroma; 24-36”; indoor <text:s/>4-6 weeks before planting out or direct sow when temp does not drop below 65 degrees; full sun; rich well drained soil; use fresh or dried.</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6">
          <table:table-cell office:value-type="float" office:value="1607" calcext:value-type="float">
            <text:p>1607</text:p>
          </table:table-cell>
          <table:table-cell table:style-name="ce15" office:value-type="string" calcext:value-type="string">
            <text:p>PEPPER, SWEET (Capsicum annuum)</text:p>
          </table:table-cell>
          <table:table-cell table:style-name="ce15" office:value-type="string" calcext:value-type="string">
            <text:p>Italian Pepperoncini</text:p>
          </table:table-cell>
          <table:table-cell table:style-name="ce14" office:value-type="string" calcext:value-type="string">
            <text:p>Baker Creek Heirloom Seeds</text:p>
          </table:table-cell>
          <table:table-cell table:style-name="ce15" office:value-type="string" calcext:value-type="string">
            <text:p>Heirloom of Southern Italy. Popular pickling pepper, 3”-5” fruit with just a little heat. <text:s/>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4" office:value-type="string" calcext:value-type="string">
            <text:p>Deborah Hargrove</text:p>
          </table:table-cell>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table-cell table:style-name="ce6" table:number-columns-repeated="16366"/>
        </table:table-row>
        <table:table-row table:style-name="ro3">
          <table:table-cell office:value-type="float" office:value="1618" calcext:value-type="float">
            <text:p>1618</text:p>
          </table:table-cell>
          <table:table-cell table:style-name="ce15" office:value-type="string" calcext:value-type="string">
            <text:p>PUMPKIN (Cucurbita maxima)</text:p>
          </table:table-cell>
          <table:table-cell table:style-name="ce15" office:value-type="string" calcext:value-type="string">
            <text:p>Jack O’Lantern</text:p>
          </table:table-cell>
          <table:table-cell table:style-name="ce15" office:value-type="string" calcext:value-type="string">
            <text:p>Ferry Morse</text:p>
          </table:table-cell>
          <table:table-cell table:style-name="ce15" office:value-type="string" calcext:value-type="string">
            <text:p>Direct sow outdoors 2-3 seeds 1”deep. Make mounds 4-6 feet apart; thin to 1 healthy plant per mound. Tolerates heat and humidity. Full sun; 110 days. Perfect for carving.</text:p>
          </table:table-cell>
          <table:table-cell table:style-name="ce15"/>
          <table:table-cell table:style-name="ce15" office:value-type="string" calcext:value-type="string">
            <text:p>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table-cell table:style-name="ce6" table:number-columns-repeated="16366"/>
        </table:table-row>
        <table:table-row table:style-name="ro4">
          <table:table-cell office:value-type="float" office:value="1061" calcext:value-type="float">
            <text:p>1061</text:p>
          </table:table-cell>
          <table:table-cell table:style-name="ce14" office:value-type="string" calcext:value-type="string">
            <text:p>BEAN, COMMON (Phaseolus vulgaris)</text:p>
          </table:table-cell>
          <table:table-cell table:style-name="ce14" office:value-type="string" calcext:value-type="string">
            <text:p>Jade - Green Bean, Bush Type</text:p>
          </table:table-cell>
          <table:table-cell table:style-name="ce14" office:value-type="string" calcext:value-type="string">
            <text:p>Ferry Morse</text:p>
          </table:table-cell>
          <table:table-cell table:style-name="ce14" office:value-type="string" calcext:value-type="string">
            <text:p>Plant early spring after frost and soil temp higher than 60 degrees. Direct sow 1” deep, 4” apart. Compact bush to 16”; 5-6” dark green pods; 58 days. <text:s/>Great for canning/freezing/eating raw. <text:s/>Will cross with other bean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number-columns-repeated="2" table:style-name="ce14" office:value-type="string" calcext:value-type="string">
            <text:p>6-7 days</text:p>
          </table:table-cell>
          <table:table-cell/>
          <table:table-cell table:style-name="ce6" table:number-columns-repeated="16366"/>
        </table:table-row>
        <table:table-row table:style-name="ro2">
          <table:table-cell office:value-type="float" office:value="1572" calcext:value-type="float">
            <text:p>1572</text:p>
          </table:table-cell>
          <table:table-cell table:style-name="ce15" office:value-type="string" calcext:value-type="string">
            <text:p>PEPPER CHILE (Capsicum annuum)</text:p>
          </table:table-cell>
          <table:table-cell table:style-name="ce15" office:value-type="string" calcext:value-type="string">
            <text:p>Jalafuego</text:p>
          </table:table-cell>
          <table:table-cell table:style-name="ce14" office:value-type="string" calcext:value-type="string">
            <text:p>Botanical Interest, Inc</text:p>
          </table:table-cell>
          <table:table-cell table:style-name="ce15" office:value-type="string" calcext:value-type="string">
            <text:p>Prolific, shiny, extra large, hot pepper. Produces all season. <text:s/>Start inside 1/4” deep in loose soil 8-10 weeks before last frost. <text:s/>Transplant outside 2-4 weeks after last frost. Slow to germinate; need warmth. Hotter, larger and more productive than other jalapenos. <text:s text:c="3"/>(HOT-Very Hot)</text:p>
          </table:table-cell>
          <table:table-cell table:style-name="ce15" table:number-columns-repeated="2"/>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0-25 days</text:p>
          </table:table-cell>
          <table:table-cell/>
          <table:table-cell table:style-name="ce6" table:number-columns-repeated="16366"/>
        </table:table-row>
        <table:table-row table:style-name="ro5">
          <table:table-cell office:value-type="float" office:value="1577" calcext:value-type="float">
            <text:p>1577</text:p>
          </table:table-cell>
          <table:table-cell table:style-name="ce15" office:value-type="string" calcext:value-type="string">
            <text:p>PEPPER CHILE (Capsicum annuum)</text:p>
          </table:table-cell>
          <table:table-cell table:style-name="ce15" office:value-type="string" calcext:value-type="string">
            <text:p>Jalapeno <text:s/>Early</text:p>
          </table:table-cell>
          <table:table-cell table:style-name="ce15" office:value-type="string" calcext:value-type="string">
            <text:p>Burpee</text:p>
          </table:table-cell>
          <table:table-cell table:style-name="ce15" office:value-type="string" calcext:value-type="string">
            <text:p>Prolific hot pepper bold flavor. <text:s/>Produces all season. <text:s/>Start inside 1/4” deep in loose soil 8-10 weeks before last frost. <text:s/>Slow to germinate; need warmth. Can cross pollinate.2,500-5,000 scoville. Medium ho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table-cell table:style-name="ce6" table:number-columns-repeated="16366"/>
        </table:table-row>
        <table:table-row table:style-name="ro5">
          <table:table-cell office:value-type="float" office:value="1573" calcext:value-type="float">
            <text:p>1573</text:p>
          </table:table-cell>
          <table:table-cell table:style-name="ce14" office:value-type="string" calcext:value-type="string">
            <text:p>PEPPER CHILE (Capsicum annuum)</text:p>
          </table:table-cell>
          <table:table-cell table:style-name="ce14" office:value-type="string" calcext:value-type="string">
            <text:p>Jalapeno NuMex Lemon Spice</text:p>
          </table:table-cell>
          <table:table-cell table:style-name="ce14" office:value-type="string" calcext:value-type="string">
            <text:p>Botanical Interest, Inc</text:p>
          </table:table-cell>
          <table:table-cell table:style-name="ce14" office:value-type="string" calcext:value-type="string">
            <text:p>Prolific, sunny, yellow hot pepper with a slight citrus flavor. <text:s/>Produces all season. <text:s/>Start inside 1/4” deep in loose soil 8-10 weeks before last frost. <text:s/>Slow to germinate; need warmth. Save seeds from fully ripe, slightly shriveled fruit. Can cross pollinate.</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table-cell table:style-name="ce6" table:number-columns-repeated="16366"/>
        </table:table-row>
        <table:table-row table:style-name="ro3">
          <table:table-cell office:value-type="float" office:value="1537" calcext:value-type="float">
            <text:p>1537</text:p>
          </table:table-cell>
          <table:table-cell table:style-name="ce14" office:value-type="string" calcext:value-type="string">
            <text:p>OKRA (Abelmoschus esculentus)</text:p>
          </table:table-cell>
          <table:table-cell table:style-name="ce14" office:value-type="string" calcext:value-type="string">
            <text:p>Jambalaya</text:p>
          </table:table-cell>
          <table:table-cell table:style-name="ce14" office:value-type="string" calcext:value-type="string">
            <text:p>Renee’s Garden</text:p>
          </table:table-cell>
          <table:table-cell table:style-name="ce14" office:value-type="string" calcext:value-type="string">
            <text:p>Soak 24 hrs before planting, direct sow or start indoors. Plant 3/4” deep about 3 feet apart. Harvest pods 2-4” long daily, as they grow quickly past stage of prime eating.</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3">
          <table:table-cell office:value-type="float" office:value="1396" calcext:value-type="float">
            <text:p>1396</text:p>
          </table:table-cell>
          <table:table-cell table:style-name="ce15" office:value-type="string" calcext:value-type="string">
            <text:p>GREENS (Brassica rapa)</text:p>
          </table:table-cell>
          <table:table-cell table:style-name="ce15" office:value-type="string" calcext:value-type="string">
            <text:p>Japanese MIZUNA</text:p>
          </table:table-cell>
          <table:table-cell table:style-name="ce15" office:value-type="string" calcext:value-type="string">
            <text:p>Johnny’s Seed</text:p>
          </table:table-cell>
          <table:table-cell table:style-name="ce15" office:value-type="string" calcext:value-type="string">
            <text:p>Plant 1/4” deep about 15 seeds per foot in cool season. Does not require thinning. Harvest individual leaves or cut bunches to add to salads or use in stir fry.</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2">
          <table:table-cell office:value-type="float" office:value="1744" calcext:value-type="float">
            <text:p>1744</text:p>
          </table:table-cell>
          <table:table-cell table:style-name="ce15" office:value-type="string" calcext:value-type="string">
            <text:p>WATERMELON (Citrullus lanatus)</text:p>
          </table:table-cell>
          <table:table-cell table:style-name="ce15" office:value-type="string" calcext:value-type="string">
            <text:p>Jemez</text:p>
          </table:table-cell>
          <table:table-cell table:style-name="ce15" office:value-type="string" calcext:value-type="string">
            <text:p>Native Seed/SEARCH <text:s/>www.nativeseeds.org</text:p>
          </table:table-cell>
          <table:table-cell table:style-name="ce15" office:value-type="string" calcext:value-type="string">
            <text:p>An African native introduced by the Spanish to Mexico. Direct sow outside after danger of frost. Plant 3 seeds 1” deep in basins 3-5 feet apart. Full sun; long growing season, rich soil (add compost as they grow). Fruits vary in size and color of flesh and rid. Varieties will cross. Soil Temp Range: 60– 105 Optimum: 9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 105 Optimum: 95°</text:p>
          </table:table-cell>
          <table:table-cell table:style-name="ce15" office:value-type="string" calcext:value-type="string">
            <text:p>3-4 days</text:p>
          </table:table-cell>
          <table:table-cell/>
          <table:table-cell table:style-name="ce6" table:number-columns-repeated="16366"/>
        </table:table-row>
        <table:table-row table:style-name="ro4">
          <table:table-cell office:value-type="float" office:value="1499" calcext:value-type="float">
            <text:p>1499</text:p>
          </table:table-cell>
          <table:table-cell table:style-name="ce15" office:value-type="string" calcext:value-type="string">
            <text:p>LETTUCE Romaine (Latuca sativa)</text:p>
          </table:table-cell>
          <table:table-cell table:style-name="ce15" office:value-type="string" calcext:value-type="string">
            <text:p>Jericho</text:p>
          </table:table-cell>
          <table:table-cell table:style-name="ce15" office:value-type="string" calcext:value-type="string">
            <text:p>High Mowing</text:p>
          </table:table-cell>
          <table:table-cell table:style-name="ce15" office:value-type="string" calcext:value-type="string">
            <text:p>Large, bright green romaine; origin Israel (heat tolerant) but does well in cool temps. Water at base to avoid rot. Stagger planting 10 days; thin to 8” for full head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2">
          <table:table-cell office:value-type="float" office:value="1209" calcext:value-type="float">
            <text:p>1209</text:p>
          </table:table-cell>
          <table:table-cell table:style-name="ce14" office:value-type="string" calcext:value-type="string">
            <text:p>FLOWER <text:s/>Nasturtium (Tropaeolum majus)</text:p>
          </table:table-cell>
          <table:table-cell table:style-name="ce14" office:value-type="string" calcext:value-type="string">
            <text:p>Jewel Blend</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Deters garden pests while attracting pollinators. Deer and rabbit resistant. Blossoms and leaves can also be eaten.</text:p>
          </table:table-cell>
          <table:table-cell table:style-name="ce14"/>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2">
          <table:table-cell office:value-type="float" office:value="1609" calcext:value-type="float">
            <text:p>1609</text:p>
          </table:table-cell>
          <table:table-cell table:style-name="ce14" office:value-type="string" calcext:value-type="string">
            <text:p>PEPPER, SWEET (Capsicum annuum)</text:p>
          </table:table-cell>
          <table:table-cell table:style-name="ce14" office:value-type="string" calcext:value-type="string">
            <text:p>Jimmy Nardello Italian Pepper</text:p>
          </table:table-cell>
          <table:table-cell table:style-name="ce14" office:value-type="string" calcext:value-type="string">
            <text:p>Botanical Interest, Inc</text:p>
          </table:table-cell>
          <table:table-cell table:style-name="ce14" office:value-type="string" calcext:value-type="string">
            <text:p>Long, thin-skinned frying pepper from Southern Italy. Rich flavor, ripens red, prolific. <text:s/>Start inside 1/4” deep in loose soil 8-10 weeks before last frost. <text:s/>Slow to germinate; need warmth; plant 12-16” apart in full sun/partial in shade low desert. Save seeds from fully ripe, slightly shriveled fruit. Can cross pollinate.</text:p>
          </table:table-cell>
          <table:table-cell table:style-name="ce14"/>
          <table:table-cell table:style-name="ce14" office:value-type="string" calcext:value-type="string">
            <text:p>3+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otanical Interests</text:p>
          </table:table-cell>
          <table:table-cell table:style-name="ce28" office:value-type="string" calcext:value-type="string">
            <text:p>2022</text:p>
          </table:table-cell>
          <table:table-cell table:style-name="ce14"/>
          <table:table-cell table:style-name="ce14" office:value-type="string" calcext:value-type="string">
            <text:p>8-10 days</text:p>
          </table:table-cell>
          <table:table-cell/>
          <table:table-cell table:style-name="ce6" table:number-columns-repeated="16366"/>
        </table:table-row>
        <table:table-row table:style-name="ro11">
          <table:table-cell office:value-type="float" office:value="1743" calcext:value-type="float">
            <text:p>1743</text:p>
          </table:table-cell>
          <table:table-cell table:style-name="ce14" office:value-type="string" calcext:value-type="string">
            <text:p>WATERMELON (Citrullus lanatus)</text:p>
          </table:table-cell>
          <table:table-cell table:style-name="ce14" office:value-type="string" calcext:value-type="string">
            <text:p>Jubilee</text:p>
          </table:table-cell>
          <table:table-cell table:style-name="ce14" office:value-type="string" calcext:value-type="string">
            <text:p>Ferry Morse</text:p>
          </table:table-cell>
          <table:table-cell table:style-name="ce14" office:value-type="string" calcext:value-type="string">
            <text:p>Direct sow outside after danger of frost. Plant 1” deep in hills of 2 to 3 plants per hill at 3-5 feet apart. Full sun; 90 days; 25+pound frui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3">
          <table:table-cell office:value-type="float" office:value="1062" calcext:value-type="float">
            <text:p>1062</text:p>
          </table:table-cell>
          <table:table-cell table:style-name="ce15" office:value-type="string" calcext:value-type="string">
            <text:p>BEAN, COMMON (Phaseolus vulgaris)</text:p>
          </table:table-cell>
          <table:table-cell table:style-name="ce15" office:value-type="string" calcext:value-type="string">
            <text:p>Kentucky Blue (pole)</text:p>
          </table:table-cell>
          <table:table-cell table:style-name="ce14" office:value-type="string" calcext:value-type="string">
            <text:p>Ferry Morse</text:p>
          </table:table-cell>
          <table:table-cell table:style-name="ce15" office:value-type="string" calcext:value-type="string">
            <text:p>Direct sow outdoors after last frost. Plant 1.5” deep, 4” apart; pole type. <text:s/>Popular for its flavor and tenderness. <text:s/>Will cross-pollinate with other beans.</text:p>
          </table:table-cell>
          <table:table-cell table:style-name="ce15"/>
          <table:table-cell table:style-name="ce15" office:value-type="string" calcext:value-type="string">
            <text:p>11-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8 days</text:p>
          </table:table-cell>
          <table:table-cell/>
          <table:table-cell table:style-name="ce6" table:number-columns-repeated="16366"/>
        </table:table-row>
        <table:table-row table:style-name="ro3">
          <table:table-cell office:value-type="float" office:value="1046" calcext:value-type="float">
            <text:p>1046</text:p>
          </table:table-cell>
          <table:table-cell table:style-name="ce14" office:value-type="string" calcext:value-type="string">
            <text:p>BEAN, COMMON (Phaseolus vulgaris)</text:p>
          </table:table-cell>
          <table:table-cell table:style-name="ce14" office:value-type="string" calcext:value-type="string">
            <text:p>Kentucky Wonder (pole type)</text:p>
          </table:table-cell>
          <table:table-cell table:style-name="ce14" office:value-type="string" calcext:value-type="string">
            <text:p>American Seed</text:p>
          </table:table-cell>
          <table:table-cell table:style-name="ce14" office:value-type="string" calcext:value-type="string">
            <text:p>Direct sow outdoors after last frost. <text:s/>Plant 1.5” deep, 4” apart; pole type. <text:s/>Popular for its fine table quality. Will cross-pollinate with other beans. Soil Temp Range: 60°-95° Optimum: 80°</text:p>
          </table:table-cell>
          <table:table-cell table:style-name="ce14"/>
          <table:table-cell table:style-name="ce14" office:value-type="string" calcext:value-type="string">
            <text:p>11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2">
          <table:table-cell office:value-type="float" office:value="1307" calcext:value-type="float">
            <text:p>1307</text:p>
          </table:table-cell>
          <table:table-cell table:style-name="ce15" office:value-type="string" calcext:value-type="string">
            <text:p>FLOWER Marigold (Tagetes erecta)</text:p>
          </table:table-cell>
          <table:table-cell table:style-name="ce15" office:value-type="string" calcext:value-type="string">
            <text:p>Kilimanjaro White</text:p>
          </table:table-cell>
          <table:table-cell table:style-name="ce14" office:value-type="string" calcext:value-type="string">
            <text:p>Botanical Interest, Inc</text:p>
          </table:table-cell>
          <table:table-cell table:style-name="ce15" office:value-type="string" calcext:value-type="string">
            <text:p>18” plants with vanilla-white blossoms. They have a lovely sweet scent, different from other marigolds. Plant in fine, moist soil, covering lightly with 1/4” soil. <text:s/>Plant 2-3 seeds 9-12” apart in full sun. <text:s/>Thrives in summer’s heat. Also great in containers. Deer and rabbit resistan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5">
          <table:table-cell office:value-type="float" office:value="1483" calcext:value-type="float">
            <text:p>1483</text:p>
          </table:table-cell>
          <table:table-cell table:style-name="ce14" office:value-type="string" calcext:value-type="string">
            <text:p>LEEK (Allium porrum)</text:p>
          </table:table-cell>
          <table:table-cell table:style-name="ce14" office:value-type="string" calcext:value-type="string">
            <text:p>KING RICHARD</text:p>
          </table:table-cell>
          <table:table-cell table:style-name="ce15" office:value-type="string" calcext:value-type="string">
            <text:p>Johnny’s Seed</text:p>
          </table:table-cell>
          <table:table-cell table:style-name="ce14" office:value-type="string" calcext:value-type="string">
            <text:p>Predominant choice for home gardeners; close relative to onion and garlic; used in soups and stews, salads. <text:s/>Sow indoors, 1/8-1/4” deep; transplant to 6” apart; full sun; 8-10” long, 20-30 days after transplant.</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2">
          <table:table-cell office:value-type="float" office:value="1668" calcext:value-type="float">
            <text:p>1668</text:p>
          </table:table-cell>
          <table:table-cell table:style-name="ce15" office:value-type="string" calcext:value-type="string">
            <text:p>SQUASH (Cucurbirta maxima)</text:p>
          </table:table-cell>
          <table:table-cell table:style-name="ce15" office:value-type="string" calcext:value-type="string">
            <text:p>Lakota </text:p>
          </table:table-cell>
          <table:table-cell table:style-name="ce14" office:value-type="string" calcext:value-type="string">
            <text:p>Botanical Interest, Inc</text:p>
          </table:table-cell>
          <table:table-cell table:style-name="ce15" office:value-type="string" calcext:value-type="string">
            <text:p>Direct sow outside after last frost. Plant 1” deep in hills of 2-3 plants per hill, <text:s/>feet apart. Full sun; 85-100 days; fruit is large, smooth green and orange skin and weighs up to 15+ pounds. <text:s/>Excellent cooked squash; smooth, deep orange, sweet nutty flavor. <text:s/>Stores well over winte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2">
          <table:table-cell office:value-type="float" office:value="1241" calcext:value-type="float">
            <text:p>1241</text:p>
          </table:table-cell>
          <table:table-cell table:style-name="ce14" office:value-type="string" calcext:value-type="string">
            <text:p>FLOWER BEE BALM (Monarda sp.)</text:p>
          </table:table-cell>
          <table:table-cell table:style-name="ce14" office:value-type="string" calcext:value-type="string">
            <text:p>Lambada</text:p>
          </table:table-cell>
          <table:table-cell table:style-name="ce14" office:value-type="string" calcext:value-type="string">
            <text:p>Botanical Interest, Inc</text:p>
          </table:table-cell>
          <table:table-cell table:style-name="ce14" office:value-type="string" calcext:value-type="string">
            <text:p>Sow outside 2 to 4 weeks before last frost. Press seed gently onto surface of soil. Space 12” apart. Attracts pollinators. B. Deer resistant. Drought resistant. Unique, lavender-pink flower clusters. Petals are edible with a lemon-mint-oregano flavor. Pretty as cut flowers.</text:p>
          </table:table-cell>
          <table:table-cell table:style-name="ce14"/>
          <table:table-cell table:style-name="ce14" office:value-type="string" calcext:value-type="string">
            <text:p>15</text:p>
            <text:p>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481" calcext:value-type="float">
            <text:p>1481</text:p>
          </table:table-cell>
          <table:table-cell table:style-name="ce15" office:value-type="string" calcext:value-type="string">
            <text:p>LEEK (Allium ampeloprasum)</text:p>
          </table:table-cell>
          <table:table-cell table:style-name="ce15" office:value-type="string" calcext:value-type="string">
            <text:p>Lancelot</text:p>
          </table:table-cell>
          <table:table-cell table:style-name="ce15" office:value-type="string" calcext:value-type="string">
            <text:p>Dixon Dale Farms</text:p>
          </table:table-cell>
          <table:table-cell table:style-name="ce15" office:value-type="string" calcext:value-type="string">
            <text:p>Predominant choice for home gardeners; close relative to onion and garlic; used in soups and stews, salads. <text:s/>Sow indoors, 1/8-1/4” deep; transplant to 6” apart; full sun; 8-10” long, 90-120 days.</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Avery-Hargrove (CCMGA Master Gardener) </text:p>
          </table:table-cell>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3">
          <table:table-cell office:value-type="float" office:value="1228" calcext:value-type="float">
            <text:p>1228</text:p>
          </table:table-cell>
          <table:table-cell table:style-name="ce14" office:value-type="string" calcext:value-type="string">
            <text:p>Flower (Lantana camara)</text:p>
          </table:table-cell>
          <table:table-cell table:style-name="ce14" office:value-type="string" calcext:value-type="string">
            <text:p>Lantana—Pink Yellow</text:p>
          </table:table-cell>
          <table:table-cell table:style-name="ce14" office:value-type="string" calcext:value-type="string">
            <text:p>CCMG Seed Library</text:p>
          </table:table-cell>
          <table:table-cell table:style-name="ce14" office:value-type="string" calcext:value-type="string">
            <text:p>Scatter seeds 2-4 weeks before average last frost. Rake seeds in to 1/8”-1/4” depth and water gently and keep moist until plants are established.</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3">
          <table:table-cell office:value-type="float" office:value="1229" calcext:value-type="float">
            <text:p>1229</text:p>
          </table:table-cell>
          <table:table-cell table:style-name="ce14" office:value-type="string" calcext:value-type="string">
            <text:p>Flower (Lantana camara)</text:p>
          </table:table-cell>
          <table:table-cell table:style-name="ce14" office:value-type="string" calcext:value-type="string">
            <text:p>Lantana—Red</text:p>
          </table:table-cell>
          <table:table-cell table:style-name="ce14" office:value-type="string" calcext:value-type="string">
            <text:p>CCMG Seed Library</text:p>
          </table:table-cell>
          <table:table-cell table:style-name="ce14" office:value-type="string" calcext:value-type="string">
            <text:p>Scatter seeds 2-4 weeks before average last frost. Rake seeds in to 1/8”-1/4” depth and water gently and keep moist until plants are established.</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4">
          <table:table-cell office:value-type="float" office:value="1390" calcext:value-type="float">
            <text:p>1390</text:p>
          </table:table-cell>
          <table:table-cell table:style-name="ce15" office:value-type="string" calcext:value-type="string">
            <text:p>GOURD (Lagenaria siceraria)</text:p>
          </table:table-cell>
          <table:table-cell table:style-name="ce15" office:value-type="string" calcext:value-type="string">
            <text:p>LARGE GOURD </text:p>
          </table:table-cell>
          <table:table-cell table:style-name="ce15" office:value-type="string" calcext:value-type="string">
            <text:p>Native Seed/SEARCH <text:s/>www.nativeseeds.org</text:p>
          </table:table-cell>
          <table:table-cell table:style-name="ce15"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Tucson,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70– 85 Optimum: 85°</text:p>
          </table:table-cell>
          <table:table-cell table:style-name="ce15" office:value-type="string" calcext:value-type="string">
            <text:p>3-10 days</text:p>
          </table:table-cell>
          <table:table-cell/>
          <table:table-cell table:style-name="ce6" table:number-columns-repeated="16366"/>
        </table:table-row>
        <table:table-row table:style-name="ro2">
          <table:table-cell office:value-type="float" office:value="1289" calcext:value-type="float">
            <text:p>1289</text:p>
          </table:table-cell>
          <table:table-cell table:style-name="ce15" office:value-type="string" calcext:value-type="string">
            <text:p>FLOWER Hyssop (Agastache foeniculum)</text:p>
          </table:table-cell>
          <table:table-cell table:style-name="ce15" office:value-type="string" calcext:value-type="string">
            <text:p>Lavender Hyssop</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May also be sown in late fall for spring germination. Space 12” apart. Attracts pollinators. <text:s/>Deer resistant. Leaves and flowers can make refreshing, fruity tea or added to salad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2">
          <table:table-cell office:value-type="float" office:value="1643" calcext:value-type="float">
            <text:p>1643</text:p>
          </table:table-cell>
          <table:table-cell table:style-name="ce15" office:value-type="string" calcext:value-type="string">
            <text:p>SPINACH (Spinacia oleracea)</text:p>
          </table:table-cell>
          <table:table-cell table:style-name="ce15" office:value-type="string" calcext:value-type="string">
            <text:p>Lavewa</text:p>
          </table:table-cell>
          <table:table-cell table:style-name="ce14" office:value-type="string" calcext:value-type="string">
            <text:p>Botanical Interest, Inc</text:p>
          </table:table-cell>
          <table:table-cell table:style-name="ce15" office:value-type="string" calcext:value-type="string">
            <text:p>Direct sow in early spring &amp; late summer, group of 3 seeds 4-6” apart, 1/2” deep, rows 12” apart. <text:s/>Thin to 1 plant every 4-6”; use these as baby greens. <text:s/>Open-pollinated variety, excellent flavor, heat tolerant, mildew resistant! Soil Temp Range: 35°-85° Optimum: 70°</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35°-85° Optimum: 70°</text:p>
          </table:table-cell>
          <table:table-cell table:style-name="ce15" office:value-type="string" calcext:value-type="string">
            <text:p>5-10 days</text:p>
          </table:table-cell>
          <table:table-cell/>
          <table:table-cell table:style-name="ce6" table:number-columns-repeated="16366"/>
        </table:table-row>
        <table:table-row table:style-name="ro11">
          <table:table-cell office:value-type="float" office:value="1190" calcext:value-type="float">
            <text:p>1190</text:p>
          </table:table-cell>
          <table:table-cell table:style-name="ce14" office:value-type="string" calcext:value-type="string">
            <text:p>CUCUMBER (Cucumis sativus)</text:p>
          </table:table-cell>
          <table:table-cell table:style-name="ce14" office:value-type="string" calcext:value-type="string">
            <text:p>Lemon</text:p>
          </table:table-cell>
          <table:table-cell table:style-name="ce14" office:value-type="string" calcext:value-type="string">
            <text:p>Native Seed/SEARCH <text:s/>www.nativeseeds.org</text:p>
          </table:table-cell>
          <table:table-cell table:style-name="ce14" office:value-type="string" calcext:value-type="string">
            <text:p>Heat tolerant, slicing/pickling, plant in rich, warm soil; fresh or pickled Soil Temp Range: 60°-105° Optimum: 9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5° Optimum: 95°</text:p>
          </table:table-cell>
          <table:table-cell table:style-name="ce14" office:value-type="string" calcext:value-type="string">
            <text:p>4 to 6 days</text:p>
          </table:table-cell>
          <table:table-cell/>
          <table:table-cell table:style-name="ce6" table:number-columns-repeated="16366"/>
        </table:table-row>
        <table:table-row table:style-name="ro3">
          <table:table-cell office:value-type="float" office:value="1407" calcext:value-type="float">
            <text:p>1407</text:p>
          </table:table-cell>
          <table:table-cell table:style-name="ce15" office:value-type="string" calcext:value-type="string">
            <text:p>HERB Basil (Ocimum africanum)</text:p>
          </table:table-cell>
          <table:table-cell table:style-name="ce15" office:value-type="string" calcext:value-type="string">
            <text:p>Lemon</text:p>
          </table:table-cell>
          <table:table-cell table:style-name="ce15" office:value-type="string" calcext:value-type="string">
            <text:p>Start Smart</text:p>
          </table:table-cell>
          <table:table-cell table:style-name="ce15" office:value-type="string" calcext:value-type="string">
            <text:p>Start indoors 4-6 weeks before transplanting outdoors. Sow 1/4” deep in seed starting mix. Transplant outdoors 1-2 weeks after last frost about 12” apart.</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354" calcext:value-type="float">
            <text:p>1354</text:p>
          </table:table-cell>
          <table:table-cell table:style-name="ce14" office:value-type="string" calcext:value-type="string">
            <text:p>FLOWER Sunflower (Helianthus annuus)</text:p>
          </table:table-cell>
          <table:table-cell table:style-name="ce14" office:value-type="string" calcext:value-type="string">
            <text:p>Lemon Queen</text:p>
          </table:table-cell>
          <table:table-cell table:style-name="ce14" office:value-type="string" calcext:value-type="string">
            <text:p>Open Seed Library</text:p>
          </table:table-cell>
          <table:table-cell table:style-name="ce14" office:value-type="string" calcext:value-type="string">
            <text:p>Beautiful lemon-yellow blooms with chocolate centers. <text:s/>Tall plants with multiple flower heads per plant. <text:s/>Direct sow (sunflowers do not transplant well) after last frost, 1/2 inch deep, <text:s text:c="2"/>4-5 inches apart. Germination takes 8-10 days.</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4"/>
          <table:table-cell table:style-name="ce14" office:value-type="string" calcext:value-type="string">
            <text:p>Jennifer Barrett (Cochise County Master Gardener)</text:p>
          </table:table-cell>
          <table:table-cell table:style-name="ce28" office:value-type="string" calcext:value-type="string">
            <text:p>2019</text:p>
          </table:table-cell>
          <table:table-cell table:style-name="ce14"/>
          <table:table-cell table:style-name="ce14" office:value-type="string" calcext:value-type="string">
            <text:p>takes 8-10 days.</text:p>
          </table:table-cell>
          <table:table-cell/>
          <table:table-cell table:style-name="ce6" table:number-columns-repeated="16366"/>
        </table:table-row>
        <table:table-row table:style-name="ro4">
          <table:table-cell office:value-type="float" office:value="1415" calcext:value-type="float">
            <text:p>1415</text:p>
          </table:table-cell>
          <table:table-cell table:style-name="ce14" office:value-type="string" calcext:value-type="string">
            <text:p>HERB Basil (Ocimum basilicum)</text:p>
          </table:table-cell>
          <table:table-cell table:style-name="ce14" office:value-type="string" calcext:value-type="string">
            <text:p>Lettuce Leaf</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Very large leaves that can be used as lettuce alternative on sandwiches. Slow bolt.</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372" calcext:value-type="float">
            <text:p>1372</text:p>
          </table:table-cell>
          <table:table-cell table:style-name="ce15" office:value-type="string" calcext:value-type="string">
            <text:p>FLOWER ZINNIA (Zinnia elegans)</text:p>
          </table:table-cell>
          <table:table-cell table:style-name="ce15" office:value-type="string" calcext:value-type="string">
            <text:p>Lilliput</text:p>
          </table:table-cell>
          <table:table-cell table:style-name="ce14" office:value-type="string" calcext:value-type="string">
            <text:p>Botanical Interest, Inc</text:p>
          </table:table-cell>
          <table:table-cell table:style-name="ce15" office:value-type="string" calcext:value-type="string">
            <text:p>Sow outside 1/4” deep, 9”-12” apart 1-2 weeks after last frost. Colors of white, yellow, pink, scarlet, purple, orange, and more. <text:s/>Plants grow 18 inches tall. <text:s/>Lovely to look at. <text:s/>Lovely in bouquets. <text:s/>Great in the garden to attract pollinators! <text:s/>This <text:s/>annual can reseed in our high desert climate! Deer resist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552" calcext:value-type="float">
            <text:p>1552</text:p>
          </table:table-cell>
          <table:table-cell table:style-name="ce14" office:value-type="string" calcext:value-type="string">
            <text:p>PEA Shell (Pisum sativum)</text:p>
          </table:table-cell>
          <table:table-cell table:style-name="ce14" office:value-type="string" calcext:value-type="string">
            <text:p>Lincoln</text:p>
          </table:table-cell>
          <table:table-cell table:style-name="ce15" office:value-type="string" calcext:value-type="string">
            <text:p>Patriot Seeds</text:p>
          </table:table-cell>
          <table:table-cell table:style-name="ce14" office:value-type="string" calcext:value-type="string">
            <text:p>Direct sow outdoors; young plants can tolerate a light frost. <text:s/>Plant 1” deep, 2” apart, trellis. Keep weed free. Pick when seeds have enlarged in pod; hold vines when picking to prevent damage to vine. <text:s/>4-5” pods, 67 days Soil Temp Range: 40°-85° Optimum: 75°</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office:value-type="string" calcext:value-type="string">
            <text:p>40°-85° Optimum: 75°</text:p>
          </table:table-cell>
          <table:table-cell table:style-name="ce14" office:value-type="string" calcext:value-type="string">
            <text:p>6-7 days</text:p>
          </table:table-cell>
          <table:table-cell/>
          <table:table-cell table:style-name="ce6" table:number-columns-repeated="16366"/>
        </table:table-row>
        <table:table-row table:style-name="ro6">
          <table:table-cell office:value-type="float" office:value="1404" calcext:value-type="float">
            <text:p>1404</text:p>
          </table:table-cell>
          <table:table-cell table:style-name="ce15" office:value-type="string" calcext:value-type="string">
            <text:p>GREENS Wheatgrass (Triticum aestivuum)</text:p>
          </table:table-cell>
          <table:table-cell table:style-name="ce15" office:value-type="string" calcext:value-type="string">
            <text:p>Liquid Sunshine</text:p>
          </table:table-cell>
          <table:table-cell table:style-name="ce14" office:value-type="string" calcext:value-type="string">
            <text:p>Botanical Interest, Inc</text:p>
          </table:table-cell>
          <table:table-cell table:style-name="ce15" office:value-type="string" calcext:value-type="string">
            <text:p>To hasten germination, soak seed in water for 12-24 hours. Sow in shallow trays or flats filled 1”-2” deep with fine, seed-starting mix. Broadcast seed thickly, about 1/4” apart. Press seeds firmly into soil mix and cover about 1/8” with sowing mix. Move containers as need for best light exposure. Matures 10-15 days. Greens can be juiced for essential vitamins and mineral.</text:p>
          </table:table-cell>
          <table:table-cell table:style-name="ce15"/>
          <table:table-cell table:style-name="ce15" office:value-type="string" calcext:value-type="string">
            <text:p>25+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2">
          <table:table-cell office:value-type="float" office:value="1194" calcext:value-type="float">
            <text:p>1194</text:p>
          </table:table-cell>
          <table:table-cell table:style-name="ce15" office:value-type="string" calcext:value-type="string">
            <text:p>EGGPLANT (Solanum melongena)</text:p>
          </table:table-cell>
          <table:table-cell table:style-name="ce15" office:value-type="string" calcext:value-type="string">
            <text:p>Listada de Gandia</text:p>
          </table:table-cell>
          <table:table-cell table:style-name="ce15"/>
          <table:table-cell table:style-name="ce15" office:value-type="string" calcext:value-type="string">
            <text:p>Start indoors 8-10 weeks before last average frost or direct sow after frost. Sow seeds 1/2” deep after last frost. Transplant 2436” apart. Full sun. Best when harvested at peak; skin is tender no need to peel. 6”-8” oval eggplants that thrive on heat. 75-90 days to mature from transplan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10-20 days</text:p>
          </table:table-cell>
          <table:table-cell/>
          <table:table-cell table:style-name="ce6" table:number-columns-repeated="16366"/>
        </table:table-row>
        <table:table-row table:style-name="ro2">
          <table:table-cell office:value-type="float" office:value="1551" calcext:value-type="float">
            <text:p>1551</text:p>
          </table:table-cell>
          <table:table-cell table:style-name="ce15" office:value-type="string" calcext:value-type="string">
            <text:p>PEA Shell (Pisum sativum)</text:p>
          </table:table-cell>
          <table:table-cell table:style-name="ce15" office:value-type="string" calcext:value-type="string">
            <text:p>Little Marvel</text:p>
          </table:table-cell>
          <table:table-cell table:style-name="ce15" office:value-type="string" calcext:value-type="string">
            <text:p>Lilly Miller Seeds</text:p>
          </table:table-cell>
          <table:table-cell table:style-name="ce15" office:value-type="string" calcext:value-type="string">
            <text:p>Direct sow outdoors; young plants can tolerate a light frost. <text:s/>Plant 1” deep, 4-6” apart. Trellis. Keep weed free. <text:s/>Pick when seeds have enlarged in pod; hold vines when picking to prevent damage to vine. Sweet, dependable, dwarf vines (14”); 3” pods, 63 days. <text:s/>Easy to grow; freeze well. Soil Temp Range: 40°-85° Optimum: 75°</text:p>
          </table:table-cell>
          <table:table-cell table:style-name="ce15"/>
          <table:table-cell table:style-name="ce15" office:value-type="string" calcext:value-type="string">
            <text:p>8+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7-10 days</text:p>
          </table:table-cell>
          <table:table-cell/>
          <table:table-cell table:style-name="ce6" table:number-columns-repeated="16366"/>
        </table:table-row>
        <table:table-row table:style-name="ro4">
          <table:table-cell office:value-type="float" office:value="1361" calcext:value-type="float">
            <text:p>1361</text:p>
          </table:table-cell>
          <table:table-cell table:style-name="ce15" office:value-type="string" calcext:value-type="string">
            <text:p>FLOWER Sweet Pea (Lathyrus odoratus)</text:p>
          </table:table-cell>
          <table:table-cell table:style-name="ce15" office:value-type="string" calcext:value-type="string">
            <text:p>Little Sweetheart (Dwarf Bush)</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Great for hanging baskets, window boxes or other containers.</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647" calcext:value-type="float">
            <text:p>1647</text:p>
          </table:table-cell>
          <table:table-cell table:style-name="ce14" office:value-type="string" calcext:value-type="string">
            <text:p>SPINACH (Spinacia oleracea)</text:p>
          </table:table-cell>
          <table:table-cell table:style-name="ce14" office:value-type="string" calcext:value-type="string">
            <text:p>LIZARD</text:p>
          </table:table-cell>
          <table:table-cell table:style-name="ce14" office:value-type="string" calcext:value-type="string">
            <text:p>Rijk Zwaan</text:p>
          </table:table-cell>
          <table:table-cell table:style-name="ce14" office:value-type="string" calcext:value-type="string">
            <text:p>Good for babyleaf. <text:s/>Fast growing. Direct sow in early spring &amp; late summer, 1/2” deep, thin to 2” apart, rows 12” apart. Days to mature, 30.</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table-cell table:style-name="ce14" office:value-type="string" calcext:value-type="string">
            <text:p>3-7 days</text:p>
          </table:table-cell>
          <table:table-cell/>
          <table:table-cell table:style-name="ce6" table:number-columns-repeated="16366"/>
        </table:table-row>
        <table:table-row table:style-name="ro11">
          <table:table-cell office:value-type="float" office:value="1141" calcext:value-type="float">
            <text:p>1141</text:p>
          </table:table-cell>
          <table:table-cell table:style-name="ce15" office:value-type="string" calcext:value-type="string">
            <text:p>CARROT (Daucus carota)</text:p>
          </table:table-cell>
          <table:table-cell table:style-name="ce15" office:value-type="string" calcext:value-type="string">
            <text:p>Long Impersonator</text:p>
          </table:table-cell>
          <table:table-cell table:style-name="ce15"/>
          <table:table-cell table:style-name="ce15" office:value-type="string" calcext:value-type="string">
            <text:p>Plant 1/4” deep, thin to 3”. Pick when tops of roots are 3/4-1 inch in diameter.</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8 to 12 days</text:p>
          </table:table-cell>
          <table:table-cell/>
          <table:table-cell table:style-name="ce6" table:number-columns-repeated="16366"/>
        </table:table-row>
        <table:table-row table:style-name="ro4">
          <table:table-cell office:value-type="float" office:value="1123" calcext:value-type="float">
            <text:p>1123</text:p>
          </table:table-cell>
          <table:table-cell table:style-name="ce15" office:value-type="string" calcext:value-type="string">
            <text:p>BRUSSELS SPROUTS (Brassica oleracea var. gemmifera)</text:p>
          </table:table-cell>
          <table:table-cell table:style-name="ce15" office:value-type="string" calcext:value-type="string">
            <text:p>Long Island Improved</text:p>
          </table:table-cell>
          <table:table-cell table:style-name="ce14" office:value-type="string" calcext:value-type="string">
            <text:p>Botanical Interest, Inc</text:p>
          </table:table-cell>
          <table:table-cell table:style-name="ce15" office:value-type="string" calcext:value-type="string">
            <text:p>Sow indoors or directly into soil. <text:s/>Plant 1/4” under soil surface, 24 inches between plants. Full sun. Heads will grow on main stem right above leaf. Harvest when heads are about 1-2 inches and feels firm to the touch. Mature 85-110 day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3">
          <table:table-cell office:value-type="float" office:value="1436" calcext:value-type="float">
            <text:p>1436</text:p>
          </table:table-cell>
          <table:table-cell table:style-name="ce14" office:value-type="string" calcext:value-type="string">
            <text:p>HERB Dill (Anethum graveolens)</text:p>
          </table:table-cell>
          <table:table-cell table:style-name="ce14" office:value-type="string" calcext:value-type="string">
            <text:p>Long Island Mammoth</text:p>
          </table:table-cell>
          <table:table-cell table:style-name="ce14" office:value-type="string" calcext:value-type="string">
            <text:p>Seeds of Change</text:p>
          </table:table-cell>
          <table:table-cell table:style-name="ce14" office:value-type="string" calcext:value-type="string">
            <text:p>Large fragrant heads and abundant seeds. Great for pickling and fresh use. <text:s/>Direct sow 1/2” deep; thin to 4” apart; full sun; shelter from wind; will readily volunteer each year by dropping seed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20-25 days Harvest</text:p>
          </table:table-cell>
          <table:table-cell/>
          <table:table-cell table:style-name="ce6" table:number-columns-repeated="16366"/>
        </table:table-row>
        <table:table-row table:style-name="ro2">
          <table:table-cell office:value-type="float" office:value="1193" calcext:value-type="float">
            <text:p>1193</text:p>
          </table:table-cell>
          <table:table-cell table:style-name="ce14" office:value-type="string" calcext:value-type="string">
            <text:p>EGGPLANT (Solanum melongena)</text:p>
          </table:table-cell>
          <table:table-cell table:style-name="ce14" office:value-type="string" calcext:value-type="string">
            <text:p>Long Purple</text:p>
          </table:table-cell>
          <table:table-cell table:style-name="ce14" office:value-type="string" calcext:value-type="string">
            <text:p>Botanical Interest, Inc</text:p>
          </table:table-cell>
          <table:table-cell table:style-name="ce14" office:value-type="string" calcext:value-type="string">
            <text:p>Start indoors 10-12 weeks before last average frost or direct sow after frost. Sow seeds 1/4” deep. Transplant 36” apart. Full sun. Best when harvested at peak; skin is tender no need to peel. 6”-8” oval eggplants that thrive on heat. 75-90 days to mature from transplant. Milder more delicate flavo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20 days</text:p>
          </table:table-cell>
          <table:table-cell/>
          <table:table-cell table:style-name="ce6" table:number-columns-repeated="16366"/>
        </table:table-row>
        <table:table-row table:style-name="ro9">
          <table:table-cell office:value-type="float" office:value="1392" calcext:value-type="float">
            <text:p>1392</text:p>
          </table:table-cell>
          <table:table-cell table:style-name="ce14" office:value-type="string" calcext:value-type="string">
            <text:p>GOURD LUFFA (Luffa aegytiaca)</text:p>
          </table:table-cell>
          <table:table-cell table:style-name="ce14" office:value-type="string" calcext:value-type="string">
            <text:p>Luffa</text:p>
          </table:table-cell>
          <table:table-cell table:style-name="ce15" office:value-type="string" calcext:value-type="string">
            <text:p>BJ Searcy, CCMGA Master Gardener, Whetstone</text:p>
          </table:table-cell>
          <table:table-cell table:style-name="ce14" office:value-type="string" calcext:value-type="string">
            <text:p>Direct sow or start indoors; seeds may take 10- 20 days to germinate; long climbing vine needs lots of room and it is recommended to grow on a fence or trellis. Plant in direct sunight 1” deep on hills of well drained dirt with 4 plants each. Water daily if possible. Small young fruit can be eaten as a summer squash. Fruits can be up to 24 inches long and should mature on plant until dry then peel to reveal sponge.</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J Searcy, Master Gardener</text:p>
          </table:table-cell>
          <table:table-cell table:style-name="ce28" office:value-type="string" calcext:value-type="string">
            <text:p>2022</text:p>
          </table:table-cell>
          <table:table-cell table:style-name="ce14"/>
          <table:table-cell table:style-name="ce14" office:value-type="string" calcext:value-type="string">
            <text:p>Slow</text:p>
          </table:table-cell>
          <table:table-cell/>
          <table:table-cell table:style-name="ce6" table:number-columns-repeated="16366"/>
        </table:table-row>
        <table:table-row table:style-name="ro4">
          <table:table-cell office:value-type="float" office:value="1617" calcext:value-type="float">
            <text:p>1617</text:p>
          </table:table-cell>
          <table:table-cell table:style-name="ce14" office:value-type="string" calcext:value-type="string">
            <text:p>PUMPKIN (Cucurbita maxima)</text:p>
          </table:table-cell>
          <table:table-cell table:style-name="ce14" office:value-type="string" calcext:value-type="string">
            <text:p>Lumina (White Pumpkin)</text:p>
          </table:table-cell>
          <table:table-cell table:style-name="ce14" office:value-type="string" calcext:value-type="string">
            <text:p>Botanical Interest, Inc</text:p>
          </table:table-cell>
          <table:table-cell table:style-name="ce14" office:value-type="string" calcext:value-type="string">
            <text:p>Direct sow outdoors 1”deep. Make mounds 4-6 feet apart; <text:s/>1 healthy plant per mound. Tolerates heat and humidity. Full sun; 90 days. Large, smooth, deeply ridged and good for eating, painting or carving.</text:p>
          </table:table-cell>
          <table:table-cell table:style-name="ce14" table:number-columns-repeated="3"/>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table-cell table:style-name="ce6" table:number-columns-repeated="16366"/>
        </table:table-row>
        <table:table-row table:style-name="ro4">
          <table:table-cell office:value-type="float" office:value="1401" calcext:value-type="float">
            <text:p>1401</text:p>
          </table:table-cell>
          <table:table-cell table:style-name="ce14" office:value-type="string" calcext:value-type="string">
            <text:p>GREENS (Valerianella locusta)</text:p>
          </table:table-cell>
          <table:table-cell table:style-name="ce14" office:value-type="string" calcext:value-type="string">
            <text:p>Mache, Corn Salad</text:p>
          </table:table-cell>
          <table:table-cell table:style-name="ce14" office:value-type="string" calcext:value-type="string">
            <text:p>Botanical Interest, Inc</text:p>
          </table:table-cell>
          <table:table-cell table:style-name="ce14" office:value-type="string" calcext:value-type="string">
            <text:p>Direct sow 1/4” deep about 3 seeds every 4”.Thin to 1 every 4”. Delightful eaten alone as a salad, mixed with other greens or cooked like spinach. Tolerant of heat without bitterness and cold/freeze tolerant.</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11">
          <table:table-cell office:value-type="float" office:value="1273" calcext:value-type="float">
            <text:p>1273</text:p>
          </table:table-cell>
          <table:table-cell table:style-name="ce14" office:value-type="string" calcext:value-type="string">
            <text:p>FLOWER Flower Mix (Assorted species)</text:p>
          </table:table-cell>
          <table:table-cell table:style-name="ce14" office:value-type="string" calcext:value-type="string">
            <text:p>Made in the Shade</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bout 20 seeds per square foot and rake in.</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2">
          <table:table-cell office:value-type="float" office:value="1661" calcext:value-type="float">
            <text:p>1661</text:p>
          </table:table-cell>
          <table:table-cell table:style-name="ce15" office:value-type="string" calcext:value-type="string">
            <text:p>SQUASH (Cucubirta moschata)</text:p>
          </table:table-cell>
          <table:table-cell table:style-name="ce15" office:value-type="string" calcext:value-type="string">
            <text:p>Magdalena Big Cheese</text:p>
          </table:table-cell>
          <table:table-cell table:style-name="ce23" office:value-type="string" calcext:value-type="string">
            <text:p>Native Seed/SEARCH <text:s/>www.nativeseeds.org</text:p>
          </table:table-cell>
          <table:table-cell table:style-name="ce15" office:value-type="string" calcext:value-type="string">
            <text:p>Direct sow outdoors 2-3 seeds 1”deep, 3-4 feet apart; thin to 1 healthy plant. <text:s/>Full sun; 75-90 days; Large, pale orange, ribbed squashes, with a pumpkin shape and wonderful sweet brilliant orange flesh. Draught tolerant and prolific producer if only watered when very dry.</text:p>
          </table:table-cell>
          <table:table-cell table:style-name="ce15"/>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3">
          <table:table-cell office:value-type="float" office:value="1339" calcext:value-type="float">
            <text:p>1339</text:p>
          </table:table-cell>
          <table:table-cell table:style-name="ce14" office:value-type="string" calcext:value-type="string">
            <text:p>FLOWER Snapdragon (Antirrhinum majus)</text:p>
          </table:table-cell>
          <table:table-cell table:style-name="ce14" office:value-type="string" calcext:value-type="string">
            <text:p>Magic Carpet Blend</text:p>
          </table:table-cell>
          <table:table-cell table:style-name="ce14" office:value-type="string" calcext:value-type="string">
            <text:p>Botanical Interest, Inc</text:p>
          </table:table-cell>
          <table:table-cell table:style-name="ce14" office:value-type="string" calcext:value-type="string">
            <text:p>Sow outside late summer to early fall. Light aids germination. Press seeds into soil surface. Space 6” apart. Attracts pollinators. Deer resistant.</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2">
          <table:table-cell office:value-type="float" office:value="1318" calcext:value-type="float">
            <text:p>1318</text:p>
          </table:table-cell>
          <table:table-cell table:style-name="ce15" office:value-type="string" calcext:value-type="string">
            <text:p>FLOWER Nasturtium (Tropaeolum majus)</text:p>
          </table:table-cell>
          <table:table-cell table:style-name="ce15" office:value-type="string" calcext:value-type="string">
            <text:p>Mahogany</text:p>
          </table:table-cell>
          <table:table-cell table:style-name="ce14" office:value-type="string" calcext:value-type="string">
            <text:p>Botanical Interest, Inc</text:p>
          </table:table-cell>
          <table:table-cell table:style-name="ce15" office:value-type="string" calcext:value-type="string">
            <text:p>Soak seed in water for 12 to 24 hours before sowing. Sow outside 1 to 2 weeks after average last frost date. Plant 1/2” to 1” deep. Space 8” to 12” apart. Deters garden pests while attracting pollinators. Deer and rabbit resistant. Blossoms have a peppery taste and leaves can also be eaten.</text:p>
          </table:table-cell>
          <table:table-cell table:style-name="ce15" table:number-columns-repeated="3"/>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652" calcext:value-type="float">
            <text:p>1652</text:p>
          </table:table-cell>
          <table:table-cell table:style-name="ce15" office:value-type="string" calcext:value-type="string">
            <text:p>SPINACH (Spinacia oleracea)</text:p>
          </table:table-cell>
          <table:table-cell table:style-name="ce15" office:value-type="string" calcext:value-type="string">
            <text:p>Malabar (Red Stem)</text:p>
          </table:table-cell>
          <table:table-cell table:style-name="ce15"/>
          <table:table-cell table:style-name="ce15" office:value-type="string" calcext:value-type="string">
            <text:p>Red veined with tender smooth leaves. Makes an excellent baby leaf spinach. Direct sow in early spring &amp; late summer, 1/2” deep, thin to 2-4” apart, rows 12” apart. Days to mature, 30.</text:p>
          </table:table-cell>
          <table:table-cell table:style-name="ce15"/>
          <table:table-cell table:style-name="ce15" office:value-type="string" calcext:value-type="string">
            <text:p>10-1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4-9 days</text:p>
          </table:table-cell>
          <table:table-cell/>
          <table:table-cell table:style-name="ce6" table:number-columns-repeated="16366"/>
        </table:table-row>
        <table:table-row table:style-name="ro2">
          <table:table-cell office:value-type="float" office:value="1592" calcext:value-type="float">
            <text:p>1592</text:p>
          </table:table-cell>
          <table:table-cell table:style-name="ce15" office:value-type="string" calcext:value-type="string">
            <text:p>PEPPER CHILE (Capsicum annuum)</text:p>
          </table:table-cell>
          <table:table-cell table:style-name="ce15" office:value-type="string" calcext:value-type="string">
            <text:p>Mama Mia Red Chili</text:p>
          </table:table-cell>
          <table:table-cell table:style-name="ce15"/>
          <table:table-cell table:style-name="ce15" office:value-type="string" calcext:value-type="string">
            <text:p>Hybrid, red Italian roasting pepper. Sweet flavor and thick walls. Start indoors barely covering seeds in loose, rich soil 8-10 weeks before last frost. <text:s/>Slow to germinate; need warmth; move to sunny window or grow light after sprouting. In ground, plant 12-16” apart in full sun.</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table-cell table:style-name="ce6" table:number-columns-repeated="16366"/>
        </table:table-row>
        <table:table-row table:style-name="ro4">
          <table:table-cell office:value-type="float" office:value="1351" calcext:value-type="float">
            <text:p>1351</text:p>
          </table:table-cell>
          <table:table-cell table:style-name="ce14" office:value-type="string" calcext:value-type="string">
            <text:p>FLOWER Sunflower (Helianthus annuus)</text:p>
          </table:table-cell>
          <table:table-cell table:style-name="ce15" office:value-type="string" calcext:value-type="string">
            <text:p>Mammoth</text:p>
          </table:table-cell>
          <table:table-cell table:style-name="ce14" office:value-type="string" calcext:value-type="string">
            <text:p>Ferry Morse</text:p>
          </table:table-cell>
          <table:table-cell table:style-name="ce14" office:value-type="string" calcext:value-type="string">
            <text:p>Large blooms with large seeds for roasting. Plants can grow up p to 7’-12’ tall. <text:s/>Direct sow (sunflowers do not transplant well) after last frost, 1 inch deep, thin to 18”-24” inches apart. Because of the size, needs lots of water.</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14-21 days</text:p>
          </table:table-cell>
          <table:table-cell/>
          <table:table-cell table:style-name="ce6" table:number-columns-repeated="16366"/>
        </table:table-row>
        <table:table-row table:style-name="ro2">
          <table:table-cell office:value-type="float" office:value="1628" calcext:value-type="float">
            <text:p>1628</text:p>
          </table:table-cell>
          <table:table-cell table:style-name="ce14" office:value-type="string" calcext:value-type="string">
            <text:p>RADISH (Raphanus sativus)</text:p>
          </table:table-cell>
          <table:table-cell table:style-name="ce14" office:value-type="string" calcext:value-type="string">
            <text:p>Mantanghong</text:p>
          </table:table-cell>
          <table:table-cell table:style-name="ce14" office:value-type="string" calcext:value-type="string">
            <text:p>Botanical Interest, Inc</text:p>
          </table:table-cell>
          <table:table-cell table:style-name="ce14" office:value-type="string" calcext:value-type="string">
            <text:p>Direct sow 8-10 weeks before first frost. Plant every 10 days until temperatures are too cold (below 40). 1/2” deep, plant 5” apart (or closer and thin later), rows 10-12” apart. <text:s/>65 days. Produces 3” round mild radish that can weigh up to 1 lb. Greenish white exterior with fuchsia interior. Can be eaten raw, cooked or pickled.</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3">
          <table:table-cell office:value-type="float" office:value="1301" calcext:value-type="float">
            <text:p>1301</text:p>
          </table:table-cell>
          <table:table-cell table:style-name="ce15" office:value-type="string" calcext:value-type="string">
            <text:p>FLOWER Marigold (Baileyaiata multira)</text:p>
          </table:table-cell>
          <table:table-cell table:style-name="ce15" office:value-type="string" calcext:value-type="string">
            <text:p>Marigold</text:p>
          </table:table-cell>
          <table:table-cell table:style-name="ce23" office:value-type="string" calcext:value-type="string">
            <text:p>Native Seed/SEARCH <text:s/>www.nativeseeds.org</text:p>
          </table:table-cell>
          <table:table-cell table:style-name="ce15" office:value-type="string" calcext:value-type="string">
            <text:p>Tightly packed, heavily curled petals. Start indoors 3-4 weeks before setting out after frost using fine, moist soil, covering lightly. <text:s/>Plant one foot apart in full sun.</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2">
          <table:table-cell office:value-type="float" office:value="1305" calcext:value-type="float">
            <text:p>1305</text:p>
          </table:table-cell>
          <table:table-cell table:style-name="ce15" office:value-type="string" calcext:value-type="string">
            <text:p>FLOWER Marigold (Tagetes erecta)</text:p>
          </table:table-cell>
          <table:table-cell table:style-name="ce14" office:value-type="string" calcext:value-type="string">
            <text:p>Marigold—Cupid Mix</text:p>
          </table:table-cell>
          <table:table-cell table:style-name="ce14" office:value-type="string" calcext:value-type="string">
            <text:p>Baker Creek Heirloom Seeds</text:p>
          </table:table-cell>
          <table:table-cell table:style-name="ce14" office:value-type="string" calcext:value-type="string">
            <text:p>Most adorable little African marigold for bedding (seldom exceeding 14 inches) smothered in deep golden, soft yellow, and tangerine orange blooms. <text:s/>Tightly packed, heavily curled petals. <text:s/>Start indoors 3-4 weeks before setting out after frost using fine, moist soil, covering lightly. Plant one foot apart in full sun.</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3">
          <table:table-cell office:value-type="float" office:value="1309" calcext:value-type="float">
            <text:p>1309</text:p>
          </table:table-cell>
          <table:table-cell table:style-name="ce15" office:value-type="string" calcext:value-type="string">
            <text:p>FLOWER Marigold (Tagetes erecta)</text:p>
          </table:table-cell>
          <table:table-cell table:style-name="ce15" office:value-type="string" calcext:value-type="string">
            <text:p>Marigold—French Cancan</text:p>
          </table:table-cell>
          <table:table-cell table:style-name="ce15"/>
          <table:table-cell table:style-name="ce15" office:value-type="string" calcext:value-type="string">
            <text:p>Compact plants with sunny yellow flowers. <text:s/>Plant in fine, moist soil, covering lightly with 1/4” soil. <text:s/>Plant 6” apart in full sun. Fairly drought tolerant once established. Deer and rabbit resistant.</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276" calcext:value-type="float">
            <text:p>1276</text:p>
          </table:table-cell>
          <table:table-cell table:style-name="ce15" office:value-type="string" calcext:value-type="string">
            <text:p>FLOWER Heliotrope (Heliotropium arborescens)</text:p>
          </table:table-cell>
          <table:table-cell table:style-name="ce15" office:value-type="string" calcext:value-type="string">
            <text:p>Marine</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Space 12” apart. Attracts pollinators. Very fragrant and can be grown in window boxes. In hot summers, plants appreciate afternoon shade.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4">
          <table:table-cell office:value-type="float" office:value="1734" calcext:value-type="float">
            <text:p>1734</text:p>
          </table:table-cell>
          <table:table-cell table:style-name="ce15" office:value-type="string" calcext:value-type="string">
            <text:p>TURNIP (Brassica rapa)</text:p>
          </table:table-cell>
          <table:table-cell table:style-name="ce15" office:value-type="string" calcext:value-type="string">
            <text:p>Market Express</text:p>
          </table:table-cell>
          <table:table-cell table:style-name="ce14" office:value-type="string" calcext:value-type="string">
            <text:p>Botanical Interest, Inc</text:p>
          </table:table-cell>
          <table:table-cell table:style-name="ce15" office:value-type="string" calcext:value-type="string">
            <text:p>Plant 2-4 weeks before last frost and fall for cool season harvest. Sow 1/4” deep, 4”-6” apart with rows 18” apart. 30-40 days. Pure white and mild, great baby turnip in salads, pickling and traditional turnip dishes. Greens are also edible.</text:p>
          </table:table-cell>
          <table:table-cell table:style-name="ce15"/>
          <table:table-cell table:style-name="ce15" office:value-type="string" calcext:value-type="string">
            <text:p>15-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3">
          <table:table-cell office:value-type="float" office:value="1184" calcext:value-type="float">
            <text:p>1184</text:p>
          </table:table-cell>
          <table:table-cell table:style-name="ce15" office:value-type="string" calcext:value-type="string">
            <text:p>CUCUMBER (Cucumis sativus)</text:p>
          </table:table-cell>
          <table:table-cell table:style-name="ce15" office:value-type="string" calcext:value-type="string">
            <text:p>Marketmore 76</text:p>
          </table:table-cell>
          <table:table-cell table:style-name="ce14" office:value-type="string" calcext:value-type="string">
            <text:p>Ferry Morse</text:p>
          </table:table-cell>
          <table:table-cell table:style-name="ce15" office:value-type="string" calcext:value-type="string">
            <text:p>Direct sow outside after danger of frost. Plant 1/2” deep with 2-3 seeds per hill, 24” apart if sprawling, 4” apart if trellising. <text:s/>Full sun; 6o days. Fruit 6”-8” long. Good for slicing.</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6 days</text:p>
          </table:table-cell>
          <table:table-cell/>
          <table:table-cell table:style-name="ce6" table:number-columns-repeated="16366"/>
        </table:table-row>
        <table:table-row table:style-name="ro8">
          <table:table-cell office:value-type="float" office:value="1033" calcext:value-type="float">
            <text:p>1033</text:p>
          </table:table-cell>
          <table:table-cell table:style-name="ce15" office:value-type="string" calcext:value-type="string">
            <text:p>ASPARAGUS (Asparagus officinalis)</text:p>
          </table:table-cell>
          <table:table-cell table:style-name="ce15" office:value-type="string" calcext:value-type="string">
            <text:p>Mary Washington</text:p>
          </table:table-cell>
          <table:table-cell table:style-name="ce14" office:value-type="string" calcext:value-type="string">
            <text:p>Ferry Morse</text:p>
          </table:table-cell>
          <table:table-cell table:style-name="ce15" office:value-type="string" calcext:value-type="string">
            <text:p>Perennial to 4 feet. Sow seeds indoors in very early spring. <text:s/>First soak for several hours and plant 1/2 inch deep. Transplant as needed to give room to grow for one year. In their final placement, asparagus need as much as 3-4 feet spacing in rich organic soil with ample moisture. <text:s/>Mulch at planting, but don’t bury the seedlings; mulch heavily the second fall. <text:s/>A few spears may be harvested the third year if plants are vigorous, and more in subsequent years.</text:p>
          </table:table-cell>
          <table:table-cell table:style-name="ce15"/>
          <table:table-cell table:style-name="ce15" office:value-type="string" calcext:value-type="string">
            <text:p>6+ Seeds pelleted</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11">
          <table:table-cell office:value-type="float" office:value="1644" calcext:value-type="float">
            <text:p>1644</text:p>
          </table:table-cell>
          <table:table-cell table:style-name="ce14" office:value-type="string" calcext:value-type="string">
            <text:p>SPINACH (Spinacia oleracea)</text:p>
          </table:table-cell>
          <table:table-cell table:style-name="ce14" office:value-type="string" calcext:value-type="string">
            <text:p>Matador</text:p>
          </table:table-cell>
          <table:table-cell table:style-name="ce14" office:value-type="string" calcext:value-type="string">
            <text:p>Botanical Interest, Inc</text:p>
          </table:table-cell>
          <table:table-cell table:style-name="ce14" office:value-type="string" calcext:value-type="string">
            <text:p>Direct sow in early spring &amp; late summer, 1/2” deep, thin to 3-6” apart, rows 12” apart. Loves cool weather; will bolt in summer heat.</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6 days</text:p>
          </table:table-cell>
          <table:table-cell/>
          <table:table-cell table:style-name="ce6" table:number-columns-repeated="16366"/>
        </table:table-row>
        <table:table-row table:style-name="ro4">
          <table:table-cell office:value-type="float" office:value="1680" calcext:value-type="float">
            <text:p>1680</text:p>
          </table:table-cell>
          <table:table-cell table:style-name="ce15" office:value-type="string" calcext:value-type="string">
            <text:p>SQUASH Summer (Cucubirta pepo)</text:p>
          </table:table-cell>
          <table:table-cell table:style-name="ce15" office:value-type="string" calcext:value-type="string">
            <text:p>Max’s Gold</text:p>
          </table:table-cell>
          <table:table-cell table:style-name="ce14" office:value-type="string" calcext:value-type="string">
            <text:p>Botanical Interest, Inc</text:p>
          </table:table-cell>
          <table:table-cell table:style-name="ce15" office:value-type="string" calcext:value-type="string">
            <text:p>Plant outdoors1-2 weeks after last frost. Sow 2-3 seeds 1/2”-1”deep, on mounds spaced 3-4 feet apart; thin to 1 healthy plant. Pick regularly to encourage fruit development. <text:s/>Will cross with other squash. <text:s/>55 days. Long straight fruit with small seed cavity.</text:p>
          </table:table-cell>
          <table:table-cell table:style-name="ce15" table:number-columns-repeated="2"/>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4">
          <table:table-cell office:value-type="float" office:value="1253" calcext:value-type="float">
            <text:p>1253</text:p>
          </table:table-cell>
          <table:table-cell table:style-name="ce15" office:value-type="string" calcext:value-type="string">
            <text:p>FLOWER Columbine (Aquilegia cultorum)</text:p>
          </table:table-cell>
          <table:table-cell table:style-name="ce15" office:value-type="string" calcext:value-type="string">
            <text:p>McKana Giants</text:p>
          </table:table-cell>
          <table:table-cell table:style-name="ce14" office:value-type="string" calcext:value-type="string">
            <text:p>Botanical Interest, Inc</text:p>
          </table:table-cell>
          <table:table-cell table:style-name="ce15" office:value-type="string" calcext:value-type="string">
            <text:p>Benefits from stratification, a cold moist period before planting. Sow outside 4 to 6 weeks before average last frost or until 8 weeks before first frost. Light aids germination. Press seed lightly into soil surface and keep moist. Space 12” apart. Lasts well as a cut flower.</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523" calcext:value-type="float">
            <text:p>1523</text:p>
          </table:table-cell>
          <table:table-cell table:style-name="ce14" office:value-type="string" calcext:value-type="string">
            <text:p>Microgreens (Brassica, assorted species)</text:p>
          </table:table-cell>
          <table:table-cell table:style-name="ce14" office:value-type="string" calcext:value-type="string">
            <text:p>Mellow Blend</text:p>
          </table:table-cell>
          <table:table-cell table:style-name="ce14" office:value-type="string" calcext:value-type="string">
            <text:p>Botanical Interest, Inc</text:p>
          </table:table-cell>
          <table:table-cell table:style-name="ce14" office:value-type="string" calcext:value-type="string">
            <text:p>Sow in shallow trays or flats with 1”-2” of fine seed starting mix. Broadcast seed thickly, about 1/8”-1/4” apart. Press seeds firmly into soil mix and cover lightly with sowing mix, vermiculite or dome.</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642" calcext:value-type="float">
            <text:p>1642</text:p>
          </table:table-cell>
          <table:table-cell table:style-name="ce15" office:value-type="string" calcext:value-type="string">
            <text:p>SPINACH (Spinacia oleracea)</text:p>
          </table:table-cell>
          <table:table-cell table:style-name="ce15" office:value-type="string" calcext:value-type="string">
            <text:p>Merlo Nero</text:p>
          </table:table-cell>
          <table:table-cell table:style-name="ce14" office:value-type="string" calcext:value-type="string">
            <text:p>Baker Creek Heirloom Seeds</text:p>
          </table:table-cell>
          <table:table-cell table:style-name="ce15" office:value-type="string" calcext:value-type="string">
            <text:p><text:s/>Rare in U.S. Fine flavored Italian spinach. <text:s/>Direct sow in early spring &amp; late summer, 1/2” deep, thin to 3-6” apart, rows 12” apart. Loves cool weather; will bolt in summer heat. Needs rich, moist soil to thrive Soil Temp Range: 35°-85° Optimum: 7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35°-85° Optimum: 70°</text:p>
          </table:table-cell>
          <table:table-cell table:style-name="ce15" office:value-type="string" calcext:value-type="string">
            <text:p>5-6 days</text:p>
          </table:table-cell>
          <table:table-cell/>
          <table:table-cell table:style-name="ce6" table:number-columns-repeated="16366"/>
        </table:table-row>
        <table:table-row table:style-name="ro2">
          <table:table-cell office:value-type="float" office:value="1465" calcext:value-type="float">
            <text:p>1465</text:p>
          </table:table-cell>
          <table:table-cell table:style-name="ce15" office:value-type="string" calcext:value-type="string">
            <text:p>HERB Tarragon (Artemesia dracunculoides)</text:p>
          </table:table-cell>
          <table:table-cell table:style-name="ce15" office:value-type="string" calcext:value-type="string">
            <text:p>Mexican</text:p>
          </table:table-cell>
          <table:table-cell table:style-name="ce14" office:value-type="string" calcext:value-type="string">
            <text:p>Botanical Interest, Inc</text:p>
          </table:table-cell>
          <table:table-cell table:style-name="ce15" office:value-type="string" calcext:value-type="string">
            <text:p>Plant early spring indoors, barely <text:s/>covering. Keep warm and in low light until sprouted. Transplant outdoors after last frost. It can thrive in poor soil and is drought tolerant. Both leaves and flowers are edible. Most insects are repelled by the aroma so it makes a good companion plant. Harvest in the morning.</text:p>
          </table:table-cell>
          <table:table-cell table:style-name="ce15"/>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11">
          <table:table-cell office:value-type="float" office:value="1156" calcext:value-type="float">
            <text:p>1156</text:p>
          </table:table-cell>
          <table:table-cell table:style-name="ce14" office:value-type="string" calcext:value-type="string">
            <text:p>CORN, ANCIENT (Zea mays parvaglumis)</text:p>
          </table:table-cell>
          <table:table-cell table:style-name="ce14" office:value-type="string" calcext:value-type="string">
            <text:p>Mexican Annual Teosinte</text:p>
          </table:table-cell>
          <table:table-cell table:style-name="ce14" office:value-type="string" calcext:value-type="string">
            <text:p>Native Seed/SEARCH <text:s/>www.nativeseeds.org</text:p>
          </table:table-cell>
          <table:table-cell table:style-name="ce14" office:value-type="string" calcext:value-type="string">
            <text:p>Plant in spring 1” deep in rows or basin. <text:s/>Needs rich soil and moisture.</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4">
          <table:table-cell office:value-type="float" office:value="1008" calcext:value-type="float">
            <text:p>1008</text:p>
          </table:table-cell>
          <table:table-cell table:style-name="ce15" office:value-type="string" calcext:value-type="string">
            <text:p>AMARANTH (Amaranthus cruentus)</text:p>
          </table:table-cell>
          <table:table-cell table:style-name="ce15" office:value-type="string" calcext:value-type="string">
            <text:p>Mexican Grain</text:p>
          </table:table-cell>
          <table:table-cell table:style-name="ce15"/>
          <table:table-cell table:style-name="ce15" office:value-type="string" calcext:value-type="string">
            <text:p>Blond seeds are edible and rich in lysine, and young leaves are rich in iron and calcium. Plant in warm soil or with summer rains 1/4” deep in basins or rows. Thin to 10-15” apart. Grows taller if soil is enriched with compost. Likes full sun.</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table-cell table:style-name="ce6" table:number-columns-repeated="16366"/>
        </table:table-row>
        <table:table-row table:style-name="ro9">
          <table:table-cell office:value-type="float" office:value="1635" calcext:value-type="float">
            <text:p>1635</text:p>
          </table:table-cell>
          <table:table-cell table:style-name="ce15" office:value-type="string" calcext:value-type="string">
            <text:p>SHRUB <text:s/>(Caesalpinia pulcherrima)</text:p>
          </table:table-cell>
          <table:table-cell table:style-name="ce14" office:value-type="string" calcext:value-type="string">
            <text:p>Mexican Red Bird of Paradise</text:p>
          </table:table-cell>
          <table:table-cell table:style-name="ce15" office:value-type="string" calcext:value-type="string">
            <text:p>Ken Forrester, Master Gardener</text:p>
          </table:table-cell>
          <table:table-cell table:style-name="ce15" office:value-type="string" calcext:value-type="string">
            <text:p>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 bird of paradise prefers soil to dry between watering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4"/>
          <table:table-cell table:style-name="ce15" office:value-type="string" calcext:value-type="string">
            <text:p>Perennial</text:p>
          </table:table-cell>
          <table:table-cell table:style-name="ce15" office:value-type="string" calcext:value-type="string">
            <text:p>Ken Forrester, Master Gardenerfers soil to dry between waterings.</text:p>
          </table:table-cell>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9">
          <table:table-cell office:value-type="float" office:value="1636" calcext:value-type="float">
            <text:p>1636</text:p>
          </table:table-cell>
          <table:table-cell table:style-name="ce14" office:value-type="string" calcext:value-type="string">
            <text:p>SHRUB <text:s/>(Caesalpinia pulcherrima)</text:p>
          </table:table-cell>
          <table:table-cell table:style-name="ce14" office:value-type="string" calcext:value-type="string">
            <text:p>Mexican Red Bird of Paradise</text:p>
          </table:table-cell>
          <table:table-cell table:style-name="ce14"/>
          <table:table-cell table:style-name="ce14" office:value-type="string" calcext:value-type="string">
            <text:p>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 bird of paradise prefers soil to dry between watering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4">
          <table:table-cell office:value-type="float" office:value="1357" calcext:value-type="float">
            <text:p>1357</text:p>
          </table:table-cell>
          <table:table-cell table:style-name="ce14" office:value-type="string" calcext:value-type="string">
            <text:p>FLOWER Sunflower (Tithonia)</text:p>
          </table:table-cell>
          <table:table-cell table:style-name="ce14" office:value-type="string" calcext:value-type="string">
            <text:p>Mexican Sunflower</text:p>
          </table:table-cell>
          <table:table-cell table:style-name="ce14" office:value-type="string" calcext:value-type="string">
            <text:p>Angeles Emory, Master Gardener</text:p>
          </table:table-cell>
          <table:table-cell table:style-name="ce14" office:value-type="string" calcext:value-type="string">
            <text:p>Sow in full sun in early spring. Direct sow no more than 1/8-1/4” deep (seeds need light to germinate). Sunflowers do not transplant well. Water gently, keep moist but not waterlogged until plants start growing. Deadhead flowers to keep continuous blooming.</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4">
          <table:table-cell office:value-type="float" office:value="1512" calcext:value-type="float">
            <text:p>1512</text:p>
          </table:table-cell>
          <table:table-cell table:style-name="ce14" office:value-type="string" calcext:value-type="string">
            <text:p>MELON (Cucumis melo)</text:p>
          </table:table-cell>
          <table:table-cell table:style-name="ce14" office:value-type="string" calcext:value-type="string">
            <text:p>Mexicano</text:p>
          </table:table-cell>
          <table:table-cell table:style-name="ce14" office:value-type="string" calcext:value-type="string">
            <text:p>Native Seed/SEARCH <text:s/>www.nativeseeds.org</text:p>
          </table:table-cell>
          <table:table-cell table:style-name="ce14" office:value-type="string" calcext:value-type="string">
            <text:p>Early introduction by Spaniards to SW; fruits are orange, green, or white; skin is smooth, ribbed or netted. Plant 3-5 seeds in basin 1/2” deep 24” apart, sprawling vine. Soil Temp Range: 60°-100° Optimum: 9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0° Optimum: 90°</text:p>
          </table:table-cell>
          <table:table-cell table:style-name="ce14" office:value-type="string" calcext:value-type="string">
            <text:p>3-4 days</text:p>
          </table:table-cell>
          <table:table-cell/>
          <table:table-cell table:style-name="ce6" table:number-columns-repeated="16366"/>
        </table:table-row>
        <table:table-row table:style-name="ro3">
          <table:table-cell office:value-type="float" office:value="1739" calcext:value-type="float">
            <text:p>1739</text:p>
          </table:table-cell>
          <table:table-cell table:style-name="ce15" office:value-type="string" calcext:value-type="string">
            <text:p>WATERMELON (Citrullus lanatus)</text:p>
          </table:table-cell>
          <table:table-cell table:style-name="ce15" office:value-type="string" calcext:value-type="string">
            <text:p>Mickylee</text:p>
          </table:table-cell>
          <table:table-cell table:style-name="ce14" office:value-type="string" calcext:value-type="string">
            <text:p>Botanical Interest, Inc</text:p>
          </table:table-cell>
          <table:table-cell table:style-name="ce15" office:value-type="string" calcext:value-type="string">
            <text:p>Direct sow outside 1-2 weeks after danger of frost. Plant 1/2” deep in hills at 4-6 feet apart. Full sun; 80 days; 10 pound fruit with few small seeds. Soil Temp Range: 60– 105 Optimum: 9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office:value-type="string" calcext:value-type="string">
            <text:p>60– 105 Optimum: 95°</text:p>
          </table:table-cell>
          <table:table-cell table:style-name="ce15" office:value-type="string" calcext:value-type="string">
            <text:p>5-10 days</text:p>
          </table:table-cell>
          <table:table-cell/>
          <table:table-cell table:style-name="ce6" table:number-columns-repeated="16366"/>
        </table:table-row>
        <table:table-row table:style-name="ro3">
          <table:table-cell office:value-type="float" office:value="1290" calcext:value-type="float">
            <text:p>1290</text:p>
          </table:table-cell>
          <table:table-cell table:style-name="ce15" office:value-type="string" calcext:value-type="string">
            <text:p>FLOWER Impatiens (Impatiens walleriana hybrid)</text:p>
          </table:table-cell>
          <table:table-cell table:style-name="ce15" office:value-type="string" calcext:value-type="string">
            <text:p>Midnight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Space 12” apart. Deer resistant. Can also be grown as a housepl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3">
          <table:table-cell office:value-type="float" office:value="1212" calcext:value-type="float">
            <text:p>1212</text:p>
          </table:table-cell>
          <table:table-cell table:style-name="ce15" office:value-type="string" calcext:value-type="string">
            <text:p>FLOWER <text:s/>Poppy California (Eschscholzia californica)</text:p>
          </table:table-cell>
          <table:table-cell table:style-name="ce15" office:value-type="string" calcext:value-type="string">
            <text:p>Mikado Original Seed</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Attracts pollinators. Deer resistant. Drought and heat toler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10">
          <table:table-cell office:value-type="float" office:value="1730" calcext:value-type="float">
            <text:p>1730</text:p>
          </table:table-cell>
          <table:table-cell table:style-name="ce14" office:value-type="string" calcext:value-type="string">
            <text:p>TREE (Albizia julibrissin)</text:p>
          </table:table-cell>
          <table:table-cell table:style-name="ce14" office:value-type="string" calcext:value-type="string">
            <text:p>Mimosa</text:p>
          </table:table-cell>
          <table:table-cell table:style-name="ce14" office:value-type="string" calcext:value-type="string">
            <text:p>Mary Jackson, Master Gardener</text:p>
          </table:table-cell>
          <table:table-cell table:style-name="ce14" office:value-type="string" calcext:value-type="string">
            <text:p>Also called Silk Trees. <text:s/>Fragrant pink flowers and airy foliage. Subtropical deciduous tree. <text:s/>Attract hummingbirds, butterflies and bees. Prepare seeds after the last spring frost. Scarify (file or sand a spot on the end of the seed) then soak in hot water for 24 hours. Plant 1 in deep in a 5 in. pot filled with half sand and half loam. Spread 1/4 in of sand over soil. Set in direct sun and keep soil warm but not hot. Water to a 2 in depth when top 1/2 in is dry. Avoid under or over watering. Transplant into a permanent bed at least 6 weeks before first frost in full sun and at least 20 ft from structures and other trees. Until well established, water when dry.</text:p>
          </table:table-cell>
          <table:table-cell table:style-name="ce14" table:number-columns-repeated="5"/>
          <table:table-cell table:style-name="ce27" office:value-type="string" calcext:value-type="string">
            <text:p>Edible</text:p>
          </table:table-cell>
          <table:table-cell table:style-name="ce14" table:number-columns-repeated="2"/>
          <table:table-cell table:style-name="ce14" office:value-type="string" calcext:value-type="string">
            <text:p>Mary Jackson, Master Gardener</text:p>
          </table:table-cell>
          <table:table-cell table:style-name="ce28" office:value-type="string" calcext:value-type="string">
            <text:p>2019</text:p>
          </table:table-cell>
          <table:table-cell table:style-name="ce14" table:number-columns-repeated="2"/>
          <table:table-cell/>
          <table:table-cell table:style-name="ce6" table:number-columns-repeated="16366"/>
        </table:table-row>
        <table:table-row table:style-name="ro4">
          <table:table-cell office:value-type="float" office:value="1120" calcext:value-type="float">
            <text:p>1120</text:p>
          </table:table-cell>
          <table:table-cell table:style-name="ce15" office:value-type="string" calcext:value-type="string">
            <text:p>BROCCOLI (Brassica oleracea)</text:p>
          </table:table-cell>
          <table:table-cell table:style-name="ce15" office:value-type="string" calcext:value-type="string">
            <text:p>Mini (Broccolini)</text:p>
          </table:table-cell>
          <table:table-cell table:style-name="ce15"/>
          <table:table-cell table:style-name="ce15" office:value-type="string" calcext:value-type="string">
            <text:p>Prefers a well drained, fertile soil high in organic matter. Sow directly in outside beds or in flats, 1/4” deep. Soil should be warm for germination and cool for growing. Prefers consistent moisture so irrigate regularly.</text:p>
          </table:table-cell>
          <table:table-cell table:style-name="ce15"/>
          <table:table-cell table:style-name="ce15" office:value-type="string" calcext:value-type="string">
            <text:p>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and cool</text:p>
          </table:table-cell>
          <table:table-cell/>
          <table:table-cell table:style-name="ce6" table:number-columns-repeated="16366"/>
        </table:table-row>
        <table:table-row table:style-name="ro3">
          <table:table-cell office:value-type="float" office:value="1619" calcext:value-type="float">
            <text:p>1619</text:p>
          </table:table-cell>
          <table:table-cell table:style-name="ce15" office:value-type="string" calcext:value-type="string">
            <text:p>PUMPKIN (Cucurbita pepo)</text:p>
          </table:table-cell>
          <table:table-cell table:style-name="ce15" office:value-type="string" calcext:value-type="string">
            <text:p>Mini Harvest Blend</text:p>
          </table:table-cell>
          <table:table-cell table:style-name="ce15" office:value-type="string" calcext:value-type="string">
            <text:p>Ferry Morse</text:p>
          </table:table-cell>
          <table:table-cell table:style-name="ce15" office:value-type="string" calcext:value-type="string">
            <text:p>Direct sow outdoors 2-3 seeds 1”deep. Make mounds 4-6 feet apart; thin to 1 healthy plant per mound. <text:s/>Full sun; 90 days. Very small for decorating and also good for eating.</text:p>
          </table:table-cell>
          <table:table-cell table:style-name="ce15"/>
          <table:table-cell table:style-name="ce15" office:value-type="string" calcext:value-type="string">
            <text:p>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table-cell table:style-name="ce6" table:number-columns-repeated="16366"/>
        </table:table-row>
        <table:table-row table:style-name="ro3">
          <table:table-cell office:value-type="float" office:value="1518" calcext:value-type="float">
            <text:p>1518</text:p>
          </table:table-cell>
          <table:table-cell table:style-name="ce15" office:value-type="string" calcext:value-type="string">
            <text:p>MELON Cantelope (Cucumis melo)</text:p>
          </table:table-cell>
          <table:table-cell table:style-name="ce15" office:value-type="string" calcext:value-type="string">
            <text:p>Minnesota Midget</text:p>
          </table:table-cell>
          <table:table-cell table:style-name="ce14" office:value-type="string" calcext:value-type="string">
            <text:p>Botanical Interest, Inc</text:p>
          </table:table-cell>
          <table:table-cell table:style-name="ce15" office:value-type="string" calcext:value-type="string">
            <text:p>Plant 1-2 weeks after last frost. Make mounds 2’-3’ apart. Sow 3-5 seeds in top of mound 1/4” deep. Thin to one plant per mound. Full sun, 60-70 days. <text:s/>Small sweet frui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5">
          <table:table-cell office:value-type="float" office:value="1399" calcext:value-type="float">
            <text:p>1399</text:p>
          </table:table-cell>
          <table:table-cell table:style-name="ce14" office:value-type="string" calcext:value-type="string">
            <text:p>GREENS (Plantago coronopus)</text:p>
          </table:table-cell>
          <table:table-cell table:style-name="ce14" office:value-type="string" calcext:value-type="string">
            <text:p>MINUTINA</text:p>
          </table:table-cell>
          <table:table-cell table:style-name="ce14" office:value-type="string" calcext:value-type="string">
            <text:p>Johnny’s Seed</text:p>
          </table:table-cell>
          <table:table-cell table:style-name="ce14" office:value-type="string" calcext:value-type="string">
            <text:p>Plant 1/4” deep about 4-5 seeds per inch in flats or plug trays. Thin to 2-3 plants. When roots fill cell, gently transplant to 6” apart or let grow thickly if plants are to be clipped when young. Add to winter salads.</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12">
          <table:table-cell office:value-type="float" office:value="1299" calcext:value-type="float">
            <text:p>1299</text:p>
          </table:table-cell>
          <table:table-cell table:style-name="ce15" office:value-type="string" calcext:value-type="string">
            <text:p>FLOWER Love-In-A-Mist (Nigella damascena)</text:p>
          </table:table-cell>
          <table:table-cell table:style-name="ce15" office:value-type="string" calcext:value-type="string">
            <text:p>Miss Jekyll Blend</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by gently pressing into surface and very lightly cover. <text:s/>Space 8” apart. Drought tolerant. Generally self sows to come back year after year.</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12">
          <table:table-cell office:value-type="float" office:value="1213" calcext:value-type="float">
            <text:p>1213</text:p>
          </table:table-cell>
          <table:table-cell table:style-name="ce14" office:value-type="string" calcext:value-type="string">
            <text:p>FLOWER <text:s/>Poppy California (Eschscholzia californica)</text:p>
          </table:table-cell>
          <table:table-cell table:style-name="ce14" office:value-type="string" calcext:value-type="string">
            <text:p>Mission Bells</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12">
          <table:table-cell office:value-type="float" office:value="1036" calcext:value-type="float">
            <text:p>1036</text:p>
          </table:table-cell>
          <table:table-cell table:style-name="ce15" office:value-type="string" calcext:value-type="string">
            <text:p>Baby GREENS (Assorted Brassica)</text:p>
          </table:table-cell>
          <table:table-cell table:style-name="ce15" office:value-type="string" calcext:value-type="string">
            <text:p>Mixed Assortment</text:p>
          </table:table-cell>
          <table:table-cell table:style-name="ce15"/>
          <table:table-cell table:style-name="ce15" office:value-type="string" calcext:value-type="string">
            <text:p>Plant 1/8” deep about 15 seeds per foot in a flat. Does not require thinning. Harvest when 2-4 inches tall to add to salads or smoothies.</text:p>
          </table:table-cell>
          <table:table-cell table:style-name="ce15"/>
          <table:table-cell table:style-name="ce15" office:value-type="string" calcext:value-type="string">
            <text:p>2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6">
          <table:table-cell office:value-type="float" office:value="1654" calcext:value-type="float">
            <text:p>1654</text:p>
          </table:table-cell>
          <table:table-cell table:style-name="ce15" office:value-type="string" calcext:value-type="string">
            <text:p>Sprouts Alfalfa (Medicago sativa)</text:p>
          </table:table-cell>
          <table:table-cell table:style-name="ce15" office:value-type="string" calcext:value-type="string">
            <text:p>Mixed Blemd</text:p>
          </table:table-cell>
          <table:table-cell table:style-name="ce15"/>
          <table:table-cell table:style-name="ce15" office:value-type="string" calcext:value-type="string">
            <text:p>Soak seeds in in twice their own volume of water with a pinch of salt for 8-12 hours. Rince thoroughly and place in a sprouting container, in a warm area (70 degrees). Rinse at least twice daily until sprouts are desired length (3-5 cm). Can also be grown as a crop by planting 1/2” deep after last frost. Keep soil consistently moist until harvest.</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2">
          <table:table-cell office:value-type="float" office:value="1285" calcext:value-type="float">
            <text:p>1285</text:p>
          </table:table-cell>
          <table:table-cell table:style-name="ce15" office:value-type="string" calcext:value-type="string">
            <text:p>FLOWER Hollyhock (Alcea rosea)</text:p>
          </table:table-cell>
          <table:table-cell table:style-name="ce15" office:value-type="string" calcext:value-type="string">
            <text:p>Mixed colors</text:p>
          </table:table-cell>
          <table:table-cell table:style-name="ce15" office:value-type="string" calcext:value-type="string">
            <text:p>Mary Berg</text:p>
          </table:table-cell>
          <table:table-cell table:style-name="ce15" office:value-type="string" calcext:value-type="string">
            <text:p>Biennial life cycle; grows 72-84 inches; direct sow; full sun; moist, fertile, well drained soil. Plant 1/4 inches deep and 2 feet between plants. Blooms summer into fall. Loves monsoon mass planting, must water if planting earlier; amend soil, keep weeds out; winter: don’t deadhead stems.</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Berg</text:p>
          </table:table-cell>
          <table:table-cell table:style-name="ce28" office:value-type="string" calcext:value-type="string">
            <text:p>2019</text:p>
          </table:table-cell>
          <table:table-cell table:style-name="ce15" table:number-columns-repeated="2"/>
          <table:table-cell/>
          <table:table-cell table:style-name="ce6" table:number-columns-repeated="16366"/>
        </table:table-row>
        <table:table-row table:style-name="ro3">
          <table:table-cell office:value-type="float" office:value="1336" calcext:value-type="float">
            <text:p>1336</text:p>
          </table:table-cell>
          <table:table-cell table:style-name="ce14" office:value-type="string" calcext:value-type="string">
            <text:p>FLOWER Scabiosa Pincushion (Sixalix atropurpurea)</text:p>
          </table:table-cell>
          <table:table-cell table:style-name="ce14" office:value-type="string" calcext:value-type="string">
            <text:p>Mixed Colors</text:p>
          </table:table-cell>
          <table:table-cell table:style-name="ce14" office:value-type="string" calcext:value-type="string">
            <text:p>Winnie Struse</text:p>
          </table:table-cell>
          <table:table-cell table:style-name="ce14" office:value-type="string" calcext:value-type="string">
            <text:p>Plant in fine, moist soil, covering lightly with 1/8” soil. <text:s/>Plant 12” apart in full sun to part shade. <text:s/>Blooms all summer, is fairly drought tolerant and attractive to pollinators. Deer resistan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4"/>
          <table:table-cell table:style-name="ce14" office:value-type="string" calcext:value-type="string">
            <text:p>Winnie Struse</text:p>
          </table:table-cell>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4">
          <table:table-cell office:value-type="float" office:value="1352" calcext:value-type="float">
            <text:p>1352</text:p>
          </table:table-cell>
          <table:table-cell table:style-name="ce14" office:value-type="string" calcext:value-type="string">
            <text:p>FLOWER Sunflower (Helianthus annuus)</text:p>
          </table:table-cell>
          <table:table-cell table:style-name="ce15" office:value-type="string" calcext:value-type="string">
            <text:p>Mixed Colors</text:p>
          </table:table-cell>
          <table:table-cell table:style-name="ce14" office:value-type="string" calcext:value-type="string">
            <text:p>Ferry Morse</text:p>
          </table:table-cell>
          <table:table-cell table:style-name="ce15" office:value-type="string" calcext:value-type="string">
            <text:p>Beautiful array of colors which may include yellow, white, brown, bronze and crimson. <text:s/>Direct sow in full sun (sunflowers do not transplant well) after last frost, 1 inch deep, 18-24 inches apart. Germination takes 14-21 days. Great for cut flowers.</text:p>
          </table:table-cell>
          <table:table-cell table:style-name="ce15" table:number-columns-repeated="2"/>
          <table:table-cell table:style-name="ce15" office:value-type="string" calcext:value-type="string">
            <text:p>Warm Season</text:p>
          </table:table-cell>
          <table:table-cell table:style-name="ce14"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table-cell table:style-name="ce15" office:value-type="string" calcext:value-type="string">
            <text:p>takes 14-21 days. Great</text:p>
          </table:table-cell>
          <table:table-cell/>
          <table:table-cell table:style-name="ce6" table:number-columns-repeated="16366"/>
        </table:table-row>
        <table:table-row table:style-name="ro3">
          <table:table-cell office:value-type="float" office:value="1693" calcext:value-type="float">
            <text:p>1693</text:p>
          </table:table-cell>
          <table:table-cell table:style-name="ce14" office:value-type="string" calcext:value-type="string">
            <text:p>SWISS CHARD (Beta vulgaris)</text:p>
          </table:table-cell>
          <table:table-cell table:style-name="ce14" office:value-type="string" calcext:value-type="string">
            <text:p>Mixed Colors Acelga</text:p>
          </table:table-cell>
          <table:table-cell table:style-name="ce14" office:value-type="string" calcext:value-type="string">
            <text:p>Ferry Morse</text:p>
          </table:table-cell>
          <table:table-cell table:style-name="ce14" office:value-type="string" calcext:value-type="string">
            <text:p>Sow direct or indoors for transplant, 1/2” deep, 8” apart. <text:s/>Sun/partial shade, 40-60 days. <text:s/>Stalks will be 8-10” tall. Soil Temp: <text:s/>Range: 40-95 degrees Optimum: 85 degrees</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Range: 40-95 degrees Optimum: 85 degrees</text:p>
          </table:table-cell>
          <table:table-cell table:style-name="ce14" office:value-type="string" calcext:value-type="string">
            <text:p>4-5 days @ 85 degrees</text:p>
          </table:table-cell>
          <table:table-cell/>
          <table:table-cell table:style-name="ce6" table:number-columns-repeated="16366"/>
        </table:table-row>
        <table:table-row table:style-name="ro6">
          <table:table-cell office:value-type="float" office:value="1405" calcext:value-type="float">
            <text:p>1405</text:p>
          </table:table-cell>
          <table:table-cell table:style-name="ce15" office:value-type="string" calcext:value-type="string">
            <text:p>Greens, Mixed</text:p>
          </table:table-cell>
          <table:table-cell table:style-name="ce15" office:value-type="string" calcext:value-type="string">
            <text:p>Mixed Winter Leafy Greens</text:p>
          </table:table-cell>
          <table:table-cell table:style-name="ce15"/>
          <table:table-cell table:style-name="ce15" office:value-type="string" calcext:value-type="string">
            <text:p>Sow indoors 3-4 weeks before last frost. Sow in flats barely covering seeds. Shade on very sunny days to keep soil cool. Germinates well in low temps but dormant above 75 degrees. Harvest leaves from outer edge so plants continues to grow from center. May contain lettuces, mustard, kohlrabi, and other winter greens.</text:p>
          </table:table-cell>
          <table:table-cell table:style-name="ce15"/>
          <table:table-cell table:style-name="ce15" office:value-type="string" calcext:value-type="string">
            <text:p>10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2">
          <table:table-cell office:value-type="float" office:value="1631" calcext:value-type="float">
            <text:p>1631</text:p>
          </table:table-cell>
          <table:table-cell table:style-name="ce14" office:value-type="string" calcext:value-type="string">
            <text:p>RADISH Daikon (Raphanus sativus)</text:p>
          </table:table-cell>
          <table:table-cell table:style-name="ce14" office:value-type="string" calcext:value-type="string">
            <text:p>Miyashige White</text:p>
          </table:table-cell>
          <table:table-cell table:style-name="ce14" office:value-type="string" calcext:value-type="string">
            <text:p>Botanical Interest, Inc</text:p>
          </table:table-cell>
          <table:table-cell table:style-name="ce14" office:value-type="string" calcext:value-type="string">
            <text:p>Direct sow 8-10 weeks before first frost. Plant every 10 days until temperatures are too cold (below 40). 1/2” deep, plant 5” apart (or closer and thin later), rows 10-12” apart. <text:s/>65 days. Produces large mild radish that can weigh up to 1 lb. Can be eaten raw, cooked or pickled.</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3">
          <table:table-cell office:value-type="float" office:value="1533" calcext:value-type="float">
            <text:p>1533</text:p>
          </table:table-cell>
          <table:table-cell table:style-name="ce14" office:value-type="string" calcext:value-type="string">
            <text:p>Mustard (Brassica rapa)</text:p>
          </table:table-cell>
          <table:table-cell table:style-name="ce14" office:value-type="string" calcext:value-type="string">
            <text:p>MIZUNA</text:p>
          </table:table-cell>
          <table:table-cell table:style-name="ce14" office:value-type="string" calcext:value-type="string">
            <text:p>Botanical Interest, Inc</text:p>
          </table:table-cell>
          <table:table-cell table:style-name="ce14" office:value-type="string" calcext:value-type="string">
            <text:p>Plant 1/4” deep about 15 seeds per foot in cool season. Does not require thinning. Harvest individual leaves or cut bunches to add to salads or use in stir fry.</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709" calcext:value-type="float">
            <text:p>1709</text:p>
          </table:table-cell>
          <table:table-cell table:style-name="ce14" office:value-type="string" calcext:value-type="string">
            <text:p>TOMATO (Lycopersicon esculentum)</text:p>
          </table:table-cell>
          <table:table-cell table:style-name="ce14" office:value-type="string" calcext:value-type="string">
            <text:p>Moneymaker</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80 days from transplant. Uniform medium size are sweet and meaty. Good for fresh or cooked dishes. Tolerates humidity.</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4">
          <table:table-cell office:value-type="float" office:value="1645" calcext:value-type="float">
            <text:p>1645</text:p>
          </table:table-cell>
          <table:table-cell table:style-name="ce14" office:value-type="string" calcext:value-type="string">
            <text:p>SPINACH (Spinacia oleracea)</text:p>
          </table:table-cell>
          <table:table-cell table:style-name="ce14" office:value-type="string" calcext:value-type="string">
            <text:p>Monstrueux de Viroflay</text:p>
          </table:table-cell>
          <table:table-cell table:style-name="ce14" office:value-type="string" calcext:value-type="string">
            <text:p>Botanical Interest, Inc</text:p>
          </table:table-cell>
          <table:table-cell table:style-name="ce14" office:value-type="string" calcext:value-type="string">
            <text:p>Direct sow in early spring &amp; late summer, group of 3 seeds 12-18” apart, 1/2” deep, rows 12” apart. Plants can get up to 24” wide with 10” leaves — a gourmet delight! Soil Temp Range: 35°-85° Optimum: 70°</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table-cell table:style-name="ce6" table:number-columns-repeated="16366"/>
        </table:table-row>
        <table:table-row table:style-name="ro4">
          <table:table-cell office:value-type="float" office:value="1724" calcext:value-type="float">
            <text:p>1724</text:p>
          </table:table-cell>
          <table:table-cell table:style-name="ce15" office:value-type="string" calcext:value-type="string">
            <text:p>TOMATO (Solanum lycopersiucm)</text:p>
          </table:table-cell>
          <table:table-cell table:style-name="ce15" office:value-type="string" calcext:value-type="string">
            <text:p>Moonglow</text:p>
          </table:table-cell>
          <table:table-cell table:style-name="ce15" office:value-type="string" calcext:value-type="string">
            <text:p>Native Seed/SEARCH <text:s/>www.nativeseeds.org</text:p>
          </table:table-cell>
          <table:table-cell table:style-name="ce15" office:value-type="string" calcext:value-type="string">
            <text:p>Start indoors 4-6 weeks before transplant, 1/4” below surface; plant outdoors 36” apart, full sun. Bright orange tomato, rich flavor, great for fresh eating; rich in lycopene. Indeterminate habit. Soil Temp Range: 5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50°-95° Optimum: 85°</text:p>
          </table:table-cell>
          <table:table-cell table:style-name="ce15" office:value-type="string" calcext:value-type="string">
            <text:p>6-7 days</text:p>
          </table:table-cell>
          <table:table-cell/>
          <table:table-cell table:style-name="ce6" table:number-columns-repeated="16366"/>
        </table:table-row>
        <table:table-row table:style-name="ro3">
          <table:table-cell office:value-type="float" office:value="1453" calcext:value-type="float">
            <text:p>1453</text:p>
          </table:table-cell>
          <table:table-cell table:style-name="ce15" office:value-type="string" calcext:value-type="string">
            <text:p>HERB Parsley (Petroselinium crispum)</text:p>
          </table:table-cell>
          <table:table-cell table:style-name="ce15" office:value-type="string" calcext:value-type="string">
            <text:p>Moss Curled</text:p>
          </table:table-cell>
          <table:table-cell table:style-name="ce14" office:value-type="string" calcext:value-type="string">
            <text:p>Botanical Interest, Inc</text:p>
          </table:table-cell>
          <table:table-cell table:style-name="ce15" office:value-type="string" calcext:value-type="string">
            <text:p>To aid germination, soak seeds in water for 12-24 hours before sowing. Plant outdoors 6-8 weeks before last frost 1/4” deep. Space about 8”-16” apar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329" calcext:value-type="float">
            <text:p>1329</text:p>
          </table:table-cell>
          <table:table-cell table:style-name="ce14" office:value-type="string" calcext:value-type="string">
            <text:p>FLOWER Portulaca (Portulaca grandflora)</text:p>
          </table:table-cell>
          <table:table-cell table:style-name="ce14" office:value-type="string" calcext:value-type="string">
            <text:p>Moss Rose Double Blend</text:p>
          </table:table-cell>
          <table:table-cell table:style-name="ce14" office:value-type="string" calcext:value-type="string">
            <text:p>Botanical Interest, Inc</text:p>
          </table:table-cell>
          <table:table-cell table:style-name="ce14" office:value-type="string" calcext:value-type="string">
            <text:p>Start inside 6-8 weeks before average last frost. Outside, plant 1-2 weeks before last frost. Press into soil surface, 3 seeds every 2”. Light aids germination. Pollinator attractor. Bright flowers with dense, spreading, succulent foliage. Heat &amp; drought toleran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217" calcext:value-type="float">
            <text:p>1217</text:p>
          </table:table-cell>
          <table:table-cell table:style-name="ce15" office:value-type="string" calcext:value-type="string">
            <text:p>FLOWER <text:s/>Poppy Corn (Papaver rhoeas)</text:p>
          </table:table-cell>
          <table:table-cell table:style-name="ce15" office:value-type="string" calcext:value-type="string">
            <text:p>Mother of Pearl</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6” to 8”. Attracts pollinators. Deer resistant. Drought and heat toler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4">
          <table:table-cell office:value-type="float" office:value="1158" calcext:value-type="float">
            <text:p>1158</text:p>
          </table:table-cell>
          <table:table-cell table:style-name="ce15" office:value-type="string" calcext:value-type="string">
            <text:p>CORN, DECORATIVE (Zea mays)</text:p>
          </table:table-cell>
          <table:table-cell table:style-name="ce15" office:value-type="string" calcext:value-type="string">
            <text:p>Multicolored</text:p>
          </table:table-cell>
          <table:table-cell table:style-name="ce15"/>
          <table:table-cell table:style-name="ce15" office:value-type="string" calcext:value-type="string">
            <text:p>Plant in spring 1” deep in rows or clusters. Plants should be no more than 8-12 inches apart to get best pollination. All species will cross pollinate so planting different species several weeks apart is recommended. <text:s/>Typically for decorative purposes.</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2">
          <table:table-cell office:value-type="float" office:value="1580" calcext:value-type="float">
            <text:p>1580</text:p>
          </table:table-cell>
          <table:table-cell table:style-name="ce15" office:value-type="string" calcext:value-type="string">
            <text:p>Pepper CHILE (Capsicum annuum)</text:p>
          </table:table-cell>
          <table:table-cell table:style-name="ce15" office:value-type="string" calcext:value-type="string">
            <text:p>Multicolored, HOT</text:p>
          </table:table-cell>
          <table:table-cell table:style-name="ce15" office:value-type="string" calcext:value-type="string">
            <text:p>Greenlee Treasury of Seed</text:p>
          </table:table-cell>
          <table:table-cell table:style-name="ce15" office:value-type="string" calcext:value-type="string">
            <text:p>Multi-colored, Anaheim size &amp; heat. Start inside 1/4” deep in loose soil 8-10 weeks before last frost. Slow to germinate; need warmth; plant 12-16” apart in full sun/partial in shade low desert. Save seeds from fully ripe, slightly shriveled fruit. Can cross pollinate. Soil Temp Range: 60°-95° Optimum: 8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Duncan, AZ</text:p>
          </table:table-cell>
          <table:table-cell table:style-name="ce15"/>
          <table:table-cell table:style-name="ce15" office:value-type="string" calcext:value-type="string">
            <text:p>Bill Cook, Master Gardener, Duncan, AZ</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table-cell table:style-name="ce6" table:number-columns-repeated="16366"/>
        </table:table-row>
        <table:table-row table:style-name="ro4">
          <table:table-cell office:value-type="float" office:value="1159" calcext:value-type="float">
            <text:p>1159</text:p>
          </table:table-cell>
          <table:table-cell table:style-name="ce14" office:value-type="string" calcext:value-type="string">
            <text:p>CORN, DECORATIVE (Zea mays)</text:p>
          </table:table-cell>
          <table:table-cell table:style-name="ce14" office:value-type="string" calcext:value-type="string">
            <text:p>Multicolored, small kernals</text:p>
          </table:table-cell>
          <table:table-cell table:style-name="ce14"/>
          <table:table-cell table:style-name="ce14" office:value-type="string" calcext:value-type="string">
            <text:p>Plant in spring 1” deep in rows or clusters. Plants should be no more than 8-12 inches apart to get best pollination. All species will cross pollinate so planting different species several weeks apart is recommended. <text:s/>Typically for decorative purpose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4">
          <table:table-cell office:value-type="float" office:value="1179" calcext:value-type="float">
            <text:p>1179</text:p>
          </table:table-cell>
          <table:table-cell table:style-name="ce14" office:value-type="string" calcext:value-type="string">
            <text:p>CUCUMBER (Cucumis sativus)</text:p>
          </table:table-cell>
          <table:table-cell table:style-name="ce14" office:value-type="string" calcext:value-type="string">
            <text:p>Muncher</text:p>
          </table:table-cell>
          <table:table-cell table:style-name="ce14" office:value-type="string" calcext:value-type="string">
            <text:p>American Seed</text:p>
          </table:table-cell>
          <table:table-cell table:style-name="ce14" office:value-type="string" calcext:value-type="string">
            <text:p>Direct sow outside after danger of frost. Plant 1” below soil with 2-3 seeds per hill if spawling, 4” apart if trellising. <text:s/>Full sun; 45 days. Fruit up to 6-8” long. <text:s/>Early maturing slicer, bitter-free. Soil Temp Range: 60– 105 Optimum: 8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 105 Optimum: 85°</text:p>
          </table:table-cell>
          <table:table-cell table:style-name="ce14" office:value-type="string" calcext:value-type="string">
            <text:p>5-6 days</text:p>
          </table:table-cell>
          <table:table-cell/>
          <table:table-cell table:style-name="ce6" table:number-columns-repeated="16366"/>
        </table:table-row>
        <table:table-row table:style-name="ro6">
          <table:table-cell office:value-type="float" office:value="1294" calcext:value-type="float">
            <text:p>1294</text:p>
          </table:table-cell>
          <table:table-cell table:style-name="ce15" office:value-type="string" calcext:value-type="string">
            <text:p>FLOWER Lavender (Consolida regalis)</text:p>
          </table:table-cell>
          <table:table-cell table:style-name="ce15" office:value-type="string" calcext:value-type="string">
            <text:p>Munstead</text:p>
          </table:table-cell>
          <table:table-cell table:style-name="ce14" office:value-type="string" calcext:value-type="string">
            <text:p>Botanical Interest, Inc</text:p>
          </table:table-cell>
          <table:table-cell table:style-name="ce15" office:value-type="string" calcext:value-type="string">
            <text:p>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 days) <text:s/>Space 18”-24” apart.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039" calcext:value-type="float">
            <text:p>1039</text:p>
          </table:table-cell>
          <table:table-cell table:style-name="ce14" office:value-type="string" calcext:value-type="string">
            <text:p>Baby GREENS (Brassica, assorted)</text:p>
          </table:table-cell>
          <table:table-cell table:style-name="ce14" office:value-type="string" calcext:value-type="string">
            <text:p>Must Have Mustards</text:p>
          </table:table-cell>
          <table:table-cell table:style-name="ce14" office:value-type="string" calcext:value-type="string">
            <text:p>Botanical Interest, Inc</text:p>
          </table:table-cell>
          <table:table-cell table:style-name="ce14"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4"/>
          <table:table-cell table:style-name="ce14" office:value-type="string" calcext:value-type="string">
            <text:p>30+ Seeds</text:p>
          </table:table-cell>
          <table:table-cell table:style-name="ce14" office:value-type="string" calcext:value-type="string">
            <text:p>Al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362" calcext:value-type="float">
            <text:p>1362</text:p>
          </table:table-cell>
          <table:table-cell table:style-name="ce14" office:value-type="string" calcext:value-type="string">
            <text:p>FLOWER Sweet Pea (Lathyrus odoratus)</text:p>
          </table:table-cell>
          <table:table-cell table:style-name="ce14" office:value-type="string" calcext:value-type="string">
            <text:p>My Navy</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3">
          <table:table-cell office:value-type="float" office:value="1510" calcext:value-type="float">
            <text:p>1510</text:p>
          </table:table-cell>
          <table:table-cell table:style-name="ce15" office:value-type="string" calcext:value-type="string">
            <text:p>MELON (Cucumis melo)</text:p>
          </table:table-cell>
          <table:table-cell table:style-name="ce15" office:value-type="string" calcext:value-type="string">
            <text:p>Mystery Melon</text:p>
          </table:table-cell>
          <table:table-cell table:style-name="ce15" office:value-type="string" calcext:value-type="string">
            <text:p>Bill Cook</text:p>
          </table:table-cell>
          <table:table-cell table:style-name="ce15" office:value-type="string" calcext:value-type="string">
            <text:p>Plant 3-5 seeds in basin 1” deep 5 feet apart, sprawling vine. Full sun. Some netting on the exterior but isn’t a cantaloupe. Taste is somewhere between a nice sweet honeydew and a cantaloupe.</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ill Cook, Master Gardener, Duncan, AZ</text:p>
          </table:table-cell>
          <table:table-cell table:style-name="ce28" office:value-type="string" calcext:value-type="string">
            <text:p>2023</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6">
          <table:table-cell office:value-type="float" office:value="1313" calcext:value-type="float">
            <text:p>1313</text:p>
          </table:table-cell>
          <table:table-cell table:style-name="ce15" office:value-type="string" calcext:value-type="string">
            <text:p>FLOWER Milkweed (Asclepias fascicularis)</text:p>
          </table:table-cell>
          <table:table-cell table:style-name="ce15" office:value-type="string" calcext:value-type="string">
            <text:p>Narrowleaf Butterfly Flower</text:p>
          </table:table-cell>
          <table:table-cell table:style-name="ce14" office:value-type="string" calcext:value-type="string">
            <text:p>Botanical Interest, Inc</text:p>
          </table:table-cell>
          <table:table-cell table:style-name="ce15" office:value-type="string" calcext:value-type="string">
            <text:p>Sow outside 2 to 4 weeks before average last frost date or fall for spring germination. Plant 1/4” deep. Space 12” to 16” apart. Drought tolerant when established. Attracts beneficial insects, butterflies and habitat for monarch butterfly and their caterpillars. Deer resistant. Drought tolerant once established. Sap is toxic; avoid skin/eye contact. Do not ea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185" calcext:value-type="float">
            <text:p>1185</text:p>
          </table:table-cell>
          <table:table-cell table:style-name="ce15" office:value-type="string" calcext:value-type="string">
            <text:p>CUCUMBER (Cucumis sativus)</text:p>
          </table:table-cell>
          <table:table-cell table:style-name="ce15" office:value-type="string" calcext:value-type="string">
            <text:p>National Pickling</text:p>
          </table:table-cell>
          <table:table-cell table:style-name="ce14" office:value-type="string" calcext:value-type="string">
            <text:p>Ferry Morse</text:p>
          </table:table-cell>
          <table:table-cell table:style-name="ce15" office:value-type="string" calcext:value-type="string">
            <text:p>Direct sow outside after danger of frost. <text:s/>Plant 1” below soil with 2-3 seeds per hill if spawling, 4” apart if trellising. <text:s/>Full sun; 55-60 days. Dark green 5-6” fruit. <text:s/>A favorite for pickling; extremely prolific.</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5-6 days</text:p>
          </table:table-cell>
          <table:table-cell/>
          <table:table-cell table:style-name="ce6" table:number-columns-repeated="16366"/>
        </table:table-row>
        <table:table-row table:style-name="ro4">
          <table:table-cell office:value-type="float" office:value="1674" calcext:value-type="float">
            <text:p>1674</text:p>
          </table:table-cell>
          <table:table-cell table:style-name="ce14" office:value-type="string" calcext:value-type="string">
            <text:p>SQUASH (Cucurbita maxima)</text:p>
          </table:table-cell>
          <table:table-cell table:style-name="ce14" office:value-type="string" calcext:value-type="string">
            <text:p>Navajo Hubbard</text:p>
          </table:table-cell>
          <table:table-cell table:style-name="ce14" office:value-type="string" calcext:value-type="string">
            <text:p>Native Seed/SEARCH <text:s/>www.nativeseeds.org</text:p>
          </table:table-cell>
          <table:table-cell table:style-name="ce14" office:value-type="string" calcext:value-type="string">
            <text:p>Common across the Navajo Nation. <text:s/>Fruits can Be eaten immature as summer squash or mature as winter squash. <text:s/>Plant in spring or summer rains 1” deep, 3-6 ft apart. Soil Temp Range: 60°-100° Optimum: 90°</text:p>
          </table:table-cell>
          <table:table-cell table:style-name="ce14"/>
          <table:table-cell table:style-name="ce14" office:value-type="string" calcext:value-type="string">
            <text:p>6+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Linda Lawson, CC Master Gardener</text:p>
          </table:table-cell>
          <table:table-cell table:style-name="ce28" office:value-type="string" calcext:value-type="string">
            <text:p>2017</text:p>
          </table:table-cell>
          <table:table-cell table:style-name="ce14" office:value-type="string" calcext:value-type="string">
            <text:p>60°-100° Optimum: 90°</text:p>
          </table:table-cell>
          <table:table-cell table:style-name="ce14" office:value-type="string" calcext:value-type="string">
            <text:p>3-4 days</text:p>
          </table:table-cell>
          <table:table-cell/>
          <table:table-cell table:style-name="ce6" table:number-columns-repeated="16366"/>
        </table:table-row>
        <table:table-row table:style-name="ro3">
          <table:table-cell office:value-type="float" office:value="1634" calcext:value-type="float">
            <text:p>1634</text:p>
          </table:table-cell>
          <table:table-cell table:style-name="ce14" office:value-type="string" calcext:value-type="string">
            <text:p>RUTABAGA (Brassica napus)</text:p>
          </table:table-cell>
          <table:table-cell table:style-name="ce14" office:value-type="string" calcext:value-type="string">
            <text:p>Navone Yellow</text:p>
          </table:table-cell>
          <table:table-cell table:style-name="ce14" office:value-type="string" calcext:value-type="string">
            <text:p>Baker Creek Heirloom Seeds</text:p>
          </table:table-cell>
          <table:table-cell table:style-name="ce14" office:value-type="string" calcext:value-type="string">
            <text:p>Sow 1/4” deep, 6-8” apart with rows 18” apart. 30-40 days. Harvest when fully formed, usually about 3-4 inches in diameter. Sweet and rich tasting.</text:p>
          </table:table-cell>
          <table:table-cell table:style-name="ce14"/>
          <table:table-cell table:style-name="ce14" office:value-type="string" calcext:value-type="string">
            <text:p>36-4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4-7 days</text:p>
          </table:table-cell>
          <table:table-cell/>
          <table:table-cell table:style-name="ce6" table:number-columns-repeated="16366"/>
        </table:table-row>
        <table:table-row table:style-name="ro3">
          <table:table-cell office:value-type="float" office:value="1470" calcext:value-type="float">
            <text:p>1470</text:p>
          </table:table-cell>
          <table:table-cell table:style-name="ce14" office:value-type="string" calcext:value-type="string">
            <text:p>KALE <text:s/>Italian Lacinato (Brassica oleracea)</text:p>
          </table:table-cell>
          <table:table-cell table:style-name="ce14" office:value-type="string" calcext:value-type="string">
            <text:p>Nero Toscano</text:p>
          </table:table-cell>
          <table:table-cell table:style-name="ce14" office:value-type="string" calcext:value-type="string">
            <text:p>Botanical Interest, Inc</text:p>
          </table:table-cell>
          <table:table-cell table:style-name="ce14" office:value-type="string" calcext:value-type="string">
            <text:p>Spring or fall plant; sow 3-4 seeds at 1/2” depth; 12” apart; rows 18” apart. Thin to one plant per group. Harvest outside leaves in about 2 months. Very cold hardy.</text:p>
          </table:table-cell>
          <table:table-cell table:style-name="ce14"/>
          <table:table-cell table:style-name="ce14" office:value-type="string" calcext:value-type="string">
            <text:p>15-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table-cell table:style-name="ce6" table:number-columns-repeated="16366"/>
        </table:table-row>
        <table:table-row table:style-name="ro2">
          <table:table-cell office:value-type="float" office:value="1563" calcext:value-type="float">
            <text:p>1563</text:p>
          </table:table-cell>
          <table:table-cell table:style-name="ce15" office:value-type="string" calcext:value-type="string">
            <text:p>Pepper CHILE (Capsicum annuum)</text:p>
          </table:table-cell>
          <table:table-cell table:style-name="ce14" office:value-type="string" calcext:value-type="string">
            <text:p>New Mexico 6-4L Pepper </text:p>
          </table:table-cell>
          <table:table-cell table:style-name="ce24" office:value-type="string" calcext:value-type="string">
            <text:p>Bonnie Plants</text:p>
          </table:table-cell>
          <table:table-cell table:style-name="ce14" office:value-type="string" calcext:value-type="string">
            <text:p>Mild heat, 500 to 1,000 SHU. Start inside 1/4” deep in loose soil 8-10 weeks before last frost. <text:s/>Slow to germinate; need warmth; plant 12- 16” apart in full sun. Size to 6”; 70 to 80 days. <text:s/>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3">
          <table:table-cell office:value-type="float" office:value="1340" calcext:value-type="float">
            <text:p>1340</text:p>
          </table:table-cell>
          <table:table-cell table:style-name="ce15" office:value-type="string" calcext:value-type="string">
            <text:p>FLOWER Snapdragon (Antirrhinum majus)</text:p>
          </table:table-cell>
          <table:table-cell table:style-name="ce15" office:value-type="string" calcext:value-type="string">
            <text:p>Night and Day</text:p>
          </table:table-cell>
          <table:table-cell table:style-name="ce14" office:value-type="string" calcext:value-type="string">
            <text:p>Botanical Interest, Inc</text:p>
          </table:table-cell>
          <table:table-cell table:style-name="ce15" office:value-type="string" calcext:value-type="string">
            <text:p>Sow outside late summer to early fall. Light aids germination. Press seeds into soil surface. Space 6” apart. Attracts pollinators. Deer resistant.</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373" calcext:value-type="float">
            <text:p>1373</text:p>
          </table:table-cell>
          <table:table-cell table:style-name="ce14" office:value-type="string" calcext:value-type="string">
            <text:p>FLOWER Zinnia (Zinnia elegans)</text:p>
          </table:table-cell>
          <table:table-cell table:style-name="ce14" office:value-type="string" calcext:value-type="string">
            <text:p>Northern Lights Blend</text:p>
          </table:table-cell>
          <table:table-cell table:style-name="ce14" office:value-type="string" calcext:value-type="string">
            <text:p>Botanical Interest, Inc</text:p>
          </table:table-cell>
          <table:table-cell table:style-name="ce14" office:value-type="string" calcext:value-type="string">
            <text:p>Sow outside 1/4” deep, 9”-12” apart 1-2 weeks after last frost. Colors of pink, purple and burgandy. <text:s/>Great in the garden to attract pollinators! Deer resistant.Will self-propagate from its own seed.</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218" calcext:value-type="float">
            <text:p>1218</text:p>
          </table:table-cell>
          <table:table-cell table:style-name="ce14" office:value-type="string" calcext:value-type="string">
            <text:p>FLOWER <text:s/>Poppy Iceland (Papaver nudicaule)</text:p>
          </table:table-cell>
          <table:table-cell table:style-name="ce14" office:value-type="string" calcext:value-type="string">
            <text:p>Nudicaule Blend</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4"/>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596" calcext:value-type="float">
            <text:p>1596</text:p>
          </table:table-cell>
          <table:table-cell table:style-name="ce15" office:value-type="string" calcext:value-type="string">
            <text:p>Pepper Chili (Capsicum annuum)</text:p>
          </table:table-cell>
          <table:table-cell table:style-name="ce15" office:value-type="string" calcext:value-type="string">
            <text:p>NuMex Joe E Parker</text:p>
          </table:table-cell>
          <table:table-cell table:style-name="ce14" office:value-type="string" calcext:value-type="string">
            <text:p>Botanical Interest, Inc</text:p>
          </table:table-cell>
          <table:table-cell table:style-name="ce15" office:value-type="string" calcext:value-type="string">
            <text:p>Start inside 1/4” deep in loose soil 8- 10 weeks before last frost. <text:s/>Slow to germinate; need warmth; plant 12-16” apart in full sun. Size to 6”; 70 to 80 days. <text:s/>Save seeds from fully ripe, slightly shriveled fruit. Can cross pollinate.</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table-cell table:style-name="ce6" table:number-columns-repeated="16366"/>
        </table:table-row>
        <table:table-row table:style-name="ro4">
          <table:table-cell office:value-type="float" office:value="1385" calcext:value-type="float">
            <text:p>1385</text:p>
          </table:table-cell>
          <table:table-cell table:style-name="ce14" office:value-type="string" calcext:value-type="string">
            <text:p>GOURD (Lagenaria siceraria)</text:p>
          </table:table-cell>
          <table:table-cell table:style-name="ce14" office:value-type="string" calcext:value-type="string">
            <text:p>O’Odham Dipper</text:p>
          </table:table-cell>
          <table:table-cell table:style-name="ce14" office:value-type="string" calcext:value-type="string">
            <text:p>Andy Ward</text:p>
          </table:table-cell>
          <table:table-cell table:style-name="ce14"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4"/>
          <table:table-cell table:style-name="ce14" office:value-type="string" calcext:value-type="string">
            <text:p>4+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Andy Ward</text:p>
          </table:table-cell>
          <table:table-cell table:style-name="ce28" office:value-type="string" calcext:value-type="string">
            <text:p>2018</text:p>
          </table:table-cell>
          <table:table-cell table:style-name="ce14" office:value-type="string" calcext:value-type="string">
            <text:p>70– 85 Optimum: 85°</text:p>
          </table:table-cell>
          <table:table-cell table:style-name="ce14" office:value-type="string" calcext:value-type="string">
            <text:p>3-10 days</text:p>
          </table:table-cell>
          <table:table-cell/>
          <table:table-cell table:style-name="ce6" table:number-columns-repeated="16366"/>
        </table:table-row>
        <table:table-row table:style-name="ro3">
          <table:table-cell office:value-type="float" office:value="1363" calcext:value-type="float">
            <text:p>1363</text:p>
          </table:table-cell>
          <table:table-cell table:style-name="ce15" office:value-type="string" calcext:value-type="string">
            <text:p>FLOWER Sweet Pea (Lathyrus odoratus)</text:p>
          </table:table-cell>
          <table:table-cell table:style-name="ce15" office:value-type="string" calcext:value-type="string">
            <text:p>Old Spice Blend</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402" calcext:value-type="float">
            <text:p>1402</text:p>
          </table:table-cell>
          <table:table-cell table:style-name="ce14" office:value-type="string" calcext:value-type="string">
            <text:p>GREENS Endive (Chichorium endivia)</text:p>
          </table:table-cell>
          <table:table-cell table:style-name="ce14" office:value-type="string" calcext:value-type="string">
            <text:p>Olesh Tres Fine</text:p>
          </table:table-cell>
          <table:table-cell table:style-name="ce14" office:value-type="string" calcext:value-type="string">
            <text:p>Botanical Interest, Inc</text:p>
          </table:table-cell>
          <table:table-cell table:style-name="ce14" office:value-type="string" calcext:value-type="string">
            <text:p>Plant 1/8” deep about 3 seeds every 6 inches 8-10 weeks before average first frost. Thin to one every 6”. Harvest individual leaves or cut bunches to add to salads.</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134" calcext:value-type="float">
            <text:p>1134</text:p>
          </table:table-cell>
          <table:table-cell table:style-name="ce14" office:value-type="string" calcext:value-type="string">
            <text:p>CABBAGE—Napa (Brassica rapa subsp. pekinensis)</text:p>
          </table:table-cell>
          <table:table-cell table:style-name="ce14" office:value-type="string" calcext:value-type="string">
            <text:p>One Kilo Slow Bolt</text:p>
          </table:table-cell>
          <table:table-cell table:style-name="ce14" office:value-type="string" calcext:value-type="string">
            <text:p>Botanical Interest, Inc</text:p>
          </table:table-cell>
          <table:table-cell table:style-name="ce14" office:value-type="string" calcext:value-type="string">
            <text:p>Sow indoors 4-6 weeks prior to desired transplant date: 4 weeks before last frost in spring or 6 weeks before first frost in fall. <text:s/>Plant 1/4” deep. Needs lots of sunlight or grow light, transplant at 2-4 true leaves 24 inches apart. Full sun. Grows best at 60°-65°. Matures 50-55 days</text:p>
          </table:table-cell>
          <table:table-cell table:style-name="ce14"/>
          <table:table-cell table:style-name="ce14" office:value-type="string" calcext:value-type="string">
            <text:p>10-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5 days</text:p>
          </table:table-cell>
          <table:table-cell/>
          <table:table-cell table:style-name="ce6" table:number-columns-repeated="16366"/>
        </table:table-row>
        <table:table-row table:style-name="ro4">
          <table:table-cell office:value-type="float" office:value="1247" calcext:value-type="float">
            <text:p>1247</text:p>
          </table:table-cell>
          <table:table-cell table:style-name="ce15" office:value-type="string" calcext:value-type="string">
            <text:p>FLOWER Calendula (Calendula officinalis)</text:p>
          </table:table-cell>
          <table:table-cell table:style-name="ce15" office:value-type="string" calcext:value-type="string">
            <text:p>Oopsy Daisy</text:p>
          </table:table-cell>
          <table:table-cell table:style-name="ce14" office:value-type="string" calcext:value-type="string">
            <text:p>Botanical Interest, Inc</text:p>
          </table:table-cell>
          <table:table-cell table:style-name="ce15" office:value-type="string" calcext:value-type="string">
            <text:p>Direct sow in early spring for summer bloom in full sun. Plant late summer for winter bloom. Group a few seeds every 6-8 inches, cover lightly with 1/4 in soil. Keep moist until germinated, about 5-15 days to see sprout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612" calcext:value-type="float">
            <text:p>1612</text:p>
          </table:table-cell>
          <table:table-cell table:style-name="ce15" office:value-type="string" calcext:value-type="string">
            <text:p>PEPPER, SWEET (Capsicum annuum))</text:p>
          </table:table-cell>
          <table:table-cell table:style-name="ce15" office:value-type="string" calcext:value-type="string">
            <text:p>Orange Sun</text:p>
          </table:table-cell>
          <table:table-cell table:style-name="ce14" office:value-type="string" calcext:value-type="string">
            <text:p>Botanical Interest, Inc</text:p>
          </table:table-cell>
          <table:table-cell table:style-name="ce15" office:value-type="string" calcext:value-type="string">
            <text:p>Sow indoors 6-8 weeks before last frost. <text:s/>Plant 1/4 inch below soil; transplant to garden 12” apart. <text:s/>Peppers are slow to germinate. Save seed from fully ripe, slightly shriveled frui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8-10 days</text:p>
          </table:table-cell>
          <table:table-cell/>
          <table:table-cell table:style-name="ce6" table:number-columns-repeated="16366"/>
        </table:table-row>
        <table:table-row table:style-name="ro6">
          <table:table-cell office:value-type="float" office:value="1583" calcext:value-type="float">
            <text:p>1583</text:p>
          </table:table-cell>
          <table:table-cell table:style-name="ce15" office:value-type="string" calcext:value-type="string">
            <text:p>Pepper CHILE (Capsicum annuum)</text:p>
          </table:table-cell>
          <table:table-cell table:style-name="ce15" office:value-type="string" calcext:value-type="string">
            <text:p>Ordono <text:s/>(HOT)</text:p>
          </table:table-cell>
          <table:table-cell table:style-name="ce15" office:value-type="string" calcext:value-type="string">
            <text:p>Native Seed/SEARCH <text:s/>www.nativeseeds.org</text:p>
          </table:table-cell>
          <table:table-cell table:style-name="ce15" office:value-type="string" calcext:value-type="string">
            <text:p>Stunning ornamental chile from Batopilas Canyon, Chihuahua, Mexico. Hot &amp; edible. Upright fruit mature to purple, yellow, orange, then red. <text:s/>Start inside 1/4” deep in loose soil 8-10 weeks before last frost. <text:s/>Slow to germinate; need warmth; great container plant. Save seeds from fully ripe, slightly shriveled fruit. Can cross pollinate. Soil Temp Range: 60°-95° Optimum: 8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table-cell table:style-name="ce6" table:number-columns-repeated="16366"/>
        </table:table-row>
        <table:table-row table:style-name="ro4">
          <table:table-cell office:value-type="float" office:value="1555" calcext:value-type="float">
            <text:p>1555</text:p>
          </table:table-cell>
          <table:table-cell table:style-name="ce14" office:value-type="string" calcext:value-type="string">
            <text:p>PEA Sugar Pod (Pisum sativum)</text:p>
          </table:table-cell>
          <table:table-cell table:style-name="ce14" office:value-type="string" calcext:value-type="string">
            <text:p>Oregon II</text:p>
          </table:table-cell>
          <table:table-cell table:style-name="ce14" office:value-type="string" calcext:value-type="string">
            <text:p>Botanical Interest, Inc</text:p>
          </table:table-cell>
          <table:table-cell table:style-name="ce14" office:value-type="string" calcext:value-type="string">
            <text:p>Direct sow outdoors; young plants can tolerate a light frost and harder frosts with frost cover. Plant 1/2”-1” deep, 4”-6” apart in full sun. Trellis. Keep weed free. <text:s/>Early harvest; cold resistant; 65 days; 4”-5” pods.</text:p>
          </table:table-cell>
          <table:table-cell table:style-name="ce14"/>
          <table:table-cell table:style-name="ce14" office:value-type="string" calcext:value-type="string">
            <text:p>8+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6-7 days</text:p>
          </table:table-cell>
          <table:table-cell/>
          <table:table-cell table:style-name="ce6" table:number-columns-repeated="16366"/>
        </table:table-row>
        <table:table-row table:style-name="ro2">
          <table:table-cell office:value-type="float" office:value="1466" calcext:value-type="float">
            <text:p>1466</text:p>
          </table:table-cell>
          <table:table-cell table:style-name="ce14" office:value-type="string" calcext:value-type="string">
            <text:p>HERB Tarragon (Artemesia dracunculoides)</text:p>
          </table:table-cell>
          <table:table-cell table:style-name="ce14" office:value-type="string" calcext:value-type="string">
            <text:p>Organic</text:p>
          </table:table-cell>
          <table:table-cell table:style-name="ce14" office:value-type="string" calcext:value-type="string">
            <text:p>Ferry Morse</text:p>
          </table:table-cell>
          <table:table-cell table:style-name="ce14" office:value-type="string" calcext:value-type="string">
            <text:p>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 Harvest in the morning for best flavo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4">
          <table:table-cell office:value-type="float" office:value="1101" calcext:value-type="float">
            <text:p>1101</text:p>
          </table:table-cell>
          <table:table-cell table:style-name="ce14" office:value-type="string" calcext:value-type="string">
            <text:p>BEAN, YARDLONG (Vigna unguiculate)</text:p>
          </table:table-cell>
          <table:table-cell table:style-name="ce14" office:value-type="string" calcext:value-type="string">
            <text:p>Orient Wonder</text:p>
          </table:table-cell>
          <table:table-cell table:style-name="ce14" office:value-type="string" calcext:value-type="string">
            <text:p>Botanical Interest, Inc</text:p>
          </table:table-cell>
          <table:table-cell table:style-name="ce14" office:value-type="string" calcext:value-type="string">
            <text:p>18” pods. <text:s/>This is a tender bean for stir fry, do not overcook. <text:s/>LONG vines; trellis at least 8 feet! <text:s/>Plant in warm soil 1” deep, 4-6 inches apart in full sun; keep pods picked to encourage production. <text:s/>Pods are stringles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table-cell table:style-name="ce6" table:number-columns-repeated="16366"/>
        </table:table-row>
        <table:table-row table:style-name="ro4">
          <table:table-cell office:value-type="float" office:value="1204" calcext:value-type="float">
            <text:p>1204</text:p>
          </table:table-cell>
          <table:table-cell table:style-name="ce14" office:value-type="string" calcext:value-type="string">
            <text:p>FLOWER <text:s/>ALYSSUM (Lobularia maritima)</text:p>
          </table:table-cell>
          <table:table-cell table:style-name="ce14" office:value-type="string" calcext:value-type="string">
            <text:p>Oriental Nights</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Fall planting in mild climates for winter bloom. Light aids germination. Press seed lightly into soil surface Soil Temp Range: 60°-85°</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office:value-type="string" calcext:value-type="string">
            <text:p>60°-85°</text:p>
          </table:table-cell>
          <table:table-cell table:style-name="ce14"/>
          <table:table-cell/>
          <table:table-cell table:style-name="ce6" table:number-columns-repeated="16366"/>
        </table:table-row>
        <table:table-row table:style-name="ro2">
          <table:table-cell office:value-type="float" office:value="1132" calcext:value-type="float">
            <text:p>1132</text:p>
          </table:table-cell>
          <table:table-cell table:style-name="ce14" office:value-type="string" calcext:value-type="string">
            <text:p>CABBAGE (Brassica rapa)</text:p>
          </table:table-cell>
          <table:table-cell table:style-name="ce14" office:value-type="string" calcext:value-type="string">
            <text:p>Oriental—Extra Dwarf Pak Choy </text:p>
          </table:table-cell>
          <table:table-cell table:style-name="ce14" office:value-type="string" calcext:value-type="string">
            <text:p>Baker Creek Heirloom Seeds</text:p>
          </table:table-cell>
          <table:table-cell table:style-name="ce14" office:value-type="string" calcext:value-type="string">
            <text:p>Tiny Pak Choy is picked at 2” tall! Apt to bolt in frosty weather or summer heat. <text:s/>Direct sow in cool spring or fall conditions. <text:s/>Sow no deeper than 1/4” in moist, rich, well- draining soil. <text:s/>Space 6-12” apart in rows 18-24” apart. <text:s/>Thrive best in temps between 45 and 75 degrees. Soil Temp Range: 45°-75° Optimum: 75°</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45°-75° Optimum: 75°</text:p>
          </table:table-cell>
          <table:table-cell table:style-name="ce14" office:value-type="string" calcext:value-type="string">
            <text:p>4-5 days</text:p>
          </table:table-cell>
          <table:table-cell/>
          <table:table-cell table:style-name="ce6" table:number-columns-repeated="16366"/>
        </table:table-row>
        <table:table-row table:style-name="ro4">
          <table:table-cell office:value-type="float" office:value="1519" calcext:value-type="float">
            <text:p>1519</text:p>
          </table:table-cell>
          <table:table-cell table:style-name="ce15" office:value-type="string" calcext:value-type="string">
            <text:p>MELON Cantelope (Cucumis melo)</text:p>
          </table:table-cell>
          <table:table-cell table:style-name="ce15" office:value-type="string" calcext:value-type="string">
            <text:p>Origami</text:p>
          </table:table-cell>
          <table:table-cell table:style-name="ce15" office:value-type="string" calcext:value-type="string">
            <text:p>Legend Farms</text:p>
          </table:table-cell>
          <table:table-cell table:style-name="ce15" office:value-type="string" calcext:value-type="string">
            <text:p>Plant 3-5 seeds in basin 1” deep 5 feet apart, sprawling vine. Full sun, 90 days. <text:s/>Thin rind, aromatic, small seed cavity, strong grower, #1 requested melon from Legend Farms. Soil Temp Range: 60°-100° Optimum: 9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Jackson, Master Gardener</text:p>
          </table:table-cell>
          <table:table-cell table:style-name="ce28" office:value-type="string" calcext:value-type="string">
            <text:p>2017</text:p>
          </table:table-cell>
          <table:table-cell table:style-name="ce15" office:value-type="string" calcext:value-type="string">
            <text:p>60°-100° Optimum: 90°</text:p>
          </table:table-cell>
          <table:table-cell table:style-name="ce15" office:value-type="string" calcext:value-type="string">
            <text:p>3-4 days</text:p>
          </table:table-cell>
          <table:table-cell/>
          <table:table-cell table:style-name="ce6" table:number-columns-repeated="16366"/>
        </table:table-row>
        <table:table-row table:style-name="ro11">
          <table:table-cell office:value-type="float" office:value="1302" calcext:value-type="float">
            <text:p>1302</text:p>
          </table:table-cell>
          <table:table-cell table:style-name="ce15" office:value-type="string" calcext:value-type="string">
            <text:p>FLOWER Marigold (Calendula officinalis)</text:p>
          </table:table-cell>
          <table:table-cell table:style-name="ce15" office:value-type="string" calcext:value-type="string">
            <text:p>Pacific Beauty Mix</text:p>
          </table:table-cell>
          <table:table-cell table:style-name="ce15"/>
          <table:table-cell table:style-name="ce15" office:value-type="string" calcext:value-type="string">
            <text:p>Plant 1/4” deep about 6-12” apart in fall. Petals of the flower may be eaten raw in salads or cooked as a seasoning for other dishes.</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4">
          <table:table-cell office:value-type="float" office:value="1263" calcext:value-type="float">
            <text:p>1263</text:p>
          </table:table-cell>
          <table:table-cell table:style-name="ce15" office:value-type="string" calcext:value-type="string">
            <text:p>FLOWER Delphinium (Delphinium elatum)</text:p>
          </table:table-cell>
          <table:table-cell table:style-name="ce15" office:value-type="string" calcext:value-type="string">
            <text:p>Pacific Giants</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and in mild climates as late as 2 months before first frost. Plant 1/4” deep. Space 12” apart. Attracts pollinators. Lasts well as a cut flower. Deer resistant. Grows 3’ to 6’ tall.</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574" calcext:value-type="float">
            <text:p>1574</text:p>
          </table:table-cell>
          <table:table-cell table:style-name="ce14" office:value-type="string" calcext:value-type="string">
            <text:p>PEPPER CHILE (Capsicum annuum)</text:p>
          </table:table-cell>
          <table:table-cell table:style-name="ce14" office:value-type="string" calcext:value-type="string">
            <text:p>Padron</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8”-24” apart in full sun/partial in shade low desert. Save seeds from fully ripe, slightly shriveled fruit. Can cross pollinate. <text:s/>(Mild heat 500-2,500 SHU)</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table-cell table:style-name="ce6" table:number-columns-repeated="16366"/>
        </table:table-row>
        <table:table-row table:style-name="ro3">
          <table:table-cell office:value-type="float" office:value="1166" calcext:value-type="float">
            <text:p>1166</text:p>
          </table:table-cell>
          <table:table-cell table:style-name="ce15" office:value-type="string" calcext:value-type="string">
            <text:p>CORN, SWEET (Zea mays)</text:p>
          </table:table-cell>
          <table:table-cell table:style-name="ce15" office:value-type="string" calcext:value-type="string">
            <text:p>Painted Hill</text:p>
          </table:table-cell>
          <table:table-cell table:style-name="ce14" office:value-type="string" calcext:value-type="string">
            <text:p>Botanical Interest, Inc</text:p>
          </table:table-cell>
          <table:table-cell table:style-name="ce15" office:value-type="string" calcext:value-type="string">
            <text:p>Wind pollinated; all varieties will cross. Plant in early spring or 1” deep in rows, clumps, or basins. Cool tolerant. Color intensifies when dried.</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281" calcext:value-type="float">
            <text:p>1281</text:p>
          </table:table-cell>
          <table:table-cell table:style-name="ce14" office:value-type="string" calcext:value-type="string">
            <text:p>FLOWER Hollyhock (Alcea rosea)</text:p>
          </table:table-cell>
          <table:table-cell table:style-name="ce14" office:value-type="string" calcext:value-type="string">
            <text:p>Pale Yellow, Single</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3">
          <table:table-cell office:value-type="float" office:value="1133" calcext:value-type="float">
            <text:p>1133</text:p>
          </table:table-cell>
          <table:table-cell table:style-name="ce14" office:value-type="string" calcext:value-type="string">
            <text:p>CABBAGE Raddicchio (Chichorium intybus)</text:p>
          </table:table-cell>
          <table:table-cell table:style-name="ce14" office:value-type="string" calcext:value-type="string">
            <text:p>Palla Rossa Mavrik</text:p>
          </table:table-cell>
          <table:table-cell table:style-name="ce14" office:value-type="string" calcext:value-type="string">
            <text:p>Botanical Interest, Inc</text:p>
          </table:table-cell>
          <table:table-cell table:style-name="ce14" office:value-type="string" calcext:value-type="string">
            <text:p>Plant seeds 1/4” deep indoors 8-10 weeks before average first fall frost then transplant about 4 weeks later 8-10 inches apart. Seeds go dormant over 77F. Great in salad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5 days</text:p>
          </table:table-cell>
          <table:table-cell/>
          <table:table-cell table:style-name="ce6" table:number-columns-repeated="16366"/>
        </table:table-row>
        <table:table-row table:style-name="ro2">
          <table:table-cell office:value-type="float" office:value="1322" calcext:value-type="float">
            <text:p>1322</text:p>
          </table:table-cell>
          <table:table-cell table:style-name="ce14" office:value-type="string" calcext:value-type="string">
            <text:p>FLOWER Penstemon (Penstemon palmeri)</text:p>
          </table:table-cell>
          <table:table-cell table:style-name="ce14" office:value-type="string" calcext:value-type="string">
            <text:p>Palmer’s Penstemon</text:p>
          </table:table-cell>
          <table:table-cell table:style-name="ce14"/>
          <table:table-cell table:style-name="ce14" office:value-type="string" calcext:value-type="string">
            <text:p>Loosen soil with a rake or spade and work the seeds into the top 1/2 inch. Needs well drained soil with little or no amendments. Thrives in full sun. Do not overwater. One of 250 species; native to AZ &amp; Mexico, typically above 3600’. Light pink bloom that can reach 3-6’. Pollinator. Will reseed themselve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table-cell table:style-name="ce6" table:number-columns-repeated="16366"/>
        </table:table-row>
        <table:table-row table:style-name="ro2">
          <table:table-cell office:value-type="float" office:value="1224" calcext:value-type="float">
            <text:p>1224</text:p>
          </table:table-cell>
          <table:table-cell table:style-name="ce14" office:value-type="string" calcext:value-type="string">
            <text:p>FLOWER (Cyelosia argentea var. Plumosa)</text:p>
          </table:table-cell>
          <table:table-cell table:style-name="ce14" office:value-type="string" calcext:value-type="string">
            <text:p>Pampas Plume Tall Blend</text:p>
          </table:table-cell>
          <table:table-cell table:style-name="ce14" office:value-type="string" calcext:value-type="string">
            <text:p>Botanical Interest, Inc</text:p>
          </table:table-cell>
          <table:table-cell table:style-name="ce14" office:value-type="string" calcext:value-type="string">
            <text:p>Recommend starting inside 6-8 weeks before last frost. Light aids germination so sow shallowly. Keep moist until established. Fairly heat and drought tolerant.</text:p>
          </table:table-cell>
          <table:table-cell table:style-name="ce14"/>
          <table:table-cell table:style-name="ce14" office:value-type="string" calcext:value-type="string">
            <text:p>6-8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so sow shallowly. Keep moist until established. Fairly heat and drought tolerant.</text:p>
          </table:table-cell>
          <table:table-cell/>
          <table:table-cell table:style-name="ce6" table:number-columns-repeated="16366"/>
        </table:table-row>
        <table:table-row table:style-name="ro4">
          <table:table-cell office:value-type="float" office:value="1182" calcext:value-type="float">
            <text:p>1182</text:p>
          </table:table-cell>
          <table:table-cell table:style-name="ce15" office:value-type="string" calcext:value-type="string">
            <text:p>CUCUMBER (Cucumis sativus)</text:p>
          </table:table-cell>
          <table:table-cell table:style-name="ce15" office:value-type="string" calcext:value-type="string">
            <text:p>Parisian Gherkin</text:p>
          </table:table-cell>
          <table:table-cell table:style-name="ce14" office:value-type="string" calcext:value-type="string">
            <text:p>Botanical Interest, Inc</text:p>
          </table:table-cell>
          <table:table-cell table:style-name="ce15" office:value-type="string" calcext:value-type="string">
            <text:p>Direct sow outside 1-2 weeks after danger of frost. <text:s/>Plant 1/2” deep with 2-3 seeds 12” apart if trellising. Thin to 1 plant each hill. Full sun; 50 days. Dark green 1 1/2” to 4” fruit. A favorite for making sweet pickles.</text:p>
          </table:table-cell>
          <table:table-cell table:style-name="ce15"/>
          <table:table-cell table:style-name="ce15" office:value-type="string" calcext:value-type="string">
            <text:p>9+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2">
          <table:table-cell office:value-type="float" office:value="1323" calcext:value-type="float">
            <text:p>1323</text:p>
          </table:table-cell>
          <table:table-cell table:style-name="ce15" office:value-type="string" calcext:value-type="string">
            <text:p>FLOWER Penstemon (Penstemon parryi)</text:p>
          </table:table-cell>
          <table:table-cell table:style-name="ce15" office:value-type="string" calcext:value-type="string">
            <text:p>Parry’s Penstemon</text:p>
          </table:table-cell>
          <table:table-cell table:style-name="ce15"/>
          <table:table-cell table:style-name="ce15" office:value-type="string" calcext:value-type="string">
            <text:p>One of 250 species; native to AZ &amp; Mexico; reddish/pink bloom; many flower stalks; self-sowing in Zones 10, 12, 13. <text:s/>Hummingbirds love it! Loosen soil with a rake or spade and work the seeds into the top 1/2 inch. Needs well drained soil with little or no amendments. Thrives in full sun. Do not overwater.</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table-cell table:style-name="ce6" table:number-columns-repeated="16366"/>
        </table:table-row>
        <table:table-row table:style-name="ro12">
          <table:table-cell office:value-type="float" office:value="1727" calcext:value-type="float">
            <text:p>1727</text:p>
          </table:table-cell>
          <table:table-cell table:style-name="ce15" office:value-type="string" calcext:value-type="string">
            <text:p>TOMATO CHERRY(Lycopersicon esculentum)</text:p>
          </table:table-cell>
          <table:table-cell table:style-name="ce15" office:value-type="string" calcext:value-type="string">
            <text:p>Patio Choice Yellow</text:p>
          </table:table-cell>
          <table:table-cell table:style-name="ce14" office:value-type="string" calcext:value-type="string">
            <text:p>Botanical Interest, Inc</text:p>
          </table:table-cell>
          <table:table-cell table:style-name="ce15" office:value-type="string" calcext:value-type="string">
            <text:p>Start indoors 4-6 weeks before transplant. Sow 1/8” below surface in containers. Transplant 1-2 weeks after last frost. ; plant outdoors</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12">
          <table:table-cell office:value-type="float" office:value="1681" calcext:value-type="float">
            <text:p>1681</text:p>
          </table:table-cell>
          <table:table-cell table:style-name="ce15" office:value-type="string" calcext:value-type="string">
            <text:p>SQUASH Summer (Cucubirta pepo)</text:p>
          </table:table-cell>
          <table:table-cell table:style-name="ce15" office:value-type="string" calcext:value-type="string">
            <text:p>Patty Pan Scallop Blend</text:p>
          </table:table-cell>
          <table:table-cell table:style-name="ce14" office:value-type="string" calcext:value-type="string">
            <text:p>Botanical Interest, Inc</text:p>
          </table:table-cell>
          <table:table-cell table:style-name="ce15" office:value-type="string" calcext:value-type="string">
            <text:p>Plant outdoors1-2 weeks after last frost. Sow 2- 3 seeds 1/2”-1”deep, on mounds spaced 3-4 feet apart; thin to 1 healthy plant. Pick regularly to encourage fruit development. 45-60 day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12">
          <table:table-cell office:value-type="float" office:value="1682" calcext:value-type="float">
            <text:p>1682</text:p>
          </table:table-cell>
          <table:table-cell table:style-name="ce14" office:value-type="string" calcext:value-type="string">
            <text:p>SQUASH Summer (Cucubirta pepo)</text:p>
          </table:table-cell>
          <table:table-cell table:style-name="ce14" office:value-type="string" calcext:value-type="string">
            <text:p>Patty Pan-Bennings Green Tint</text:p>
          </table:table-cell>
          <table:table-cell table:style-name="ce14" office:value-type="string" calcext:value-type="string">
            <text:p>Botanical Interest, Inc</text:p>
          </table:table-cell>
          <table:table-cell table:style-name="ce14" office:value-type="string" calcext:value-type="string">
            <text:p>Plant outdoors1-2 weeks after last frost. Sow 2- 3 seeds 1/2”-1”deep, on mounds spaced 3-4 feet apart; thin to 1 healthy plant. Pick regularly to encourage fruit development. 45-60 day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12">
          <table:table-cell office:value-type="float" office:value="1043" calcext:value-type="float">
            <text:p>1043</text:p>
          </table:table-cell>
          <table:table-cell table:style-name="ce15" office:value-type="string" calcext:value-type="string">
            <text:p>Baby GREENS (Pisum sativum)</text:p>
          </table:table-cell>
          <table:table-cell table:style-name="ce15" office:value-type="string" calcext:value-type="string">
            <text:p>Pea Shoots</text:p>
          </table:table-cell>
          <table:table-cell table:style-name="ce14" office:value-type="string" calcext:value-type="string">
            <text:p>Botanical Interest, Inc</text:p>
          </table:table-cell>
          <table:table-cell table:style-name="ce15" office:value-type="string" calcext:value-type="string">
            <text:p>Plant 1/2” deep about 1” apart in a flat. Keep in an area with temperature between 60-80. Does not require thinning. Harvest when 2-4 inches tall to add to salads or smoothies.</text:p>
          </table:table-cell>
          <table:table-cell table:style-name="ce15"/>
          <table:table-cell table:style-name="ce15" office:value-type="string" calcext:value-type="string">
            <text:p>30-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167" calcext:value-type="float">
            <text:p>1167</text:p>
          </table:table-cell>
          <table:table-cell table:style-name="ce14" office:value-type="string" calcext:value-type="string">
            <text:p>CORN, SWEET (Zea mays)</text:p>
          </table:table-cell>
          <table:table-cell table:style-name="ce14" office:value-type="string" calcext:value-type="string">
            <text:p>Peaches and Cream</text:p>
          </table:table-cell>
          <table:table-cell table:style-name="ce14" office:value-type="string" calcext:value-type="string">
            <text:p>Ferry Morse</text:p>
          </table:table-cell>
          <table:table-cell table:style-name="ce14" office:value-type="string" calcext:value-type="string">
            <text:p>Up to 7 1/2” inch ears, 65 days; wind pollinated; all varieties will cross. Plant in spring after last frost 1”-1 1/2” deep, 8-12” apart in rows, clumps, or basins. For best results plant a number of short rows together to ensure pollination. Harvest when kernels are full and juicy, about 83 day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175" calcext:value-type="float">
            <text:p>1175</text:p>
          </table:table-cell>
          <table:table-cell table:style-name="ce14" office:value-type="string" calcext:value-type="string">
            <text:p>Cover Crop Soil Builder (Pisum sativum and Avina Sativa)</text:p>
          </table:table-cell>
          <table:table-cell table:style-name="ce14" office:value-type="string" calcext:value-type="string">
            <text:p>Peas and Oats</text:p>
          </table:table-cell>
          <table:table-cell table:style-name="ce14" office:value-type="string" calcext:value-type="string">
            <text:p>Botanical Interest, Inc</text:p>
          </table:table-cell>
          <table:table-cell table:style-name="ce14" office:value-type="string" calcext:value-type="string">
            <text:p>Sow as soon as soil can be worked; best to sow in fall or winter for growth during cool season. Scatter seeds about 3” apart and cover with 1” soil. Peas fix nitrogen and attract beneficial insects. Oats hold nitrogen, provide organic matter and suppress weeds.</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4">
          <table:table-cell office:value-type="float" office:value="1326" calcext:value-type="float">
            <text:p>1326</text:p>
          </table:table-cell>
          <table:table-cell table:style-name="ce14" office:value-type="string" calcext:value-type="string">
            <text:p>FLOWER Peony Double (Papaver somniferum)</text:p>
          </table:table-cell>
          <table:table-cell table:style-name="ce14" office:value-type="string" calcext:value-type="string">
            <text:p>Peony Double</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Fully double 3”-5”, colorful flowers. Seed pods are interesting in dried flower arrangements. Attracts pollinators. Deer resistant. Drought tolerant.</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469" calcext:value-type="float">
            <text:p>1469</text:p>
          </table:table-cell>
          <table:table-cell table:style-name="ce15" office:value-type="string" calcext:value-type="string">
            <text:p>HERB, MINT <text:s/>(Menthe piperta)</text:p>
          </table:table-cell>
          <table:table-cell table:style-name="ce15" office:value-type="string" calcext:value-type="string">
            <text:p>Peppermint</text:p>
          </table:table-cell>
          <table:table-cell table:style-name="ce15" office:value-type="string" calcext:value-type="string">
            <text:p>Sunnizona Family Farms</text:p>
          </table:table-cell>
          <table:table-cell table:style-name="ce15" office:value-type="string" calcext:value-type="string">
            <text:p>Sow in shallow trays or flats. Broadcast seed thickly, about 1/8”-1/4” apart. Press seeds firmly into soil but do not cover except with clear dome as seed need light to germinate.</text:p>
          </table:table-cell>
          <table:table-cell table:style-name="ce15"/>
          <table:table-cell table:style-name="ce15" office:value-type="string" calcext:value-type="string">
            <text:p>10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6">
          <table:table-cell office:value-type="float" office:value="1694" calcext:value-type="float">
            <text:p>1694</text:p>
          </table:table-cell>
          <table:table-cell table:style-name="ce15" office:value-type="string" calcext:value-type="string">
            <text:p>SWISS CHARD (Beta vulgaris)</text:p>
          </table:table-cell>
          <table:table-cell table:style-name="ce15" office:value-type="string" calcext:value-type="string">
            <text:p>Peppermint</text:p>
          </table:table-cell>
          <table:table-cell table:style-name="ce15" office:value-type="string" calcext:value-type="string">
            <text:p>Johnny’s Seed</text:p>
          </table:table-cell>
          <table:table-cell table:style-name="ce15" office:value-type="string" calcext:value-type="string">
            <text:p>Pink on white stems. Sow direct or indoors for transplant, 1/2” deep, 8” apart early spring. Sun/partial shade, 40-60 days. <text:s/>Stalks will be 8-10” tall. Begin harvesting when outer leaves are 6-8” tall; cut off individual leaves near the base; new leaves will grow back. Loves warm weather. Soil Temp: <text:s/>Range: 40-95 degrees Optimum: 85 degrees</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Range: 40-95 degrees Optimum: 85 degrees</text:p>
          </table:table-cell>
          <table:table-cell table:style-name="ce15" office:value-type="string" calcext:value-type="string">
            <text:p>4-5 days @ 85 degrees</text:p>
          </table:table-cell>
          <table:table-cell/>
          <table:table-cell table:style-name="ce6" table:number-columns-repeated="16366"/>
        </table:table-row>
        <table:table-row table:style-name="ro3">
          <table:table-cell office:value-type="float" office:value="1374" calcext:value-type="float">
            <text:p>1374</text:p>
          </table:table-cell>
          <table:table-cell table:style-name="ce15" office:value-type="string" calcext:value-type="string">
            <text:p>FLOWER Zinnia (Zinnia elegans)</text:p>
          </table:table-cell>
          <table:table-cell table:style-name="ce15" office:value-type="string" calcext:value-type="string">
            <text:p>Peppermint Stick</text:p>
          </table:table-cell>
          <table:table-cell table:style-name="ce14" office:value-type="string" calcext:value-type="string">
            <text:p>Botanical Interest, Inc</text:p>
          </table:table-cell>
          <table:table-cell table:style-name="ce15" office:value-type="string" calcext:value-type="string">
            <text:p>Sow outside 2 to 4 weeks after last frost. Plant 1/4” deep. Space 8” apart. Heat loving. Attracts pollinators. Deer resistant. Make wonderful cut flowe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4">
          <table:table-cell office:value-type="float" office:value="1439" calcext:value-type="float">
            <text:p>1439</text:p>
          </table:table-cell>
          <table:table-cell table:style-name="ce14" office:value-type="string" calcext:value-type="string">
            <text:p>HERB Fennel (Foeniculum vulgare var azoricum)</text:p>
          </table:table-cell>
          <table:table-cell table:style-name="ce14" office:value-type="string" calcext:value-type="string">
            <text:p>Perfection </text:p>
          </table:table-cell>
          <table:table-cell table:style-name="ce14" office:value-type="string" calcext:value-type="string">
            <text:p>Botanical Interest, Inc</text:p>
          </table:table-cell>
          <table:table-cell table:style-name="ce14" office:value-type="string" calcext:value-type="string">
            <text:p>Start indoors 1/4” deep; darkness aids germination. Transplant <text:s/>4” apart; prefers well-drained, rich soil. <text:s/>Excellent additive to salads, fish, sauces (add seeds to spaghetti sauce!). <text:s/>Larger bulb can be eaten as a vegetable. Foliage and seeds can be used as herb.</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15 days</text:p>
          </table:table-cell>
          <table:table-cell/>
          <table:table-cell table:style-name="ce6" table:number-columns-repeated="16366"/>
        </table:table-row>
        <table:table-row table:style-name="ro3">
          <table:table-cell office:value-type="float" office:value="1381" calcext:value-type="float">
            <text:p>1381</text:p>
          </table:table-cell>
          <table:table-cell table:style-name="ce14" office:value-type="string" calcext:value-type="string">
            <text:p>FLOWER Zinnia (Zinnia haageana)</text:p>
          </table:table-cell>
          <table:table-cell table:style-name="ce14" office:value-type="string" calcext:value-type="string">
            <text:p>Persian Carpet</text:p>
          </table:table-cell>
          <table:table-cell table:style-name="ce14" office:value-type="string" calcext:value-type="string">
            <text:p>Botanical Interest, Inc</text:p>
          </table:table-cell>
          <table:table-cell table:style-name="ce14" office:value-type="string" calcext:value-type="string">
            <text:p>Sow outside 2 to 4 weeks after last frost. Plant 1/4” deep. Space 8” apart. Heat loving and drought tolerant. Attracts pollinators. Deer resistant. Make wonderful cut flow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5">
          <table:table-cell office:value-type="float" office:value="1304" calcext:value-type="float">
            <text:p>1304</text:p>
          </table:table-cell>
          <table:table-cell table:style-name="ce15" office:value-type="string" calcext:value-type="string">
            <text:p>FLOWER Marigold (Tagetes erecta)</text:p>
          </table:table-cell>
          <table:table-cell table:style-name="ce14" office:value-type="string" calcext:value-type="string">
            <text:p>Petite Orange</text:p>
          </table:table-cell>
          <table:table-cell table:style-name="ce14" office:value-type="string" calcext:value-type="string">
            <text:p>American Seed</text:p>
          </table:table-cell>
          <table:table-cell table:style-name="ce14" office:value-type="string" calcext:value-type="string">
            <text:p>Tightly packed, heavily curled petals. Start indoors 3-4 weeks before setting out after frost using fine, moist soil, covering lightly. <text:s/>Plant one foot apart in full sun. 6-8 inches tall. Small bright orange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1</text:p>
          </table:table-cell>
          <table:table-cell table:style-name="ce14" table:number-columns-repeated="2"/>
          <table:table-cell/>
          <table:table-cell table:style-name="ce6" table:number-columns-repeated="16366"/>
        </table:table-row>
        <table:table-row table:style-name="ro5">
          <table:table-cell office:value-type="float" office:value="1145" calcext:value-type="float">
            <text:p>1145</text:p>
          </table:table-cell>
          <table:table-cell table:style-name="ce14" office:value-type="string" calcext:value-type="string">
            <text:p>CARROT (Daucus carota)</text:p>
          </table:table-cell>
          <table:table-cell table:style-name="ce14" office:value-type="string" calcext:value-type="string">
            <text:p>Petite Sweet</text:p>
          </table:table-cell>
          <table:table-cell table:style-name="ce14" office:value-type="string" calcext:value-type="string">
            <text:p>American Seed</text:p>
          </table:table-cell>
          <table:table-cell table:style-name="ce14" office:value-type="string" calcext:value-type="string">
            <text:p>Gourmet baby carrot 3-4 inches long. <text:s/>Sow direct into rich soil high in phosphorus &amp; potassium (moderate nitrogen); 3-5 seeds every inch; harvest 65 days. <text:s/>Compact roots; good for canning. <text:s/>Seeds are biennial. Soil Temp Range: 40°-95° Optimum: 85°</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40°-95° Optimum: 85°</text:p>
          </table:table-cell>
          <table:table-cell table:style-name="ce14" office:value-type="string" calcext:value-type="string">
            <text:p>4-6 days</text:p>
          </table:table-cell>
          <table:table-cell/>
          <table:table-cell table:style-name="ce6" table:number-columns-repeated="16366"/>
        </table:table-row>
        <table:table-row table:style-name="ro3">
          <table:table-cell office:value-type="float" office:value="1081" calcext:value-type="float">
            <text:p>1081</text:p>
          </table:table-cell>
          <table:table-cell table:style-name="ce14" office:value-type="string" calcext:value-type="string">
            <text:p>BEAN, LIMA (Phaseolus lunatus)</text:p>
          </table:table-cell>
          <table:table-cell table:style-name="ce14" office:value-type="string" calcext:value-type="string">
            <text:p>Pima Beige</text:p>
          </table:table-cell>
          <table:table-cell table:style-name="ce14" office:value-type="string" calcext:value-type="string">
            <text:p>Native Seed/SEARCH <text:s/>www.nativeseeds.org</text:p>
          </table:table-cell>
          <table:table-cell table:style-name="ce14" office:value-type="string" calcext:value-type="string">
            <text:p>Direct sow outdoors after last frost; 6” apart and 1” deep; rows or basins; trellis. <text:s/>Broad, flat beans eaten green or dried. Tolerant of salt and alkaline soils. Soil Temp Range: 60°-9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Gila River Indian Community in Arizona</text:p>
          </table:table-cell>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4">
          <table:table-cell office:value-type="float" office:value="1091" calcext:value-type="float">
            <text:p>1091</text:p>
          </table:table-cell>
          <table:table-cell table:style-name="ce16" office:value-type="string" calcext:value-type="string">
            <text:p>BEAN, TEPARY (Phaseolus acutifolius)</text:p>
          </table:table-cell>
          <table:table-cell table:style-name="ce14" office:value-type="string" calcext:value-type="string">
            <text:p>Pinacate</text:p>
          </table:table-cell>
          <table:table-cell table:style-name="ce14" office:value-type="string" calcext:value-type="string">
            <text:p>Native Seed/SEARCH <text:s/>www.nativeseeds.org</text:p>
          </table:table-cell>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 </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table:number-columns-repeated="2"/>
          <table:table-cell/>
          <table:table-cell table:style-name="ce6" table:number-columns-repeated="16366"/>
        </table:table-row>
        <table:table-row table:style-name="ro4">
          <table:table-cell office:value-type="float" office:value="1287" calcext:value-type="float">
            <text:p>1287</text:p>
          </table:table-cell>
          <table:table-cell table:style-name="ce14" office:value-type="string" calcext:value-type="string">
            <text:p>FLOWER Hollyhock (Alcea rosea)</text:p>
          </table:table-cell>
          <table:table-cell table:style-name="ce14" office:value-type="string" calcext:value-type="string">
            <text:p>Pink</text:p>
          </table:table-cell>
          <table:table-cell table:style-name="ce14"/>
          <table:table-cell table:style-name="ce14" office:value-type="string" calcext:value-type="string">
            <text:p>Biennial life cycle; grows 72-84 inches; direct sow 1/4 in deep, 2 ft between plants; full sun; mid to late season, blooms summer into fall. <text:s/>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3">
          <table:table-cell office:value-type="float" office:value="1178" calcext:value-type="float">
            <text:p>1178</text:p>
          </table:table-cell>
          <table:table-cell table:style-name="ce15" office:value-type="string" calcext:value-type="string">
            <text:p>COWPEA (Vigna unguiculata) Variety: Pinkeye Purple Hull Bush(Shell or dried)</text:p>
          </table:table-cell>
          <table:table-cell table:style-name="ce15" office:value-type="string" calcext:value-type="string">
            <text:p>Pinkeye Purple Hull Bush(Shell or dried)</text:p>
          </table:table-cell>
          <table:table-cell table:style-name="ce14" office:value-type="string" calcext:value-type="string">
            <text:p>Botanical Interest, Inc</text:p>
          </table:table-cell>
          <table:table-cell table:style-name="ce15" office:value-type="string" calcext:value-type="string">
            <text:p>Soak seeds for 1-2 hours before planting (speeds germination); plant 1” deep, full sun,</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7 days</text:p>
          </table:table-cell>
          <table:table-cell/>
          <table:table-cell table:style-name="ce6" table:number-columns-repeated="16366"/>
        </table:table-row>
        <table:table-row table:style-name="ro4">
          <table:table-cell office:value-type="float" office:value="1071" calcext:value-type="float">
            <text:p>1071</text:p>
          </table:table-cell>
          <table:table-cell table:style-name="ce14" office:value-type="string" calcext:value-type="string">
            <text:p>BEAN, COMMON (Phaseolus vulgaris)</text:p>
          </table:table-cell>
          <table:table-cell table:style-name="ce15" office:value-type="string" calcext:value-type="string">
            <text:p>Pinto - Bush Type</text:p>
          </table:table-cell>
          <table:table-cell table:style-name="ce15" office:value-type="string" calcext:value-type="string">
            <text:p>Patriot Seeds</text:p>
          </table:table-cell>
          <table:table-cell table:style-name="ce15" office:value-type="string" calcext:value-type="string">
            <text:p>Direct sow outdoors after last frost; 4” apart and 1” deep; rows 24” apart. Full sun; 90-95 days. Harvest when pods are completely dried while still on vine or eat green and young as snap bean. Soil Temp Range: 60°-95° Optimum: 80°</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60°-95° Optimum: 80°</text:p>
          </table:table-cell>
          <table:table-cell table:style-name="ce15" office:value-type="string" calcext:value-type="string">
            <text:p>6-7 days</text:p>
          </table:table-cell>
          <table:table-cell/>
          <table:table-cell table:style-name="ce6" table:number-columns-repeated="16366"/>
        </table:table-row>
        <table:table-row table:style-name="ro4">
          <table:table-cell office:value-type="float" office:value="1300" calcext:value-type="float">
            <text:p>1300</text:p>
          </table:table-cell>
          <table:table-cell table:style-name="ce14" office:value-type="string" calcext:value-type="string">
            <text:p>FLOWER Lupine (Lupinus nanus)</text:p>
          </table:table-cell>
          <table:table-cell table:style-name="ce14" office:value-type="string" calcext:value-type="string">
            <text:p>Pixie Delight</text:p>
          </table:table-cell>
          <table:table-cell table:style-name="ce14" office:value-type="string" calcext:value-type="string">
            <text:p>Botanical Interest, Inc</text:p>
          </table:table-cell>
          <table:table-cell table:style-name="ce14" office:value-type="string" calcext:value-type="string">
            <text:p>Sow outside in late fall for blooms the following spring. Plant 1/8” deep. Space 10” apart. Attracts pollinators. Blooms are shades of pink, blue, purple, white and some are bicolored. Tolerates poor, dry soi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3">
          <table:table-cell office:value-type="float" office:value="1598" calcext:value-type="float">
            <text:p>1598</text:p>
          </table:table-cell>
          <table:table-cell table:style-name="ce15" office:value-type="string" calcext:value-type="string">
            <text:p>Pepper Chili (Capsicum annuum)</text:p>
          </table:table-cell>
          <table:table-cell table:style-name="ce15" office:value-type="string" calcext:value-type="string">
            <text:p>Pizza </text:p>
          </table:table-cell>
          <table:table-cell table:style-name="ce15" office:value-type="string" calcext:value-type="string">
            <text:p>Territorial Seed Company</text:p>
          </table:table-cell>
          <table:table-cell table:style-name="ce15" office:value-type="string" calcext:value-type="string">
            <text:p>Start inside 1/4” deep in loose soil 8- 10 weeks before last frost. <text:s/>Slow to germinate; need warmth; plant 12-16” apart in full sun. Thick walled, flavorful with a hint of zing. Can cross pollinate.</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10-25 days</text:p>
          </table:table-cell>
          <table:table-cell/>
          <table:table-cell table:style-name="ce6" table:number-columns-repeated="16366"/>
        </table:table-row>
        <table:table-row table:style-name="ro4">
          <table:table-cell office:value-type="float" office:value="1600" calcext:value-type="float">
            <text:p>1600</text:p>
          </table:table-cell>
          <table:table-cell table:style-name="ce15" office:value-type="string" calcext:value-type="string">
            <text:p>Pepper, CHILE (Capsicum annuum)</text:p>
          </table:table-cell>
          <table:table-cell table:style-name="ce15" office:value-type="string" calcext:value-type="string">
            <text:p>Poblano (when fresh), Ancho (when when dried)</text:p>
          </table:table-cell>
          <table:table-cell table:style-name="ce15" office:value-type="string" calcext:value-type="string">
            <text:p>Mary Jackson, Master Gardener</text:p>
          </table:table-cell>
          <table:table-cell table:style-name="ce15" office:value-type="string" calcext:value-type="string">
            <text:p>Start inside 1/4” deep in loose soil 8- 10 weeks before last frost. <text:s/>Slow to germinate; need warmth; plant 12-16” apart in full sun/partial in shade low desert. Save seeds from fully ripe, slightly shriveled fruit. Can cross pollinate. (Medium Hot) </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Jackson, Master Gardener</text:p>
          </table:table-cell>
          <table:table-cell table:style-name="ce28" office:value-type="string" calcext:value-type="string">
            <text:p>2018</text:p>
          </table:table-cell>
          <table:table-cell table:style-name="ce15"/>
          <table:table-cell table:style-name="ce15" office:value-type="string" calcext:value-type="string">
            <text:p>8-10 days</text:p>
          </table:table-cell>
          <table:table-cell/>
          <table:table-cell table:style-name="ce6" table:number-columns-repeated="16366"/>
        </table:table-row>
        <table:table-row table:style-name="ro4">
          <table:table-cell office:value-type="float" office:value="1183" calcext:value-type="float">
            <text:p>1183</text:p>
          </table:table-cell>
          <table:table-cell table:style-name="ce14" office:value-type="string" calcext:value-type="string">
            <text:p>CUCUMBER (Cucumis sativus)</text:p>
          </table:table-cell>
          <table:table-cell table:style-name="ce14" office:value-type="string" calcext:value-type="string">
            <text:p>Poinsett </text:p>
          </table:table-cell>
          <table:table-cell table:style-name="ce14" office:value-type="string" calcext:value-type="string">
            <text:p>Botanical Interest, Inc</text:p>
          </table:table-cell>
          <table:table-cell table:style-name="ce14" office:value-type="string" calcext:value-type="string">
            <text:p>Direct sow outside after danger of frost. Plant 1/2” below soil with 2-3 seeds per hill if spawling, 4” apart if trellising. <text:s/>Full sun; 65 days. Fruit up to 6-8” long. High yield; disease resistance; thin skin; great slicer. Soil Temp Range: 60– 105 Optimum: 8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 105 Optimum: 85°</text:p>
          </table:table-cell>
          <table:table-cell table:style-name="ce14" office:value-type="string" calcext:value-type="string">
            <text:p>5-6 days</text:p>
          </table:table-cell>
          <table:table-cell/>
          <table:table-cell table:style-name="ce6" table:number-columns-repeated="16366"/>
        </table:table-row>
        <table:table-row table:style-name="ro9">
          <table:table-cell office:value-type="float" office:value="1135" calcext:value-type="float">
            <text:p>1135</text:p>
          </table:table-cell>
          <table:table-cell table:style-name="ce14" office:value-type="string" calcext:value-type="string">
            <text:p>CACTUS (Opuntia microdasys)</text:p>
          </table:table-cell>
          <table:table-cell table:style-name="ce14" office:value-type="string" calcext:value-type="string">
            <text:p>Polka Dot Prickly Pear</text:p>
          </table:table-cell>
          <table:table-cell table:style-name="ce15" office:value-type="string" calcext:value-type="string">
            <text:p>BJ Searcy, CCMGA Master Gardener, Whetstone</text:p>
          </table:table-cell>
          <table:table-cell table:style-name="ce14" office:value-type="string" calcext:value-type="string">
            <text:p>Plant in clean shallow container with well draining soil (commercial cactus soil or a mix of equal parts compost, horticulture sand and perlite). Spread seeds on top of soil and cover with a very thin layer of soil or vermiculite.. Moisten lightly, cover with a transparent lid and place in direct sunlight. Keep at a steady temperature. Keep moist but not wet. Uncover when spines appear. Transplant when cactus is well established.</text:p>
          </table:table-cell>
          <table:table-cell table:style-name="ce14"/>
          <table:table-cell table:style-name="ce14" office:value-type="string" calcext:value-type="string">
            <text:p>10+ Seeds</text:p>
          </table:table-cell>
          <table:table-cell table:style-name="ce14" office:value-type="string" calcext:value-type="string">
            <text:p>Decorative</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table-cell table:style-name="ce14" office:value-type="string" calcext:value-type="string">
            <text:p>30-365 days</text:p>
          </table:table-cell>
          <table:table-cell/>
          <table:table-cell table:style-name="ce6" table:number-columns-repeated="16366"/>
        </table:table-row>
        <table:table-row table:style-name="ro11">
          <table:table-cell office:value-type="float" office:value="1221" calcext:value-type="float">
            <text:p>1221</text:p>
          </table:table-cell>
          <table:table-cell table:style-name="ce15" office:value-type="string" calcext:value-type="string">
            <text:p>FLOWER (Assorted species)</text:p>
          </table:table-cell>
          <table:table-cell table:style-name="ce15" office:value-type="string" calcext:value-type="string">
            <text:p>Pollinator Garden Flower Mix</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seeds and rake in. Attracts pollinato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254" calcext:value-type="float">
            <text:p>1254</text:p>
          </table:table-cell>
          <table:table-cell table:style-name="ce15" office:value-type="string" calcext:value-type="string">
            <text:p>FLOWER Coneflower (Ratibida columnaris)</text:p>
          </table:table-cell>
          <table:table-cell table:style-name="ce15" office:value-type="string" calcext:value-type="string">
            <text:p>Prairie Coneflower - Yellow</text:p>
          </table:table-cell>
          <table:table-cell table:style-name="ce23" office:value-type="string" calcext:value-type="string">
            <text:p>Native Seed/SEARCH <text:s/>www.nativeseeds.org</text:p>
          </table:table-cell>
          <table:table-cell table:style-name="ce15" office:value-type="string" calcext:value-type="string">
            <text:p>Sow outside fall or spring. Scarify area to be seeded. Broadcast seed and cover with fine dusting of soil. Drought tolerant. Do not overwater.</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4">
          <table:table-cell office:value-type="float" office:value="1710" calcext:value-type="float">
            <text:p>1710</text:p>
          </table:table-cell>
          <table:table-cell table:style-name="ce14" office:value-type="string" calcext:value-type="string">
            <text:p>TOMATO (Lycopersicon esculentum)</text:p>
          </table:table-cell>
          <table:table-cell table:style-name="ce14" office:value-type="string" calcext:value-type="string">
            <text:p>Principe Borghese</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80 days from transplant. Small fragrant tomato excellent for drying, roasting or in sauce.</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4">
          <table:table-cell office:value-type="float" office:value="1549" calcext:value-type="float">
            <text:p>1549</text:p>
          </table:table-cell>
          <table:table-cell table:style-name="ce15" office:value-type="string" calcext:value-type="string">
            <text:p>PEA Shell (Pisum sativum)</text:p>
          </table:table-cell>
          <table:table-cell table:style-name="ce15" office:value-type="string" calcext:value-type="string">
            <text:p>Progress #9</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2” apart, plants are about 18” so do not need trellis. Pick when seeds have enlarged in pod; hold vines when picking to prevent damage to vine. <text:s/>5” pods, 58 days.</text:p>
          </table:table-cell>
          <table:table-cell table:style-name="ce15"/>
          <table:table-cell table:style-name="ce15" office:value-type="string" calcext:value-type="string">
            <text:p>6+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2">
          <table:table-cell office:value-type="float" office:value="1072" calcext:value-type="float">
            <text:p>1072</text:p>
          </table:table-cell>
          <table:table-cell table:style-name="ce14" office:value-type="string" calcext:value-type="string">
            <text:p>BEAN, COMMON (Phaseolus vulgaris)</text:p>
          </table:table-cell>
          <table:table-cell table:style-name="ce14" office:value-type="string" calcext:value-type="string">
            <text:p>Provider—Snap/Green Bean (Bush type)</text:p>
          </table:table-cell>
          <table:table-cell table:style-name="ce14" office:value-type="string" calcext:value-type="string">
            <text:p>Seed Savers Exchange</text:p>
          </table:table-cell>
          <table:table-cell table:style-name="ce14" office:value-type="string" calcext:value-type="string">
            <text:p>Direct sow outdoors after last frost. <text:s/>Plant 1” deep, 4” apart; bush type Full sun; 50 days; 5-6” pods. Harvest frequently to encourage continued bean production. Will cross- pollinate with other beans. . Produces unusually high yield of tender green beans. Very disease resistan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6-7 days</text:p>
          </table:table-cell>
          <table:table-cell/>
          <table:table-cell table:style-name="ce6" table:number-columns-repeated="16366"/>
        </table:table-row>
        <table:table-row table:style-name="ro3">
          <table:table-cell office:value-type="float" office:value="1722" calcext:value-type="float">
            <text:p>1722</text:p>
          </table:table-cell>
          <table:table-cell table:style-name="ce15" office:value-type="string" calcext:value-type="string">
            <text:p>TOMATO (Solanaceae)</text:p>
          </table:table-cell>
          <table:table-cell table:style-name="ce15" office:value-type="string" calcext:value-type="string">
            <text:p>Punta Banda (Lycopersicum)</text:p>
          </table:table-cell>
          <table:table-cell table:style-name="ce14" office:value-type="string" calcext:value-type="string">
            <text:p>Seed Treasures Open-Pollinated and Heirloom </text:p>
          </table:table-cell>
          <table:table-cell table:style-name="ce15" office:value-type="string" calcext:value-type="string">
            <text:p>Old Mexico wild tomato, plum size, bush type, prolific, for sauce and salsa, start indoors 6 weeks before last frost. Soil Temp Range: 75°-85° Optimum: 80°</text:p>
          </table:table-cell>
          <table:table-cell table:style-name="ce15"/>
          <table:table-cell table:style-name="ce15" office:value-type="string" calcext:value-type="string">
            <text:p>10-1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4" office:value-type="string" calcext:value-type="string">
            <text:p>Hereford, AZ</text:p>
          </table:table-cell>
          <table:table-cell table:style-name="ce15"/>
          <table:table-cell table:style-name="ce15" office:value-type="string" calcext:value-type="string">
            <text:p>Deborah Avery-Hargrove (CCMGA Master Gardener) </text:p>
          </table:table-cell>
          <table:table-cell table:style-name="ce28" office:value-type="string" calcext:value-type="string">
            <text:p>2016</text:p>
          </table:table-cell>
          <table:table-cell table:style-name="ce15" office:value-type="string" calcext:value-type="string">
            <text:p>75°-85° Optimum: 80°</text:p>
          </table:table-cell>
          <table:table-cell table:style-name="ce15" office:value-type="string" calcext:value-type="string">
            <text:p>7 to 10 days</text:p>
          </table:table-cell>
          <table:table-cell/>
          <table:table-cell table:style-name="ce6" table:number-columns-repeated="16366"/>
        </table:table-row>
        <table:table-row table:style-name="ro3">
          <table:table-cell office:value-type="float" office:value="1142" calcext:value-type="float">
            <text:p>1142</text:p>
          </table:table-cell>
          <table:table-cell table:style-name="ce14" office:value-type="string" calcext:value-type="string">
            <text:p>CARROT (Daucus carota)</text:p>
          </table:table-cell>
          <table:table-cell table:style-name="ce14" office:value-type="string" calcext:value-type="string">
            <text:p>Purple</text:p>
          </table:table-cell>
          <table:table-cell table:style-name="ce14"/>
          <table:table-cell table:style-name="ce14" office:value-type="string" calcext:value-type="string">
            <text:p>Plant 1/4” deep, thin to 2”. Pick when tops of roots are 3/4-1 inch in diameter. Carrots are uniform, purple, long and slender. Carrots mature all at once.</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 to 6 days</text:p>
          </table:table-cell>
          <table:table-cell/>
          <table:table-cell table:style-name="ce6" table:number-columns-repeated="16366"/>
        </table:table-row>
        <table:table-row table:style-name="ro3">
          <table:table-cell office:value-type="float" office:value="1702" calcext:value-type="float">
            <text:p>1702</text:p>
          </table:table-cell>
          <table:table-cell table:style-name="ce15" office:value-type="string" calcext:value-type="string">
            <text:p>TOMATILLO (Physalis philadelphica)</text:p>
          </table:table-cell>
          <table:table-cell table:style-name="ce15" office:value-type="string" calcext:value-type="string">
            <text:p>Purple</text:p>
          </table:table-cell>
          <table:table-cell table:style-name="ce14" office:value-type="string" calcext:value-type="string">
            <text:p>Botanical Interest, Inc</text:p>
          </table:table-cell>
          <table:table-cell table:style-name="ce15" office:value-type="string" calcext:value-type="string">
            <text:p>Start indoors 4-6 weeks before transplant, 1/4” below surface; plant outdoors 36” apart, full sun; 80 days; up to <text:s/>3 ounce fruit. Sweeter than green.</text:p>
          </table:table-cell>
          <table:table-cell table:style-name="ce15"/>
          <table:table-cell table:style-name="ce15" office:value-type="string" calcext:value-type="string">
            <text:p>11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table-cell table:style-name="ce6" table:number-columns-repeated="16366"/>
        </table:table-row>
        <table:table-row table:style-name="ro3">
          <table:table-cell office:value-type="float" office:value="1478" calcext:value-type="float">
            <text:p>1478</text:p>
          </table:table-cell>
          <table:table-cell table:style-name="ce14" office:value-type="string" calcext:value-type="string">
            <text:p>KOHLRABI (Brassica oleracea var. gongylodes)</text:p>
          </table:table-cell>
          <table:table-cell table:style-name="ce14" office:value-type="string" calcext:value-type="string">
            <text:p>Purple &amp; White Vienna Blend </text:p>
          </table:table-cell>
          <table:table-cell table:style-name="ce14" office:value-type="string" calcext:value-type="string">
            <text:p>Botanical Interest, Inc</text:p>
          </table:table-cell>
          <table:table-cell table:style-name="ce14" office:value-type="string" calcext:value-type="string">
            <text:p>Cool season, full sun, start indoors at 1/4 inch depth, transplant to 4-6 inches apart. Harvest when size reaches 4 inches; 50-69 days. Contains 140% of the recommended daily allowance of vitamin C.</text:p>
          </table:table-cell>
          <table:table-cell table:style-name="ce14"/>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2">
          <table:table-cell office:value-type="float" office:value="1268" calcext:value-type="float">
            <text:p>1268</text:p>
          </table:table-cell>
          <table:table-cell table:style-name="ce15" office:value-type="string" calcext:value-type="string">
            <text:p>FLOWER Echinacea (Echinacea purpurea)</text:p>
          </table:table-cell>
          <table:table-cell table:style-name="ce15" office:value-type="string" calcext:value-type="string">
            <text:p>Purple Coneflower</text:p>
          </table:table-cell>
          <table:table-cell table:style-name="ce14" office:value-type="string" calcext:value-type="string">
            <text:p>Botanical Interest, Inc</text:p>
          </table:table-cell>
          <table:table-cell table:style-name="ce15" office:value-type="string" calcext:value-type="string">
            <text:p>Sow outside 2 to 4 weeks before last frost or as late as 2 months before first frost. Plant 1/4” deep. Space 18” apart. Attracts pollinators. Lasts well as a cut flower. Drought tolerant. Deer resistant. Seed heads are great for winter interest and birds love them, too.</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416" calcext:value-type="float">
            <text:p>1416</text:p>
          </table:table-cell>
          <table:table-cell table:style-name="ce14" office:value-type="string" calcext:value-type="string">
            <text:p>HERB Basil (Ocimum basilicum)</text:p>
          </table:table-cell>
          <table:table-cell table:style-name="ce14" office:value-type="string" calcext:value-type="string">
            <text:p>Purple Petra</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Mild sweet taste. Purple color contrasts in food. Good companion plant with tomato.</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2">
          <table:table-cell office:value-type="float" office:value="1050" calcext:value-type="float">
            <text:p>1050</text:p>
          </table:table-cell>
          <table:table-cell table:style-name="ce15" office:value-type="string" calcext:value-type="string">
            <text:p>BEAN, COMMON (Phaseolus vulgaris)</text:p>
          </table:table-cell>
          <table:table-cell table:style-name="ce15" office:value-type="string" calcext:value-type="string">
            <text:p>Purple Teepee <text:s/>(Pole type)</text:p>
          </table:table-cell>
          <table:table-cell table:style-name="ce14" office:value-type="string" calcext:value-type="string">
            <text:p>Baker Creek Heirloom Seeds</text:p>
          </table:table-cell>
          <table:table-cell table:style-name="ce15" office:value-type="string" calcext:value-type="string">
            <text:p>Direct sow outdoors after last frost. <text:s/>Plant 1.5” deep, 6-12” apart; can soak seed 1-2 hours before planting to speed germination. 60 days, extremely productive; pods held above foliage. <text:s/>Pick when 4-5 inches for tender snaps. Will cross-pollinate with other beans.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95° Optimum: 80°</text:p>
          </table:table-cell>
          <table:table-cell table:style-name="ce15" office:value-type="string" calcext:value-type="string">
            <text:p>6-7 days</text:p>
          </table:table-cell>
          <table:table-cell/>
          <table:table-cell table:style-name="ce6" table:number-columns-repeated="16366"/>
        </table:table-row>
        <table:table-row table:style-name="ro3">
          <table:table-cell office:value-type="float" office:value="1735" calcext:value-type="float">
            <text:p>1735</text:p>
          </table:table-cell>
          <table:table-cell table:style-name="ce14" office:value-type="string" calcext:value-type="string">
            <text:p>TURNIP (Brassica rapa)</text:p>
          </table:table-cell>
          <table:table-cell table:style-name="ce14" office:value-type="string" calcext:value-type="string">
            <text:p>Purple Top White Globe</text:p>
          </table:table-cell>
          <table:table-cell table:style-name="ce14"/>
          <table:table-cell table:style-name="ce14" office:value-type="string" calcext:value-type="string">
            <text:p>Sow 1/4” deep, 3-4” apart with rows 18” apart. 30-40 days. Harvest when fully formed, usually about 3-4 inches in diameter. Greens are also edible.</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3">
          <table:table-cell office:value-type="float" office:value="1480" calcext:value-type="float">
            <text:p>1480</text:p>
          </table:table-cell>
          <table:table-cell table:style-name="ce15" office:value-type="string" calcext:value-type="string">
            <text:p>KOHLRABI (Brassica oleracea)</text:p>
          </table:table-cell>
          <table:table-cell table:style-name="ce15" office:value-type="string" calcext:value-type="string">
            <text:p>Purple Vienna Heirloom</text:p>
          </table:table-cell>
          <table:table-cell table:style-name="ce14" office:value-type="string" calcext:value-type="string">
            <text:p>Botanical Interest, Inc</text:p>
          </table:table-cell>
          <table:table-cell table:style-name="ce15" office:value-type="string" calcext:value-type="string">
            <text:p>Cool season, full sun, start indoors or direct in ground at 1/4 inch depth, 4-6 inches apart. Harvest when size reaches 4 inches; 60 days.</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146" calcext:value-type="float">
            <text:p>1146</text:p>
          </table:table-cell>
          <table:table-cell table:style-name="ce15" office:value-type="string" calcext:value-type="string">
            <text:p>CARROT (Daucus carota)</text:p>
          </table:table-cell>
          <table:table-cell table:style-name="ce15" office:value-type="string" calcext:value-type="string">
            <text:p>Pusa Rudhira Red </text:p>
          </table:table-cell>
          <table:table-cell table:style-name="ce14" office:value-type="string" calcext:value-type="string">
            <text:p>Baker Creek Heirloom Seeds</text:p>
          </table:table-cell>
          <table:table-cell table:style-name="ce15" office:value-type="string" calcext:value-type="string">
            <text:p>This variety is high in beta-carotene and lycopene. <text:s/>Early sow 2-3 weeks before last spring frost. Seeds should be surface sown or minimally covered. Keep moist until seedlings are strong. <text:s/>Sow in intervals until one month before fall frost. <text:s/>Seeds are biennial. Soil Temp Range: 40°-95° Optimum: 85°</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4 to 6 days</text:p>
          </table:table-cell>
          <table:table-cell/>
          <table:table-cell table:style-name="ce6" table:number-columns-repeated="16366"/>
        </table:table-row>
        <table:table-row table:style-name="ro4">
          <table:table-cell office:value-type="float" office:value="1384" calcext:value-type="float">
            <text:p>1384</text:p>
          </table:table-cell>
          <table:table-cell table:style-name="ce14" office:value-type="string" calcext:value-type="string">
            <text:p>Gomphrena (Gomphrena haageana)</text:p>
          </table:table-cell>
          <table:table-cell table:style-name="ce14" office:value-type="string" calcext:value-type="string">
            <text:p>QIS Fiery Sunrise Blend</text:p>
          </table:table-cell>
          <table:table-cell table:style-name="ce14" office:value-type="string" calcext:value-type="string">
            <text:p>Botanical Interest, Inc</text:p>
          </table:table-cell>
          <table:table-cell table:style-name="ce14" office:value-type="string" calcext:value-type="string">
            <text:p>Plant in fine, moist soil, covering lightly with 1/4” soil. <text:s/>Plant 8” apart in full sun. Blooms all summer, is fairly drought tolerant and attractive to pollinators. Flowerheads <text:s/>are long lasting whether fresh or dried. Deer resistan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6">
          <table:table-cell office:value-type="float" office:value="1584" calcext:value-type="float">
            <text:p>1584</text:p>
          </table:table-cell>
          <table:table-cell table:style-name="ce15" office:value-type="string" calcext:value-type="string">
            <text:p>Pepper CHILE (Capsicum annuum)</text:p>
          </table:table-cell>
          <table:table-cell table:style-name="ce14" office:value-type="string" calcext:value-type="string">
            <text:p>Quatro Milpas (Mild) </text:p>
          </table:table-cell>
          <table:table-cell table:style-name="ce14" office:value-type="string" calcext:value-type="string">
            <text:p>Native Seed/SEARCH <text:s/>www.nativeseeds.org</text:p>
          </table:table-cell>
          <table:table-cell table:style-name="ce14" office:value-type="string" calcext:value-type="string">
            <text:p>Large, fleshy chile grown in Quatro Milpas, Sonora. Fruit ripens to dark brownish-red. Start inside 1/4” deep in loose soil 8- 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3">
          <table:table-cell office:value-type="float" office:value="1139" calcext:value-type="float">
            <text:p>1139</text:p>
          </table:table-cell>
          <table:table-cell table:style-name="ce14" office:value-type="string" calcext:value-type="string">
            <text:p>CARROT (Daucus carota)</text:p>
          </table:table-cell>
          <table:table-cell table:style-name="ce14" office:value-type="string" calcext:value-type="string">
            <text:p>Rainbow</text:p>
          </table:table-cell>
          <table:table-cell table:style-name="ce14" office:value-type="string" calcext:value-type="string">
            <text:p>Ferry Morse</text:p>
          </table:table-cell>
          <table:table-cell table:style-name="ce14" office:value-type="string" calcext:value-type="string">
            <text:p>Plant 1/4” deep, thin to 2”. Pick when tops of roots are 3/4-1 inch in diameter. Carrots are uniform, long and slender in an array of yellow and orange tones. Carrots mature all at once.</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 to 6 days</text:p>
          </table:table-cell>
          <table:table-cell/>
          <table:table-cell table:style-name="ce6" table:number-columns-repeated="16366"/>
        </table:table-row>
        <table:table-row table:style-name="ro4">
          <table:table-cell office:value-type="float" office:value="1697" calcext:value-type="float">
            <text:p>1697</text:p>
          </table:table-cell>
          <table:table-cell table:style-name="ce14" office:value-type="string" calcext:value-type="string">
            <text:p>SWISS CHARD (Beta vulgaris)</text:p>
          </table:table-cell>
          <table:table-cell table:style-name="ce14" office:value-type="string" calcext:value-type="string">
            <text:p>Rainbow Blend</text:p>
          </table:table-cell>
          <table:table-cell table:style-name="ce14"/>
          <table:table-cell table:style-name="ce14" office:value-type="string" calcext:value-type="string">
            <text:p>Sow direct or indoors for transplant, 1/2” deep, 2-4” apart for baby leaf. Thin to 8-12” for full size. Sun/partial shade, 40-60 days. <text:s/>Stalks will be 8-10” tall. Harvest outer leaves as they are ready. Soil Temp: <text:s/>Range: 40-95 degrees Optimum: 85 degrees</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Range: 40-95 degrees Optimum: 85 degrees</text:p>
          </table:table-cell>
          <table:table-cell table:style-name="ce14"/>
          <table:table-cell/>
          <table:table-cell table:style-name="ce6" table:number-columns-repeated="16366"/>
        </table:table-row>
        <table:table-row table:style-name="ro6">
          <table:table-cell office:value-type="float" office:value="1728" calcext:value-type="float">
            <text:p>1728</text:p>
          </table:table-cell>
          <table:table-cell table:style-name="ce14" office:value-type="string" calcext:value-type="string">
            <text:p>TOMATO CHERRY(Solanum lycopersicum)</text:p>
          </table:table-cell>
          <table:table-cell table:style-name="ce14" office:value-type="string" calcext:value-type="string">
            <text:p>Rainbow Blend</text:p>
          </table:table-cell>
          <table:table-cell table:style-name="ce14" office:value-type="string" calcext:value-type="string">
            <text:p>Botanical Interest, Inc</text:p>
          </table:table-cell>
          <table:table-cell table:style-name="ce14" office:value-type="string" calcext:value-type="string">
            <text:p>Start indoors 4-6 weeks before transplant. Sow 1/8” below surface in containers. Transplant 1-2 weeks after last frost. ; plant outdoors 24”-36” apart. Matures 55-90 days from transplant. <text:s/>Unique combination of different cherry tomatoes. May include Sundrop, Gold Nugget, Chocolate Cherry, Sweetie, Green Grape, Super Snow White and Bicolor Cherry. Provide support for vines.</text:p>
          </table:table-cell>
          <table:table-cell table:style-name="ce14"/>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4">
          <table:table-cell office:value-type="float" office:value="1527" calcext:value-type="float">
            <text:p>1527</text:p>
          </table:table-cell>
          <table:table-cell table:style-name="ce14" office:value-type="string" calcext:value-type="string">
            <text:p>Microgreens CHARD (Beta vulgaris)</text:p>
          </table:table-cell>
          <table:table-cell table:style-name="ce14" office:value-type="string" calcext:value-type="string">
            <text:p>Rainbow Blend </text:p>
          </table:table-cell>
          <table:table-cell table:style-name="ce15" office:value-type="string" calcext:value-type="string">
            <text:p>Johnny’s Seed</text:p>
          </table:table-cell>
          <table:table-cell table:style-name="ce14" office:value-type="string" calcext:value-type="string">
            <text:p>Sow in shallow trays or flats. Broadcast seed thickly, about 1/8”-1/4” apartPress seeds firmly into soil mix and cover lightly with sowing mix, vermiculite or dome. Soil Temp: <text:s/>Range: <text:s/>60-75 degrees Optimum: 75 degrees</text:p>
          </table:table-cell>
          <table:table-cell table:style-name="ce14"/>
          <table:table-cell table:style-name="ce14" office:value-type="string" calcext:value-type="string">
            <text:p>10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text:s/>60-75 degrees Optimum: 75 degrees</text:p>
          </table:table-cell>
          <table:table-cell table:style-name="ce14" office:value-type="string" calcext:value-type="string">
            <text:p>4-5 days @ 75 degrees, Then reduced to 60 degrees</text:p>
          </table:table-cell>
          <table:table-cell/>
          <table:table-cell table:style-name="ce6" table:number-columns-repeated="16366"/>
        </table:table-row>
        <table:table-row table:style-name="ro2">
          <table:table-cell office:value-type="float" office:value="1251" calcext:value-type="float">
            <text:p>1251</text:p>
          </table:table-cell>
          <table:table-cell table:style-name="ce14" office:value-type="string" calcext:value-type="string">
            <text:p>FLOWER Coleus (Plectranthus scutellarioides)</text:p>
          </table:table-cell>
          <table:table-cell table:style-name="ce14" office:value-type="string" calcext:value-type="string">
            <text:p>Rainbow Mixed Colors</text:p>
          </table:table-cell>
          <table:table-cell table:style-name="ce14" office:value-type="string" calcext:value-type="string">
            <text:p>Ferry Morse</text:p>
          </table:table-cell>
          <table:table-cell table:style-name="ce14" office:value-type="string" calcext:value-type="string">
            <text:p>For early bloom, start indoors or outdoors after last frost. Sprinkle seeds and press lightly into soil. Do not cover with dirt but cover with clear plastic dome and keep soil moist. Germination is slow, about 3 weeks. May be propagated with cuttings to have houseplants to overwinter. Toxic to dogs and cats if eaten.</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4">
          <table:table-cell office:value-type="float" office:value="1122" calcext:value-type="float">
            <text:p>1122</text:p>
          </table:table-cell>
          <table:table-cell table:style-name="ce14" office:value-type="string" calcext:value-type="string">
            <text:p>BROCCOLI Raab (Brassica Rapa)</text:p>
          </table:table-cell>
          <table:table-cell table:style-name="ce14" office:value-type="string" calcext:value-type="string">
            <text:p>Rapini</text:p>
          </table:table-cell>
          <table:table-cell table:style-name="ce14" office:value-type="string" calcext:value-type="string">
            <text:p>Botanical Interest, Inc</text:p>
          </table:table-cell>
          <table:table-cell table:style-name="ce14" office:value-type="string" calcext:value-type="string">
            <text:p>Prefers a well drained, fertile soil high in organic matter. Sow directly in outside beds or in flats, 1/4” deep. Soil should be warm for germination and cool for growing. Prefers consistent moisture so irrigate regularly. Tender shoots and edible leave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and cool</text:p>
          </table:table-cell>
          <table:table-cell/>
          <table:table-cell table:style-name="ce6" table:number-columns-repeated="16366"/>
        </table:table-row>
        <table:table-row table:style-name="ro6">
          <table:table-cell office:value-type="float" office:value="1622" calcext:value-type="float">
            <text:p>1622</text:p>
          </table:table-cell>
          <table:table-cell table:style-name="ce15" office:value-type="string" calcext:value-type="string">
            <text:p>RADISH (Raphanus sativus var. mougri)</text:p>
          </table:table-cell>
          <table:table-cell table:style-name="ce15" office:value-type="string" calcext:value-type="string">
            <text:p>Rat’s Tail</text:p>
          </table:table-cell>
          <table:table-cell table:style-name="ce14" office:value-type="string" calcext:value-type="string">
            <text:p>Botanical Interest, Inc</text:p>
          </table:table-cell>
          <table:table-cell table:style-name="ce15" office:value-type="string" calcext:value-type="string">
            <text:p>Direct sow 8-10 weeks before first frost. Plant every 1-2 weeks until mid to late summer. 1/2” deep, plant 6-12” apart, rows 24” apart. <text:s/>40-50 days. Instead of edible roots, this prehistoric origin is grown for the seed pods that grow above the ground on the 24-26” plants. The pods have a subtle spiciness. Can be eaten raw, stir-fried, in curries or pickled. Continue to produce even in hot weather.</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11">
          <table:table-cell office:value-type="float" office:value="1286" calcext:value-type="float">
            <text:p>1286</text:p>
          </table:table-cell>
          <table:table-cell table:style-name="ce15" office:value-type="string" calcext:value-type="string">
            <text:p>FLOWER Hollyhock (Alcea rosea)</text:p>
          </table:table-cell>
          <table:table-cell table:style-name="ce15" office:value-type="string" calcext:value-type="string">
            <text:p>Red &amp; Pink</text:p>
          </table:table-cell>
          <table:table-cell table:style-name="ce15" office:value-type="string" calcext:value-type="string">
            <text:p>Wild Harvested</text:p>
          </table:table-cell>
          <table:table-cell table:style-name="ce15" office:value-type="string" calcext:value-type="string">
            <text:p>Biennial life cycle; grows 72-84 inches; direct sow; full sun; mid to late season, blooms summer into fall.</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4" office:value-type="string" calcext:value-type="string">
            <text:p>Sierra Vista, AZ</text:p>
          </table:table-cell>
          <table:table-cell table:style-name="ce15" table:number-columns-repeated="2"/>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3">
          <table:table-cell office:value-type="float" office:value="1541" calcext:value-type="float">
            <text:p>1541</text:p>
          </table:table-cell>
          <table:table-cell table:style-name="ce15" office:value-type="string" calcext:value-type="string">
            <text:p>ONION (Allium cepa)</text:p>
          </table:table-cell>
          <table:table-cell table:style-name="ce15" office:value-type="string" calcext:value-type="string">
            <text:p>Red Amposta</text:p>
          </table:table-cell>
          <table:table-cell table:style-name="ce14" office:value-type="string" calcext:value-type="string">
            <text:p>Botanical Interest, Inc</text:p>
          </table:table-cell>
          <table:table-cell table:style-name="ce15" office:value-type="string" calcext:value-type="string">
            <text:p>Start indoors 10-12 weeks before last frost, 1/4” deep in moist soil. Transplant outdoors 4-6 weeks before last frost, 6” apart, full sun. 115 days to harves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5 days</text:p>
          </table:table-cell>
          <table:table-cell/>
          <table:table-cell table:style-name="ce6" table:number-columns-repeated="16366"/>
        </table:table-row>
        <table:table-row table:style-name="ro3">
          <table:table-cell office:value-type="float" office:value="1715" calcext:value-type="float">
            <text:p>1715</text:p>
          </table:table-cell>
          <table:table-cell table:style-name="ce14" office:value-type="string" calcext:value-type="string">
            <text:p>TOMATO (Sloanum lycopersicum)</text:p>
          </table:table-cell>
          <table:table-cell table:style-name="ce14" office:value-type="string" calcext:value-type="string">
            <text:p>Red and Yellow Pear Blend</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Sow 1/4” and thin to one healthy plant for transplant, Plant outdoors 24”-36” apart. <text:s/>75 days from transplan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4">
          <table:table-cell office:value-type="float" office:value="1534" calcext:value-type="float">
            <text:p>1534</text:p>
          </table:table-cell>
          <table:table-cell table:style-name="ce15" office:value-type="string" calcext:value-type="string">
            <text:p>OKRA (Abelmoschus esculentus)</text:p>
          </table:table-cell>
          <table:table-cell table:style-name="ce15" office:value-type="string" calcext:value-type="string">
            <text:p>Red Burgundy </text:p>
          </table:table-cell>
          <table:table-cell table:style-name="ce14" office:value-type="string" calcext:value-type="string">
            <text:p>Botanical Interest, Inc</text:p>
          </table:table-cell>
          <table:table-cell table:style-name="ce15" office:value-type="string" calcext:value-type="string">
            <text:p>Beautiful plants grow 7-8 ft tall; pods are long and slim. Soak seeds 24 hrs to improve germination. Direct sow 1” deep 2 weeks after last frost or start indoors in containers 2-4 weeks before setting out. <text:s/>One plant per square foot. <text:s/>Harvest daily in hot weather.</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 days</text:p>
          </table:table-cell>
          <table:table-cell/>
          <table:table-cell table:style-name="ce6" table:number-columns-repeated="16366"/>
        </table:table-row>
        <table:table-row table:style-name="ro2">
          <table:table-cell office:value-type="float" office:value="1504" calcext:value-type="float">
            <text:p>1504</text:p>
          </table:table-cell>
          <table:table-cell table:style-name="ce15" office:value-type="string" calcext:value-type="string">
            <text:p>LETTUCE Salanova (Latuca sativa)</text:p>
          </table:table-cell>
          <table:table-cell table:style-name="ce15" office:value-type="string" calcext:value-type="string">
            <text:p>Red Butter</text:p>
          </table:table-cell>
          <table:table-cell table:style-name="ce15" office:value-type="string" calcext:value-type="string">
            <text:p>Johnny’s Seed</text:p>
          </table:table-cell>
          <table:table-cell table:style-name="ce15" office:value-type="string" calcext:value-type="string">
            <text:p>Triple red heads have attractive red to green transition. Delicate buttery flavor. Mildew resistant.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3">
          <table:table-cell office:value-type="float" office:value="1149" calcext:value-type="float">
            <text:p>1149</text:p>
          </table:table-cell>
          <table:table-cell table:style-name="ce15" office:value-type="string" calcext:value-type="string">
            <text:p>CARROT (Daucus carota)</text:p>
          </table:table-cell>
          <table:table-cell table:style-name="ce15" office:value-type="string" calcext:value-type="string">
            <text:p>Red Cored Chantenay</text:p>
          </table:table-cell>
          <table:table-cell table:style-name="ce15" office:value-type="string" calcext:value-type="string">
            <text:p>Native Seed/SEARCH <text:s/>www.nativeseeds.org</text:p>
          </table:table-cell>
          <table:table-cell table:style-name="ce15" office:value-type="string" calcext:value-type="string">
            <text:p>Rich soil high in phosphorus &amp; potassium (moderate nitrogen). Superior eating. Seeds are biennial. Soil Temp Range: 40°-95° Optimum: 85°</text:p>
          </table:table-cell>
          <table:table-cell table:style-name="ce15"/>
          <table:table-cell table:style-name="ce15" office:value-type="string" calcext:value-type="string">
            <text:p>10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40°-95° Optimum: 85°</text:p>
          </table:table-cell>
          <table:table-cell table:style-name="ce15" office:value-type="string" calcext:value-type="string">
            <text:p>4 to 6 days</text:p>
          </table:table-cell>
          <table:table-cell/>
          <table:table-cell table:style-name="ce6" table:number-columns-repeated="16366"/>
        </table:table-row>
        <table:table-row table:style-name="ro11">
          <table:table-cell office:value-type="float" office:value="1531" calcext:value-type="float">
            <text:p>1531</text:p>
          </table:table-cell>
          <table:table-cell table:style-name="ce15" office:value-type="string" calcext:value-type="string">
            <text:p>MUSTARD (Brassica juncea)</text:p>
          </table:table-cell>
          <table:table-cell table:style-name="ce15" office:value-type="string" calcext:value-type="string">
            <text:p>Red Giant</text:p>
          </table:table-cell>
          <table:table-cell table:style-name="ce14" office:value-type="string" calcext:value-type="string">
            <text:p>Botanical Interest, Inc</text:p>
          </table:table-cell>
          <table:table-cell table:style-name="ce15" office:value-type="string" calcext:value-type="string">
            <text:p>Direct sow 1/4” depth. Thin to 18” apart. Leaves can grow very large but are best harvested when young and tender.</text:p>
          </table:table-cell>
          <table:table-cell table:style-name="ce15"/>
          <table:table-cell table:style-name="ce15" office:value-type="string" calcext:value-type="string">
            <text:p>15-20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2">
          <table:table-cell office:value-type="float" office:value="1505" calcext:value-type="float">
            <text:p>1505</text:p>
          </table:table-cell>
          <table:table-cell table:style-name="ce15" office:value-type="string" calcext:value-type="string">
            <text:p>LETTUCE Salanova (Latuca sativa)</text:p>
          </table:table-cell>
          <table:table-cell table:style-name="ce14" office:value-type="string" calcext:value-type="string">
            <text:p>Red Incised</text:p>
          </table:table-cell>
          <table:table-cell table:style-name="ce15" office:value-type="string" calcext:value-type="string">
            <text:p>Johnny’s Seed</text:p>
          </table:table-cell>
          <table:table-cell table:style-name="ce14" office:value-type="string" calcext:value-type="string">
            <text:p>Deeply incised, double red leaves with heavily frilled margins. Mildew resistant.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4">
          <table:table-cell office:value-type="float" office:value="1648" calcext:value-type="float">
            <text:p>1648</text:p>
          </table:table-cell>
          <table:table-cell table:style-name="ce15" office:value-type="string" calcext:value-type="string">
            <text:p>SPINACH (Spinacia oleracea)</text:p>
          </table:table-cell>
          <table:table-cell table:style-name="ce15" office:value-type="string" calcext:value-type="string">
            <text:p>RED KITTEN</text:p>
          </table:table-cell>
          <table:table-cell table:style-name="ce15" office:value-type="string" calcext:value-type="string">
            <text:p>Rijk Zwaan</text:p>
          </table:table-cell>
          <table:table-cell table:style-name="ce15" office:value-type="string" calcext:value-type="string">
            <text:p>Red veined with tender smooth leaves. Makes an excellent baby leaf spinach. Direct sow in early spring &amp; late summer, 1/2” deep, thin to 2” apart, rows 12” apart. Days to mature, 30. Soil Temp Range: 35°-85° Optimum: 7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35°-85° Optimum: 70°</text:p>
          </table:table-cell>
          <table:table-cell table:style-name="ce15" office:value-type="string" calcext:value-type="string">
            <text:p>4-9 days</text:p>
          </table:table-cell>
          <table:table-cell/>
          <table:table-cell table:style-name="ce6" table:number-columns-repeated="16366"/>
        </table:table-row>
        <table:table-row table:style-name="ro4">
          <table:table-cell office:value-type="float" office:value="1395" calcext:value-type="float">
            <text:p>1395</text:p>
          </table:table-cell>
          <table:table-cell table:style-name="ce14" office:value-type="string" calcext:value-type="string">
            <text:p>GREENS (Basella rubra)</text:p>
          </table:table-cell>
          <table:table-cell table:style-name="ce14" office:value-type="string" calcext:value-type="string">
            <text:p>Red Malabar Spinach </text:p>
          </table:table-cell>
          <table:table-cell table:style-name="ce14" office:value-type="string" calcext:value-type="string">
            <text:p>Native Seed/SEARCH <text:s/>www.nativeseeds.org</text:p>
          </table:table-cell>
          <table:table-cell table:style-name="ce14" office:value-type="string" calcext:value-type="string">
            <text:p>Not a true spinach. Spinach-like leaves on this beautiful vining plant like hot weather. Dark red stems; dark green leaves. Direct sow or start indoors. Best germination at soil temp of 80 degrees. High in vitamins A, C, iron, and calcium.</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7</text:p>
          </table:table-cell>
          <table:table-cell table:number-columns-repeated="2" table:style-name="ce14" office:value-type="string" calcext:value-type="string">
            <text:p>Best at 80 degrees</text:p>
          </table:table-cell>
          <table:table-cell/>
          <table:table-cell table:style-name="ce6" table:number-columns-repeated="16366"/>
        </table:table-row>
        <table:table-row table:style-name="ro4">
          <table:table-cell office:value-type="float" office:value="1506" calcext:value-type="float">
            <text:p>1506</text:p>
          </table:table-cell>
          <table:table-cell table:style-name="ce15" office:value-type="string" calcext:value-type="string">
            <text:p>LETTUCE Salanova (Latuca sativa)</text:p>
          </table:table-cell>
          <table:table-cell table:style-name="ce15" office:value-type="string" calcext:value-type="string">
            <text:p>Red Oakleaf</text:p>
          </table:table-cell>
          <table:table-cell table:style-name="ce15" office:value-type="string" calcext:value-type="string">
            <text:p>Johnny’s Seed</text:p>
          </table:table-cell>
          <table:table-cell table:style-name="ce15" office:value-type="string" calcext:value-type="string">
            <text:p>Dense heads with deep shiny red. Mildew resistant.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4">
          <table:table-cell office:value-type="float" office:value="1211" calcext:value-type="float">
            <text:p>1211</text:p>
          </table:table-cell>
          <table:table-cell table:style-name="ce15" office:value-type="string" calcext:value-type="string">
            <text:p>FLOWER <text:s/>Poppy (Papaver orientale)</text:p>
          </table:table-cell>
          <table:table-cell table:style-name="ce15" office:value-type="string" calcext:value-type="string">
            <text:p>Red Poppy</text:p>
          </table:table-cell>
          <table:table-cell table:style-name="ce15" office:value-type="string" calcext:value-type="string">
            <text:p>American Meadows</text:p>
          </table:table-cell>
          <table:table-cell table:style-name="ce15"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473" calcext:value-type="float">
            <text:p>1473</text:p>
          </table:table-cell>
          <table:table-cell table:style-name="ce14" office:value-type="string" calcext:value-type="string">
            <text:p>KALE (Brassica oleracea)</text:p>
          </table:table-cell>
          <table:table-cell table:style-name="ce14" office:value-type="string" calcext:value-type="string">
            <text:p>Red Russian</text:p>
          </table:table-cell>
          <table:table-cell table:style-name="ce15" office:value-type="string" calcext:value-type="string">
            <text:p>Johnny’s Seed</text:p>
          </table:table-cell>
          <table:table-cell table:style-name="ce14" office:value-type="string" calcext:value-type="string">
            <text:p>Spring or fall plant; sow 3-4 seeds at 1/2” depth; 12” apart; rows 18” apart. Thin to one plant per group. Harvest outside leaves in about 2 months. Very cold hardy.</text:p>
          </table:table-cell>
          <table:table-cell table:style-name="ce14"/>
          <table:table-cell table:style-name="ce14" office:value-type="string" calcext:value-type="string">
            <text:p>10-15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number-columns-repeated="2"/>
          <table:table-cell/>
          <table:table-cell table:style-name="ce6" table:number-columns-repeated="16366"/>
        </table:table-row>
        <table:table-row table:style-name="ro3">
          <table:table-cell office:value-type="float" office:value="1038" calcext:value-type="float">
            <text:p>1038</text:p>
          </table:table-cell>
          <table:table-cell table:style-name="ce14" office:value-type="string" calcext:value-type="string">
            <text:p>Baby GREENS (Brassica oleracea)</text:p>
          </table:table-cell>
          <table:table-cell table:style-name="ce14" office:value-type="string" calcext:value-type="string">
            <text:p>Red Russian Kale</text:p>
          </table:table-cell>
          <table:table-cell table:style-name="ce14" office:value-type="string" calcext:value-type="string">
            <text:p>Botanical Interest, Inc</text:p>
          </table:table-cell>
          <table:table-cell table:style-name="ce14"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table-cell table:style-name="ce6" table:number-columns-repeated="16366"/>
        </table:table-row>
        <table:table-row table:style-name="ro4">
          <table:table-cell office:value-type="float" office:value="1484" calcext:value-type="float">
            <text:p>1484</text:p>
          </table:table-cell>
          <table:table-cell table:style-name="ce14" office:value-type="string" calcext:value-type="string">
            <text:p>LETTUCE (Latuca sativa)</text:p>
          </table:table-cell>
          <table:table-cell table:style-name="ce14" office:value-type="string" calcext:value-type="string">
            <text:p>Red Sails</text:p>
          </table:table-cell>
          <table:table-cell table:style-name="ce14"/>
          <table:table-cell table:style-name="ce14" office:value-type="string" calcext:value-type="string">
            <text:p>Attractive, ruffled fringed leaves of deep burgundy red over green.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9">
          <table:table-cell office:value-type="float" office:value="1638" calcext:value-type="float">
            <text:p>1638</text:p>
          </table:table-cell>
          <table:table-cell table:style-name="ce14" office:value-type="string" calcext:value-type="string">
            <text:p>SHRUB <text:s/>(Hesperaloe parviflora)</text:p>
          </table:table-cell>
          <table:table-cell table:style-name="ce14" office:value-type="string" calcext:value-type="string">
            <text:p>Red Yucca</text:p>
          </table:table-cell>
          <table:table-cell table:style-name="ce14"/>
          <table:table-cell table:style-name="ce14" office:value-type="string" calcext:value-type="string">
            <text:p>Succulent plant that is hardy, low care, drought resistant and provides lovely color through the warm months. Scarify (gently sand the ends of the seed) then soak in warm water for several hours. Plant in full sun and barely cover seeds with soil. Keep soil moist until germinated. When seedlings are several inches tall, allow the soil to slightly dry out. Mature plants prefers soil to dry between waterings. May start indoors before transplanting outside.</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3">
          <table:table-cell office:value-type="float" office:value="1022" calcext:value-type="float">
            <text:p>1022</text:p>
          </table:table-cell>
          <table:table-cell table:style-name="ce14" office:value-type="string" calcext:value-type="string">
            <text:p>ARUGULA (Diplotaxis Tenuifolia)</text:p>
          </table:table-cell>
          <table:table-cell table:style-name="ce14" office:value-type="string" calcext:value-type="string">
            <text:p>Rocket</text:p>
          </table:table-cell>
          <table:table-cell table:style-name="ce14"/>
          <table:table-cell table:style-name="ce14" office:value-type="string" calcext:value-type="string">
            <text:p>Direct sow 1/4” deep; <text:s/>thin to 6” apart; size 6-12”; 21-40 days; sun/partial shade; grow year-round in the desert; leaves can be spicier in summertime. <text:s/>Easy to grow.</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3">
          <table:table-cell office:value-type="float" office:value="1029" calcext:value-type="float">
            <text:p>1029</text:p>
          </table:table-cell>
          <table:table-cell table:style-name="ce15" office:value-type="string" calcext:value-type="string">
            <text:p>ARUGULA (Eruca vesicaria)</text:p>
          </table:table-cell>
          <table:table-cell table:style-name="ce15" office:value-type="string" calcext:value-type="string">
            <text:p>Rocket</text:p>
          </table:table-cell>
          <table:table-cell table:style-name="ce14" office:value-type="string" calcext:value-type="string">
            <text:p>Botanical Interest, Inc</text:p>
          </table:table-cell>
          <table:table-cell table:style-name="ce15" office:value-type="string" calcext:value-type="string">
            <text:p>Direct sow 1/4” deep; <text:s/>thin to 6” apart; size 6-12”; 40 days; sun/partial shade; grow year-round in the desert; leaves can be spicier in summertime. <text:s/>Easy to grow.</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252" calcext:value-type="float">
            <text:p>1252</text:p>
          </table:table-cell>
          <table:table-cell table:style-name="ce14" office:value-type="string" calcext:value-type="string">
            <text:p>FLOWER Columbine (Aquilegia coerulea)</text:p>
          </table:table-cell>
          <table:table-cell table:style-name="ce14" office:value-type="string" calcext:value-type="string">
            <text:p>Rocky Mountain Blue</text:p>
          </table:table-cell>
          <table:table-cell table:style-name="ce14" office:value-type="string" calcext:value-type="string">
            <text:p>Botanical Interest, Inc</text:p>
          </table:table-cell>
          <table:table-cell table:style-name="ce14" office:value-type="string" calcext:value-type="string">
            <text:p>Benefits from stratification, a cold moist period before planting. Sow outside 4 to 6 weeks before average last frost or until 8 weeks before first frost. Light aids germination. Press seed lightly into soil surface and keep moist. Space 12” apart. Attracts hummingbirds. Lasts well as a cut flowe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2">
          <table:table-cell office:value-type="float" office:value="1324" calcext:value-type="float">
            <text:p>1324</text:p>
          </table:table-cell>
          <table:table-cell table:style-name="ce14" office:value-type="string" calcext:value-type="string">
            <text:p>FLOWER Penstemon (Penstemon strictus)</text:p>
          </table:table-cell>
          <table:table-cell table:style-name="ce15" office:value-type="string" calcext:value-type="string">
            <text:p>Rocky Mountain Blue</text:p>
          </table:table-cell>
          <table:table-cell table:style-name="ce15" office:value-type="string" calcext:value-type="string">
            <text:p>Botanical Interest, Inc</text:p>
          </table:table-cell>
          <table:table-cell table:style-name="ce15" office:value-type="string" calcext:value-type="string">
            <text:p>One of 250 species; native to AZ &amp; Mexico; blue/violet bloom; many flower stalks; self- sowing in Zones 10, 12, 13. <text:s/>Hummingbirds love it! Loosen soil with a rake or spade and work the seeds into the top 1/2 inch. Needs well drained soil with little or no amendments. Thrives in full sun. Do not overwater.</text:p>
          </table:table-cell>
          <table:table-cell table:style-name="ce15"/>
          <table:table-cell table:style-name="ce15" office:value-type="string" calcext:value-type="string">
            <text:p>1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030" calcext:value-type="float">
            <text:p>1030</text:p>
          </table:table-cell>
          <table:table-cell table:style-name="ce14" office:value-type="string" calcext:value-type="string">
            <text:p>ARUGULA Wild Rocket (Diplotaxis Tenuifolia)</text:p>
          </table:table-cell>
          <table:table-cell table:style-name="ce14" office:value-type="string" calcext:value-type="string">
            <text:p>Rocky Original</text:p>
          </table:table-cell>
          <table:table-cell table:style-name="ce14" office:value-type="string" calcext:value-type="string">
            <text:p>Botanical Interest, Inc</text:p>
          </table:table-cell>
          <table:table-cell table:style-name="ce14" office:value-type="string" calcext:value-type="string">
            <text:p>Direct sow 1/4” deep; <text:s/>thin to 6” <text:s/>apart; size 6-12”; 21-40 days; sun/partial shade; grow year-round in the desert; leaves can be spicier in summertime. <text:s/>Easy to grow.</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table-cell table:style-name="ce6" table:number-columns-repeated="16366"/>
        </table:table-row>
        <table:table-row table:style-name="ro3">
          <table:table-cell office:value-type="float" office:value="1712" calcext:value-type="float">
            <text:p>1712</text:p>
          </table:table-cell>
          <table:table-cell table:style-name="ce14" office:value-type="string" calcext:value-type="string">
            <text:p>TOMATO (Lycopersicon esculentum)</text:p>
          </table:table-cell>
          <table:table-cell table:style-name="ce14" office:value-type="string" calcext:value-type="string">
            <text:p>Roma</text:p>
          </table:table-cell>
          <table:table-cell table:style-name="ce14" office:value-type="string" calcext:value-type="string">
            <text:p>Harris Seeds</text:p>
          </table:table-cell>
          <table:table-cell table:style-name="ce14" office:value-type="string" calcext:value-type="string">
            <text:p>Start indoors 4-6 weeks before transplant, 1/4” below surface; plant outdoors 36” apart. Determinate ripening (nearly all at once); full sun; 72 days; great in salads, salsa or for making sauces.</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table-cell table:style-name="ce14" office:value-type="string" calcext:value-type="string">
            <text:p>6-7 days</text:p>
          </table:table-cell>
          <table:table-cell/>
          <table:table-cell table:style-name="ce6" table:number-columns-repeated="16366"/>
        </table:table-row>
        <table:table-row table:style-name="ro6">
          <table:table-cell office:value-type="float" office:value="1051" calcext:value-type="float">
            <text:p>1051</text:p>
          </table:table-cell>
          <table:table-cell table:style-name="ce14" office:value-type="string" calcext:value-type="string">
            <text:p>BEAN, COMMON (Phaseolus vulgaris)</text:p>
          </table:table-cell>
          <table:table-cell table:style-name="ce14" office:value-type="string" calcext:value-type="string">
            <text:p>Roma II (Bush type)</text:p>
          </table:table-cell>
          <table:table-cell table:style-name="ce14" office:value-type="string" calcext:value-type="string">
            <text:p>Baker Creek Heirloom Seeds</text:p>
          </table:table-cell>
          <table:table-cell table:style-name="ce14" office:value-type="string" calcext:value-type="string">
            <text:p>Direct sow outdoors after last frost. <text:s/>Sow seeds 1.5” deep, 6-12” apart; bush type. Produces unusually high yield of 6-7” long pods that are wide. <text:s/>Full sun. <text:s/>Keep pods well picked to encourage production. <text:s/>To freeze: blanch 3 minutes, ice bath to cool, drain, freeze. Will cross-pollinate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3">
          <table:table-cell office:value-type="float" office:value="1713" calcext:value-type="float">
            <text:p>1713</text:p>
          </table:table-cell>
          <table:table-cell table:style-name="ce14" office:value-type="string" calcext:value-type="string">
            <text:p>TOMATO (Lycopersicon esculentum)</text:p>
          </table:table-cell>
          <table:table-cell table:style-name="ce14" office:value-type="string" calcext:value-type="string">
            <text:p>Roma, San Marzano Gigante 3</text:p>
          </table:table-cell>
          <table:table-cell table:style-name="ce15" office:value-type="string" calcext:value-type="string">
            <text:p>Territorial Seed Company</text:p>
          </table:table-cell>
          <table:table-cell table:style-name="ce14" office:value-type="string" calcext:value-type="string">
            <text:p>Start indoors 4-6 weeks before transplant, 1/4” below surface; plant outdoors 36” apart. Full sun; 90 days; large fruit, great in salads, salsa or for making sauces.</text:p>
          </table:table-cell>
          <table:table-cell table:style-name="ce14"/>
          <table:table-cell table:style-name="ce14" office:value-type="string" calcext:value-type="string">
            <text:p>9+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table:table-cell table:style-name="ce14" office:value-type="string" calcext:value-type="string">
            <text:p>6-7 days</text:p>
          </table:table-cell>
          <table:table-cell/>
          <table:table-cell table:style-name="ce6" table:number-columns-repeated="16366"/>
        </table:table-row>
        <table:table-row table:style-name="ro3">
          <table:table-cell office:value-type="float" office:value="1714" calcext:value-type="float">
            <text:p>1714</text:p>
          </table:table-cell>
          <table:table-cell table:style-name="ce15" office:value-type="string" calcext:value-type="string">
            <text:p>TOMATO (Lycopersicon esculentum)</text:p>
          </table:table-cell>
          <table:table-cell table:style-name="ce15" office:value-type="string" calcext:value-type="string">
            <text:p>Roma, San Marzano Original Seed Source: Territorial Seed Company</text:p>
          </table:table-cell>
          <table:table-cell table:style-name="ce15" office:value-type="string" calcext:value-type="string">
            <text:p>Territorial Seed Company</text:p>
          </table:table-cell>
          <table:table-cell table:style-name="ce15" office:value-type="string" calcext:value-type="string">
            <text:p>Start indoors 4-6 weeks before transplant, 1/4” below surface; plant outdoors 36” apart. Indeterminate ripening (throughout the season); full sun; 78 days; great in salads, salsa or for making sauce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6-7 days</text:p>
          </table:table-cell>
          <table:table-cell/>
          <table:table-cell table:style-name="ce6" table:number-columns-repeated="16366"/>
        </table:table-row>
        <table:table-row table:style-name="ro3">
          <table:table-cell office:value-type="float" office:value="1495" calcext:value-type="float">
            <text:p>1495</text:p>
          </table:table-cell>
          <table:table-cell table:style-name="ce15" office:value-type="string" calcext:value-type="string">
            <text:p>LETTUCE Paris Island Cos (Lactuca sativa)</text:p>
          </table:table-cell>
          <table:table-cell table:style-name="ce15" office:value-type="string" calcext:value-type="string">
            <text:p>Romaine</text:p>
          </table:table-cell>
          <table:table-cell table:style-name="ce14" office:value-type="string" calcext:value-type="string">
            <text:p>Ferry Morse</text:p>
          </table:table-cell>
          <table:table-cell table:style-name="ce15" office:value-type="string" calcext:value-type="string">
            <text:p>Romaine style, sow outside in early spring; may be fall planted. <text:s/>Plant seeds 1/8” below soil surface. Rows should be 12-18” apart. Harvest by removing outside leaves; plant will continue to grow.</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11">
          <table:table-cell office:value-type="float" office:value="1150" calcext:value-type="float">
            <text:p>1150</text:p>
          </table:table-cell>
          <table:table-cell table:style-name="ce15" office:value-type="string" calcext:value-type="string">
            <text:p>CAULIFLOWER (Brassica oleracea var.botrytis)</text:p>
          </table:table-cell>
          <table:table-cell table:style-name="ce15" office:value-type="string" calcext:value-type="string">
            <text:p>Romanesco</text:p>
          </table:table-cell>
          <table:table-cell table:style-name="ce14" office:value-type="string" calcext:value-type="string">
            <text:p>Botanical Interest, Inc</text:p>
          </table:table-cell>
          <table:table-cell table:style-name="ce15" office:value-type="string" calcext:value-type="string">
            <text:p>Sow 1/4” deep with 12-16” between plants. Full Sun, 80 days. Heads have spirals of <text:s/>a lime green. It has a delicious nutty flavor.</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7 days</text:p>
          </table:table-cell>
          <table:table-cell/>
          <table:table-cell table:style-name="ce6" table:number-columns-repeated="16366"/>
        </table:table-row>
        <table:table-row table:style-name="ro4">
          <table:table-cell office:value-type="float" office:value="1113" calcext:value-type="float">
            <text:p>1113</text:p>
          </table:table-cell>
          <table:table-cell table:style-name="ce15" office:value-type="string" calcext:value-type="string">
            <text:p>BROCCOLI (Brassica oleracea var botrytis)</text:p>
          </table:table-cell>
          <table:table-cell table:style-name="ce15" office:value-type="string" calcext:value-type="string">
            <text:p>Romanesco Original</text:p>
          </table:table-cell>
          <table:table-cell table:style-name="ce14" office:value-type="string" calcext:value-type="string">
            <text:p>Botanical Interest, Inc</text:p>
          </table:table-cell>
          <table:table-cell table:style-name="ce15" office:value-type="string" calcext:value-type="string">
            <text:p>Sow 1/4” deep, 24-36”” apart. <text:s/>75-100 days, full sun. Harvest the main head before the flowers open. Somewhere between broccoli and cauliflower with 5”-6” heads. Cooked it has nutty flavor and texture similar to cauliflower.</text:p>
          </table:table-cell>
          <table:table-cell table:style-name="ce15"/>
          <table:table-cell table:style-name="ce15" office:value-type="string" calcext:value-type="string">
            <text:p>18+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4-5 days</text:p>
          </table:table-cell>
          <table:table-cell/>
          <table:table-cell table:style-name="ce6" table:number-columns-repeated="16366"/>
        </table:table-row>
        <table:table-row table:style-name="ro4">
          <table:table-cell office:value-type="float" office:value="1205" calcext:value-type="float">
            <text:p>1205</text:p>
          </table:table-cell>
          <table:table-cell table:style-name="ce15" office:value-type="string" calcext:value-type="string">
            <text:p>FLOWER <text:s/>ALYSSUM (Lobularia maritima)</text:p>
          </table:table-cell>
          <table:table-cell table:style-name="ce15" office:value-type="string" calcext:value-type="string">
            <text:p>Rosie O’Day</text:p>
          </table:table-cell>
          <table:table-cell table:style-name="ce14" office:value-type="string" calcext:value-type="string">
            <text:p>Botanical Interest, Inc</text:p>
          </table:table-cell>
          <table:table-cell table:style-name="ce15" office:value-type="string" calcext:value-type="string">
            <text:p>Start inside 4-6 weeks before average last frost. Outside, plant 1-2 weeks before average last frost. Fall planting in mild climates for winter bloom. Light aids germination. Press seed lightly into soil surface. Rosy pink blossom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347" calcext:value-type="float">
            <text:p>1347</text:p>
          </table:table-cell>
          <table:table-cell table:style-name="ce14" office:value-type="string" calcext:value-type="string">
            <text:p>FLOWER Sunflower (Helianthus annus—hybrid)</text:p>
          </table:table-cell>
          <table:table-cell table:style-name="ce14" office:value-type="string" calcext:value-type="string">
            <text:p>Rouge Royale</text:p>
          </table:table-cell>
          <table:table-cell table:style-name="ce14" office:value-type="string" calcext:value-type="string">
            <text:p>Botanical Interest, Inc</text:p>
          </table:table-cell>
          <table:table-cell table:style-name="ce14" office:value-type="string" calcext:value-type="string">
            <text:p>Plant after danger of frost 1-2 weeks after last frost. Sensitive to root disturbance so sow directly into soil, 1/4”-1/2” deep 18”-24” apart. Rich deep red makes dramatic accent to beds and as cut-flower.</text:p>
          </table:table-cell>
          <table:table-cell table:style-name="ce14" table:number-columns-repeated="2"/>
          <table:table-cell table:style-name="ce14" office:value-type="string" calcext:value-type="string">
            <text:p>Warm Season</text:p>
          </table:table-cell>
          <table:table-cell table:style-name="ce14" table:number-columns-repeated="6"/>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2">
          <table:table-cell office:value-type="float" office:value="1687" calcext:value-type="float">
            <text:p>1687</text:p>
          </table:table-cell>
          <table:table-cell table:style-name="ce15" office:value-type="string" calcext:value-type="string">
            <text:p>SQUASH Zucchini (Cucubirta pepo)</text:p>
          </table:table-cell>
          <table:table-cell table:style-name="ce15" office:value-type="string" calcext:value-type="string">
            <text:p>Round</text:p>
          </table:table-cell>
          <table:table-cell table:style-name="ce14" office:value-type="string" calcext:value-type="string">
            <text:p>American Seed</text:p>
          </table:table-cell>
          <table:table-cell table:style-name="ce15" office:value-type="string" calcext:value-type="string">
            <text:p>Plant outdoors 2-3 seeds 1”deep, 3-4 feet apart; thin to 1 healthy plant. <text:s/>Globe shaped, 4-6” fruit; great for stuffing; compact; productive. Pick regularly to encourage fruit development; best flavor when skin is thin. <text:s/>Will cross with other Cucubirta pepo. <text:s/>50 days Soil Temp Range: 60°-100° Optimum: 9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100° Optimum: 95°</text:p>
          </table:table-cell>
          <table:table-cell table:style-name="ce15" office:value-type="string" calcext:value-type="string">
            <text:p>3-4 days</text:p>
          </table:table-cell>
          <table:table-cell/>
          <table:table-cell table:style-name="ce6" table:number-columns-repeated="16366"/>
        </table:table-row>
        <table:table-row table:style-name="ro5">
          <table:table-cell office:value-type="float" office:value="1511" calcext:value-type="float">
            <text:p>1511</text:p>
          </table:table-cell>
          <table:table-cell table:style-name="ce14" office:value-type="string" calcext:value-type="string">
            <text:p>MELON (Cucumis melo)</text:p>
          </table:table-cell>
          <table:table-cell table:style-name="ce14" office:value-type="string" calcext:value-type="string">
            <text:p>Round Valley </text:p>
          </table:table-cell>
          <table:table-cell table:style-name="ce14" office:value-type="string" calcext:value-type="string">
            <text:p>Bill Cook</text:p>
          </table:table-cell>
          <table:table-cell table:style-name="ce14" office:value-type="string" calcext:value-type="string">
            <text:p>Plant 3-5 seeds in basin 1” deep 5 feet apart, sprawling vine. In low desert plant in dappled shade in mid- July. <text:s text:c="2"/>This seed is under test at 4,500 feet with early July planting. <text:s/>Yellow rind, SWEET orange flesh; up to 5 pound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Duncan, AZ</text:p>
          </table:table-cell>
          <table:table-cell table:style-name="ce14"/>
          <table:table-cell table:style-name="ce15" office:value-type="string" calcext:value-type="string">
            <text:p>Bill Cook, Master Gardener, Duncan, AZ</text:p>
          </table:table-cell>
          <table:table-cell table:style-name="ce28" office:value-type="string" calcext:value-type="string">
            <text:p>2016</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5">
          <table:table-cell office:value-type="float" office:value="1055" calcext:value-type="float">
            <text:p>1055</text:p>
          </table:table-cell>
          <table:table-cell table:style-name="ce15" office:value-type="string" calcext:value-type="string">
            <text:p>BEAN, COMMON (Phaseolus vulgaris)</text:p>
          </table:table-cell>
          <table:table-cell table:style-name="ce15" office:value-type="string" calcext:value-type="string">
            <text:p>Royal Burgandy (Bush type)</text:p>
          </table:table-cell>
          <table:table-cell table:style-name="ce14" office:value-type="string" calcext:value-type="string">
            <text:p>Botanical Interest, Inc</text:p>
          </table:table-cell>
          <table:table-cell table:style-name="ce15" office:value-type="string" calcext:value-type="string">
            <text:p>Direct sow outdoors after last frost. <text:s/>Plant 1.5” deep, 6-12” apart. 55 days. Pick when 4-5 inches for tender snaps. Bright purple pods turn green when cooked. Not heat tolerant, is cool stable and resistant to</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6-12 days</text:p>
          </table:table-cell>
          <table:table-cell/>
          <table:table-cell table:style-name="ce6" table:number-columns-repeated="16366"/>
        </table:table-row>
        <table:table-row table:style-name="ro3">
          <table:table-cell office:value-type="float" office:value="1258" calcext:value-type="float">
            <text:p>1258</text:p>
          </table:table-cell>
          <table:table-cell table:style-name="ce14" office:value-type="string" calcext:value-type="string">
            <text:p>FLOWER Cosmos (Cosmos bipinnatus)</text:p>
          </table:table-cell>
          <table:table-cell table:style-name="ce14" office:value-type="string" calcext:value-type="string">
            <text:p>Rubenza</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Bold red flow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110" calcext:value-type="float">
            <text:p>1110</text:p>
          </table:table-cell>
          <table:table-cell table:style-name="ce14" office:value-type="string" calcext:value-type="string">
            <text:p>BEET (Beta vulgaris)</text:p>
          </table:table-cell>
          <table:table-cell table:style-name="ce14" office:value-type="string" calcext:value-type="string">
            <text:p>Ruby Queen</text:p>
          </table:table-cell>
          <table:table-cell table:style-name="ce14" office:value-type="string" calcext:value-type="string">
            <text:p>Ferry Morse</text:p>
          </table:table-cell>
          <table:table-cell table:style-name="ce14" office:value-type="string" calcext:value-type="string">
            <text:p>Direct sow outside early spring or fall. Plant 1/2” deep, 3” apart, in rows 18” apart. Full Sun; 55 days. Fruit matures to 3” diameter; deep red and sweet; great for canning.</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10-12 days</text:p>
          </table:table-cell>
          <table:table-cell/>
          <table:table-cell table:style-name="ce6" table:number-columns-repeated="16366"/>
        </table:table-row>
        <table:table-row table:style-name="ro4">
          <table:table-cell office:value-type="float" office:value="1160" calcext:value-type="float">
            <text:p>1160</text:p>
          </table:table-cell>
          <table:table-cell table:style-name="ce14" office:value-type="string" calcext:value-type="string">
            <text:p>CORN, DECORATIVE (Zea mays)</text:p>
          </table:table-cell>
          <table:table-cell table:style-name="ce14" office:value-type="string" calcext:value-type="string">
            <text:p>Ruby Red</text:p>
          </table:table-cell>
          <table:table-cell table:style-name="ce14"/>
          <table:table-cell table:style-name="ce14" office:value-type="string" calcext:value-type="string">
            <text:p>Plant in spring 1” deep in rows or clusters. Plants should be no more than 8-12 inches apart to get best pollination. All species will cross pollinate so planting different species several weeks apart is recommended. Dark red kernels typically for decorative purpose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2">
          <table:table-cell office:value-type="float" office:value="1695" calcext:value-type="float">
            <text:p>1695</text:p>
          </table:table-cell>
          <table:table-cell table:style-name="ce15" office:value-type="string" calcext:value-type="string">
            <text:p>SWISS CHARD (Beta vulgaris)</text:p>
          </table:table-cell>
          <table:table-cell table:style-name="ce15" office:value-type="string" calcext:value-type="string">
            <text:p>Ruby Red </text:p>
          </table:table-cell>
          <table:table-cell table:style-name="ce15" office:value-type="string" calcext:value-type="string">
            <text:p>Lilly Miller Seeds</text:p>
          </table:table-cell>
          <table:table-cell table:style-name="ce15" office:value-type="string" calcext:value-type="string">
            <text:p>Sow direct or indoors for transplant, 1/2” deep, 8” apart early spring. <text:s/>Sun/partial shade, 40-60 days. <text:s/>Stalks will be 8-10” tall. <text:s/>Begin harvesting when outer leaves are 6-8” tall; cut off individual leaves near the base; new leaves will grow back. Loves warm weather. Soil Temp: <text:s/>Range: 40-95 degrees Optimum: 85 degrees</text:p>
          </table:table-cell>
          <table:table-cell table:style-name="ce15"/>
          <table:table-cell table:style-name="ce15" office:value-type="string" calcext:value-type="string">
            <text:p>6+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Range: 40-95 degrees Optimum: 85 degrees</text:p>
          </table:table-cell>
          <table:table-cell table:style-name="ce15" office:value-type="string" calcext:value-type="string">
            <text:p>4-5 days @ 85 degrees</text:p>
          </table:table-cell>
          <table:table-cell/>
          <table:table-cell table:style-name="ce6" table:number-columns-repeated="16366"/>
        </table:table-row>
        <table:table-row table:style-name="ro2">
          <table:table-cell office:value-type="float" office:value="1672" calcext:value-type="float">
            <text:p>1672</text:p>
          </table:table-cell>
          <table:table-cell table:style-name="ce15" office:value-type="string" calcext:value-type="string">
            <text:p>SQUASH (Cucurbirta moschata)</text:p>
          </table:table-cell>
          <table:table-cell table:style-name="ce15" office:value-type="string" calcext:value-type="string">
            <text:p>Rumbo </text:p>
          </table:table-cell>
          <table:table-cell table:style-name="ce15" office:value-type="string" calcext:value-type="string">
            <text:p>CCMG Garden</text:p>
          </table:table-cell>
          <table:table-cell table:style-name="ce15" office:value-type="string" calcext:value-type="string">
            <text:p>Direct sow outside after last frost. Plant 1” deep in hills of 2-3 plants per hill, 6-10 feet apart. Full sun; 115-125 days; fruit is flat shaped, ribbed, smooth and weighs up to 15+ pounds. <text:s/>Excellent cooked squash; smooth, deep orange, sweet flesh. <text:s/>Will cross with other moschata. Soil Temp Range: 60– 100 Optimum: 9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text:p>
          </table:table-cell>
          <table:table-cell table:style-name="ce28" office:value-type="string" calcext:value-type="string">
            <text:p>2016</text:p>
          </table:table-cell>
          <table:table-cell table:style-name="ce15" office:value-type="string" calcext:value-type="string">
            <text:p>60– 100 Optimum: 95°</text:p>
          </table:table-cell>
          <table:table-cell table:style-name="ce15" office:value-type="string" calcext:value-type="string">
            <text:p>3-4 days</text:p>
          </table:table-cell>
          <table:table-cell/>
          <table:table-cell table:style-name="ce6" table:number-columns-repeated="16366"/>
        </table:table-row>
        <table:table-row table:style-name="ro4">
          <table:table-cell office:value-type="float" office:value="1095" calcext:value-type="float">
            <text:p>1095</text:p>
          </table:table-cell>
          <table:table-cell table:style-name="ce15" office:value-type="string" calcext:value-type="string">
            <text:p>BEAN, TEPARY (Phaseolus acutifolius)</text:p>
          </table:table-cell>
          <table:table-cell table:style-name="ce15" office:value-type="string" calcext:value-type="string">
            <text:p>S-CHUUK Bavi (Black)</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text:p>
          </table:table-cell>
          <table:table-cell table:style-name="ce15"/>
          <table:table-cell table:style-name="ce15" office:value-type="string" calcext:value-type="string">
            <text:p>10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096" calcext:value-type="float">
            <text:p>1096</text:p>
          </table:table-cell>
          <table:table-cell table:style-name="ce15" office:value-type="string" calcext:value-type="string">
            <text:p>BEAN, TEPARY (Phaseolus acutifolius)</text:p>
          </table:table-cell>
          <table:table-cell table:style-name="ce15" office:value-type="string" calcext:value-type="string">
            <text:p>S-OAM Bavi (Brown)</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4">
          <table:table-cell office:value-type="float" office:value="1097" calcext:value-type="float">
            <text:p>1097</text:p>
          </table:table-cell>
          <table:table-cell table:style-name="ce15" office:value-type="string" calcext:value-type="string">
            <text:p>BEAN, TEPARY (Phaseolus acutifolius)</text:p>
          </table:table-cell>
          <table:table-cell table:style-name="ce15" office:value-type="string" calcext:value-type="string">
            <text:p>S-TOTOAH Bavi (White)</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es not tolerate overwatering; do not plant with other beans (potential bean mosaic virus); harvest as pods brown/let dry thoroughly.</text:p>
          </table:table-cell>
          <table:table-cell table:style-name="ce15"/>
          <table:table-cell table:style-name="ce15" office:value-type="string" calcext:value-type="string">
            <text:p>15-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2">
          <table:table-cell office:value-type="float" office:value="1496" calcext:value-type="float">
            <text:p>1496</text:p>
          </table:table-cell>
          <table:table-cell table:style-name="ce15" office:value-type="string" calcext:value-type="string">
            <text:p>LETTUCE Rocky Top (Lactuca sativa)</text:p>
          </table:table-cell>
          <table:table-cell table:style-name="ce15" office:value-type="string" calcext:value-type="string">
            <text:p>Salid Mix</text:p>
          </table:table-cell>
          <table:table-cell table:style-name="ce14" office:value-type="string" calcext:value-type="string">
            <text:p>Baker Creek Heirloom Seeds</text:p>
          </table:table-cell>
          <table:table-cell table:style-name="ce15" office:value-type="string" calcext:value-type="string">
            <text:p>Old World crop; requires cool temps; plants may benefit from a few hours of afternoon shade. <text:s/>Sow seed on soil surface and rake in lightly (barely cover). <text:s/>Do no allow seed bed to get dry. <text:s/>Enjoy thinnings in an early salad. <text:s/>Rows should be 12-18” apart. Harvest: 45 days Soil Temp Range: 35°-85° Optimum: 75°</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35°-85° Optimum: 75°</text:p>
          </table:table-cell>
          <table:table-cell table:style-name="ce15" office:value-type="string" calcext:value-type="string">
            <text:p>3-4 days</text:p>
          </table:table-cell>
          <table:table-cell/>
          <table:table-cell table:style-name="ce6" table:number-columns-repeated="16366"/>
        </table:table-row>
        <table:table-row table:style-name="ro2">
          <table:table-cell office:value-type="float" office:value="1585" calcext:value-type="float">
            <text:p>1585</text:p>
          </table:table-cell>
          <table:table-cell table:style-name="ce15" office:value-type="string" calcext:value-type="string">
            <text:p>Pepper CHILE (Capsicum annuum)</text:p>
          </table:table-cell>
          <table:table-cell table:style-name="ce15" office:value-type="string" calcext:value-type="string">
            <text:p>San Felipe (Medium to Medium Hot)</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table-cell table:style-name="ce6" table:number-columns-repeated="16366"/>
        </table:table-row>
        <table:table-row table:style-name="ro11">
          <table:table-cell office:value-type="float" office:value="1230" calcext:value-type="float">
            <text:p>1230</text:p>
          </table:table-cell>
          <table:table-cell table:style-name="ce15" office:value-type="string" calcext:value-type="string">
            <text:p>FLOWER (Lasianthaca podocephala)</text:p>
          </table:table-cell>
          <table:table-cell table:style-name="ce15" office:value-type="string" calcext:value-type="string">
            <text:p>San Pedro Daisy</text:p>
          </table:table-cell>
          <table:table-cell table:style-name="ce15" office:value-type="string" calcext:value-type="string">
            <text:p>Jim Koweek</text:p>
          </table:table-cell>
          <table:table-cell table:style-name="ce15" office:value-type="string" calcext:value-type="string">
            <text:p>Perennial found on Arizona hillsides. Rough feeling leaves with small yellow flowe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office:value-type="string" calcext:value-type="string">
            <text:p>Perennial</text:p>
          </table:table-cell>
          <table:table-cell table:style-name="ce15"/>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6">
          <table:table-cell office:value-type="float" office:value="1086" calcext:value-type="float">
            <text:p>1086</text:p>
          </table:table-cell>
          <table:table-cell table:style-name="ce16" office:value-type="string" calcext:value-type="string">
            <text:p>BEAN, TEPARY (Phaseolus acutifolius)</text:p>
          </table:table-cell>
          <table:table-cell table:style-name="ce14" office:value-type="string" calcext:value-type="string">
            <text:p>San Pedro Wild Tepary (latifolius)</text:p>
          </table:table-cell>
          <table:table-cell table:style-name="ce14" office:value-type="string" calcext:value-type="string">
            <text:p>Locally harvested</text:p>
          </table:table-cell>
          <table:table-cell table:style-name="ce14" office:value-type="string" calcext:value-type="string">
            <text:p>Pole bean; used as dry bean; tolerates heat, drought, and alkaline soils; plant at monsoon time 1/2” deep 4” apart; does not tolerate overwatering; do not plant with other beans. Harvested wild by Andy; certified by NS/S. <text:s/>More difficult to cultivate than domestics; try this piece of AZ ag history &amp; wild plant conservation. <text:s/>Scarify lightly before planting.</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Andy Ward </text:p>
          </table:table-cell>
          <table:table-cell table:style-name="ce28" office:value-type="string" calcext:value-type="string">
            <text:p>2016</text:p>
          </table:table-cell>
          <table:table-cell table:style-name="ce14" table:number-columns-repeated="2"/>
          <table:table-cell/>
          <table:table-cell table:style-name="ce6" table:number-columns-repeated="16366"/>
        </table:table-row>
        <table:table-row table:style-name="ro2">
          <table:table-cell office:value-type="float" office:value="1564" calcext:value-type="float">
            <text:p>1564</text:p>
          </table:table-cell>
          <table:table-cell table:style-name="ce15" office:value-type="string" calcext:value-type="string">
            <text:p>Pepper CHILE (Capsicum annuum)</text:p>
          </table:table-cell>
          <table:table-cell table:style-name="ce14" office:value-type="string" calcext:value-type="string">
            <text:p>Sandia Hot Pepper (NuMex Sandia-Heirloom) (Mild heat, 500 to 2,500 SHU) </text:p>
          </table:table-cell>
          <table:table-cell table:style-name="ce24" office:value-type="string" calcext:value-type="string">
            <text:p>Bonnie Plants</text:p>
          </table:table-cell>
          <table:table-cell table:style-name="ce14" office:value-type="string" calcext:value-type="string">
            <text:p>Start inside 1/4” deep in loose soil 8-10 weeks before last frost. <text:s/>Slow to germinate; need warmth; plant 12- 16” apart in full sun. Size to 6”; 77 to 80 days. <text:s/>Save seeds from fully ripe, slightly shriveled fruit. Can cross pollinate. Heat increases as fruit ripens to red.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2">
          <table:table-cell office:value-type="float" office:value="1565" calcext:value-type="float">
            <text:p>1565</text:p>
          </table:table-cell>
          <table:table-cell table:style-name="ce15" office:value-type="string" calcext:value-type="string">
            <text:p>Pepper CHILE (Capsicum annuum)</text:p>
          </table:table-cell>
          <table:table-cell table:style-name="ce15" office:value-type="string" calcext:value-type="string">
            <text:p>Santa Fe Grande (Guero)</text:p>
          </table:table-cell>
          <table:table-cell table:style-name="ce24" office:value-type="string" calcext:value-type="string">
            <text:p>Bonnie Plants</text:p>
          </table:table-cell>
          <table:table-cell table:style-name="ce15" office:value-type="string" calcext:value-type="string">
            <text:p>Start inside 1/4” deep in loose soil 8-10 weeks before last frost. <text:s/>Slow to germinate; need warmth; plant 12- 16” apart in full sun. Size to 3.5”; 75 to 80 days; matures yellow to orange to red. Save seeds from fully ripe, slightly shriveled fruit. Can cross pollinate. Soil Temp Range: 60°-95° Optimum: 8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table-cell table:style-name="ce6" table:number-columns-repeated="16366"/>
        </table:table-row>
        <table:table-row table:style-name="ro11">
          <table:table-cell office:value-type="float" office:value="1393" calcext:value-type="float">
            <text:p>1393</text:p>
          </table:table-cell>
          <table:table-cell table:style-name="ce14" office:value-type="string" calcext:value-type="string">
            <text:p>GRASS (Boutelour eludens) </text:p>
          </table:table-cell>
          <table:table-cell table:style-name="ce14" office:value-type="string" calcext:value-type="string">
            <text:p>Santa Rita Grama Grass (Boutelour eludens)</text:p>
          </table:table-cell>
          <table:table-cell table:style-name="ce15" office:value-type="string" calcext:value-type="string">
            <text:p>Jim Koweek</text:p>
          </table:table-cell>
          <table:table-cell table:style-name="ce14" office:value-type="string" calcext:value-type="string">
            <text:p>This grass is one of a variety of grama grasses. <text:s/>It is both heat and drought toler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2">
          <table:table-cell office:value-type="float" office:value="1575" calcext:value-type="float">
            <text:p>1575</text:p>
          </table:table-cell>
          <table:table-cell table:style-name="ce14" office:value-type="string" calcext:value-type="string">
            <text:p>PEPPER CHILE (Capsicum annuum)</text:p>
          </table:table-cell>
          <table:table-cell table:style-name="ce14" office:value-type="string" calcext:value-type="string">
            <text:p>Santak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Transplant 24”-36”” apart in full sun. Size to 2”; 70 to 80 days. <text:s text:c="2"/>Can cross pollinate. <text:s/>Origin Japan. Use in Asian dishes such as stir-fries and soups. <text:s/>(hot, 40,000-50,000 SHU)</text:p>
          </table:table-cell>
          <table:table-cell table:style-name="ce14"/>
          <table:table-cell table:style-name="ce14" office:value-type="string" calcext:value-type="string">
            <text:p>8+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table-cell table:style-name="ce6" table:number-columns-repeated="16366"/>
        </table:table-row>
        <table:table-row table:style-name="ro2">
          <table:table-cell office:value-type="float" office:value="1586" calcext:value-type="float">
            <text:p>1586</text:p>
          </table:table-cell>
          <table:table-cell table:style-name="ce15" office:value-type="string" calcext:value-type="string">
            <text:p>Pepper CHILE (Capsicum annuum)</text:p>
          </table:table-cell>
          <table:table-cell table:style-name="ce14" office:value-type="string" calcext:value-type="string">
            <text:p>Santo Domingo (Medium to Medium Hot)</text:p>
          </table:table-cell>
          <table:table-cell table:style-name="ce14" office:value-type="string" calcext:value-type="string">
            <text:p>Native Seed/SEARCH <text:s/>www.nativeseeds.org</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5">
          <table:table-cell office:value-type="float" office:value="1222" calcext:value-type="float">
            <text:p>1222</text:p>
          </table:table-cell>
          <table:table-cell table:style-name="ce14" office:value-type="string" calcext:value-type="string">
            <text:p>FLOWER (Assorted species)</text:p>
          </table:table-cell>
          <table:table-cell table:style-name="ce14" office:value-type="string" calcext:value-type="string">
            <text:p>Save the Bees Flower Mix</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bout 20 seeds per square foot and rake in. Attracts pollinators and beneficial insects. Has some flowers and some herb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197" calcext:value-type="float">
            <text:p>1197</text:p>
          </table:table-cell>
          <table:table-cell table:style-name="ce14" office:value-type="string" calcext:value-type="string">
            <text:p>Flax (Linaceae grandiflorum)</text:p>
          </table:table-cell>
          <table:table-cell table:style-name="ce14" office:value-type="string" calcext:value-type="string">
            <text:p>Scarlet</text:p>
          </table:table-cell>
          <table:table-cell table:style-name="ce14" office:value-type="string" calcext:value-type="string">
            <text:p>Botanical Interest, Inc</text:p>
          </table:table-cell>
          <table:table-cell table:style-name="ce14" office:value-type="string" calcext:value-type="string">
            <text:p>Press gently into soil, a pinch of seeds every 4-8 inches in full sun. Grows best in poor, dry soil. Germinates in about a month. Scarlet flowers attract pollinators.</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474" calcext:value-type="float">
            <text:p>1474</text:p>
          </table:table-cell>
          <table:table-cell table:style-name="ce15" office:value-type="string" calcext:value-type="string">
            <text:p>KALE (Brassica oleracea)</text:p>
          </table:table-cell>
          <table:table-cell table:style-name="ce15" office:value-type="string" calcext:value-type="string">
            <text:p>Scarlet</text:p>
          </table:table-cell>
          <table:table-cell table:style-name="ce15" office:value-type="string" calcext:value-type="string">
            <text:p>Johnny’s Seed</text:p>
          </table:table-cell>
          <table:table-cell table:style-name="ce15" office:value-type="string" calcext:value-type="string">
            <text:p>Spring or fall plant; sow 3-4 seeds at 1/2” depth; 12” apart; rows 18” apart. Thin to one plant per group. Harvest outside leaves in about 2 months. Very cold hardy.</text:p>
          </table:table-cell>
          <table:table-cell table:style-name="ce15"/>
          <table:table-cell table:style-name="ce15" office:value-type="string" calcext:value-type="string">
            <text:p>25-3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4">
          <table:table-cell office:value-type="float" office:value="1084" calcext:value-type="float">
            <text:p>1084</text:p>
          </table:table-cell>
          <table:table-cell table:style-name="ce15" office:value-type="string" calcext:value-type="string">
            <text:p>BEAN, RUNNER (Phaseolus coccineus)</text:p>
          </table:table-cell>
          <table:table-cell table:style-name="ce14" office:value-type="string" calcext:value-type="string">
            <text:p>Scarlet Emporer</text:p>
          </table:table-cell>
          <table:table-cell table:style-name="ce14" office:value-type="string" calcext:value-type="string">
            <text:p>Botanical Interest, Inc</text:p>
          </table:table-cell>
          <table:table-cell table:style-name="ce14" office:value-type="string" calcext:value-type="string">
            <text:p>Showy RED flowers produce 6-8” pods that can be eaten as a green bean (75 days to harvest) or as a dry bean. Direct sow 2 weeks before last frost 1-3” deep, 4-6” apart. Must trellis. Soil Temp Range: 60°-95° Optimum: 80°</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3">
          <table:table-cell office:value-type="float" office:value="1140" calcext:value-type="float">
            <text:p>1140</text:p>
          </table:table-cell>
          <table:table-cell table:style-name="ce15" office:value-type="string" calcext:value-type="string">
            <text:p>CARROT (Daucus carota)</text:p>
          </table:table-cell>
          <table:table-cell table:style-name="ce15" office:value-type="string" calcext:value-type="string">
            <text:p>Scarlet Nantes</text:p>
          </table:table-cell>
          <table:table-cell table:style-name="ce15" office:value-type="string" calcext:value-type="string">
            <text:p>Patriot Seeds</text:p>
          </table:table-cell>
          <table:table-cell table:style-name="ce15" office:value-type="string" calcext:value-type="string">
            <text:p>Sow direct into rich soil high in phosphorus &amp; Potassium (moderate nitrogen). <text:s/>Seeds are biennial. Soil Temp Range: 40°-95° Optimum: 85°</text:p>
          </table:table-cell>
          <table:table-cell table:style-name="ce15"/>
          <table:table-cell table:style-name="ce15" office:value-type="string" calcext:value-type="string">
            <text:p>75-80 Seeds</text:p>
          </table:table-cell>
          <table:table-cell table:style-name="ce14"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40°-95° Optimum: 85°</text:p>
          </table:table-cell>
          <table:table-cell table:style-name="ce15" office:value-type="string" calcext:value-type="string">
            <text:p>4-6 days</text:p>
          </table:table-cell>
          <table:table-cell/>
          <table:table-cell table:style-name="ce6" table:number-columns-repeated="16366"/>
        </table:table-row>
        <table:table-row table:style-name="ro9">
          <table:table-cell office:value-type="float" office:value="1334" calcext:value-type="float">
            <text:p>1334</text:p>
          </table:table-cell>
          <table:table-cell table:style-name="ce14" office:value-type="string" calcext:value-type="string">
            <text:p>FLOWER Salvia (Salvia splendens)</text:p>
          </table:table-cell>
          <table:table-cell table:style-name="ce14" office:value-type="string" calcext:value-type="string">
            <text:p>Scarlet Sage</text:p>
          </table:table-cell>
          <table:table-cell table:style-name="ce14" office:value-type="string" calcext:value-type="string">
            <text:p>Baker Creek Heirloom Seeds</text:p>
          </table:table-cell>
          <table:table-cell table:style-name="ce14" office:value-type="string" calcext:value-type="string">
            <text:p>Perennial, usually grown as an annual, branched plant to 2 ft tall, green-gray foliage, 4” flower spikes covered with rich scarlet tubular flowers. <text:s/>Sow in place in early spring in very well draining soil, barely covering seeds OR start indoors and transplant at time of last frost. Adding charcoal to the planting medium may improve germination. <text:s/>Full sun; prefers sandy soil. <text:s/>Seeds may be collected from mature flower heads. <text:s/>Self-seeds freely if content.</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Annual</text:p>
          </table:table-cell>
          <table:table-cell table:style-name="ce14"/>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3">
          <table:table-cell office:value-type="float" office:value="1207" calcext:value-type="float">
            <text:p>1207</text:p>
          </table:table-cell>
          <table:table-cell table:style-name="ce15" office:value-type="string" calcext:value-type="string">
            <text:p>FLOWER <text:s/>Cosmos (Cosmos bipinnatus)</text:p>
          </table:table-cell>
          <table:table-cell table:style-name="ce15" office:value-type="string" calcext:value-type="string">
            <text:p>Sensation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Red, pink and white flower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2">
          <table:table-cell office:value-type="float" office:value="1560" calcext:value-type="float">
            <text:p>1560</text:p>
          </table:table-cell>
          <table:table-cell table:style-name="ce15" office:value-type="string" calcext:value-type="string">
            <text:p>Pepper CHILE (Capsicum annuum)</text:p>
          </table:table-cell>
          <table:table-cell table:style-name="ce14" office:value-type="string" calcext:value-type="string">
            <text:p>Serrano (Medium Hot)</text:p>
          </table:table-cell>
          <table:table-cell table:style-name="ce14" office:value-type="string" calcext:value-type="string">
            <text:p>Baker Creek Heirloom Seeds</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 </text:p>
          </table:table-cell>
          <table:table-cell table:style-name="ce14"/>
          <table:table-cell table:style-name="ce14" office:value-type="string" calcext:value-type="string">
            <text:p>Deborah Hargrove</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11">
          <table:table-cell office:value-type="float" office:value="1293" calcext:value-type="float">
            <text:p>1293</text:p>
          </table:table-cell>
          <table:table-cell table:style-name="ce14" office:value-type="string" calcext:value-type="string">
            <text:p>FLOWER Larkspur (Consolida regalis)</text:p>
          </table:table-cell>
          <table:table-cell table:style-name="ce14" office:value-type="string" calcext:value-type="string">
            <text:p>Shades of Blue</text:p>
          </table:table-cell>
          <table:table-cell table:style-name="ce14" office:value-type="string" calcext:value-type="string">
            <text:p>Botanical Interest, Inc</text:p>
          </table:table-cell>
          <table:table-cell table:style-name="ce14" office:value-type="string" calcext:value-type="string">
            <text:p>Sow outside 4 to 6 weeks before last frost or in fall before first frost. Plant 1/4” deep. <text:s/>Space 12” apart. Deer resistant. Grows 3’ to 4’ t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553" calcext:value-type="float">
            <text:p>1553</text:p>
          </table:table-cell>
          <table:table-cell table:style-name="ce14" office:value-type="string" calcext:value-type="string">
            <text:p>PEA Shell (Pisum sativum)</text:p>
          </table:table-cell>
          <table:table-cell table:style-name="ce14" office:value-type="string" calcext:value-type="string">
            <text:p>Shell Pea</text:p>
          </table:table-cell>
          <table:table-cell table:style-name="ce14"/>
          <table:table-cell table:style-name="ce14" office:value-type="string" calcext:value-type="string">
            <text:p>Direct sow outdoors; young plants can tolerate a light frost. Will tolerate harder frosts with frost cover. <text:s/>Plant 1” deep, 2” apart, trellis. Keep weed free. <text:s/>Pick when seeds have enlarged in pod; hold vines when picking to prevent damage to vine. <text:s/>4-5” pods, 67 day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6-7 days</text:p>
          </table:table-cell>
          <table:table-cell/>
          <table:table-cell table:style-name="ce6" table:number-columns-repeated="16366"/>
        </table:table-row>
        <table:table-row table:style-name="ro6">
          <table:table-cell office:value-type="float" office:value="1603" calcext:value-type="float">
            <text:p>1603</text:p>
          </table:table-cell>
          <table:table-cell table:style-name="ce14" office:value-type="string" calcext:value-type="string">
            <text:p>PEPPER, SWEET (Capsicum annuum)</text:p>
          </table:table-cell>
          <table:table-cell table:style-name="ce14" office:value-type="string" calcext:value-type="string">
            <text:p>Shishito (Japanese Sweet Pepper)</text:p>
          </table:table-cell>
          <table:table-cell table:style-name="ce14" office:value-type="string" calcext:value-type="string">
            <text:p>Alan Wendt, Hereford AZ </text:p>
          </table:table-cell>
          <table:table-cell table:style-name="ce14" office:value-type="string" calcext:value-type="string">
            <text:p>Start inside 1/4” deep in loose soil 8-10 weeks before last frost. <text:s/>Slow to germinate; need warmth; plant 12-16” apart in full sun/partial in shade low desert. Fruit is 3-4 inches long; 60 days to green/80 days to red. Save seeds from fully ripe, slightly shriveled fruit. Can cross pollinate. Great in a 18 inch pot. Wonderful for tempura and stir fr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table-cell table:style-name="ce14" office:value-type="string" calcext:value-type="string">
            <text:p>8-10 days</text:p>
          </table:table-cell>
          <table:table-cell/>
          <table:table-cell table:style-name="ce6" table:number-columns-repeated="16366"/>
        </table:table-row>
        <table:table-row table:style-name="ro6">
          <table:table-cell office:value-type="float" office:value="1406" calcext:value-type="float">
            <text:p>1406</text:p>
          </table:table-cell>
          <table:table-cell table:style-name="ce15" office:value-type="string" calcext:value-type="string">
            <text:p>HERB (Perilla frutescens)</text:p>
          </table:table-cell>
          <table:table-cell table:style-name="ce15" office:value-type="string" calcext:value-type="string">
            <text:p>Shiso/Perilla, green &amp; red (Japanese basil)</text:p>
          </table:table-cell>
          <table:table-cell table:style-name="ce14" office:value-type="string" calcext:value-type="string">
            <text:p>Botanical Interest, Inc</text:p>
          </table:table-cell>
          <table:table-cell table:style-name="ce15" office:value-type="string" calcext:value-type="string">
            <text:p>A taste described as a combination of cinnamon, mint and clove with overtones of cumin. Start indoors 4-6 weeks before average last frost. Store seeds in refrigerator before planting. Soak seeds in water 12- 24 hours prior to planting, press seeds into soil, do not cover. Excellent for growing in containers. Heat and drought tolerant. Deer resistant.</text:p>
          </table:table-cell>
          <table:table-cell table:style-name="ce15"/>
          <table:table-cell table:style-name="ce15" office:value-type="string" calcext:value-type="string">
            <text:p>25-3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4">
          <table:table-cell office:value-type="float" office:value="1314" calcext:value-type="float">
            <text:p>1314</text:p>
          </table:table-cell>
          <table:table-cell table:style-name="ce14" office:value-type="string" calcext:value-type="string">
            <text:p>FLOWER Milkweed (Asclepias speciosa)</text:p>
          </table:table-cell>
          <table:table-cell table:style-name="ce14" office:value-type="string" calcext:value-type="string">
            <text:p>Showy Milkweed Butterfly Flower</text:p>
          </table:table-cell>
          <table:table-cell table:style-name="ce14" office:value-type="string" calcext:value-type="string">
            <text:p>Botanical Interest, Inc</text:p>
          </table:table-cell>
          <table:table-cell table:style-name="ce14" office:value-type="string" calcext:value-type="string">
            <text:p>Sow outside 2 to 4 weeks before average last frost date. Plant 1/4” deep. Space 12” to 16” apart. Drought tolerant when established. Attracts butterflies. Deer resistant. Sap is toxic; avoid skin/eye contact. Do not ea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6">
          <table:table-cell office:value-type="float" office:value="1400" calcext:value-type="float">
            <text:p>1400</text:p>
          </table:table-cell>
          <table:table-cell table:style-name="ce15" office:value-type="string" calcext:value-type="string">
            <text:p>GREENS (Salad Blend)</text:p>
          </table:table-cell>
          <table:table-cell table:style-name="ce15" office:value-type="string" calcext:value-type="string">
            <text:p>Siamese Dragon Stir-Fry Mix </text:p>
          </table:table-cell>
          <table:table-cell table:style-name="ce14" office:value-type="string" calcext:value-type="string">
            <text:p>Baker Creek Heirloom Seeds</text:p>
          </table:table-cell>
          <table:table-cell table:style-name="ce15" office:value-type="string" calcext:value-type="string">
            <text:p>All the best Asian greens for stir-frying and steaming. <text:s/>Rich flavor is incredible when lightly cooked and seasoned with garlic and Thai peppers. <text:s/>Grow as spring/fall crop. <text:s/>Sow in place no more than 1/4” deep in moist, well- drained soil. Full morning sun/afternoon shade. <text:s/>Allow a few inches between plants, thinning as they grow. <text:s/>Leaves, flowers and stems are all edible.</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11">
          <table:table-cell office:value-type="float" office:value="1471" calcext:value-type="float">
            <text:p>1471</text:p>
          </table:table-cell>
          <table:table-cell table:style-name="ce14" office:value-type="string" calcext:value-type="string">
            <text:p>KALE (Brassica napus pabularia)</text:p>
          </table:table-cell>
          <table:table-cell table:style-name="ce14" office:value-type="string" calcext:value-type="string">
            <text:p>Siberian </text:p>
          </table:table-cell>
          <table:table-cell table:style-name="ce15" office:value-type="string" calcext:value-type="string">
            <text:p>Johnny’s Seed</text:p>
          </table:table-cell>
          <table:table-cell table:style-name="ce14" office:value-type="string" calcext:value-type="string">
            <text:p>Spring or fall plant; sow directly into soil at 1/4” depth; thin to 6-12” apart; rows 18” apart. Will cross pollinate.</text:p>
          </table:table-cell>
          <table:table-cell table:style-name="ce14"/>
          <table:table-cell table:style-name="ce14" office:value-type="string" calcext:value-type="string">
            <text:p>10-15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number-columns-repeated="2"/>
          <table:table-cell/>
          <table:table-cell table:style-name="ce6" table:number-columns-repeated="16366"/>
        </table:table-row>
        <table:table-row table:style-name="ro3">
          <table:table-cell office:value-type="float" office:value="1514" calcext:value-type="float">
            <text:p>1514</text:p>
          </table:table-cell>
          <table:table-cell table:style-name="ce14" office:value-type="string" calcext:value-type="string">
            <text:p>MELON Cantalope (Cucumis melo)</text:p>
          </table:table-cell>
          <table:table-cell table:style-name="ce14" office:value-type="string" calcext:value-type="string">
            <text:p>Sierra Gold</text:p>
          </table:table-cell>
          <table:table-cell table:style-name="ce14" office:value-type="string" calcext:value-type="string">
            <text:p>Ferry Morse</text:p>
          </table:table-cell>
          <table:table-cell table:style-name="ce14" office:value-type="string" calcext:value-type="string">
            <text:p>Plant 1-2 weeks after last frost. Make mounds 4’-6’ apart. Sow 2-3 seeds in top of mound 1/4” deep. Thin to one plant per mound. Full sun, 90 day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2">
          <table:table-cell office:value-type="float" office:value="1168" calcext:value-type="float">
            <text:p>1168</text:p>
          </table:table-cell>
          <table:table-cell table:style-name="ce14" office:value-type="string" calcext:value-type="string">
            <text:p>CORN, SWEET (Zea mays)</text:p>
          </table:table-cell>
          <table:table-cell table:style-name="ce14" office:value-type="string" calcext:value-type="string">
            <text:p>Silver ‘N Gold</text:p>
          </table:table-cell>
          <table:table-cell table:style-name="ce14" office:value-type="string" calcext:value-type="string">
            <text:p>Ferry Morse</text:p>
          </table:table-cell>
          <table:table-cell table:style-name="ce14" office:value-type="string" calcext:value-type="string">
            <text:p>Up to 8-9 inch ears, 65 days; wind pollinated; all varieties will cross. Plant in spring after last frost 1”-1 1/2” deep, 8-12” apart in rows, clumps, or basins. For best results plant a number of short rows together to ensure pollination. Harvest when kernels are full and juicy, about 85 day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9">
          <table:table-cell office:value-type="float" office:value="1666" calcext:value-type="float">
            <text:p>1666</text:p>
          </table:table-cell>
          <table:table-cell table:style-name="ce14" office:value-type="string" calcext:value-type="string">
            <text:p>SQUASH (Cucubita argyroserma)</text:p>
          </table:table-cell>
          <table:table-cell table:style-name="ce14" office:value-type="string" calcext:value-type="string">
            <text:p>Silver Edged</text:p>
          </table:table-cell>
          <table:table-cell table:style-name="ce15" office:value-type="string" calcext:value-type="string">
            <text:p>Native Seed/SEARCH <text:s/>www.nativeseeds.org</text:p>
          </table:table-cell>
          <table:table-cell table:style-name="ce14" office:value-type="string" calcext:value-type="string">
            <text:p>Plant outdoors 2-3 seeds 1”deep in basins, 3-4 feet apart; abundant vine growth. <text:s/>Eat immature as summer squash or mature as winter squash. <text:s/>Flower, seeds, and growing tips of vines all edible. Grown for tasty seeds (roasted) which are white with silvery edge. Will cross pollinate same species. Seed saving: pick mature and after-ripen 30 days before collecting the seed. Soil Temp Range: 60°-100° Optimum: 9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100° Optimum: 95°</text:p>
          </table:table-cell>
          <table:table-cell table:style-name="ce14" office:value-type="string" calcext:value-type="string">
            <text:p>3-4 days</text:p>
          </table:table-cell>
          <table:table-cell/>
          <table:table-cell table:style-name="ce6" table:number-columns-repeated="16366"/>
        </table:table-row>
        <table:table-row table:style-name="ro2">
          <table:table-cell office:value-type="float" office:value="1169" calcext:value-type="float">
            <text:p>1169</text:p>
          </table:table-cell>
          <table:table-cell table:style-name="ce15" office:value-type="string" calcext:value-type="string">
            <text:p>CORN, SWEET (Zea mays)</text:p>
          </table:table-cell>
          <table:table-cell table:style-name="ce15" office:value-type="string" calcext:value-type="string">
            <text:p>Silver Queen</text:p>
          </table:table-cell>
          <table:table-cell table:style-name="ce14" office:value-type="string" calcext:value-type="string">
            <text:p>Ferry Morse</text:p>
          </table:table-cell>
          <table:table-cell table:style-name="ce15" office:value-type="string" calcext:value-type="string">
            <text:p>Up to 8-9 inch ears, 85 days; wind pollinated; all varieties will cross. Plant in spring after last frost 1”-1 1/2” deep, 8-12” apart in rows, clumps, or basins. For best results plant a number of short rows together to ensure pollination. Harvest when kernels are full and juicy, about 85 days.</text:p>
          </table:table-cell>
          <table:table-cell table:style-name="ce15"/>
          <table:table-cell table:style-name="ce15" office:value-type="string" calcext:value-type="string">
            <text:p>20-30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6">
          <table:table-cell office:value-type="float" office:value="1486" calcext:value-type="float">
            <text:p>1486</text:p>
          </table:table-cell>
          <table:table-cell table:style-name="ce14" office:value-type="string" calcext:value-type="string">
            <text:p>LETTUCE Black Seeded (Latuca sativa)</text:p>
          </table:table-cell>
          <table:table-cell table:style-name="ce14" office:value-type="string" calcext:value-type="string">
            <text:p>Simpson</text:p>
          </table:table-cell>
          <table:table-cell table:style-name="ce15" office:value-type="string" calcext:value-type="string">
            <text:p>Johnny’s Seed</text:p>
          </table:table-cell>
          <table:table-cell table:style-name="ce14" office:value-type="string" calcext:value-type="string">
            <text:p>Full sized frilly leaves That can be picked in just over a month. Light aids germination. Press into surface 3 seeds every 10”, thinning to one plant. Sow outdoors 2-4 weeks before last frost or fall and winter for cool weather harvest. Dormant above 80 degrees. Harvest leaves from outer edge so plant continues to grow from center.</text:p>
          </table:table-cell>
          <table:table-cell table:style-name="ce14"/>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11">
          <table:table-cell office:value-type="float" office:value="1320" calcext:value-type="float">
            <text:p>1320</text:p>
          </table:table-cell>
          <table:table-cell table:style-name="ce15" office:value-type="string" calcext:value-type="string">
            <text:p>FLOWER Pansy (Viola tricolor var. hortensis)</text:p>
          </table:table-cell>
          <table:table-cell table:style-name="ce15" office:value-type="string" calcext:value-type="string">
            <text:p>Single mixed colors</text:p>
          </table:table-cell>
          <table:table-cell table:style-name="ce14" office:value-type="string" calcext:value-type="string">
            <text:p>Botanical Interest, Inc</text:p>
          </table:table-cell>
          <table:table-cell table:style-name="ce15" office:value-type="string" calcext:value-type="string">
            <text:p>Sow outside late fall to early winter. Plant 1/4” deep. Space 6” apart. Large velvety blooms. Attracts pollinators.</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422" calcext:value-type="float">
            <text:p>1422</text:p>
          </table:table-cell>
          <table:table-cell table:style-name="ce15" office:value-type="string" calcext:value-type="string">
            <text:p>HERB Basil Blend (Ocimum basilicum)</text:p>
          </table:table-cell>
          <table:table-cell table:style-name="ce15" office:value-type="string" calcext:value-type="string">
            <text:p>Six Basil Blend</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Up to 6 different flavors including Genovese, large leaf, dark opal, lime, lemon and cinnamon.</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344" calcext:value-type="float">
            <text:p>1344</text:p>
          </table:table-cell>
          <table:table-cell table:style-name="ce15" office:value-type="string" calcext:value-type="string">
            <text:p>FLOWER Sunflower (Helianthus annus)</text:p>
          </table:table-cell>
          <table:table-cell table:style-name="ce15" office:value-type="string" calcext:value-type="string">
            <text:p>Skyscraper</text:p>
          </table:table-cell>
          <table:table-cell table:style-name="ce14" office:value-type="string" calcext:value-type="string">
            <text:p>Ferry Morse</text:p>
          </table:table-cell>
          <table:table-cell table:style-name="ce15" office:value-type="string" calcext:value-type="string">
            <text:p>Plant after danger of frost 1-2 weeks after last frost. Sensitive to root disturbance so sow directly into soil, 1/4”-1/2” deep 18”-24” apart. Grows up to 10-12’ with flowers 14” or better. Edible jumbo seed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186" calcext:value-type="float">
            <text:p>1186</text:p>
          </table:table-cell>
          <table:table-cell table:style-name="ce15" office:value-type="string" calcext:value-type="string">
            <text:p>CUCUMBER (Cucumis sativus)</text:p>
          </table:table-cell>
          <table:table-cell table:style-name="ce15" office:value-type="string" calcext:value-type="string">
            <text:p>Slicer</text:p>
          </table:table-cell>
          <table:table-cell table:style-name="ce15" office:value-type="string" calcext:value-type="string">
            <text:p>Ferry Morse</text:p>
          </table:table-cell>
          <table:table-cell table:style-name="ce15" office:value-type="string" calcext:value-type="string">
            <text:p>Direct sow outside after danger of frost. <text:s/>Plant 1/2” below soil with 2-3 seeds per hill if sprawling, 4” apart. Keep picked so the plant continues to produce.</text:p>
          </table:table-cell>
          <table:table-cell table:style-name="ce15"/>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table-cell table:style-name="ce6" table:number-columns-repeated="16366"/>
        </table:table-row>
        <table:table-row table:style-name="ro3">
          <table:table-cell office:value-type="float" office:value="1020" calcext:value-type="float">
            <text:p>1020</text:p>
          </table:table-cell>
          <table:table-cell table:style-name="ce15" office:value-type="string" calcext:value-type="string">
            <text:p>ARUGULA (Diplotaxis Tenuifolia)</text:p>
          </table:table-cell>
          <table:table-cell table:style-name="ce15" office:value-type="string" calcext:value-type="string">
            <text:p>Slow Bolting</text:p>
          </table:table-cell>
          <table:table-cell table:style-name="ce14" office:value-type="string" calcext:value-type="string">
            <text:p>Botanical Interest, Inc</text:p>
          </table:table-cell>
          <table:table-cell table:style-name="ce15" office:value-type="string" calcext:value-type="string">
            <text:p>Direct sow 1/4” deep; <text:s/>thin to 6” <text:s/>apart; size 6-12”; 21-40 days; sun/partial shade; grow year-round in the desert; leaves can be spicier in summertime. <text:s/>Easy to grow.</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number-columns-repeated="2"/>
          <table:table-cell/>
          <table:table-cell table:style-name="ce6" table:number-columns-repeated="16366"/>
        </table:table-row>
        <table:table-row table:style-name="ro4">
          <table:table-cell office:value-type="float" office:value="1037" calcext:value-type="float">
            <text:p>1037</text:p>
          </table:table-cell>
          <table:table-cell table:style-name="ce15" office:value-type="string" calcext:value-type="string">
            <text:p>Baby GREENS (Assorted species)</text:p>
          </table:table-cell>
          <table:table-cell table:style-name="ce15" office:value-type="string" calcext:value-type="string">
            <text:p>Smoothie Mix</text:p>
          </table:table-cell>
          <table:table-cell table:style-name="ce14" office:value-type="string" calcext:value-type="string">
            <text:p>Botanical Interest, Inc</text:p>
          </table:table-cell>
          <table:table-cell table:style-name="ce15" office:value-type="string" calcext:value-type="string">
            <text:p>Plant 1/8” deep about 15 seeds per foot in a flat. Does not require thinning. Harvest when 2-4 inches tall to add to salads or smoothies. Includes spinach, Early Wonder beets, Bulls Blood beets, Swiss chard and Romaine lettuce.</text:p>
          </table:table-cell>
          <table:table-cell table:style-name="ce15"/>
          <table:table-cell table:style-name="ce15" office:value-type="string" calcext:value-type="string">
            <text:p>4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table-cell table:style-name="ce6" table:number-columns-repeated="16366"/>
        </table:table-row>
        <table:table-row table:style-name="ro3">
          <table:table-cell office:value-type="float" office:value="1191" calcext:value-type="float">
            <text:p>1191</text:p>
          </table:table-cell>
          <table:table-cell table:style-name="ce15" office:value-type="string" calcext:value-type="string">
            <text:p>CUCUMBER (Cucumis sativus)</text:p>
          </table:table-cell>
          <table:table-cell table:style-name="ce15" office:value-type="string" calcext:value-type="string">
            <text:p>SMR 58</text:p>
          </table:table-cell>
          <table:table-cell table:style-name="ce14" office:value-type="string" calcext:value-type="string">
            <text:p>Native Seed/SEARCH <text:s/>www.nativeseeds.org</text:p>
          </table:table-cell>
          <table:table-cell table:style-name="ce15" office:value-type="string" calcext:value-type="string">
            <text:p>The BEST open-pollinated pickling cuke; harvest at 6” max., resists scab spot rot and cucumber mosaic; dislikes herbs &amp; potatoes Soil Temp Range: 60°-105° Optimum: 9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60°-105° Optimum: 95°</text:p>
          </table:table-cell>
          <table:table-cell table:style-name="ce15" office:value-type="string" calcext:value-type="string">
            <text:p>4 to 6 days</text:p>
          </table:table-cell>
          <table:table-cell/>
          <table:table-cell table:style-name="ce6" table:number-columns-repeated="16366"/>
        </table:table-row>
        <table:table-row table:style-name="ro6">
          <table:table-cell office:value-type="float" office:value="1152" calcext:value-type="float">
            <text:p>1152</text:p>
          </table:table-cell>
          <table:table-cell table:style-name="ce15" office:value-type="string" calcext:value-type="string">
            <text:p>CAULIFLOWER (Brassica oleracea)</text:p>
          </table:table-cell>
          <table:table-cell table:style-name="ce15" office:value-type="string" calcext:value-type="string">
            <text:p>Snowball</text:p>
          </table:table-cell>
          <table:table-cell table:style-name="ce14" office:value-type="string" calcext:value-type="string">
            <text:p>Ferry Morse</text:p>
          </table:table-cell>
          <table:table-cell table:style-name="ce15" office:value-type="string" calcext:value-type="string">
            <text:p>Sow indoors 5-7 weeks before planting outdoors in early fall. Or plant outdoors when evenings start being cool. Plant 1/4” deep with 12-16” between plants. Full Sun, 65-70 days. When heads start to form, tuck or tie leaves over the head to reduce sun exposure. Harvest when head turns to bright white and is outgrowing leaf cover.</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2">
          <table:table-cell office:value-type="float" office:value="1717" calcext:value-type="float">
            <text:p>1717</text:p>
          </table:table-cell>
          <table:table-cell table:style-name="ce15" office:value-type="string" calcext:value-type="string">
            <text:p>TOMATO (Solanaceae lycopersicum)</text:p>
          </table:table-cell>
          <table:table-cell table:style-name="ce15" office:value-type="string" calcext:value-type="string">
            <text:p>Solar Flair </text:p>
          </table:table-cell>
          <table:table-cell table:style-name="ce15" office:value-type="string" calcext:value-type="string">
            <text:p>Baker Creek Heirloom Seeds</text:p>
          </table:table-cell>
          <table:table-cell table:style-name="ce15" office:value-type="string" calcext:value-type="string">
            <text:p>6-8 oz beefsteak, red with gold stripes. Very meaty with luscious sweet red tomato flavor. <text:s/>Start indoors 6-8 weeks before last frost. Cover seeds lightly to allow light to assist germination. <text:s/>Keep most. Move to bright light after sprouted. <text:s/>After last frost, plant in garden 2 to 3 feet apart. Soil Temp Range: 75°-85° Optimum: 8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75°-85° Optimum: 80°</text:p>
          </table:table-cell>
          <table:table-cell table:style-name="ce15" office:value-type="string" calcext:value-type="string">
            <text:p>7 to 10 days</text:p>
          </table:table-cell>
          <table:table-cell/>
          <table:table-cell table:style-name="ce6" table:number-columns-repeated="16366"/>
        </table:table-row>
        <table:table-row table:style-name="ro3">
          <table:table-cell office:value-type="float" office:value="1187" calcext:value-type="float">
            <text:p>1187</text:p>
          </table:table-cell>
          <table:table-cell table:style-name="ce14" office:value-type="string" calcext:value-type="string">
            <text:p>CUCUMBER (Cucumis sativus)</text:p>
          </table:table-cell>
          <table:table-cell table:style-name="ce14" office:value-type="string" calcext:value-type="string">
            <text:p>Spacemaster (Bush)</text:p>
          </table:table-cell>
          <table:table-cell table:style-name="ce14" office:value-type="string" calcext:value-type="string">
            <text:p>Ferry Morse</text:p>
          </table:table-cell>
          <table:table-cell table:style-name="ce14" office:value-type="string" calcext:value-type="string">
            <text:p>Direct sow outside after danger of frost. <text:s/>Plant 1/2” below soil with 2-3 seeds per hill 4’ apart. Its 2’-3’ vines make it ideal for small spaces Full sun; 62 day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3">
          <table:table-cell office:value-type="float" office:value="1665" calcext:value-type="float">
            <text:p>1665</text:p>
          </table:table-cell>
          <table:table-cell table:style-name="ce15" office:value-type="string" calcext:value-type="string">
            <text:p>SQUASH (Cucubirta pepo)</text:p>
          </table:table-cell>
          <table:table-cell table:style-name="ce15" office:value-type="string" calcext:value-type="string">
            <text:p>Spaghetti</text:p>
          </table:table-cell>
          <table:table-cell table:style-name="ce15"/>
          <table:table-cell table:style-name="ce15" office:value-type="string" calcext:value-type="string">
            <text:p>Plant outdoors 2-3 seeds 1”deep, 3-4 feet apart; thin to 1 healthy plant. <text:s/>Full sun; 9”-12” fruit. Will cross with other squash, cucmbers and melons. <text:s/>90 days</text:p>
          </table:table-cell>
          <table:table-cell table:style-name="ce15"/>
          <table:table-cell table:style-name="ce15" office:value-type="string" calcext:value-type="string">
            <text:p>6+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3">
          <table:table-cell office:value-type="float" office:value="1447" calcext:value-type="float">
            <text:p>1447</text:p>
          </table:table-cell>
          <table:table-cell table:style-name="ce14" office:value-type="string" calcext:value-type="string">
            <text:p>HERB Mint (Mentha spicata)</text:p>
          </table:table-cell>
          <table:table-cell table:style-name="ce14" office:value-type="string" calcext:value-type="string">
            <text:p>Spearmint</text:p>
          </table:table-cell>
          <table:table-cell table:style-name="ce14" office:value-type="string" calcext:value-type="string">
            <text:p>Burpee</text:p>
          </table:table-cell>
          <table:table-cell table:style-name="ce14" office:value-type="string" calcext:value-type="string">
            <text:p>Plant outside1-2 weeks after last frost. Plant inside 8-10 weeks before last frost. Gently press into surface of soil, light aids germination. Keep moist. Plant in containers outside after last fros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3">
          <table:table-cell office:value-type="float" office:value="1214" calcext:value-type="float">
            <text:p>1214</text:p>
          </table:table-cell>
          <table:table-cell table:style-name="ce14" office:value-type="string" calcext:value-type="string">
            <text:p>FLOWER <text:s/>Poppy California (Eschscholzia californica)</text:p>
          </table:table-cell>
          <table:table-cell table:style-name="ce14" office:value-type="string" calcext:value-type="string">
            <text:p>Spring Melody Blend</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5">
          <table:table-cell office:value-type="float" office:value="1538" calcext:value-type="float">
            <text:p>1538</text:p>
          </table:table-cell>
          <table:table-cell table:style-name="ce14" office:value-type="string" calcext:value-type="string">
            <text:p>OKRA (Abelmoschus esculentus)</text:p>
          </table:table-cell>
          <table:table-cell table:style-name="ce14" office:value-type="string" calcext:value-type="string">
            <text:p>Star of David</text:p>
          </table:table-cell>
          <table:table-cell table:style-name="ce14" office:value-type="string" calcext:value-type="string">
            <text:p>Winnie Struse</text:p>
          </table:table-cell>
          <table:table-cell table:style-name="ce14" office:value-type="string" calcext:value-type="string">
            <text:p>Israeli variety, short, very thick delicious pods, twice as fat around as most okra. Soak 24 hrs before planting, direct sow or start indoors. Harvest pods daily, as they grow quickly past stage of prime eating.</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Winnie Struse</text:p>
          </table:table-cell>
          <table:table-cell table:style-name="ce28" office:value-type="string" calcext:value-type="string">
            <text:p>2021</text:p>
          </table:table-cell>
          <table:table-cell table:style-name="ce14" table:number-columns-repeated="2"/>
          <table:table-cell/>
          <table:table-cell table:style-name="ce6" table:number-columns-repeated="16366"/>
        </table:table-row>
        <table:table-row table:style-name="ro3">
          <table:table-cell office:value-type="float" office:value="1475" calcext:value-type="float">
            <text:p>1475</text:p>
          </table:table-cell>
          <table:table-cell table:style-name="ce15" office:value-type="string" calcext:value-type="string">
            <text:p>KALE (Brassica oleracea)</text:p>
          </table:table-cell>
          <table:table-cell table:style-name="ce15" office:value-type="string" calcext:value-type="string">
            <text:p>Starbor (Hybrid)</text:p>
          </table:table-cell>
          <table:table-cell table:style-name="ce15" office:value-type="string" calcext:value-type="string">
            <text:p>Johnny’s Seed</text:p>
          </table:table-cell>
          <table:table-cell table:style-name="ce15" office:value-type="string" calcext:value-type="string">
            <text:p>Spring or fall plant; sow 3-4 seeds at 1/2” depth; 12” apart; rows 18” apart. Thin to one plant per group. Harvest outside leaves in about 2 months. Very cold hardy.</text:p>
          </table:table-cell>
          <table:table-cell table:style-name="ce15"/>
          <table:table-cell table:style-name="ce15" office:value-type="string" calcext:value-type="string">
            <text:p>25-3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4">
          <table:table-cell office:value-type="float" office:value="1491" calcext:value-type="float">
            <text:p>1491</text:p>
          </table:table-cell>
          <table:table-cell table:style-name="ce14" office:value-type="string" calcext:value-type="string">
            <text:p>LETTUCE Green (Latuca sativa)</text:p>
          </table:table-cell>
          <table:table-cell table:style-name="ce14" office:value-type="string" calcext:value-type="string">
            <text:p>Starfighter</text:p>
          </table:table-cell>
          <table:table-cell table:style-name="ce14" office:value-type="string" calcext:value-type="string">
            <text:p>Rijk Zwaan</text:p>
          </table:table-cell>
          <table:table-cell table:style-name="ce14" office:value-type="string" calcext:value-type="string">
            <text:p>Green leaf with blistered leaves (savoyed) with nice regular shape. Water at base to avoid rot. Plant 1/8” deep. Thin to 8” for full heads. Harvest leaves from outer edge so plant continues to grow from center.</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4">
          <table:table-cell office:value-type="float" office:value="1649" calcext:value-type="float">
            <text:p>1649</text:p>
          </table:table-cell>
          <table:table-cell table:style-name="ce14" office:value-type="string" calcext:value-type="string">
            <text:p>SPINACH (Spinacia oleracea)</text:p>
          </table:table-cell>
          <table:table-cell table:style-name="ce14" office:value-type="string" calcext:value-type="string">
            <text:p>STARFISH</text:p>
          </table:table-cell>
          <table:table-cell table:style-name="ce14" office:value-type="string" calcext:value-type="string">
            <text:p>Rijk Zwaan</text:p>
          </table:table-cell>
          <table:table-cell table:style-name="ce14" office:value-type="string" calcext:value-type="string">
            <text:p>Oriental type. Also can be used for hydroponic growing. Thick leaves, fast growing. Direct sow in early spring &amp; late summer, 1/2” deep, thin to 2” apart, rows 12” apart. Days to mature, 30. Soil Temp Range: 35°-85° Optimum: 70°</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35°-85° Optimum: 70°</text:p>
          </table:table-cell>
          <table:table-cell table:style-name="ce14" office:value-type="string" calcext:value-type="string">
            <text:p>4-9 days</text:p>
          </table:table-cell>
          <table:table-cell/>
          <table:table-cell table:style-name="ce6" table:number-columns-repeated="16366"/>
        </table:table-row>
        <table:table-row table:style-name="ro3">
          <table:table-cell office:value-type="float" office:value="1397" calcext:value-type="float">
            <text:p>1397</text:p>
          </table:table-cell>
          <table:table-cell table:style-name="ce14" office:value-type="string" calcext:value-type="string">
            <text:p>GREENS (Brassica ssp &amp; Eruca sativa)</text:p>
          </table:table-cell>
          <table:table-cell table:style-name="ce14" office:value-type="string" calcext:value-type="string">
            <text:p>Stir-Fry Mix</text:p>
          </table:table-cell>
          <table:table-cell table:style-name="ce14" office:value-type="string" calcext:value-type="string">
            <text:p>Native Seed/SEARCH <text:s/>www.nativeseeds.org</text:p>
          </table:table-cell>
          <table:table-cell table:style-name="ce14" office:value-type="string" calcext:value-type="string">
            <text:p>Plant 1/4” deep in cool season; thin to 1” apart or 6”apart if you want mature leaves. Harvest individual leaves or cut to 1” above ground. Plant will regrow several times.</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table-cell table:style-name="ce6" table:number-columns-repeated="16366"/>
        </table:table-row>
        <table:table-row table:style-name="ro2">
          <table:table-cell office:value-type="float" office:value="1170" calcext:value-type="float">
            <text:p>1170</text:p>
          </table:table-cell>
          <table:table-cell table:style-name="ce15" office:value-type="string" calcext:value-type="string">
            <text:p>CORN, SWEET (Zea mays)</text:p>
          </table:table-cell>
          <table:table-cell table:style-name="ce15" office:value-type="string" calcext:value-type="string">
            <text:p>Stowell’s Evergreen</text:p>
          </table:table-cell>
          <table:table-cell table:style-name="ce15" office:value-type="string" calcext:value-type="string">
            <text:p>Native Seed/SEARCH <text:s/>www.nativeseeds.org</text:p>
          </table:table-cell>
          <table:table-cell table:style-name="ce15" office:value-type="string" calcext:value-type="string">
            <text:p>Domesticated in Mexico by 6,700 BCE. “King of all White Sweet Corn Varieties” - up to 10 inch ears on 7 foot stalks, 90 days; wind pollinated; all varieties will cross. Plant in spring or with summer rains 1” deep, 8-12” apart in rows, clumps, or basins. Harvest when kernels are full and juicy.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3">
          <table:table-cell office:value-type="float" office:value="1180" calcext:value-type="float">
            <text:p>1180</text:p>
          </table:table-cell>
          <table:table-cell table:style-name="ce15" office:value-type="string" calcext:value-type="string">
            <text:p>CUCUMBER (Cucumis sativus)</text:p>
          </table:table-cell>
          <table:table-cell table:style-name="ce15" office:value-type="string" calcext:value-type="string">
            <text:p>Straight Eight</text:p>
          </table:table-cell>
          <table:table-cell table:style-name="ce15" office:value-type="string" calcext:value-type="string">
            <text:p>American Seed</text:p>
          </table:table-cell>
          <table:table-cell table:style-name="ce15" office:value-type="string" calcext:value-type="string">
            <text:p>Direct sow outside after danger of frost. Plant 1/2” below soil with 2-3 seeds per hill if sprawling, 4” apart if trellising. <text:s/>Full sun; 55-60 days. Fruit up to 8” long. Soil Temp Range: 60– 105 Optimum: 8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0– 105 Optimum: 85°</text:p>
          </table:table-cell>
          <table:table-cell table:style-name="ce15" office:value-type="string" calcext:value-type="string">
            <text:p>7-14 days</text:p>
          </table:table-cell>
          <table:table-cell/>
          <table:table-cell table:style-name="ce6" table:number-columns-repeated="16366"/>
        </table:table-row>
        <table:table-row table:style-name="ro4">
          <table:table-cell office:value-type="float" office:value="1136" calcext:value-type="float">
            <text:p>1136</text:p>
          </table:table-cell>
          <table:table-cell table:style-name="ce14" office:value-type="string" calcext:value-type="string">
            <text:p>CANE (Saccharum officinarum)</text:p>
          </table:table-cell>
          <table:table-cell table:style-name="ce14" office:value-type="string" calcext:value-type="string">
            <text:p>Sugar</text:p>
          </table:table-cell>
          <table:table-cell table:style-name="ce14"/>
          <table:table-cell table:style-name="ce14" office:value-type="string" calcext:value-type="string">
            <text:p>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23</text:p>
          </table:table-cell>
          <table:table-cell table:style-name="ce14"/>
          <table:table-cell table:style-name="ce14" office:value-type="string" calcext:value-type="string">
            <text:p>12 months to Harvest</text:p>
          </table:table-cell>
          <table:table-cell/>
          <table:table-cell table:style-name="ce6" table:number-columns-repeated="16366"/>
        </table:table-row>
        <table:table-row table:style-name="ro11">
          <table:table-cell office:value-type="float" office:value="1746" calcext:value-type="float">
            <text:p>1746</text:p>
          </table:table-cell>
          <table:table-cell table:style-name="ce15" office:value-type="string" calcext:value-type="string">
            <text:p>WATERMELON (Citrullus lanatus)</text:p>
          </table:table-cell>
          <table:table-cell table:style-name="ce15" office:value-type="string" calcext:value-type="string">
            <text:p>Sugar Baby </text:p>
          </table:table-cell>
          <table:table-cell table:style-name="ce15"/>
          <table:table-cell table:style-name="ce15" office:value-type="string" calcext:value-type="string">
            <text:p>Direct sow outside after danger of frost. Plant 1” deep in hills of 2 to 3 plants per hill at 3-5 feet apart. Full sun; 90 days; 25+pound frui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3-4 days</text:p>
          </table:table-cell>
          <table:table-cell/>
          <table:table-cell table:style-name="ce6" table:number-columns-repeated="16366"/>
        </table:table-row>
        <table:table-row table:style-name="ro3">
          <table:table-cell office:value-type="float" office:value="1620" calcext:value-type="float">
            <text:p>1620</text:p>
          </table:table-cell>
          <table:table-cell table:style-name="ce14" office:value-type="string" calcext:value-type="string">
            <text:p>PUMPKIN (Cucurbita pepo)</text:p>
          </table:table-cell>
          <table:table-cell table:style-name="ce14" office:value-type="string" calcext:value-type="string">
            <text:p>Sugar Pie</text:p>
          </table:table-cell>
          <table:table-cell table:style-name="ce14"/>
          <table:table-cell table:style-name="ce14" office:value-type="string" calcext:value-type="string">
            <text:p>Direct sow outdoors 2-3 seeds 1”deep. Make mounds 4-6 feet apart; thin to 1 healthy plant per mound. <text:s/>Full sun; 100 days. Small 6” has been the standard for baking or for making jack o’lanterns.</text:p>
          </table:table-cell>
          <table:table-cell table:style-name="ce14"/>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7-14 days</text:p>
          </table:table-cell>
          <table:table-cell/>
          <table:table-cell table:style-name="ce6" table:number-columns-repeated="16366"/>
        </table:table-row>
        <table:table-row table:style-name="ro4">
          <table:table-cell office:value-type="float" office:value="1137" calcext:value-type="float">
            <text:p>1137</text:p>
          </table:table-cell>
          <table:table-cell table:style-name="ce15" office:value-type="string" calcext:value-type="string">
            <text:p>CANE (Saccharum officinarum)</text:p>
          </table:table-cell>
          <table:table-cell table:style-name="ce15" office:value-type="string" calcext:value-type="string">
            <text:p>Sugar, Red Apache</text:p>
          </table:table-cell>
          <table:table-cell table:style-name="ce15"/>
          <table:table-cell table:style-name="ce15" office:value-type="string" calcext:value-type="string">
            <text:p>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4"/>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table-cell table:style-name="ce15" office:value-type="string" calcext:value-type="string">
            <text:p>12 months to Harvest</text:p>
          </table:table-cell>
          <table:table-cell/>
          <table:table-cell table:style-name="ce6" table:number-columns-repeated="16366"/>
        </table:table-row>
        <table:table-row table:style-name="ro11">
          <table:table-cell office:value-type="float" office:value="1223" calcext:value-type="float">
            <text:p>1223</text:p>
          </table:table-cell>
          <table:table-cell table:style-name="ce15" office:value-type="string" calcext:value-type="string">
            <text:p>FLOWER (Cosmos sulphureus)</text:p>
          </table:table-cell>
          <table:table-cell table:style-name="ce15" office:value-type="string" calcext:value-type="string">
            <text:p>Sulphur Cosmos ORANGE</text:p>
          </table:table-cell>
          <table:table-cell table:style-name="ce15" office:value-type="string" calcext:value-type="string">
            <text:p>Mary Dever</text:p>
          </table:table-cell>
          <table:table-cell table:style-name="ce15" office:value-type="string" calcext:value-type="string">
            <text:p>Annual, Bright Orange, blooms summer/fall, reaches 30-40 inches (or up to 7ft), sun/partial shade, direct sow</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4" office:value-type="string" calcext:value-type="string">
            <text:p>Hereford, AZ</text:p>
          </table:table-cell>
          <table:table-cell table:style-name="ce15" office:value-type="string" calcext:value-type="string">
            <text:p>Annual</text:p>
          </table:table-cell>
          <table:table-cell table:style-name="ce15" office:value-type="string" calcext:value-type="string">
            <text:p>Mary Dever</text:p>
          </table:table-cell>
          <table:table-cell table:style-name="ce28" office:value-type="string" calcext:value-type="string">
            <text:p>2016</text:p>
          </table:table-cell>
          <table:table-cell table:style-name="ce15" table:number-columns-repeated="2"/>
          <table:table-cell/>
          <table:table-cell table:style-name="ce6" table:number-columns-repeated="16366"/>
        </table:table-row>
        <table:table-row table:style-name="ro4">
          <table:table-cell office:value-type="float" office:value="1461" calcext:value-type="float">
            <text:p>1461</text:p>
          </table:table-cell>
          <table:table-cell table:style-name="ce14" office:value-type="string" calcext:value-type="string">
            <text:p>HERB Savory (Satureja hortensis)</text:p>
          </table:table-cell>
          <table:table-cell table:style-name="ce14" office:value-type="string" calcext:value-type="string">
            <text:p>Summer</text:p>
          </table:table-cell>
          <table:table-cell table:style-name="ce14" office:value-type="string" calcext:value-type="string">
            <text:p>Botanical Interest, Inc</text:p>
          </table:table-cell>
          <table:table-cell table:style-name="ce14" office:value-type="string" calcext:value-type="string">
            <text:p>Plant indoors 8-10 weeks before last frost pressing lightly into soil surface. Transplant outdoors 1- 2 weeks after last frost. Space about 6”-12” apart. Attracts bees and beneficial insects. Grows well in containers. Deer resistant.</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188" calcext:value-type="float">
            <text:p>1188</text:p>
          </table:table-cell>
          <table:table-cell table:style-name="ce14" office:value-type="string" calcext:value-type="string">
            <text:p>CUCUMBER (Cucumis sativus)</text:p>
          </table:table-cell>
          <table:table-cell table:style-name="ce14" office:value-type="string" calcext:value-type="string">
            <text:p>Sumter</text:p>
          </table:table-cell>
          <table:table-cell table:style-name="ce14" office:value-type="string" calcext:value-type="string">
            <text:p>Ferry Morse</text:p>
          </table:table-cell>
          <table:table-cell table:style-name="ce14" office:value-type="string" calcext:value-type="string">
            <text:p>Direct sow outside after danger of frost. <text:s/>Plant 1/2” below soil with 2-3 seeds per hill 4’-5’ apart. <text:s/>Full sun; 56 days. Fruit up to 9” long. A favorite for slicing and pickling; resists scab and tolerates mosaic.</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6 days</text:p>
          </table:table-cell>
          <table:table-cell/>
          <table:table-cell table:style-name="ce6" table:number-columns-repeated="16366"/>
        </table:table-row>
        <table:table-row table:style-name="ro4">
          <table:table-cell office:value-type="float" office:value="1244" calcext:value-type="float">
            <text:p>1244</text:p>
          </table:table-cell>
          <table:table-cell table:style-name="ce14" office:value-type="string" calcext:value-type="string">
            <text:p>FLOWER Blue Bonnet (Lupinus perennis)</text:p>
          </table:table-cell>
          <table:table-cell table:style-name="ce14" office:value-type="string" calcext:value-type="string">
            <text:p>Sundial Lupine</text:p>
          </table:table-cell>
          <table:table-cell table:style-name="ce14" office:value-type="string" calcext:value-type="string">
            <text:p>Botanical Interest, Inc</text:p>
          </table:table-cell>
          <table:table-cell table:style-name="ce14" office:value-type="string" calcext:value-type="string">
            <text:p>Scarify before planting. If planting inside, use biodegradable pots to plant outside without disturbing roots. Plant outside, in mild climates, Sept—Oct. Plant 1/8” deep, 4” apart, thin to 12” apart. Butterfly host. Drought tolerant once established.</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11">
          <table:table-cell office:value-type="float" office:value="1226" calcext:value-type="float">
            <text:p>1226</text:p>
          </table:table-cell>
          <table:table-cell table:style-name="ce14" office:value-type="string" calcext:value-type="string">
            <text:p>FLOWER (Helianthus annua)</text:p>
          </table:table-cell>
          <table:table-cell table:style-name="ce14" office:value-type="string" calcext:value-type="string">
            <text:p>Sunflower—Ann</text:p>
          </table:table-cell>
          <table:table-cell table:style-name="ce15" office:value-type="string" calcext:value-type="string">
            <text:p>Jim Koweek</text:p>
          </table:table-cell>
          <table:table-cell table:style-name="ce14" office:value-type="string" calcext:value-type="string">
            <text:p>Shorter and smaller than most. Attracts wrens and finches. <text:s/>Seen along side roads in Arizona. <text:s/>Plant after danger of frost; water we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2">
          <table:table-cell office:value-type="float" office:value="1718" calcext:value-type="float">
            <text:p>1718</text:p>
          </table:table-cell>
          <table:table-cell table:style-name="ce14" office:value-type="string" calcext:value-type="string">
            <text:p>TOMATO (Solanaceae lycopersicum)</text:p>
          </table:table-cell>
          <table:table-cell table:style-name="ce14" office:value-type="string" calcext:value-type="string">
            <text:p>Sunrise Bumblebee</text:p>
          </table:table-cell>
          <table:table-cell table:style-name="ce14" office:value-type="string" calcext:value-type="string">
            <text:p>Baker Creek Heirloom Seeds</text:p>
          </table:table-cell>
          <table:table-cell table:style-name="ce14" office:value-type="string" calcext:value-type="string">
            <text:p>Oblong little fruits weigh barely an ounce with swirls of red and orange inside and out. <text:s text:c="2"/>Start indoors 6-8 weeks before last frost. Cover seeds lightly to allow light to assist germination. <text:s/>Keep moist. Move to bright light after sprouted. <text:s/>After last frost, plant in garden 2 to 3 feet apart. Soil Temp Range: 75°-8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5°-85° Optimum: 80°</text:p>
          </table:table-cell>
          <table:table-cell table:style-name="ce14" office:value-type="string" calcext:value-type="string">
            <text:p>7 to 10 days</text:p>
          </table:table-cell>
          <table:table-cell/>
          <table:table-cell table:style-name="ce6" table:number-columns-repeated="16366"/>
        </table:table-row>
        <table:table-row table:style-name="ro2">
          <table:table-cell office:value-type="float" office:value="1083" calcext:value-type="float">
            <text:p>1083</text:p>
          </table:table-cell>
          <table:table-cell table:style-name="ce15" office:value-type="string" calcext:value-type="string">
            <text:p>BEAN, RUNNER (Phaseolus coccineus)</text:p>
          </table:table-cell>
          <table:table-cell table:style-name="ce15" office:value-type="string" calcext:value-type="string">
            <text:p>Sunset (with lovely peach blossoms)</text:p>
          </table:table-cell>
          <table:table-cell table:style-name="ce14" office:value-type="string" calcext:value-type="string">
            <text:p>Baker Creek Heirloom Seeds</text:p>
          </table:table-cell>
          <table:table-cell table:style-name="ce15" office:value-type="string" calcext:value-type="string">
            <text:p>Produces 6-8” pods that can be eaten as a snap bean (75 days to harvest) or as a dry bean. Soak 1-2 hours before planting to aid germination. Direct sow after last frost 1-2” deep, 6” apart, full sun. Must trellis. <text:s/>Keep snaps well picked; production slows as seeds mature.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table-cell table:style-name="ce6" table:number-columns-repeated="16366"/>
        </table:table-row>
        <table:table-row table:style-name="ro5">
          <table:table-cell office:value-type="float" office:value="1034" calcext:value-type="float">
            <text:p>1034</text:p>
          </table:table-cell>
          <table:table-cell table:style-name="ce14" office:value-type="string" calcext:value-type="string">
            <text:p>Baby GREENS (Assorted Brassica)</text:p>
          </table:table-cell>
          <table:table-cell table:style-name="ce14" office:value-type="string" calcext:value-type="string">
            <text:p>Superfoods</text:p>
          </table:table-cell>
          <table:table-cell table:style-name="ce14" office:value-type="string" calcext:value-type="string">
            <text:p>Botanical Interest, Inc</text:p>
          </table:table-cell>
          <table:table-cell table:style-name="ce14" office:value-type="string" calcext:value-type="string">
            <text:p>Plant 1/8” deep about 15 seeds per foot in a flat. Does not require thinning. Harvest when 2-4 inches tall to add to salads or smoothies. Includes Kale, Broccoli, Collards, Kohlrabi, Turnip, Bok Choy.</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table-cell table:style-name="ce6" table:number-columns-repeated="16366"/>
        </table:table-row>
        <table:table-row table:style-name="ro11">
          <table:table-cell office:value-type="float" office:value="1231" calcext:value-type="float">
            <text:p>1231</text:p>
          </table:table-cell>
          <table:table-cell table:style-name="ce14" office:value-type="string" calcext:value-type="string">
            <text:p>FLOWER (Macroptillium supinum)</text:p>
          </table:table-cell>
          <table:table-cell table:style-name="ce14" office:value-type="string" calcext:value-type="string">
            <text:p>Supine Bean</text:p>
          </table:table-cell>
          <table:table-cell table:style-name="ce15" office:value-type="string" calcext:value-type="string">
            <text:p>Jim Koweek</text:p>
          </table:table-cell>
          <table:table-cell table:style-name="ce14" office:value-type="string" calcext:value-type="string">
            <text:p>Flowers above and below ground. The flowers below ground usually carry seed. Lovely orange flowe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table-cell table:style-name="ce6" table:number-columns-repeated="16366"/>
        </table:table-row>
        <table:table-row table:style-name="ro6">
          <table:table-cell office:value-type="float" office:value="1729" calcext:value-type="float">
            <text:p>1729</text:p>
          </table:table-cell>
          <table:table-cell table:style-name="ce15" office:value-type="string" calcext:value-type="string">
            <text:p>TOMATO Roma (Lycopersicon esculentum)</text:p>
          </table:table-cell>
          <table:table-cell table:style-name="ce15" office:value-type="string" calcext:value-type="string">
            <text:p>Supremo (Determinate)</text:p>
          </table:table-cell>
          <table:table-cell table:style-name="ce14" office:value-type="string" calcext:value-type="string">
            <text:p>Botanical Interest, Inc</text:p>
          </table:table-cell>
          <table:table-cell table:style-name="ce15" office:value-type="string" calcext:value-type="string">
            <text:p>Start indoors 4-6 weeks before transplant. Sow 1/4” below surface in containers. Transplant 1-2 weeks after last frost; plant outdoors 24”-36” apart. Matures 68 days from transplant. <text:s/>Fruit ripens within a week or two. Disease resistant. Large uniform tomatoes that set well even in heat. Great for sauce or paste, chop for salads or salsa, slice for sandwiches.</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3">
          <table:table-cell office:value-type="float" office:value="1418" calcext:value-type="float">
            <text:p>1418</text:p>
          </table:table-cell>
          <table:table-cell table:style-name="ce14" office:value-type="string" calcext:value-type="string">
            <text:p>HERB Basil (Ocimum basilicum)</text:p>
          </table:table-cell>
          <table:table-cell table:style-name="ce14" office:value-type="string" calcext:value-type="string">
            <text:p>Sweet</text:p>
          </table:table-cell>
          <table:table-cell table:style-name="ce14" office:value-type="string" calcext:value-type="string">
            <text:p>Ferry Morse</text:p>
          </table:table-cell>
          <table:table-cell table:style-name="ce14" office:value-type="string" calcext:value-type="string">
            <text:p>Start indoors 4-6 weeks before transplanting outdoors. Sow 1/4” deep in seed starting mix. Transplant outdoors 1-2 weeks after last frost about 12” apart.</text:p>
          </table:table-cell>
          <table:table-cell table:style-name="ce14"/>
          <table:table-cell table:style-name="ce14" office:value-type="string" calcext:value-type="string">
            <text:p>10-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5">
          <table:table-cell office:value-type="float" office:value="1745" calcext:value-type="float">
            <text:p>1745</text:p>
          </table:table-cell>
          <table:table-cell table:style-name="ce14" office:value-type="string" calcext:value-type="string">
            <text:p>WATERMELON (Citrullus lanatus)</text:p>
          </table:table-cell>
          <table:table-cell table:style-name="ce14" office:value-type="string" calcext:value-type="string">
            <text:p>Sweet Dakota Rose</text:p>
          </table:table-cell>
          <table:table-cell table:style-name="ce14" office:value-type="string" calcext:value-type="string">
            <text:p>Native Seed/SEARCH <text:s/>www.nativeseeds.org</text:p>
          </table:table-cell>
          <table:table-cell table:style-name="ce14" office:value-type="string" calcext:value-type="string">
            <text:p>Vary in size and color of flesh and rind; plant in spring or with summer rains 1/2” to 1” deep/3 per basin; long growing season; scoop seeds from fully ripe fruit Soil Temp Range: 60°-105° Optimum: 9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5° Optimum: 95°</text:p>
          </table:table-cell>
          <table:table-cell table:style-name="ce14" office:value-type="string" calcext:value-type="string">
            <text:p>3-4 days</text:p>
          </table:table-cell>
          <table:table-cell/>
          <table:table-cell table:style-name="ce6" table:number-columns-repeated="16366"/>
        </table:table-row>
        <table:table-row table:style-name="ro5">
          <table:table-cell office:value-type="float" office:value="1660" calcext:value-type="float">
            <text:p>1660</text:p>
          </table:table-cell>
          <table:table-cell table:style-name="ce14" office:value-type="string" calcext:value-type="string">
            <text:p>SQUASH (Cucubirta maxima)</text:p>
          </table:table-cell>
          <table:table-cell table:style-name="ce14" office:value-type="string" calcext:value-type="string">
            <text:p>Sweet Meat</text:p>
          </table:table-cell>
          <table:table-cell table:style-name="ce14" office:value-type="string" calcext:value-type="string">
            <text:p>Botanical Interest, Inc</text:p>
          </table:table-cell>
          <table:table-cell table:style-name="ce14" office:value-type="string" calcext:value-type="string">
            <text:p>Direct sow outdoors 2-3 seeds 1”deep, 3-4 feet apart; thin to 1 healthy plant. <text:s/>Full sun; 95-110 days; Large, green, ribbed squashes, with a pumpkin shape and wonderful sweet brilliant yellow flesh.</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11">
          <table:table-cell office:value-type="float" office:value="1321" calcext:value-type="float">
            <text:p>1321</text:p>
          </table:table-cell>
          <table:table-cell table:style-name="ce14" office:value-type="string" calcext:value-type="string">
            <text:p>FLOWER Pansy (Viola tricolor var. hortensis)</text:p>
          </table:table-cell>
          <table:table-cell table:style-name="ce14" office:value-type="string" calcext:value-type="string">
            <text:p>Swiss Giants Mixed Colors</text:p>
          </table:table-cell>
          <table:table-cell table:style-name="ce14" office:value-type="string" calcext:value-type="string">
            <text:p>Botanical Interest, Inc</text:p>
          </table:table-cell>
          <table:table-cell table:style-name="ce14" office:value-type="string" calcext:value-type="string">
            <text:p>Sow outside late fall to early winter. Plant 1/4” deep. Space 6” apart. Large velvety blooms. Attracts pollinators.</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table-cell table:style-name="ce6" table:number-columns-repeated="16366"/>
        </table:table-row>
        <table:table-row table:style-name="ro2">
          <table:table-cell office:value-type="float" office:value="1092" calcext:value-type="float">
            <text:p>1092</text:p>
          </table:table-cell>
          <table:table-cell table:style-name="ce15" office:value-type="string" calcext:value-type="string">
            <text:p>BEAN, TEPARY (Phaseolus acutifolius)</text:p>
          </table:table-cell>
          <table:table-cell table:style-name="ce15" office:value-type="string" calcext:value-type="string">
            <text:p>Sycamore Canyon</text:p>
          </table:table-cell>
          <table:table-cell table:style-name="ce14" office:value-type="string" calcext:value-type="string">
            <text:p>Native Seed/SEARCH <text:s/>www.nativeseeds.org</text:p>
          </table:table-cell>
          <table:table-cell table:style-name="ce15" office:value-type="string" calcext:value-type="string">
            <text:p>Pole or bush bean; used as dry bean; tolerate heat, drought, and alkaline soils. Scarify before planting by lightly sanding. Plant at monsoon time 1/2” deep 4” apart; keep moist until germination but do not tolerate overwatering. Harvest as pods brown/let dry thoroughl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ycamore Cayon, AZ</text:p>
          </table:table-cell>
          <table:table-cell table:style-name="ce15"/>
          <table:table-cell table:style-name="ce15" office:value-type="string" calcext:value-type="string">
            <text:p>Native Seed/SEARCH Farm</text:p>
          </table:table-cell>
          <table:table-cell table:style-name="ce28" office:value-type="string" calcext:value-type="string">
            <text:p>2020</text:p>
          </table:table-cell>
          <table:table-cell table:style-name="ce15" table:number-columns-repeated="2"/>
          <table:table-cell/>
          <table:table-cell table:style-name="ce6" table:number-columns-repeated="16366"/>
        </table:table-row>
        <table:table-row table:style-name="ro4">
          <table:table-cell office:value-type="float" office:value="1676" calcext:value-type="float">
            <text:p>1676</text:p>
          </table:table-cell>
          <table:table-cell table:style-name="ce15" office:value-type="string" calcext:value-type="string">
            <text:p>SQUASH Acorn (Cucubirta pepo)</text:p>
          </table:table-cell>
          <table:table-cell table:style-name="ce15" office:value-type="string" calcext:value-type="string">
            <text:p>Table Queen</text:p>
          </table:table-cell>
          <table:table-cell table:style-name="ce15"/>
          <table:table-cell table:style-name="ce15" office:value-type="string" calcext:value-type="string">
            <text:p>Direct sow outdoors 2-3 seeds 1”deep, 3-4 feet apart; thin to 1 healthy plant. <text:s/>Full sun; 75-90 days; Winter squash with distinctive longitudinal ridges on its exterior and sweet yellow orange flesh inside. Soil Temp Range: 60°-100° Optimum: 95°</text:p>
          </table:table-cell>
          <table:table-cell table:style-name="ce15"/>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100° Optimum: 95°</text:p>
          </table:table-cell>
          <table:table-cell table:style-name="ce15" office:value-type="string" calcext:value-type="string">
            <text:p>3-4 days</text:p>
          </table:table-cell>
          <table:table-cell/>
          <table:table-cell table:style-name="ce6" table:number-columns-repeated="16366"/>
        </table:table-row>
        <table:table-row table:style-name="ro9">
          <table:table-cell office:value-type="float" office:value="1341" calcext:value-type="float">
            <text:p>1341</text:p>
          </table:table-cell>
          <table:table-cell table:style-name="ce14" office:value-type="string" calcext:value-type="string">
            <text:p>FLOWER Snapdragon (Antirrhinum)</text:p>
          </table:table-cell>
          <table:table-cell table:style-name="ce14" office:value-type="string" calcext:value-type="string">
            <text:p>Tall Deluxe</text:p>
          </table:table-cell>
          <table:table-cell table:style-name="ce14" office:value-type="string" calcext:value-type="string">
            <text:p>Baker Creek Heirloom Seeds</text:p>
          </table:table-cell>
          <table:table-cell table:style-name="ce14" office:value-type="string" calcext:value-type="string">
            <text:p>30-36” flower spikes in brilliant pink, red, yellow, lavender, and rose. <text:s/>Perennial usually grown as annual. <text:s/>Sow in place, early spring or start indoors setting out after last frost (transplant gently). Require full sun, rich soil, moderate moisture. Cutting back after blooming may cause another flush of flowers. <text:s/>Self-seeds freely, may over-winter in our desert. <text:s/>Start indoors 8 weeks before last frost and on the surface of the soil, keep moist. <text:s/>Germination: 10 to 20 days</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Annual</text:p>
          </table:table-cell>
          <table:table-cell table:style-name="ce14"/>
          <table:table-cell table:style-name="ce28" office:value-type="string" calcext:value-type="string">
            <text:p>2018</text:p>
          </table:table-cell>
          <table:table-cell table:style-name="ce14"/>
          <table:table-cell table:style-name="ce14" office:value-type="string" calcext:value-type="string">
            <text:p>10 to 20 days</text:p>
          </table:table-cell>
          <table:table-cell/>
          <table:table-cell table:style-name="ce6" table:number-columns-repeated="16366"/>
        </table:table-row>
        <table:table-row table:style-name="ro3">
          <table:table-cell office:value-type="float" office:value="1366" calcext:value-type="float">
            <text:p>1366</text:p>
          </table:table-cell>
          <table:table-cell table:style-name="ce15" office:value-type="string" calcext:value-type="string">
            <text:p>FLOWER Sweet William (Dianthus barbatus)</text:p>
          </table:table-cell>
          <table:table-cell table:style-name="ce15" office:value-type="string" calcext:value-type="string">
            <text:p>Tall Double Mixed Colors</text:p>
          </table:table-cell>
          <table:table-cell table:style-name="ce15" office:value-type="string" calcext:value-type="string">
            <text:p>Ferry Morse</text:p>
          </table:table-cell>
          <table:table-cell table:style-name="ce15" office:value-type="string" calcext:value-type="string">
            <text:p>Plant directly outside after last frost. Sow 1/4” deep 12-18” apart. Will bloom best in second year. 18” tall so will be good as a border behind shorter flowers. Long lasting cut flower.</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210" calcext:value-type="float">
            <text:p>1210</text:p>
          </table:table-cell>
          <table:table-cell table:style-name="ce14" office:value-type="string" calcext:value-type="string">
            <text:p>FLOWER <text:s/>Nasturtium (Tropaeolum majus)</text:p>
          </table:table-cell>
          <table:table-cell table:style-name="ce14" office:value-type="string" calcext:value-type="string">
            <text:p>Tall Single Mixed Colors</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Can grow up to 5”. Deters garden pests while attracting pollinators. Deer and rabbit resistant. Blossoms and leaves can also be eaten.</text:p>
          </table:table-cell>
          <table:table-cell table:style-name="ce14" table:number-columns-repeated="3"/>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154" calcext:value-type="float">
            <text:p>1154</text:p>
          </table:table-cell>
          <table:table-cell table:style-name="ce14" office:value-type="string" calcext:value-type="string">
            <text:p>Celery (Apium graveolens)</text:p>
          </table:table-cell>
          <table:table-cell table:style-name="ce14" office:value-type="string" calcext:value-type="string">
            <text:p>Tall Utah 52-70</text:p>
          </table:table-cell>
          <table:table-cell table:style-name="ce14"/>
          <table:table-cell table:style-name="ce14" office:value-type="string" calcext:value-type="string">
            <text:p>Sow indoors 8-12 weeks before last frost, 1/8” deep; <text:s/>thin to 10” apart upon transplant after last frost. Keep mulched for better results. Thin stalks with lots of leaves</text:p>
          </table:table-cell>
          <table:table-cell table:style-name="ce14"/>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3">
          <table:table-cell office:value-type="float" office:value="1428" calcext:value-type="float">
            <text:p>1428</text:p>
          </table:table-cell>
          <table:table-cell table:style-name="ce14" office:value-type="string" calcext:value-type="string">
            <text:p>HERB Chia (Salvia tiliiforlia)</text:p>
          </table:table-cell>
          <table:table-cell table:style-name="ce14" office:value-type="string" calcext:value-type="string">
            <text:p>Tarahumara</text:p>
          </table:table-cell>
          <table:table-cell table:style-name="ce23" office:value-type="string" calcext:value-type="string">
            <text:p>Native Seed/SEARCH <text:s/>www.nativeseeds.org</text:p>
          </table:table-cell>
          <table:table-cell table:style-name="ce14" office:value-type="string" calcext:value-type="string">
            <text:p>Plant outdoors with the summer rains 1/4” deep. Harvest dried seed stalks and hang upside down for complete drying. Crush to remove seeds and winnow off chaff.</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4">
          <table:table-cell office:value-type="float" office:value="1085" calcext:value-type="float">
            <text:p>1085</text:p>
          </table:table-cell>
          <table:table-cell table:style-name="ce14" office:value-type="string" calcext:value-type="string">
            <text:p>BEAN, RUNNER (Phaseolus coccineus)</text:p>
          </table:table-cell>
          <table:table-cell table:style-name="ce14" office:value-type="string" calcext:value-type="string">
            <text:p>Tarahumara Bordal</text:p>
          </table:table-cell>
          <table:table-cell table:style-name="ce14" office:value-type="string" calcext:value-type="string">
            <text:p>Native Seed/SEARCH <text:s/>www.nativeseeds.org</text:p>
          </table:table-cell>
          <table:table-cell table:style-name="ce14" office:value-type="string" calcext:value-type="string">
            <text:p>Showy flowers produce 6-8” pods that can be eaten as a green bean or dry bean. Large white beans. Direct sow 1” deep, 6” apart after frost danger. May <text:s/>bush or vine. Flower may drop if too hot. Varieties will cross. Soil Temp Range: 60°-95° Optimum: 80°</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3">
          <table:table-cell office:value-type="float" office:value="1069" calcext:value-type="float">
            <text:p>1069</text:p>
          </table:table-cell>
          <table:table-cell table:style-name="ce14" office:value-type="string" calcext:value-type="string">
            <text:p>BEAN, COMMON (Phaseolus vulgaris)</text:p>
          </table:table-cell>
          <table:table-cell table:style-name="ce14" office:value-type="string" calcext:value-type="string">
            <text:p>Tarahumara Capirame—Dry Bean</text:p>
          </table:table-cell>
          <table:table-cell table:style-name="ce15" office:value-type="string" calcext:value-type="string">
            <text:p>Native Seed/SEARCH <text:s/>www.nativeseeds.org</text:p>
          </table:table-cell>
          <table:table-cell table:style-name="ce14" office:value-type="string" calcext:value-type="string">
            <text:p>Direct sow outdoors after last frost. <text:s/>Plant 1” deep, 4” apart; bush to pole type. <text:s/>Early Tarahumara variety. From central Tarahumara region.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Andy Ward</text:p>
          </table:table-cell>
          <table:table-cell table:style-name="ce28" office:value-type="string" calcext:value-type="string">
            <text:p>2014</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2">
          <table:table-cell office:value-type="float" office:value="1532" calcext:value-type="float">
            <text:p>1532</text:p>
          </table:table-cell>
          <table:table-cell table:style-name="ce14" office:value-type="string" calcext:value-type="string">
            <text:p>MUSTARD (Brassica juncea)</text:p>
          </table:table-cell>
          <table:table-cell table:style-name="ce14" office:value-type="string" calcext:value-type="string">
            <text:p>Tatsoi</text:p>
          </table:table-cell>
          <table:table-cell table:style-name="ce14" office:value-type="string" calcext:value-type="string">
            <text:p>Native Seed/SEARCH <text:s/>www.nativeseeds.org</text:p>
          </table:table-cell>
          <table:table-cell table:style-name="ce14" office:value-type="string" calcext:value-type="string">
            <text:p>Also called Spoon Mustard; small dark green spoon-shaped leaves best eaten raw in a mixed salad. <text:s/>Grow as you would lettuce. <text:s/>Direct sow; full sun, broadcast or rake in at 1/4” depth. Thin to 6” apart. 40-60 days. Will cross with other mustards. Soil Temp Range: 35°-85° Optimum: 75°</text:p>
          </table:table-cell>
          <table:table-cell table:style-name="ce14"/>
          <table:table-cell table:style-name="ce14" office:value-type="string" calcext:value-type="string">
            <text:p>20+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2"/>
          <table:table-cell table:style-name="ce15" office:value-type="string" calcext:value-type="string">
            <text:p>Native Seed/SEARCH Farm </text:p>
          </table:table-cell>
          <table:table-cell table:style-name="ce28" office:value-type="string" calcext:value-type="string">
            <text:p>2017</text:p>
          </table:table-cell>
          <table:table-cell table:style-name="ce14" office:value-type="string" calcext:value-type="string">
            <text:p>35°-85° Optimum: 75°</text:p>
          </table:table-cell>
          <table:table-cell table:style-name="ce14" office:value-type="string" calcext:value-type="string">
            <text:p>3-4 days</text:p>
          </table:table-cell>
          <table:table-cell/>
          <table:table-cell table:style-name="ce6" table:number-columns-repeated="16366"/>
        </table:table-row>
        <table:table-row table:style-name="ro2">
          <table:table-cell office:value-type="float" office:value="1056" calcext:value-type="float">
            <text:p>1056</text:p>
          </table:table-cell>
          <table:table-cell table:style-name="ce15" office:value-type="string" calcext:value-type="string">
            <text:p>BEAN, COMMON (Phaseolus vulgaris)</text:p>
          </table:table-cell>
          <table:table-cell table:style-name="ce15" office:value-type="string" calcext:value-type="string">
            <text:p>Tavera—Snap/Green Bean (Bush type)</text:p>
          </table:table-cell>
          <table:table-cell table:style-name="ce14" office:value-type="string" calcext:value-type="string">
            <text:p>Botanical Interest, Inc</text:p>
          </table:table-cell>
          <table:table-cell table:style-name="ce15" office:value-type="string" calcext:value-type="string">
            <text:p>Direct sow outdoors after last frost. <text:s/>Plant 1” deep, 4” apart; bush type. <text:s/>Full sun; 54 days. Harvest frequently and at a petite size to encourage continued bean production. Will cross-pollinate with other beans. . Produces unusually high yield of tender French filet green beans. Very disease resist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12 days</text:p>
          </table:table-cell>
          <table:table-cell/>
          <table:table-cell table:style-name="ce6" table:number-columns-repeated="16366"/>
        </table:table-row>
        <table:table-row table:style-name="ro3">
          <table:table-cell office:value-type="float" office:value="1144" calcext:value-type="float">
            <text:p>1144</text:p>
          </table:table-cell>
          <table:table-cell table:style-name="ce15" office:value-type="string" calcext:value-type="string">
            <text:p>CARROT (Daucus carota)</text:p>
          </table:table-cell>
          <table:table-cell table:style-name="ce15" office:value-type="string" calcext:value-type="string">
            <text:p>Tender Sweet</text:p>
          </table:table-cell>
          <table:table-cell table:style-name="ce15"/>
          <table:table-cell table:style-name="ce15" office:value-type="string" calcext:value-type="string">
            <text:p>Plant 1/4” deep, thin to 2”. Pick when tops of roots are 3/4-1 inch in diameter. Flavorful, 10 inch coreless carrot. Holds color when cooked.</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4-25 days</text:p>
          </table:table-cell>
          <table:table-cell/>
          <table:table-cell table:style-name="ce6" table:number-columns-repeated="16366"/>
        </table:table-row>
        <table:table-row table:style-name="ro2">
          <table:table-cell office:value-type="float" office:value="1047" calcext:value-type="float">
            <text:p>1047</text:p>
          </table:table-cell>
          <table:table-cell table:style-name="ce14" office:value-type="string" calcext:value-type="string">
            <text:p>BEAN, COMMON (Phaseolus vulgaris)</text:p>
          </table:table-cell>
          <table:table-cell table:style-name="ce14" office:value-type="string" calcext:value-type="string">
            <text:p>Tendergreen—Snap/Green Bean (Bush type)</text:p>
          </table:table-cell>
          <table:table-cell table:style-name="ce14" office:value-type="string" calcext:value-type="string">
            <text:p>American Seed</text:p>
          </table:table-cell>
          <table:table-cell table:style-name="ce14" office:value-type="string" calcext:value-type="string">
            <text:p>Direct sow outdoors after last frost. <text:s/>Plant 1.5” deep, 4” apart; bush type. Stringless pods 5-6 inches long; very productive. <text:s/>Full sun; 52 days. <text:s/>To freeze, blanch 3 minutes, ice bath to cool, drain, freeze. Will cross-pollinate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95° Optimum: 80°</text:p>
          </table:table-cell>
          <table:table-cell table:style-name="ce14" office:value-type="string" calcext:value-type="string">
            <text:p>6-7 days</text:p>
          </table:table-cell>
          <table:table-cell/>
          <table:table-cell table:style-name="ce6" table:number-columns-repeated="16366"/>
        </table:table-row>
        <table:table-row table:style-name="ro6">
          <table:table-cell office:value-type="float" office:value="1559" calcext:value-type="float">
            <text:p>1559</text:p>
          </table:table-cell>
          <table:table-cell table:style-name="ce15" office:value-type="string" calcext:value-type="string">
            <text:p>PEANUT (Arachis hypogaea)</text:p>
          </table:table-cell>
          <table:table-cell table:style-name="ce15" office:value-type="string" calcext:value-type="string">
            <text:p>Tennessee Red </text:p>
          </table:table-cell>
          <table:table-cell table:style-name="ce14" office:value-type="string" calcext:value-type="string">
            <text:p>Baker Creek Heirloom Seeds</text:p>
          </table:table-cell>
          <table:table-cell table:style-name="ce15" office:value-type="string" calcext:value-type="string">
            <text:p>Valencia Type, red skinned. Easy to grow, require long season—110 days or more. <text:s/>Plant in or out of shell. <text:s/>Seeds are tender. Need fertile soil. Plant 1.5” deep, 6-8” apart in rows 2 ft apart after soil reaches 65 degrees. Keep free of weeds, but do not mulch! Dig peanuts when foliage begins to yellow. <text:s/>This variety superior for roasting or boiling.</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10 days</text:p>
          </table:table-cell>
          <table:table-cell/>
          <table:table-cell table:style-name="ce6" table:number-columns-repeated="16366"/>
        </table:table-row>
        <table:table-row table:style-name="ro6">
          <table:table-cell office:value-type="float" office:value="1593" calcext:value-type="float">
            <text:p>1593</text:p>
          </table:table-cell>
          <table:table-cell table:style-name="ce15" office:value-type="string" calcext:value-type="string">
            <text:p>Pepper CHILE (Capsicum annuum)</text:p>
          </table:table-cell>
          <table:table-cell table:style-name="ce14" office:value-type="string" calcext:value-type="string">
            <text:p>Tesuque (variable to Hot)</text:p>
          </table:table-cell>
          <table:table-cell table:style-name="ce14"/>
          <table:table-cell table:style-name="ce14" office:value-type="string" calcext:value-type="string">
            <text:p>Make authentic red chili powder from these chilies! Best for drying. Start inside 1/4” deep in loose soil 8- 10 weeks before last frost. <text:s/>Slow to germinate; need warmth; plant 12-16” apart in full sun. Save seeds from fully ripe, slightly shriveled fruit. Can cross pollinate. 75 to 80 days (cultivated for generations at the Tesuque Pueblo of New Mexico)</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8-10 days</text:p>
          </table:table-cell>
          <table:table-cell/>
          <table:table-cell table:style-name="ce6" table:number-columns-repeated="16366"/>
        </table:table-row>
        <table:table-row table:style-name="ro2">
          <table:table-cell office:value-type="float" office:value="1245" calcext:value-type="float">
            <text:p>1245</text:p>
          </table:table-cell>
          <table:table-cell table:style-name="ce15" office:value-type="string" calcext:value-type="string">
            <text:p>FLOWER Blue Bonnet (Lupinus texensis)</text:p>
          </table:table-cell>
          <table:table-cell table:style-name="ce15" office:value-type="string" calcext:value-type="string">
            <text:p>Texas Lupine</text:p>
          </table:table-cell>
          <table:table-cell table:style-name="ce14" office:value-type="string" calcext:value-type="string">
            <text:p>Botanical Interest, Inc</text:p>
          </table:table-cell>
          <table:table-cell table:style-name="ce15" office:value-type="string" calcext:value-type="string">
            <text:p>Soak seed in water for 12-24 hours and scarify before planting. Plant outside, in mild climates, Sept—Nov. plant 1-2 weeks before average last frost. Plant 1/8” deep, 4” apart, thin to 12” apart. Butterfly host and attracts bees. Drought tolerant once established. Deer resistant. May self seed .</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412" calcext:value-type="float">
            <text:p>1412</text:p>
          </table:table-cell>
          <table:table-cell table:style-name="ce14" office:value-type="string" calcext:value-type="string">
            <text:p>HERB Basil (Ocimum basilicum “Thai”)</text:p>
          </table:table-cell>
          <table:table-cell table:style-name="ce14" office:value-type="string" calcext:value-type="string">
            <text:p>Thai</text:p>
          </table:table-cell>
          <table:table-cell table:style-name="ce14" office:value-type="string" calcext:value-type="string">
            <text:p>Deborah Avery-Hargrove (CCMGA Master Gardener)</text:p>
          </table:table-cell>
          <table:table-cell table:style-name="ce14" office:value-type="string" calcext:value-type="string">
            <text:p>Distinctive pungent basil used in Asian dishes; 10-24”; indoor <text:s/>4-6 weeks before planting out or direct sow when temp does not drop below 65 degrees; full sun; rich well drained soil; use fresh or dried; infuse with vinegar or oil, teas, pair with meat, or use as micro green.</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6">
          <table:table-cell office:value-type="float" office:value="1561" calcext:value-type="float">
            <text:p>1561</text:p>
          </table:table-cell>
          <table:table-cell table:style-name="ce15" office:value-type="string" calcext:value-type="string">
            <text:p>Pepper CHILE (Capsicum annuum)</text:p>
          </table:table-cell>
          <table:table-cell table:style-name="ce15" office:value-type="string" calcext:value-type="string">
            <text:p>Thai Red Chilli</text:p>
          </table:table-cell>
          <table:table-cell table:style-name="ce14" office:value-type="string" calcext:value-type="string">
            <text:p>Baker Creek Heirloom Seeds</text:p>
          </table:table-cell>
          <table:table-cell table:style-name="ce15" office:value-type="string" calcext:value-type="string">
            <text:p>Start indoors barely covering seeds in loose, rich soil 8-10 weeks before last frost. <text:s/>Slow to germinate; need warmth; move to sunny window or grow light after sprouting. In ground, plant 12-16” apart in full sun. <text:s/>Save seeds from fully ripe, slightly shriveled fruit. Can cross pollinate. Small pointed fruit great for drying.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5°</text:p>
          </table:table-cell>
          <table:table-cell table:style-name="ce15" office:value-type="string" calcext:value-type="string">
            <text:p>8-10 days</text:p>
          </table:table-cell>
          <table:table-cell/>
          <table:table-cell table:style-name="ce6" table:number-columns-repeated="16366"/>
        </table:table-row>
        <table:table-row table:style-name="ro3">
          <table:table-cell office:value-type="float" office:value="1114" calcext:value-type="float">
            <text:p>1114</text:p>
          </table:table-cell>
          <table:table-cell table:style-name="ce14" office:value-type="string" calcext:value-type="string">
            <text:p>BROCCOLI (Brassica oleracea var botrytis)</text:p>
          </table:table-cell>
          <table:table-cell table:style-name="ce14" office:value-type="string" calcext:value-type="string">
            <text:p>Thompson</text:p>
          </table:table-cell>
          <table:table-cell table:style-name="ce15" office:value-type="string" calcext:value-type="string">
            <text:p>Territorial Seed Company</text:p>
          </table:table-cell>
          <table:table-cell table:style-name="ce14" office:value-type="string" calcext:value-type="string">
            <text:p>Sow 1/4” deep, 24-36”” apart. <text:s/>70 days, full sun. Harvest the main head before the flowers open. Somewhere between broccoli and broccoli raab.</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table-cell table:style-name="ce14" office:value-type="string" calcext:value-type="string">
            <text:p>5-17 days</text:p>
          </table:table-cell>
          <table:table-cell/>
          <table:table-cell table:style-name="ce6" table:number-columns-repeated="16366"/>
        </table:table-row>
        <table:table-row table:style-name="ro2">
          <table:table-cell office:value-type="float" office:value="1380" calcext:value-type="float">
            <text:p>1380</text:p>
          </table:table-cell>
          <table:table-cell table:style-name="ce14" office:value-type="string" calcext:value-type="string">
            <text:p>FLOWER Zinnia (Zinnia elegans)</text:p>
          </table:table-cell>
          <table:table-cell table:style-name="ce14" office:value-type="string" calcext:value-type="string">
            <text:p>Thumbelina</text:p>
          </table:table-cell>
          <table:table-cell table:style-name="ce14" office:value-type="string" calcext:value-type="string">
            <text:p>Ferry Morse</text:p>
          </table:table-cell>
          <table:table-cell table:style-name="ce14" office:value-type="string" calcext:value-type="string">
            <text:p>Plant after last frost, 1/4” deep, 12” apart. Cute tiny flowers in colors of white, yellow, orange, pink and scarlet. <text:s/>Plants grow 6-8 inches tall. <text:s/>Lovely to look at. <text:s/>Lovely in bouquets. <text:s/>Great in the garden to attract pollinators! <text:s/>This <text:s/>annual can reseed in our high desert climate!</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6">
          <table:table-cell office:value-type="float" office:value="1566" calcext:value-type="float">
            <text:p>1566</text:p>
          </table:table-cell>
          <table:table-cell table:style-name="ce15" office:value-type="string" calcext:value-type="string">
            <text:p>Pepper CHILE (Capsicum annuum)</text:p>
          </table:table-cell>
          <table:table-cell table:style-name="ce14" office:value-type="string" calcext:value-type="string">
            <text:p>Tien Tsin</text:p>
          </table:table-cell>
          <table:table-cell table:style-name="ce24" office:value-type="string" calcext:value-type="string">
            <text:p>Bonnie Plants</text:p>
          </table:table-cell>
          <table:table-cell table:style-name="ce14" office:value-type="string" calcext:value-type="string">
            <text:p>The Chinese Red-6 to 30 times hotter than Jalapeno-50K-75K SHU. 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4">
          <table:table-cell office:value-type="float" office:value="1206" calcext:value-type="float">
            <text:p>1206</text:p>
          </table:table-cell>
          <table:table-cell table:style-name="ce14" office:value-type="string" calcext:value-type="string">
            <text:p>FLOWER <text:s/>ALYSSUM (Lobularia maritima)</text:p>
          </table:table-cell>
          <table:table-cell table:style-name="ce14" office:value-type="string" calcext:value-type="string">
            <text:p>Tiny Tim</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Fall planting in mild climates for winter bloom. Light aids germination. Press seed lightly into soil surface Soil Temp Range: 60°-85°</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office:value-type="string" calcext:value-type="string">
            <text:p>60°-85°</text:p>
          </table:table-cell>
          <table:table-cell table:style-name="ce14"/>
          <table:table-cell/>
          <table:table-cell table:style-name="ce6" table:number-columns-repeated="16366"/>
        </table:table-row>
        <table:table-row table:style-name="ro2">
          <table:table-cell office:value-type="float" office:value="1587" calcext:value-type="float">
            <text:p>1587</text:p>
          </table:table-cell>
          <table:table-cell table:style-name="ce15" office:value-type="string" calcext:value-type="string">
            <text:p>Pepper CHILE (Capsicum annuum)</text:p>
          </table:table-cell>
          <table:table-cell table:style-name="ce15" office:value-type="string" calcext:value-type="string">
            <text:p>Tobasco (Hot)</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16” apart in full sun/partial shade in low desert. Save seeds from fully ripe, slightly shriveled fruit. Can cross pollinate. Great container plant!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table-cell table:style-name="ce6" table:number-columns-repeated="16366"/>
        </table:table-row>
        <table:table-row table:style-name="ro4">
          <table:table-cell office:value-type="float" office:value="1093" calcext:value-type="float">
            <text:p>1093</text:p>
          </table:table-cell>
          <table:table-cell table:style-name="ce14" office:value-type="string" calcext:value-type="string">
            <text:p>BEAN, TEPARY (Phaseolus acutifolius)</text:p>
          </table:table-cell>
          <table:table-cell table:style-name="ce14" office:value-type="string" calcext:value-type="string">
            <text:p>Tohono O’odham Brown</text:p>
          </table:table-cell>
          <table:table-cell table:style-name="ce14" office:value-type="string" calcext:value-type="string">
            <text:p>Native Seed/SEARCH <text:s/>www.nativeseeds.org</text:p>
          </table:table-cell>
          <table:table-cell table:style-name="ce14" office:value-type="string" calcext:value-type="string">
            <text:p>Pole or bush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 </text:p>
          </table:table-cell>
          <table:table-cell table:style-name="ce14"/>
          <table:table-cell table:style-name="ce14" office:value-type="string" calcext:value-type="string">
            <text:p>Native Seed/SEARCH Farm</text:p>
          </table:table-cell>
          <table:table-cell table:style-name="ce28" office:value-type="string" calcext:value-type="string">
            <text:p>2019</text:p>
          </table:table-cell>
          <table:table-cell table:style-name="ce14" table:number-columns-repeated="2"/>
          <table:table-cell/>
          <table:table-cell table:style-name="ce6" table:number-columns-repeated="16366"/>
        </table:table-row>
        <table:table-row table:style-name="ro2">
          <table:table-cell office:value-type="float" office:value="1737" calcext:value-type="float">
            <text:p>1737</text:p>
          </table:table-cell>
          <table:table-cell table:style-name="ce14" office:value-type="string" calcext:value-type="string">
            <text:p>WATERMELON (Citrullus lanatus)</text:p>
          </table:table-cell>
          <table:table-cell table:style-name="ce14" office:value-type="string" calcext:value-type="string">
            <text:p>Tohono O’odham Yellow-Meated</text:p>
          </table:table-cell>
          <table:table-cell table:style-name="ce14" office:value-type="string" calcext:value-type="string">
            <text:p>Arevalos Farm, Double Adobe, AZ</text:p>
          </table:table-cell>
          <table:table-cell table:style-name="ce14" office:value-type="string" calcext:value-type="string">
            <text:p>Called “Gepi” in O’odham. <text:s/>Withstands intense summer heat of Arizona. <text:s/>Direct sow outside after danger of frost. Plant 1” deep in hills of 2 to 3 plants per hill at 3-5 feet apart. Full sun; 90 days; up to 35 pound fruit. Drought tolerant: may produce more fruit if allowed to dry between waterings while blooming.</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3">
          <table:table-cell office:value-type="float" office:value="1700" calcext:value-type="float">
            <text:p>1700</text:p>
          </table:table-cell>
          <table:table-cell table:style-name="ce14" office:value-type="string" calcext:value-type="string">
            <text:p>TOMATILLO (Physalis ixocarpa)</text:p>
          </table:table-cell>
          <table:table-cell table:style-name="ce14" office:value-type="string" calcext:value-type="string">
            <text:p>Toma Verde</text:p>
          </table:table-cell>
          <table:table-cell table:style-name="ce15" office:value-type="string" calcext:value-type="string">
            <text:p>Native Seed/SEARCH <text:s/>www.nativeseeds.org</text:p>
          </table:table-cell>
          <table:table-cell table:style-name="ce14" office:value-type="string" calcext:value-type="string">
            <text:p>Start indoors 4-6 weeks before transplant, 1/4” below surface; plant outdoors 36” apart, full sun; 80 days; up to up to 3 ounce fruit. Soil Temp Range: 5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50°-95° Optimum: 85°</text:p>
          </table:table-cell>
          <table:table-cell table:style-name="ce14" office:value-type="string" calcext:value-type="string">
            <text:p>6-7 days</text:p>
          </table:table-cell>
          <table:table-cell/>
          <table:table-cell table:style-name="ce6" table:number-columns-repeated="16366"/>
        </table:table-row>
        <table:table-row table:style-name="ro5">
          <table:table-cell office:value-type="float" office:value="1112" calcext:value-type="float">
            <text:p>1112</text:p>
          </table:table-cell>
          <table:table-cell table:style-name="ce15" office:value-type="string" calcext:value-type="string">
            <text:p>BEET (Beta vulgaris)</text:p>
          </table:table-cell>
          <table:table-cell table:style-name="ce15" office:value-type="string" calcext:value-type="string">
            <text:p>Touchstone Gold</text:p>
          </table:table-cell>
          <table:table-cell table:style-name="ce15" office:value-type="string" calcext:value-type="string">
            <text:p>Johnny’s Seed</text:p>
          </table:table-cell>
          <table:table-cell table:style-name="ce15" office:value-type="string" calcext:value-type="string">
            <text:p>Yellow beet with red skin. Plant seeds 4” apart, 1/2 in deep, rows 12-18 in apart. Cool temperatures produce best flesh. Keep well irrigated to prevent scab. Will cross with other beets or Swiss Chard.</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7 days</text:p>
          </table:table-cell>
          <table:table-cell/>
          <table:table-cell table:style-name="ce6" table:number-columns-repeated="16366"/>
        </table:table-row>
        <table:table-row table:style-name="ro3">
          <table:table-cell office:value-type="float" office:value="1238" calcext:value-type="float">
            <text:p>1238</text:p>
          </table:table-cell>
          <table:table-cell table:style-name="ce14" office:value-type="string" calcext:value-type="string">
            <text:p>FLOWER Aster (Callistephus chinensis)</text:p>
          </table:table-cell>
          <table:table-cell table:style-name="ce22" office:value-type="string" calcext:value-type="string">
            <text:p>Tower Chamois</text:p>
          </table:table-cell>
          <table:table-cell table:style-name="ce14" office:value-type="string" calcext:value-type="string">
            <text:p>Botanical Interest, Inc</text:p>
          </table:table-cell>
          <table:table-cell table:style-name="ce14" office:value-type="string" calcext:value-type="string">
            <text:p>Start inside 6-8 weeks before last frost. Sow outside 1 to 2 weeks after last frost. Plant 1/8” deep every 6-12”. <text:s/>Makes wonderful cut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494" calcext:value-type="float">
            <text:p>1494</text:p>
          </table:table-cell>
          <table:table-cell table:style-name="ce15" office:value-type="string" calcext:value-type="string">
            <text:p>LETTUCE Mini-Romaine (Latuca sativa)</text:p>
          </table:table-cell>
          <table:table-cell table:style-name="ce15" office:value-type="string" calcext:value-type="string">
            <text:p>Truchas</text:p>
          </table:table-cell>
          <table:table-cell table:style-name="ce14" office:value-type="string" calcext:value-type="string">
            <text:p>Botanical Interest, Inc</text:p>
          </table:table-cell>
          <table:table-cell table:style-name="ce15" office:value-type="string" calcext:value-type="string">
            <text:p>This deep red, small and compact romaine is easy to grow. Disease resistant. Does well in cool temps. Water at base to avoid rot. Stagger planting 10 days; thin to 8” for full heads. Harvest leaves from outer edge so plant continues to grow from center.</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table-cell table:style-name="ce6" table:number-columns-repeated="16366"/>
        </table:table-row>
        <table:table-row table:style-name="ro4">
          <table:table-cell office:value-type="float" office:value="1448" calcext:value-type="float">
            <text:p>1448</text:p>
          </table:table-cell>
          <table:table-cell table:style-name="ce15" office:value-type="string" calcext:value-type="string">
            <text:p>HERB Oregano (Origanum vulgare hirtum)</text:p>
          </table:table-cell>
          <table:table-cell table:style-name="ce14" office:value-type="string" calcext:value-type="string">
            <text:p>True Greek Oregano</text:p>
          </table:table-cell>
          <table:table-cell table:style-name="ce14" office:value-type="string" calcext:value-type="string">
            <text:p>Botanical Interest, Inc</text:p>
          </table:table-cell>
          <table:table-cell table:style-name="ce14" office:value-type="string" calcext:value-type="string">
            <text:p>Plant indoors 6-8 weeks before last frost. Light aids germination; press seed into soil surface. Transplant outdoors 2-4 weeks after last frost. Space about 12”-18” apart. Drought and heat tolerant. Deer resist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9">
          <table:table-cell office:value-type="float" office:value="1632" calcext:value-type="float">
            <text:p>1632</text:p>
          </table:table-cell>
          <table:table-cell table:style-name="ce14" office:value-type="string" calcext:value-type="string">
            <text:p>ROOT PARSLEY (Petroselinum crispum)</text:p>
          </table:table-cell>
          <table:table-cell table:style-name="ce14" office:value-type="string" calcext:value-type="string">
            <text:p>Tuberosum (Wurzelpetersilie “Halblange”) </text:p>
          </table:table-cell>
          <table:table-cell table:style-name="ce14" office:value-type="string" calcext:value-type="string">
            <text:p>Elisabeth Brackelsberg</text:p>
          </table:table-cell>
          <table:table-cell table:style-name="ce14" office:value-type="string" calcext:value-type="string">
            <text:p>Root parsley is a biennial herb grown for its tasty roots (nutty flavor reminiscent of celery). <text:s/>Foliage can be used sparingly as a garnish. <text:s/>Long, white, carrot-like roots are ready to harvest around 100 days. <text:s/>Plant early spring in full sun. <text:s text:c="3"/>A few frosts sweetens the flavor. Best enjoyed sautéed, roasted or pureed in soups. <text:s text:c="2"/>Seeds are biennial. These seeds came from Germany. Soil Temp Range: 40°-95° Optimum: 85°</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40°-95° Optimum: 85°</text:p>
          </table:table-cell>
          <table:table-cell table:style-name="ce14" office:value-type="string" calcext:value-type="string">
            <text:p>4-6 days</text:p>
          </table:table-cell>
          <table:table-cell/>
          <table:table-cell table:style-name="ce6" table:number-columns-repeated="16366"/>
        </table:table-row>
        <table:table-row table:style-name="ro2">
          <table:table-cell office:value-type="float" office:value="1419" calcext:value-type="float">
            <text:p>1419</text:p>
          </table:table-cell>
          <table:table-cell table:style-name="ce15" office:value-type="string" calcext:value-type="string">
            <text:p>HERB Basil (Ocimum sp)</text:p>
          </table:table-cell>
          <table:table-cell table:style-name="ce15" office:value-type="string" calcext:value-type="string">
            <text:p>Tulsi</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Also known as Kapoor. Frost tolerant. Said to combat stress. Makes a healthful tea. Grow in container for continuous supply year round.</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1</text:p>
          </table:table-cell>
          <table:table-cell table:style-name="ce15" table:number-columns-repeated="2"/>
          <table:table-cell/>
          <table:table-cell table:style-name="ce6" table:number-columns-repeated="16366"/>
        </table:table-row>
        <table:table-row table:style-name="ro4">
          <table:table-cell office:value-type="float" office:value="1546" calcext:value-type="float">
            <text:p>1546</text:p>
          </table:table-cell>
          <table:table-cell table:style-name="ce14" office:value-type="string" calcext:value-type="string">
            <text:p>PARSNIP (Pastinaca sativa)</text:p>
          </table:table-cell>
          <table:table-cell table:style-name="ce14" office:value-type="string" calcext:value-type="string">
            <text:p>Turga</text:p>
          </table:table-cell>
          <table:table-cell table:style-name="ce14" office:value-type="string" calcext:value-type="string">
            <text:p>Botanical Interest, Inc</text:p>
          </table:table-cell>
          <table:table-cell table:style-name="ce14" office:value-type="string" calcext:value-type="string">
            <text:p>Sow late spring or early summer, about 4 months before first fall frost and wait until after first frost to harvest. For spring harvest, sow in fall. Plant seeds 1/2” deep 3” apart. Matures 100-110 days. To hasten germination, soak seeds 12-24 hours before planting.</text:p>
          </table:table-cell>
          <table:table-cell table:style-name="ce14"/>
          <table:table-cell table:style-name="ce14" office:value-type="string" calcext:value-type="string">
            <text:p>8+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 to 15 days</text:p>
          </table:table-cell>
          <table:table-cell/>
          <table:table-cell table:style-name="ce6" table:number-columns-repeated="16366"/>
        </table:table-row>
        <table:table-row table:style-name="ro6">
          <table:table-cell office:value-type="float" office:value="1673" calcext:value-type="float">
            <text:p>1673</text:p>
          </table:table-cell>
          <table:table-cell table:style-name="ce15" office:value-type="string" calcext:value-type="string">
            <text:p>SQUASH (Cucurbita maxima)</text:p>
          </table:table-cell>
          <table:table-cell table:style-name="ce15" office:value-type="string" calcext:value-type="string">
            <text:p>Turks Turban</text:p>
          </table:table-cell>
          <table:table-cell table:style-name="ce14" office:value-type="string" calcext:value-type="string">
            <text:p>Baker Creek Heirloom Seeds</text:p>
          </table:table-cell>
          <table:table-cell table:style-name="ce15" office:value-type="string" calcext:value-type="string">
            <text:p>Beautiful striped in red, orange, green, and white, turban shaped ‘winter’ squash. <text:s/>Direct sow after frost, 1” deep, 3-5 seeds per basin or 6-12 inches apart in rows. <text:s/>Thin to best 3 plants. Harvest in fall when skins are too tough to be easily punctured with thumbnail. <text:s/>Very old variety from France with thick orange flesh. <text:s text:c="2"/>Soil Temp Range: 60°-100°</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4"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100°</text:p>
          </table:table-cell>
          <table:table-cell table:style-name="ce15" office:value-type="string" calcext:value-type="string">
            <text:p>3-4 days</text:p>
          </table:table-cell>
          <table:table-cell/>
          <table:table-cell table:style-name="ce6" table:number-columns-repeated="16366"/>
        </table:table-row>
        <table:table-row table:style-name="ro2">
          <table:table-cell office:value-type="float" office:value="1522" calcext:value-type="float">
            <text:p>1522</text:p>
          </table:table-cell>
          <table:table-cell table:style-name="ce14" office:value-type="string" calcext:value-type="string">
            <text:p>Microgreens (Brassica assorted species)</text:p>
          </table:table-cell>
          <table:table-cell table:style-name="ce14" office:value-type="string" calcext:value-type="string">
            <text:p>Unami Asian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ext:s/>thickly, about 1/2” apart. Press seeds firmly into soil mix and cover about 1/8” with sowing mix. Move containers as need for best light exposure. Harvest about 10-15 days after sowing.</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4">
          <table:table-cell office:value-type="float" office:value="1355" calcext:value-type="float">
            <text:p>1355</text:p>
          </table:table-cell>
          <table:table-cell table:style-name="ce14" office:value-type="string" calcext:value-type="string">
            <text:p>FLOWER Sunflower (Helianthus debilis)</text:p>
          </table:table-cell>
          <table:table-cell table:style-name="ce14" office:value-type="string" calcext:value-type="string">
            <text:p>Vanilla Ice</text:p>
          </table:table-cell>
          <table:table-cell table:style-name="ce14" office:value-type="string" calcext:value-type="string">
            <text:p>Botanical Interest, Inc</text:p>
          </table:table-cell>
          <table:table-cell table:style-name="ce14" office:value-type="string" calcext:value-type="string">
            <text:p>Beautiful creamy light yellow. <text:s/>Direct sow in full sun (sunflowers do not transplant well) after last frost, 1/4-1/2 inch deep, 18-24 inches apart. Germination takes 10-15 days. Great for moonlight gardens or cut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takes 10-15 days. Great for moonlight gardens or cut flowers.</text:p>
          </table:table-cell>
          <table:table-cell/>
          <table:table-cell table:style-name="ce6" table:number-columns-repeated="16366"/>
        </table:table-row>
        <table:table-row table:style-name="ro3">
          <table:table-cell office:value-type="float" office:value="1345" calcext:value-type="float">
            <text:p>1345</text:p>
          </table:table-cell>
          <table:table-cell table:style-name="ce15" office:value-type="string" calcext:value-type="string">
            <text:p>FLOWER Sunflower (Helianthus annus)</text:p>
          </table:table-cell>
          <table:table-cell table:style-name="ce15" office:value-type="string" calcext:value-type="string">
            <text:p>Velvet Queen</text:p>
          </table:table-cell>
          <table:table-cell table:style-name="ce14" office:value-type="string" calcext:value-type="string">
            <text:p>Ferry Morse</text:p>
          </table:table-cell>
          <table:table-cell table:style-name="ce15" office:value-type="string" calcext:value-type="string">
            <text:p>Plant after danger of frost 1-2 weeks after last frost. Sensitive to root disturbance so sow directly into soil, 1/4”-1/2” deep 18”-24” apart. Rich deep red makes dramatic accent to beds and as cut-flowe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6">
          <table:table-cell office:value-type="float" office:value="1124" calcext:value-type="float">
            <text:p>1124</text:p>
          </table:table-cell>
          <table:table-cell table:style-name="ce15" office:value-type="string" calcext:value-type="string">
            <text:p>CABBAGE (Brassica oleracea)</text:p>
          </table:table-cell>
          <table:table-cell table:style-name="ce15" office:value-type="string" calcext:value-type="string">
            <text:p>Violaceo di Verona</text:p>
          </table:table-cell>
          <table:table-cell table:style-name="ce14" office:value-type="string" calcext:value-type="string">
            <text:p>Baker Creek Heirloom Seeds</text:p>
          </table:table-cell>
          <table:table-cell table:style-name="ce15" office:value-type="string" calcext:value-type="string">
            <text:p>Sow indoors 4-6 weeks prior to desired transplant date. Plant 1/4” deep at no more than 75 degrees F daytime; 50 degrees at night, need lots of sunlight or grow light, transplant at 2-4 true leaves 18”-20” inches apart. Full sun. Originating in Northern Italy. Frost hardy &amp; heat tolerant. Violet wrapper leaves and yellow-green inside.</text:p>
          </table:table-cell>
          <table:table-cell table:style-name="ce15"/>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7-10 days</text:p>
          </table:table-cell>
          <table:table-cell/>
          <table:table-cell table:style-name="ce6" table:number-columns-repeated="16366"/>
        </table:table-row>
        <table:table-row table:style-name="ro4">
          <table:table-cell office:value-type="float" office:value="1408" calcext:value-type="float">
            <text:p>1408</text:p>
          </table:table-cell>
          <table:table-cell table:style-name="ce14" office:value-type="string" calcext:value-type="string">
            <text:p>HERB Basil (Ocimum basilicum O x africanum)</text:p>
          </table:table-cell>
          <table:table-cell table:style-name="ce14" office:value-type="string" calcext:value-type="string">
            <text:p>Viva la Dolce Vita Blend</text:p>
          </table:table-cell>
          <table:table-cell table:style-name="ce14" office:value-type="string" calcext:value-type="string">
            <text:p>Botanical Interest, Inc</text:p>
          </table:table-cell>
          <table:table-cell table:style-name="ce14" office:value-type="string" calcext:value-type="string">
            <text:p>Basil mix of Genovese, large leaf, Dark Opal, lime, lemon and cinnamon. Recommend plant indoors <text:s/>4-6 weeks before planting out or direct sow when temp does not drop below 65 degrees, full sun, rich well drained soil. Plant 1/4” deep with 12” spacing.</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121" calcext:value-type="float">
            <text:p>1121</text:p>
          </table:table-cell>
          <table:table-cell table:style-name="ce15" office:value-type="string" calcext:value-type="string">
            <text:p>BROCCOLI (Brassica oleracea)</text:p>
          </table:table-cell>
          <table:table-cell table:style-name="ce15" office:value-type="string" calcext:value-type="string">
            <text:p>Waltham 29</text:p>
          </table:table-cell>
          <table:table-cell table:style-name="ce15"/>
          <table:table-cell table:style-name="ce15" office:value-type="string" calcext:value-type="string">
            <text:p>Sow 1/4” deep, 18-24” apart. <text:s/>50 days, full sun. Harvest the main head before the flowers open. Side shoots may be harvested continually.</text:p>
          </table:table-cell>
          <table:table-cell table:style-name="ce15"/>
          <table:table-cell table:style-name="ce15" office:value-type="string" calcext:value-type="string">
            <text:p>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4-5 days</text:p>
          </table:table-cell>
          <table:table-cell/>
          <table:table-cell table:style-name="ce6" table:number-columns-repeated="16366"/>
        </table:table-row>
        <table:table-row table:style-name="ro4">
          <table:table-cell office:value-type="float" office:value="1670" calcext:value-type="float">
            <text:p>1670</text:p>
          </table:table-cell>
          <table:table-cell table:style-name="ce14" office:value-type="string" calcext:value-type="string">
            <text:p>SQUASH (Cucurbirta moschata)</text:p>
          </table:table-cell>
          <table:table-cell table:style-name="ce14" office:value-type="string" calcext:value-type="string">
            <text:p>Waltham Butternut</text:p>
          </table:table-cell>
          <table:table-cell table:style-name="ce14" office:value-type="string" calcext:value-type="string">
            <text:p>American Seed</text:p>
          </table:table-cell>
          <table:table-cell table:style-name="ce14" office:value-type="string" calcext:value-type="string">
            <text:p>Winter squash. Great for baking or making pies. <text:s/>Direct sow outside after last frost. Plant 1” deep in hills of 2-3 plants per hill, 6-10 feet apart. Full sun; 92- 105 days; fruit 12-15” long, 3-6 pounds. Will cross with other squash, gourds or cucumb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table-cell table:style-name="ce6" table:number-columns-repeated="16366"/>
        </table:table-row>
        <table:table-row table:style-name="ro2">
          <table:table-cell office:value-type="float" office:value="1550" calcext:value-type="float">
            <text:p>1550</text:p>
          </table:table-cell>
          <table:table-cell table:style-name="ce15" office:value-type="string" calcext:value-type="string">
            <text:p>PEA Shell (Pisum sativum)</text:p>
          </table:table-cell>
          <table:table-cell table:style-name="ce15" office:value-type="string" calcext:value-type="string">
            <text:p>Wando</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2” apart, plants are about 24-30” so recommend using a trellis. Pick when seeds have enlarged in pod; hold vines when picking to prevent damage to vine. <text:s/>5” pods, 68 days. Soil Temp Range: 40°-80° Optimum: 60°</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40°-80° Optimum: 60°</text:p>
          </table:table-cell>
          <table:table-cell table:style-name="ce15" office:value-type="string" calcext:value-type="string">
            <text:p>5-10 days</text:p>
          </table:table-cell>
          <table:table-cell/>
          <table:table-cell table:style-name="ce6" table:number-columns-repeated="16366"/>
        </table:table-row>
        <table:table-row table:style-name="ro4">
          <table:table-cell office:value-type="float" office:value="1736" calcext:value-type="float">
            <text:p>1736</text:p>
          </table:table-cell>
          <table:table-cell table:style-name="ce14" office:value-type="string" calcext:value-type="string">
            <text:p>WATERCRESS (Nasturtium officinale)</text:p>
          </table:table-cell>
          <table:table-cell table:style-name="ce14" office:value-type="string" calcext:value-type="string">
            <text:p>Watercress</text:p>
          </table:table-cell>
          <table:table-cell table:style-name="ce14"/>
          <table:table-cell table:style-name="ce14" office:value-type="string" calcext:value-type="string">
            <text:p>Plant on top of damp compost. Sprinkle seeds thickly and keep compost moist. Place in sunniest window available. Harvest at 21 days for baby/sandwich cut. Cut tips for a cut and come again crop. Soil Temp Range: 60°-100° Optimum: 95°</text:p>
          </table:table-cell>
          <table:table-cell table:style-name="ce14"/>
          <table:table-cell table:style-name="ce14" office:value-type="string" calcext:value-type="string">
            <text:p>10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100° Optimum: 95°</text:p>
          </table:table-cell>
          <table:table-cell table:style-name="ce14" office:value-type="string" calcext:value-type="string">
            <text:p>2-3 days</text:p>
          </table:table-cell>
          <table:table-cell/>
          <table:table-cell table:style-name="ce6" table:number-columns-repeated="16366"/>
        </table:table-row>
        <table:table-row table:style-name="ro4">
          <table:table-cell office:value-type="float" office:value="1177" calcext:value-type="float">
            <text:p>1177</text:p>
          </table:table-cell>
          <table:table-cell table:style-name="ce14" office:value-type="string" calcext:value-type="string">
            <text:p>COWPEA (Vigna unguiculata)</text:p>
          </table:table-cell>
          <table:table-cell table:style-name="ce14" office:value-type="string" calcext:value-type="string">
            <text:p>Whippoorwill (Shell or dried)</text:p>
          </table:table-cell>
          <table:table-cell table:style-name="ce14" office:value-type="string" calcext:value-type="string">
            <text:p>Baker Creek Heirloom Seeds</text:p>
          </table:table-cell>
          <table:table-cell table:style-name="ce14" office:value-type="string" calcext:value-type="string">
            <text:p>Soak seeds for 1-2 hours before planting (speeds germination); plant 1” deep, full sun, 6” apart (seeds will rot if too cold or wet). <text:s/>Trellis for runners up to 5 feet; 7-8 inch pods tinged with purple. Great shelled or dry. Soil Temp Range: 65°-85° Optimum: 75°</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5°-85° Optimum: 75°</text:p>
          </table:table-cell>
          <table:table-cell table:style-name="ce14" office:value-type="string" calcext:value-type="string">
            <text:p>6-7 days</text:p>
          </table:table-cell>
          <table:table-cell/>
          <table:table-cell table:style-name="ce6" table:number-columns-repeated="16366"/>
        </table:table-row>
        <table:table-row table:style-name="ro12">
          <table:table-cell office:value-type="float" office:value="1733" calcext:value-type="float">
            <text:p>1733</text:p>
          </table:table-cell>
          <table:table-cell table:style-name="ce15" office:value-type="string" calcext:value-type="string">
            <text:p>TURNIP (Brassica campestris)</text:p>
          </table:table-cell>
          <table:table-cell table:style-name="ce15" office:value-type="string" calcext:value-type="string">
            <text:p>White Egg</text:p>
          </table:table-cell>
          <table:table-cell table:style-name="ce14" office:value-type="string" calcext:value-type="string">
            <text:p>Native Seed/SEARCH <text:s/>www.nativeseeds.org</text:p>
          </table:table-cell>
          <table:table-cell table:style-name="ce15" office:value-type="string" calcext:value-type="string">
            <text:p>Great for edible tubers and leafy greens; turnips require little care; do not allow soil to dry out. Soil Temp Range: 40°-105° Optimum: 85°</text:p>
          </table:table-cell>
          <table:table-cell table:style-name="ce15"/>
          <table:table-cell table:style-name="ce15" office:value-type="string" calcext:value-type="string">
            <text:p>40-5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40°-105° Optimum: 85°</text:p>
          </table:table-cell>
          <table:table-cell table:style-name="ce15" office:value-type="string" calcext:value-type="string">
            <text:p>2 - 3 days</text:p>
          </table:table-cell>
          <table:table-cell/>
          <table:table-cell table:style-name="ce6" table:number-columns-repeated="16366"/>
        </table:table-row>
        <table:table-row table:style-name="ro12">
          <table:table-cell office:value-type="float" office:value="1542" calcext:value-type="float">
            <text:p>1542</text:p>
          </table:table-cell>
          <table:table-cell table:style-name="ce14" office:value-type="string" calcext:value-type="string">
            <text:p>ONION (Allium cepa)</text:p>
          </table:table-cell>
          <table:table-cell table:style-name="ce14" office:value-type="string" calcext:value-type="string">
            <text:p>White Lisbon Bunching</text:p>
          </table:table-cell>
          <table:table-cell table:style-name="ce14" office:value-type="string" calcext:value-type="string">
            <text:p>Ferry Morse</text:p>
          </table:table-cell>
          <table:table-cell table:style-name="ce14" office:value-type="string" calcext:value-type="string">
            <text:p>Start indoors 10-12 weeks before last frost, 1/4” deep in moist soil. Transplant outdoors 4-6 weeks before last frost, 6” apart, 2 inches deep, full sun. 60-110 days to harves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5 days</text:p>
          </table:table-cell>
          <table:table-cell/>
          <table:table-cell table:style-name="ce6" table:number-columns-repeated="16366"/>
        </table:table-row>
        <table:table-row table:style-name="ro12">
          <table:table-cell office:value-type="float" office:value="1001" calcext:value-type="float">
            <text:p>1001</text:p>
          </table:table-cell>
          <table:table-cell table:style-name="ce14" office:value-type="string" calcext:value-type="string">
            <text:p>AMARANTH (Amaranthus albus)</text:p>
          </table:table-cell>
          <table:table-cell table:style-name="ce14" office:value-type="string" calcext:value-type="string">
            <text:p>White Original </text:p>
          </table:table-cell>
          <table:table-cell table:style-name="ce15" office:value-type="string" calcext:value-type="string">
            <text:p>Native Seed/SEARCH <text:s/>www.nativeseeds.org</text:p>
          </table:table-cell>
          <table:table-cell table:style-name="ce14" office:value-type="string" calcext:value-type="string">
            <text:p>Grows 6ft tall with 1-2 ft long inflorescence. White seeds are edible and rich in lysine. Plant in warm soil or with summer rains 1/4” deep in basins or rows. Thin to 10-15” apart. Likes full sun.</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2">
          <table:table-cell office:value-type="float" office:value="1269" calcext:value-type="float">
            <text:p>1269</text:p>
          </table:table-cell>
          <table:table-cell table:style-name="ce14" office:value-type="string" calcext:value-type="string">
            <text:p>FLOWER Echinacea (Echinacea purpurea)</text:p>
          </table:table-cell>
          <table:table-cell table:style-name="ce14" office:value-type="string" calcext:value-type="string">
            <text:p>White Swan</text:p>
          </table:table-cell>
          <table:table-cell table:style-name="ce14" office:value-type="string" calcext:value-type="string">
            <text:p>Botanical Interest, Inc</text:p>
          </table:table-cell>
          <table:table-cell table:style-name="ce14" office:value-type="string" calcext:value-type="string">
            <text:p>Sow outside 2 to 4 weeks before last frost or as late as 2 months before first frost. Plant 1/4” deep. Space 18” apart. Attracts pollinators. Lasts well as a cut flower. Drought tolerant. Deer resistant. Seed heads are great for winter interest and birds love them, too.</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4">
          <table:table-cell office:value-type="float" office:value="1283" calcext:value-type="float">
            <text:p>1283</text:p>
          </table:table-cell>
          <table:table-cell table:style-name="ce15" office:value-type="string" calcext:value-type="string">
            <text:p>FLOWER Hollyhock (Alcea rosea)</text:p>
          </table:table-cell>
          <table:table-cell table:style-name="ce15" office:value-type="string" calcext:value-type="string">
            <text:p>White Veined Pink</text:p>
          </table:table-cell>
          <table:table-cell table:style-name="ce15" office:value-type="string" calcext:value-type="string">
            <text:p>Mark’s Yard</text:p>
          </table:table-cell>
          <table:table-cell table:style-name="ce15"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4" office:value-type="string" calcext:value-type="string">
            <text:p>Elfrida, AZ</text:p>
          </table:table-cell>
          <table:table-cell table:style-name="ce15"/>
          <table:table-cell table:style-name="ce14" office:value-type="string" calcext:value-type="string">
            <text:p>Mark Grams</text:p>
          </table:table-cell>
          <table:table-cell table:style-name="ce28" office:value-type="string" calcext:value-type="string">
            <text:p>2017</text:p>
          </table:table-cell>
          <table:table-cell table:style-name="ce15" table:number-columns-repeated="2"/>
          <table:table-cell/>
          <table:table-cell table:style-name="ce6" table:number-columns-repeated="16366"/>
        </table:table-row>
        <table:table-row table:style-name="ro4">
          <table:table-cell office:value-type="float" office:value="1284" calcext:value-type="float">
            <text:p>1284</text:p>
          </table:table-cell>
          <table:table-cell table:style-name="ce14" office:value-type="string" calcext:value-type="string">
            <text:p>FLOWER Hollyhock (Alcea rosea)</text:p>
          </table:table-cell>
          <table:table-cell table:style-name="ce14" office:value-type="string" calcext:value-type="string">
            <text:p>White-Yellow Center</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table-cell table:style-name="ce6" table:number-columns-repeated="16366"/>
        </table:table-row>
        <table:table-row table:style-name="ro2">
          <table:table-cell office:value-type="float" office:value="1391" calcext:value-type="float">
            <text:p>1391</text:p>
          </table:table-cell>
          <table:table-cell table:style-name="ce15" office:value-type="string" calcext:value-type="string">
            <text:p>GOURD LUFFA (Curcubita cylindrica)</text:p>
          </table:table-cell>
          <table:table-cell table:style-name="ce15" office:value-type="string" calcext:value-type="string">
            <text:p>Wild Luffa (Sponge)</text:p>
          </table:table-cell>
          <table:table-cell table:style-name="ce15" office:value-type="string" calcext:value-type="string">
            <text:p>BJ Searcy, CCMGA Master Gardener, Whetstone</text:p>
          </table:table-cell>
          <table:table-cell table:style-name="ce15" office:value-type="string" calcext:value-type="string">
            <text:p>Direct sow or start indoors; scarify and presoak seeds 24 hours before planting; may take several weeks to germinate; long climbing vine needs lots of room. Fruits should mature on plant until dry then peel to reveal sponge and seeds. Small sponges are ideal for small job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4">
          <table:table-cell office:value-type="float" office:value="1076" calcext:value-type="float">
            <text:p>1076</text:p>
          </table:table-cell>
          <table:table-cell table:style-name="ce15" office:value-type="string" calcext:value-type="string">
            <text:p>BEAN, FAVA (Vicia faba)</text:p>
          </table:table-cell>
          <table:table-cell table:style-name="ce15" office:value-type="string" calcext:value-type="string">
            <text:p>Windsor Seed</text:p>
          </table:table-cell>
          <table:table-cell table:style-name="ce14" office:value-type="string" calcext:value-type="string">
            <text:p>Botanical Interest, Inc</text:p>
          </table:table-cell>
          <table:table-cell table:style-name="ce15" office:value-type="string" calcext:value-type="string">
            <text:p>Cold tolerant—great nitrogen fixing cover crop during winter months. <text:s/>Pods 5-6 inches, 70 days, direct sow 1 1/2 inches deep, 4-6 inches apart. Can grow to 4 feet tall—you will need to stake the plants. Eat fresh or dried.</text:p>
          </table:table-cell>
          <table:table-cell table:style-name="ce15"/>
          <table:table-cell table:style-name="ce15" office:value-type="string" calcext:value-type="string">
            <text:p>5-6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table-cell table:style-name="ce6" table:number-columns-repeated="16366"/>
        </table:table-row>
        <table:table-row table:style-name="ro4">
          <table:table-cell office:value-type="float" office:value="1463" calcext:value-type="float">
            <text:p>1463</text:p>
          </table:table-cell>
          <table:table-cell table:style-name="ce15" office:value-type="string" calcext:value-type="string">
            <text:p>HERB Savory (Satureja montana)</text:p>
          </table:table-cell>
          <table:table-cell table:style-name="ce15" office:value-type="string" calcext:value-type="string">
            <text:p>Winter</text:p>
          </table:table-cell>
          <table:table-cell table:style-name="ce14" office:value-type="string" calcext:value-type="string">
            <text:p>Botanical Interest, Inc</text:p>
          </table:table-cell>
          <table:table-cell table:style-name="ce15" office:value-type="string" calcext:value-type="string">
            <text:p>Plant indoors 8-10 weeks before last frost 1/8”-1/4” deep. Transplant outdoors 1-2 weeks after last frost. Space about 8”-12” apart. Drought tolerant. Attracts bees and beneficial insects. Grows well in poor soils.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11">
          <table:table-cell office:value-type="float" office:value="1394" calcext:value-type="float">
            <text:p>1394</text:p>
          </table:table-cell>
          <table:table-cell table:style-name="ce15" office:value-type="string" calcext:value-type="string">
            <text:p>GRASS (Elionunus barbiculmis)</text:p>
          </table:table-cell>
          <table:table-cell table:style-name="ce15" office:value-type="string" calcext:value-type="string">
            <text:p>Wooly Bunchgrass </text:p>
          </table:table-cell>
          <table:table-cell table:style-name="ce15" office:value-type="string" calcext:value-type="string">
            <text:p>Jim Koweek</text:p>
          </table:table-cell>
          <table:table-cell table:style-name="ce15" office:value-type="string" calcext:value-type="string">
            <text:p>Soft-looking, yellowish/green grass that grows well on rocky slopes. <text:s/>Lemon yellow pollen.</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table:number-columns-repeated="2"/>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3">
          <table:table-cell office:value-type="float" office:value="1259" calcext:value-type="float">
            <text:p>1259</text:p>
          </table:table-cell>
          <table:table-cell table:style-name="ce15" office:value-type="string" calcext:value-type="string">
            <text:p>FLOWER Cosmos (Cosmos bipinnatus)</text:p>
          </table:table-cell>
          <table:table-cell table:style-name="ce15" office:value-type="string" calcext:value-type="string">
            <text:p>Xanthos</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Soft lime yellow with white edge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2">
          <table:table-cell office:value-type="float" office:value="1386" calcext:value-type="float">
            <text:p>1386</text:p>
          </table:table-cell>
          <table:table-cell table:style-name="ce14" office:value-type="string" calcext:value-type="string">
            <text:p>GOURD (Lagenaria siceraria)</text:p>
          </table:table-cell>
          <table:table-cell table:style-name="ce14" office:value-type="string" calcext:value-type="string">
            <text:p>Xiaohulu (hourglass shaped gourd) </text:p>
          </table:table-cell>
          <table:table-cell table:style-name="ce14" office:value-type="string" calcext:value-type="string">
            <text:p>Baker Creek Heirloom Seeds</text:p>
          </table:table-cell>
          <table:table-cell table:style-name="ce14" office:value-type="string" calcext:value-type="string">
            <text:p>Start indoors or direct sow after frost. Slow to germinate; scarify or soak overnight. <text:s/>Plant 1” deep in hills 6 feet apart. Full sun; 125 days, 8 inches long. Trellis on fence, arbor, or up a tree. <text:s/>Favored for crafting (painting/decorating). Soil Temp Range: 70– 8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0– 85 Optimum: 85°</text:p>
          </table:table-cell>
          <table:table-cell table:style-name="ce14" office:value-type="string" calcext:value-type="string">
            <text:p>3-10 days</text:p>
          </table:table-cell>
          <table:table-cell/>
          <table:table-cell table:style-name="ce6" table:number-columns-repeated="16366"/>
        </table:table-row>
        <table:table-row table:style-name="ro4">
          <table:table-cell office:value-type="float" office:value="1094" calcext:value-type="float">
            <text:p>1094</text:p>
          </table:table-cell>
          <table:table-cell table:style-name="ce14" office:value-type="string" calcext:value-type="string">
            <text:p>BEAN, TEPARY (Phaseolus acutifolius)</text:p>
          </table:table-cell>
          <table:table-cell table:style-name="ce14" office:value-type="string" calcext:value-type="string">
            <text:p>Yellow </text:p>
          </table:table-cell>
          <table:table-cell table:style-name="ce14" office:value-type="string" calcext:value-type="string">
            <text:p>Native Seed/SEARCH <text:s/>www.nativeseeds.org</text:p>
          </table:table-cell>
          <table:table-cell table:style-name="ce14" office:value-type="string" calcext:value-type="string">
            <text:p>Pole or bush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Native Seed/SEARCH Farm</text:p>
          </table:table-cell>
          <table:table-cell table:style-name="ce28" office:value-type="string" calcext:value-type="string">
            <text:p>2019</text:p>
          </table:table-cell>
          <table:table-cell table:style-name="ce14" table:number-columns-repeated="2"/>
          <table:table-cell/>
          <table:table-cell table:style-name="ce6" table:number-columns-repeated="16366"/>
        </table:table-row>
        <table:table-row table:style-name="ro4">
          <table:table-cell office:value-type="float" office:value="1686" calcext:value-type="float">
            <text:p>1686</text:p>
          </table:table-cell>
          <table:table-cell table:style-name="ce14" office:value-type="string" calcext:value-type="string">
            <text:p>SQUASH Summer (Cucubirta pepo)</text:p>
          </table:table-cell>
          <table:table-cell table:style-name="ce14" office:value-type="string" calcext:value-type="string">
            <text:p>Yellow Crookneck, Early Summer</text:p>
          </table:table-cell>
          <table:table-cell table:style-name="ce14"/>
          <table:table-cell table:style-name="ce14" office:value-type="string" calcext:value-type="string">
            <text:p>Plant outdoors1-2 weeks after last frost. Sow 2- 3 seeds 1/2”-1”deep, on mounds spaced 3-4 feet apart; thin to 1 healthy plant. Pick regularly to encourage fruit development. Will cross with other squash. <text:s/>55 days. Long straight fruit with small seed cavity.</text:p>
          </table:table-cell>
          <table:table-cell table:style-name="ce14" table:number-columns-repeated="2"/>
          <table:table-cell table:style-name="ce14" office:value-type="string" calcext:value-type="string">
            <text:p>Warm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table-cell table:style-name="ce6" table:number-columns-repeated="16366"/>
        </table:table-row>
        <table:table-row table:style-name="ro3">
          <table:table-cell office:value-type="float" office:value="1544" calcext:value-type="float">
            <text:p>1544</text:p>
          </table:table-cell>
          <table:table-cell table:style-name="ce15" office:value-type="string" calcext:value-type="string">
            <text:p>ONION Italian (Allium cepa)</text:p>
          </table:table-cell>
          <table:table-cell table:style-name="ce15" office:value-type="string" calcext:value-type="string">
            <text:p>Yellow Granex PRR (Sweet Onion)</text:p>
          </table:table-cell>
          <table:table-cell table:style-name="ce14" office:value-type="string" calcext:value-type="string">
            <text:p>Botanical Interest, Inc</text:p>
          </table:table-cell>
          <table:table-cell table:style-name="ce15" office:value-type="string" calcext:value-type="string">
            <text:p>Start indoors 10-12 weeks before first frost, 1/4” deep in moist soil. Transplant outdoors 4-6 weeks before first frost, 4-6” apart, full sun. 110-160 days to harvest.</text:p>
          </table:table-cell>
          <table:table-cell table:style-name="ce15"/>
          <table:table-cell table:style-name="ce15" office:value-type="string" calcext:value-type="string">
            <text:p>10-15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5 days</text:p>
          </table:table-cell>
          <table:table-cell/>
          <table:table-cell table:style-name="ce6" table:number-columns-repeated="16366"/>
        </table:table-row>
        <table:table-row table:style-name="ro3">
          <table:table-cell office:value-type="float" office:value="1545" calcext:value-type="float">
            <text:p>1545</text:p>
          </table:table-cell>
          <table:table-cell table:style-name="ce15" office:value-type="string" calcext:value-type="string">
            <text:p>ONION Italian (Allium cepa)</text:p>
          </table:table-cell>
          <table:table-cell table:style-name="ce15" office:value-type="string" calcext:value-type="string">
            <text:p>Yellow of Parma</text:p>
          </table:table-cell>
          <table:table-cell table:style-name="ce14" office:value-type="string" calcext:value-type="string">
            <text:p>Botanical Interest, Inc</text:p>
          </table:table-cell>
          <table:table-cell table:style-name="ce15" office:value-type="string" calcext:value-type="string">
            <text:p>Start indoors 10-12 weeks before last frost, 1/4” deep in moist soil. Transplant outdoors 4-6 weeks before last frost, 6” apart, full sun. 110 days to harvest.</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7-15 days</text:p>
          </table:table-cell>
          <table:table-cell/>
          <table:table-cell table:style-name="ce6" table:number-columns-repeated="16366"/>
        </table:table-row>
        <table:table-row table:style-name="ro3">
          <table:table-cell office:value-type="float" office:value="1540" calcext:value-type="float">
            <text:p>1540</text:p>
          </table:table-cell>
          <table:table-cell table:style-name="ce14" office:value-type="string" calcext:value-type="string">
            <text:p>ONION (Allium cepa)</text:p>
          </table:table-cell>
          <table:table-cell table:style-name="ce14" office:value-type="string" calcext:value-type="string">
            <text:p>Yellow Sweet Spanish</text:p>
          </table:table-cell>
          <table:table-cell table:style-name="ce14" office:value-type="string" calcext:value-type="string">
            <text:p>Ferry Morse</text:p>
          </table:table-cell>
          <table:table-cell table:style-name="ce14" office:value-type="string" calcext:value-type="string">
            <text:p>Start indoors, 1/2” deep, 4-6 weeks before transplant; plant outdoors 6” apart, full sun; uncover most of bulb to form. 110 days; biennial seed stalk.</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4-5 days</text:p>
          </table:table-cell>
          <table:table-cell/>
          <table:table-cell table:style-name="ce6" table:number-columns-repeated="16366"/>
        </table:table-row>
        <table:table-row table:style-name="ro3">
          <table:table-cell office:value-type="float" office:value="1148" calcext:value-type="float">
            <text:p>1148</text:p>
          </table:table-cell>
          <table:table-cell table:style-name="ce14" office:value-type="string" calcext:value-type="string">
            <text:p>CARROT (Daucus carota)</text:p>
          </table:table-cell>
          <table:table-cell table:style-name="ce14" office:value-type="string" calcext:value-type="string">
            <text:p>Zanahoria Tendersweet</text:p>
          </table:table-cell>
          <table:table-cell table:style-name="ce14" office:value-type="string" calcext:value-type="string">
            <text:p>Ferry Morse</text:p>
          </table:table-cell>
          <table:table-cell table:style-name="ce14" office:value-type="string" calcext:value-type="string">
            <text:p>Sow direct into rich soil high in phosphorus &amp; potassium (moderate nitrogen) after all danger of frost; harvest 65 days. Seeds are biennial. Soil Temp Range: 40°-95° Optimum: 85°</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40°-95° Optimum: 85°</text:p>
          </table:table-cell>
          <table:table-cell table:style-name="ce14" office:value-type="string" calcext:value-type="string">
            <text:p>4-6 days</text:p>
          </table:table-cell>
          <table:table-cell/>
          <table:table-cell table:style-name="ce6" table:number-columns-repeated="16366"/>
        </table:table-row>
        <table:table-row table:style-name="ro2">
          <table:table-cell office:value-type="float" office:value="1588" calcext:value-type="float">
            <text:p>1588</text:p>
          </table:table-cell>
          <table:table-cell table:style-name="ce15" office:value-type="string" calcext:value-type="string">
            <text:p>Pepper CHILE (Capsicum annuum)</text:p>
          </table:table-cell>
          <table:table-cell table:style-name="ce14" office:value-type="string" calcext:value-type="string">
            <text:p>Zia Pueblo Mix (Medium to Medium Hot)</text:p>
          </table:table-cell>
          <table:table-cell table:style-name="ce14" office:value-type="string" calcext:value-type="string">
            <text:p>Native Seed/SEARCH <text:s/>www.nativeseeds.org</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office:value-type="string" calcext:value-type="string">
            <text:p>60°-95° Optimum: 85°</text:p>
          </table:table-cell>
          <table:table-cell table:style-name="ce14" office:value-type="string" calcext:value-type="string">
            <text:p>8-10 days</text:p>
          </table:table-cell>
          <table:table-cell/>
          <table:table-cell table:style-name="ce6" table:number-columns-repeated="16366"/>
        </table:table-row>
        <table:table-row table:style-name="ro11">
          <table:table-cell office:value-type="float" office:value="1234" calcext:value-type="float">
            <text:p>1234</text:p>
          </table:table-cell>
          <table:table-cell table:style-name="ce15" office:value-type="string" calcext:value-type="string">
            <text:p>FLOWER (Zinnia peruviana)</text:p>
          </table:table-cell>
          <table:table-cell table:style-name="ce15" office:value-type="string" calcext:value-type="string">
            <text:p>Zinnia, Red</text:p>
          </table:table-cell>
          <table:table-cell table:style-name="ce15" office:value-type="string" calcext:value-type="string">
            <text:p>Jim Koweek</text:p>
          </table:table-cell>
          <table:table-cell table:style-name="ce15" office:value-type="string" calcext:value-type="string">
            <text:p>Lovely red annual. <text:s/>Will self- propagate from its own seed. <text:s/>Butterflies love this flower!</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office:value-type="string" calcext:value-type="string">
            <text:p>Annual</text:p>
          </table:table-cell>
          <table:table-cell table:style-name="ce15"/>
          <table:table-cell table:style-name="ce28" office:value-type="string" calcext:value-type="string">
            <text:p>2018</text:p>
          </table:table-cell>
          <table:table-cell table:style-name="ce15" table:number-columns-repeated="2"/>
          <table:table-cell/>
          <table:table-cell table:style-name="ce6" table:number-columns-repeated="16366"/>
        </table:table-row>
        <table:table-row table:style-name="ro2">
          <table:table-cell office:value-type="float" office:value="1529" calcext:value-type="float">
            <text:p>1529</text:p>
          </table:table-cell>
          <table:table-cell table:style-name="ce15" office:value-type="string" calcext:value-type="string">
            <text:p>Microgreens Sunflower (Helianthus annuus)</text:p>
          </table:table-cell>
          <table:table-cell table:style-name="ce15"/>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hickly, about 1/2”-1” apart. Press seeds firmly into soil mix and cover about 1/8”-1/4” with sowing mix. Move containers as need for best light exposure. Harvest about 10-20 days after sowing.</text:p>
          </table:table-cell>
          <table:table-cell table:style-name="ce15"/>
          <table:table-cell table:style-name="ce15" office:value-type="string" calcext:value-type="string">
            <text:p>25-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5-75 degrees</text:p>
          </table:table-cell>
          <table:table-cell table:style-name="ce15" office:value-type="string" calcext:value-type="string">
            <text:p>5-12 days</text:p>
          </table:table-cell>
          <table:table-cell/>
          <table:table-cell table:style-name="ce6" table:number-columns-repeated="16366"/>
        </table:table-row>
        <table:table-row table:style-name="ro4">
          <table:table-cell office:value-type="float" office:value="1539" calcext:value-type="float">
            <text:p>1539</text:p>
          </table:table-cell>
          <table:table-cell table:style-name="ce15" office:value-type="string" calcext:value-type="string">
            <text:p>OKRA (Abelmoschus esculentus)</text:p>
          </table:table-cell>
          <table:table-cell table:style-name="ce15" table:number-columns-repeated="2"/>
          <table:table-cell table:style-name="ce15" office:value-type="string" calcext:value-type="string">
            <text:p>Beautiful plants grow 7-8 ft tall; pods are long and slim. Soak seeds 24 hrs to improve germination. Direct sow 1” deep 2 weeks after last frost or start indoors in containers 2-4 weeks before setting out. <text:s/>One plant per square foot. <text:s/>Harvest daily in hot weather.</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table-cell table:style-name="ce15" office:value-type="string" calcext:value-type="string">
            <text:p>6 days</text:p>
          </table:table-cell>
          <table:table-cell/>
          <table:table-cell table:style-name="ce6" table:number-columns-repeated="16366"/>
        </table:table-row>
        <table:table-row table:style-name="ro3">
          <table:table-cell office:value-type="float" office:value="1655" calcext:value-type="float">
            <text:p>1655</text:p>
          </table:table-cell>
          <table:table-cell table:style-name="ce14" office:value-type="string" calcext:value-type="string">
            <text:p>Sprouts Broccoli (Brassica oleracea var italica)</text:p>
          </table:table-cell>
          <table:table-cell table:style-name="ce14"/>
          <table:table-cell table:style-name="ce14"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6-9 days until sprouts have small, green leaves.</text:p>
          </table:table-cell>
          <table:table-cell table:style-name="ce14"/>
          <table:table-cell table:style-name="ce14" office:value-type="string" calcext:value-type="string">
            <text:p>3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table-cell table:style-name="ce6" table:number-columns-repeated="16366"/>
        </table:table-row>
        <table:table-row table:style-name="ro3">
          <table:table-cell office:value-type="float" office:value="1656" calcext:value-type="float">
            <text:p>1656</text:p>
          </table:table-cell>
          <table:table-cell table:style-name="ce15" office:value-type="string" calcext:value-type="string">
            <text:p>Sprouts China Rose Radish (Raphanus sativus)</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4-6 days until sprouts have small, green leaves.</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657" calcext:value-type="float">
            <text:p>1657</text:p>
          </table:table-cell>
          <table:table-cell table:style-name="ce15" office:value-type="string" calcext:value-type="string">
            <text:p>Sprouts Mung Beans (Vigna radiata var. radiata)</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2-4 days until sprouts have roots 1/2” - 1” long.</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3">
          <table:table-cell office:value-type="float" office:value="1658" calcext:value-type="float">
            <text:p>1658</text:p>
          </table:table-cell>
          <table:table-cell table:style-name="ce14" office:value-type="string" calcext:value-type="string">
            <text:p>Sprouts Purple Kohlrabi (Brassica oleracea var. gongylodes)</text:p>
          </table:table-cell>
          <table:table-cell table:style-name="ce14"/>
          <table:table-cell table:style-name="ce14"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6-8 days until sprouts have small green leaves.</text:p>
          </table:table-cell>
          <table:table-cell table:style-name="ce14"/>
          <table:table-cell table:style-name="ce14" office:value-type="string" calcext:value-type="string">
            <text:p>50-10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number-columns-repeated="2"/>
          <table:table-cell/>
          <table:table-cell table:style-name="ce6" table:number-columns-repeated="16366"/>
        </table:table-row>
        <table:table-row table:style-name="ro4">
          <table:table-cell office:value-type="float" office:value="1659" calcext:value-type="float">
            <text:p>1659</text:p>
          </table:table-cell>
          <table:table-cell table:style-name="ce15" office:value-type="string" calcext:value-type="string">
            <text:p>Sprouts Salad Mix (Brassica spp, Amaranthus hypochondriacus, Medicago sativia, Trifolium pratense)</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6-9 days until sprouts have small, green leaves.</text:p>
          </table:table-cell>
          <table:table-cell table:style-name="ce15"/>
          <table:table-cell table:style-name="ce15" office:value-type="string" calcext:value-type="string">
            <text:p>50-10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table-cell table:style-name="ce6" table:number-columns-repeated="16366"/>
        </table:table-row>
        <table:table-row table:style-name="ro13" table:number-rows-repeated="1047883">
          <table:table-cell table:number-columns-repeated="18"/>
          <table:table-cell table:style-name="ce6" table:number-columns-repeated="16366"/>
        </table:table-row>
        <table:table-row table:style-name="ro13">
          <table:table-cell table:number-columns-repeated="18"/>
          <table:table-cell table:style-name="ce6" table:number-columns-repeated="16366"/>
        </table:table-row>
      </table:table>
      <table:table table:name="Original Labels" table:style-name="ta2">
        <table:table-column table:style-name="co13" table:default-cell-style-name="ce41"/>
        <table:table-column table:style-name="co14" table:default-cell-style-name="ce41"/>
        <table:table-column table:style-name="co12" table:number-columns-repeated="16382"/>
        <table:table-row table:style-name="ro14">
          <table:table-cell table:style-name="ce40" office:value-type="string" calcext:value-type="string">
            <text:p>Label Left (Col A)</text:p>
          </table:table-cell>
          <table:table-cell table:style-name="ce40" office:value-type="string" calcext:value-type="string">
            <text:p>Label Right (Col B)</text:p>
          </table:table-cell>
          <table:table-cell table:style-name="Default" table:number-columns-repeated="16382"/>
        </table:table-row>
        <table:table-row table:style-name="ro15">
          <table:table-cell office:value-type="string" calcext:value-type="string">
            <text:p>Family: AMARANTH (Amaranthus cruentus)</text:p>
            <text:p>Variety: Alegria</text:p>
            <text:p>Comments: Blond seeds are edible and rich in lysine, and young leaves are rich in iron and calcium. Plant in warm soil or with summer rains 1/4” deep in basins or rows. Thin to 10-15” apart. Grows taller (up to 9 feet) if soil is enriched with compost. Likes full sun. Used to make traditional confection, made with popped seed and</text:p>
            <text:p>honey.</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5">
          <table:table-cell table:style-name="ce42" office:value-type="string" calcext:value-type="string">
            <text:p>Family: AMARANTH (Amaranthus caudatus)</text:p>
            <text:p>Variety: Coral Fountain (Love-lies-bleeding)</text:p>
            <text:p>Original Seed Source: Botanical Interests</text:p>
            <text:p>Comments: Plant 1-2 weeks after last frost and soil is warm. Sow just under a light cover of soil, in basins or rows a pinch every 12”-15” . Thin to 1 plant per spot. Likes full sun. Seeds are edible and rich in lysine, iron</text:p>
            <text:p>and calcium. Tassels are beautiful in dry flower arrangements.</text:p>
          </table:table-cell>
          <table:table-cell table:style-name="ce42" office:value-type="string" calcext:value-type="string">
            <text:p>2022</text:p>
            <text:p>EDIBLE</text:p>
            <text:p>Cool Season</text:p>
            <text:p>Various Seeds</text:p>
            <text:p>Advanced Seed Save</text:p>
          </table:table-cell>
          <table:table-cell table:style-name="Default" table:number-columns-repeated="16382"/>
        </table:table-row>
        <table:table-row table:style-name="ro15">
          <table:table-cell office:value-type="string" calcext:value-type="string">
            <text:p>Family: AMARANTH (Amaranthus tricolor)</text:p>
            <text:p>Variety: Edible Red Leaf</text:p>
            <text:p>Original Seed Source: Botanical Interests Comments: Plant in warm soil or with summer rains 1/8”-1/4” deep in basins or rows 6”-12” apart. Likes full sun. Has a spinach like flavor that is sweet and slightly tangy. Makes a great salad ingredient or steam, stir-fry, saute or mix in dishes. Leaves mature about 49 days.</text:p>
            <text:p>Seeds ready about 90-110 days. Drought and heat tolerant.</text:p>
          </table:table-cell>
          <table:table-cell office:value-type="string" calcext:value-type="string">
            <text:p>2022</text:p>
            <text:p>EDIBLE</text:p>
            <text:p>Warm Season</text:p>
            <text:p>Various Seeds</text:p>
            <text:p>Beginner Seed Saver</text:p>
          </table:table-cell>
          <table:table-cell table:style-name="Default" table:number-columns-repeated="16382"/>
        </table:table-row>
        <table:table-row table:style-name="ro15">
          <table:table-cell table:style-name="ce42" office:value-type="string" calcext:value-type="string">
            <text:p>Family: AMARANTH (Amaranthus hypochondriacus)</text:p>
            <text:p>Variety: Guarijio Grain</text:p>
            <text:p>Comments: White seeds are edible and rich in lysine, iron and calcium. Plant in warm soil or with summer rains 1/4” deep in basins or rows. Thin to 10-15” apart.</text:p>
            <text:p>Likes full sun. Crosses with wild A. powelli.</text:p>
          </table:table-cell>
          <table:table-cell table:style-name="ce42"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5">
          <table:table-cell office:value-type="string" calcext:value-type="string">
            <text:p>Family: AMARANTH (Amaranthus cruentus)</text:p>
            <text:p>Variety: Hopi Red Dye</text:p>
            <text:p>Grown By: Native Seed/SEARCH Farm</text:p>
            <text:p>Where Grown: Patagonia, AZ</text:p>
            <text:p>Original Seed Source: www.nativeseeds.org Comments: Grows 6ft tall with 1-2 ft long inflorescence. Young tender leaves are edible. Small black seeds are edible and rich in lysine. Plant in warm soil or with summer rains 1/4” deep in basins or rows. Thin to 10-15” apart. Likes full sun.</text:p>
            <text:p>Crosses easily with wild amaranth.</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5">
          <table:table-cell table:style-name="ce42" office:value-type="string" calcext:value-type="string">
            <text:p>Family: AMARANTH (Amaranthus cruentus)</text:p>
            <text:p>Variety: Hot Biscuits  Original Seed Source: Botanical Interests</text:p>
            <text:p>Comments: Plant 1-2 weeks after last frost and soil is warm. Sow just under a light cover of soil, in basins or rows a pinch every 12”-15” . Thin to 1 plant per spot. Likes full sun. To  create fuller plants, pinch tips when young. Seeds are edible and rich in lysine, iron and calcium. Tassels are beautiful in dry flower arrangements.</text:p>
          </table:table-cell>
          <table:table-cell table:style-name="ce42" office:value-type="string" calcext:value-type="string">
            <text:p>2022</text:p>
            <text:p>EDIBLE</text:p>
            <text:p>Warm Season</text:p>
            <text:p>Various Seeds</text:p>
            <text:p>Advanced Seed Saver</text:p>
          </table:table-cell>
          <table:table-cell table:style-name="Default" table:number-columns-repeated="16382"/>
        </table:table-row>
        <table:table-row table:style-name="ro15">
          <table:table-cell office:value-type="string" calcext:value-type="string">
            <text:p>Family: AMARANTH (Amaranthus cruentus)</text:p>
            <text:p>Variety: Mexican Grain</text:p>
            <text:p>Comments: Blond seeds are edible and rich in lysine, and young leaves are rich in iron and calcium. Plant in warm soil or with summer rains 1/4” deep in basins or</text:p>
            <text:p>rows. Thin to 10-15” apart. Grows taller if soil is enriched with compost. Likes full sun.</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5">
          <table:table-cell table:style-name="ce42" office:value-type="string" calcext:value-type="string">
            <text:p>Family: AMARANTH (Amaranthus albus)</text:p>
            <text:p>Variety: White</text:p>
            <text:p>Original Seed Source: www.nativeseeds.org Comments: Grows 6ft tall with 1-2 ft long inflorescence. White seeds are edible and rich in lysine.</text:p>
            <text:p>Plant in warm soil or with summer rains 1/4” deep in basins or rows. Thin to 10-15” apart. Likes full sun.</text:p>
          </table:table-cell>
          <table:table-cell table:style-name="ce42"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5">
          <table:table-cell office:value-type="string" calcext:value-type="string">
            <text:p>Family: AMARANTH (Amaranthus)</text:p>
            <text:p>Variety: Amaranth</text:p>
            <text:p>Comments: White seeds are edible and rich in lysine, iron and calcium. Plant in warm soil or with summer rains 1/4” deep in basins or rows. Thin to 10-15” apart.</text:p>
            <text:p>Likes full sun. Crosses with wild A. powelli.</text:p>
          </table:table-cell>
          <table:table-cell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5">
          <table:table-cell table:style-name="ce42" office:value-type="string" calcext:value-type="string">
            <text:p>Family: AMARANTH (Amaranthus caudatus)</text:p>
            <text:p>Variety: Coral Fountain (Love-lies-bleeding)</text:p>
            <text:p>Original Seed Source: Botanical Interests</text:p>
            <text:p>Comments: Plant 1-2 weeks after last frost and soil is warm. Sow just under a light cover of soil, in basins or rows a pinch every 12”-15” . Thin to 1 plant per spot. Likes full sun. Seeds are edible and rich in lysine, iron</text:p>
            <text:p>and calcium. Tassels are beautiful in dry flower arrangements.</text:p>
          </table:table-cell>
          <table:table-cell table:style-name="ce42" office:value-type="string" calcext:value-type="string">
            <text:p>2022</text:p>
            <text:p>EDIBLE</text:p>
            <text:p>Cool Season</text:p>
            <text:p>Various Seeds</text:p>
            <text:p>Advanced Seed Save</text:p>
          </table:table-cell>
          <table:table-cell table:style-name="Default" table:number-columns-repeated="16382"/>
        </table:table-row>
        <table:table-row table:style-name="ro15">
          <table:table-cell office:value-type="string" calcext:value-type="string">
            <text:p>Family: AMARANTH (Amaranthus tricolor)</text:p>
            <text:p>Variety: Edible Red Leaf</text:p>
            <text:p>Original Seed Source: Botanical Interests Comments: Plant in warm soil or with summer rains 1/8”-1/4” deep in basins or rows 6”-12” apart. Likes full sun. Has a spinach like flavor that is sweet and slightly tangy. Makes a great salad ingredient or steam, stir-fry, saute or mix in dishes. Leaves mature about 49 days.</text:p>
            <text:p>Seeds ready about 90-110 days. Drought and heat tolerant.</text:p>
          </table:table-cell>
          <table:table-cell office:value-type="string" calcext:value-type="string">
            <text:p>2022</text:p>
            <text:p>EDIBLE</text:p>
            <text:p>Warm Season</text:p>
            <text:p>Various Seeds</text:p>
            <text:p>Beginner Seed Saver</text:p>
          </table:table-cell>
          <table:table-cell table:style-name="Default" table:number-columns-repeated="16382"/>
        </table:table-row>
        <table:table-row table:style-name="ro15">
          <table:table-cell table:style-name="ce42" office:value-type="string" calcext:value-type="string">
            <text:p>Family: AMARANTH (Amaranthus hypochondriacus)</text:p>
            <text:p>Variety: Guarijio Grain</text:p>
            <text:p>Comments: White seeds are edible and rich in lysine, iron and calcium. Plant in warm soil or with summer rains 1/4” deep in basins or rows. Thin to 10-15” apart.</text:p>
            <text:p>Likes full sun. Crosses with wild A. powelli.</text:p>
          </table:table-cell>
          <table:table-cell table:style-name="ce42"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5">
          <table:table-cell office:value-type="string" calcext:value-type="string">
            <text:p>Family: AMARANTH (Amaranthus cruentus)</text:p>
            <text:p>Variety: Hopi Red Dye</text:p>
            <text:p>Grown By: Native Seed/SEARCH Farm</text:p>
            <text:p>Where Grown: Patagonia, AZ</text:p>
            <text:p>Original Seed Source: www.nativeseeds.org Comments: Grows 6ft tall with 1-2 ft long inflorescence. Young tender leaves are edible. Small black seeds are edible and rich in lysine. Plant in warm soil or with summer rains 1/4” deep in basins or rows. Thin to 10-15” apart. Likes full sun.</text:p>
            <text:p>Crosses easily with wild amaranth.</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5">
          <table:table-cell table:style-name="ce42" office:value-type="string" calcext:value-type="string">
            <text:p>Family: AMARANTH (Amaranthus cruentus)</text:p>
            <text:p>Variety: Hot Biscuits Original Seed Source: Botanical Interests</text:p>
            <text:p>Comments: Plant 1-2 weeks after last frost and soil is warm. Sow just under a light cover of soil, in basins or rows a pinch every 12”-15” . Thin to 1 plant per spot. Likes full sun. To  create fuller plants, pinch tips when young. Seeds are edible and rich in lysine, iron and calcium. Tassels are beautiful in dry flower arrangements.</text:p>
          </table:table-cell>
          <table:table-cell table:style-name="ce42" office:value-type="string" calcext:value-type="string">
            <text:p>2022</text:p>
            <text:p>EDIBLE</text:p>
            <text:p>Warm Season</text:p>
            <text:p>Various Seeds</text:p>
            <text:p>Advanced Seed Saver</text:p>
          </table:table-cell>
          <table:table-cell table:style-name="Default" table:number-columns-repeated="16382"/>
        </table:table-row>
        <table:table-row table:style-name="ro15">
          <table:table-cell office:value-type="string" calcext:value-type="string">
            <text:p>Family: AMARANTH (Amaranthus cruentus)</text:p>
            <text:p>Variety: Mexican Grain</text:p>
            <text:p>Comments: Blond seeds are edible and rich in lysine, and young leaves are rich in iron and calcium. Plant in warm soil or with summer rains 1/4” deep in basins or</text:p>
            <text:p>rows. Thin to 10-15” apart. Grows taller if soil is enriched with compost. Likes full sun.</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5">
          <table:table-cell table:style-name="ce42" office:value-type="string" calcext:value-type="string">
            <text:p>Family: AMARANTH (Amaranthus albus)</text:p>
            <text:p>Variety: White</text:p>
            <text:p>Original Seed Source: www.nativeseeds.org Comments: Grows 6ft tall with 1-2 ft long inflorescence. White seeds are edible and rich in lysine.</text:p>
            <text:p>Plant in warm soil or with summer rains 1/4” deep in basins or rows. Thin to 10-15” apart. Likes full sun.</text:p>
          </table:table-cell>
          <table:table-cell table:style-name="ce42"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5">
          <table:table-cell office:value-type="string" calcext:value-type="string">
            <text:p>Family: ARTICHOKE (Cynara scolymus)</text:p>
            <text:p>Variety: Green Globe</text:p>
            <text:p>Seed Source: BJ Searcy, CCMGA Master Gardener, Whetstone</text:p>
            <text:p>Comments: 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office:value-type="string" calcext:value-type="string">
            <text:p>2023</text:p>
            <text:p>EDIBLE</text:p>
            <text:p>Cool Season</text:p>
            <text:p>5 Seeds</text:p>
            <text:p>Advanced Seed Saver</text:p>
          </table:table-cell>
          <table:table-cell table:style-name="Default" table:number-columns-repeated="16382"/>
        </table:table-row>
        <table:table-row table:style-name="ro15">
          <table:table-cell table:style-name="ce42" office:value-type="string" calcext:value-type="string">
            <text:p>Family: ARTICHOKE (Cynara scolymus)</text:p>
            <text:p>Variety: Imperial Star</text:p>
            <text:p>Original Seed Source: Johnny’s Seeds Comments: Artichokes require fertile, well-drained soil with a pH of 6.5-7. Sow indoors 8-12 weeks before last frost. Plant 2-3 seeds 1/4” deep in individual containers. Transplant 2-3’ apart in rows 4-6’ apart. Time transplant so plants receive 10 days 45-50 degrees to induce budding. Protect from frost. Days to mature 85.</text:p>
            <text:p>Soil Temp:  Range: 45-95 degrees Optimum: 77 degrees</text:p>
          </table:table-cell>
          <table:table-cell table:style-name="ce42" office:value-type="string" calcext:value-type="string">
            <text:p>2017</text:p>
            <text:p>EDIBLE</text:p>
            <text:p>Warm Season</text:p>
            <text:p>10+ Seeds</text:p>
            <text:p>Advanced Seed Saver</text:p>
          </table:table-cell>
          <table:table-cell table:style-name="Default" table:number-columns-repeated="16382"/>
        </table:table-row>
        <table:table-row table:style-name="ro15">
          <table:table-cell office:value-type="string" calcext:value-type="string">
            <text:p>Family: ARTICHOKE (Cynara scolymus)</text:p>
            <text:p>Variety: Green Globe</text:p>
            <text:p>Seed Source: BJ Searcy, CCMGA Master Gardener, Whetstone</text:p>
            <text:p>Comments: 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office:value-type="string" calcext:value-type="string">
            <text:p>2023</text:p>
            <text:p>EDIBLE</text:p>
            <text:p>Cool Season</text:p>
            <text:p>5 Seeds</text:p>
            <text:p>Advanced Seed Saver</text:p>
          </table:table-cell>
          <table:table-cell table:style-name="Default" table:number-columns-repeated="16382"/>
        </table:table-row>
        <table:table-row table:style-name="ro15">
          <table:table-cell table:style-name="ce42" office:value-type="string" calcext:value-type="string">
            <text:p>Family:   ARUGULA (Diplotaxis Tenuifolia)</text:p>
            <text:p>Variety: Rocket</text:p>
            <text:p>Comments: Direct sow 1/4” deep;  thin to 6” apart; size 6-12”; 21-40 days; sun/partial shade; grow year-round in the desert; leaves can be spicier in summertime.  Easy to grow.</text:p>
          </table:table-cell>
          <table:table-cell table:style-name="ce42" office:value-type="string" calcext:value-type="string">
            <text:p>2024</text:p>
            <text:p>EDIBLE</text:p>
            <text:p>Cool Season To</text:p>
            <text:p>All Season</text:p>
            <text:p>20 Seeds</text:p>
            <text:p>Advanced Seed Saver</text:p>
          </table:table-cell>
          <table:table-cell table:style-name="Default" table:number-columns-repeated="16382"/>
        </table:table-row>
        <table:table-row table:style-name="ro15">
          <table:table-cell office:value-type="string" calcext:value-type="string">
            <text:p>Family:   ARUGULA (Diplotaxis Tenuifolia)</text:p>
            <text:p>Variety: Slow Bolting</text:p>
            <text:p>Original Source: Botanical Interests</text:p>
            <text:p>Comments: Direct sow 1/4” deep;  thin to 6”  apart; size 6-12”; 21-40 days; sun/partial shade; grow year-round in the desert; leaves can be spicier in summertime.  Easy to grow.</text:p>
          </table:table-cell>
          <table:table-cell office:value-type="string" calcext:value-type="string">
            <text:p>2021</text:p>
            <text:p>EDIBLE</text:p>
            <text:p>Cool Season To</text:p>
            <text:p>All Season</text:p>
            <text:p>Various Seeds</text:p>
            <text:p>Advanced Seed Saver</text:p>
          </table:table-cell>
          <table:table-cell table:style-name="Default" table:number-columns-repeated="16382"/>
        </table:table-row>
        <table:table-row table:style-name="ro15">
          <table:table-cell table:style-name="ce42" office:value-type="string" calcext:value-type="string">
            <text:p>Family:   ARUGULA Wild Rocket (Diplotaxis Tenuifolia)</text:p>
            <text:p>Variety: Rocky</text:p>
            <text:p>Original Source: Botanical Interests</text:p>
            <text:p>Comments: Direct sow 1/4” deep;  thin to 6”  apart; size 6-12”; 21-40 days; sun/partial shade; grow year-round in the desert; leaves can be spicier in summertime.  Easy to grow.</text:p>
          </table:table-cell>
          <table:table-cell table:style-name="ce42" office:value-type="string" calcext:value-type="string">
            <text:p>2021</text:p>
            <text:p>EDIBLE</text:p>
            <text:p>Cool Season To</text:p>
            <text:p>All Season</text:p>
            <text:p>Various Seeds</text:p>
            <text:p>Advanced Seed Saver</text:p>
          </table:table-cell>
          <table:table-cell table:style-name="Default" table:number-columns-repeated="16382"/>
        </table:table-row>
        <table:table-row table:style-name="ro15">
          <table:table-cell office:value-type="string" calcext:value-type="string">
            <text:p>Family:  ARUGULA (Diplotaxis Tenuifolia)</text:p>
            <text:p>Variety: Rocket</text:p>
            <text:p>Comments: Direct sow 1/4” deep;  thin to 6” apart; size 6-12”; 21-40 days; sun/partial shade; grow year-round in the desert; leaves can be spicier in summertime.  Easy to grow.</text:p>
          </table:table-cell>
          <table:table-cell office:value-type="string" calcext:value-type="string">
            <text:p>2024</text:p>
            <text:p>EDIBLE</text:p>
            <text:p>Cool Season To</text:p>
            <text:p>All Season</text:p>
            <text:p>20 Seeds</text:p>
            <text:p>Advanced Seed Saver</text:p>
          </table:table-cell>
          <table:table-cell table:style-name="Default" table:number-columns-repeated="16382"/>
        </table:table-row>
        <table:table-row table:style-name="ro15">
          <table:table-cell table:style-name="ce42" office:value-type="string" calcext:value-type="string">
            <text:p>Family:  ARUGULA (Diplotaxis Tenuifolia)</text:p>
            <text:p>Variety: Slow Bolting</text:p>
            <text:p>Original Source: Botanical Interests</text:p>
            <text:p>Comments: Direct sow 1/4” deep;  thin to 6” apart; size 6-12”; 21-40 days; sun/partial shade; grow year-round in the desert; leaves can be spicier in summertime.  Easy to grow.</text:p>
          </table:table-cell>
          <table:table-cell table:style-name="ce42" office:value-type="string" calcext:value-type="string">
            <text:p>2021</text:p>
            <text:p>EDIBLE</text:p>
            <text:p>Cool Season To</text:p>
            <text:p>All Season Various Seeds</text:p>
            <text:p>Advanced Seed Saver</text:p>
          </table:table-cell>
          <table:table-cell table:style-name="Default" table:number-columns-repeated="16382"/>
        </table:table-row>
        <table:table-row table:style-name="ro15">
          <table:table-cell office:value-type="string" calcext:value-type="string">
            <text:p>Family:  ARUGULA Wild Rocket (Diplotaxis Tenuifolia)</text:p>
            <text:p>Variety: Rocky</text:p>
            <text:p>Original Source: Botanical Interests</text:p>
            <text:p>Comments: Direct sow 1/4” deep;  thin to 6” apart; size 6-12”; 21-40 days; sun/partial shade; grow year-round in the desert; leaves can be spicier in summertime.  Easy to grow.</text:p>
          </table:table-cell>
          <table:table-cell office:value-type="string" calcext:value-type="string">
            <text:p>2021</text:p>
            <text:p>EDIBLE</text:p>
            <text:p>Cool Season To</text:p>
            <text:p>All Season Various Seeds</text:p>
            <text:p>Advanced Seed Saver</text:p>
          </table:table-cell>
          <table:table-cell table:style-name="Default" table:number-columns-repeated="16382"/>
        </table:table-row>
        <table:table-row table:style-name="ro15">
          <table:table-cell table:style-name="ce42" office:value-type="string" calcext:value-type="string">
            <text:p>Family: ASPARAGUS (Asparagus officinalis)</text:p>
            <text:p>Variety: Mary Washington</text:p>
            <text:p>Original Seed Source: Ferry-Morse</text:p>
            <text:p>Comments: Perennial to 4 feet. Sow seeds indoors in very early spring.  First soak for several hours and plant 1/2 inch deep. Transplant as needed to give room to grow for one year. In their final placement, asparagus need as much as 3-4 feet spacing in rich organic soil with ample moisture.  Mulch at planting, but don’t bury the seedlings; mulch heavily the second fall.  A few spears may be harvested the third year if plants are vigorous, and more in subsequent years.</text:p>
          </table:table-cell>
          <table:table-cell table:style-name="ce42" office:value-type="string" calcext:value-type="string">
            <text:p>2022</text:p>
            <text:p>EDIBLE</text:p>
            <text:p>Cool Season</text:p>
            <text:p>6+ Seeds pelleted</text:p>
            <text:p>Advanced Seed Saver</text:p>
          </table:table-cell>
          <table:table-cell table:style-name="Default" table:number-columns-repeated="16382"/>
        </table:table-row>
        <table:table-row table:style-name="ro15">
          <table:table-cell office:value-type="string" calcext:value-type="string">
            <text:p>Family: ASPARAGUS (Asparagus officinalis)</text:p>
            <text:p>Variety: Mary Washington</text:p>
            <text:p>Original Seed Source: Ferry-Morse</text:p>
            <text:p>Comments: Perennial to 4 feet. Sow seeds indoors in very early spring.  First soak for several hours and plant 1/2 inch deep. Transplant as needed to give room to grow for one year. In their final placement, asparagus need as much as 3-4 feet spacing in rich organic soil with ample moisture.  Mulch at planting, but don’t bury the seedlings; mulch heavily the second fall.  A few spears may be harvested the third year if plants are vigorous, and more in subsequent years.</text:p>
          </table:table-cell>
          <table:table-cell office:value-type="string" calcext:value-type="string">
            <text:p>2022</text:p>
            <text:p>EDIBLE</text:p>
            <text:p>Cool Season</text:p>
            <text:p>6+ Seeds pelleted</text:p>
            <text:p>Advanced Seed Saver</text:p>
          </table:table-cell>
          <table:table-cell table:style-name="Default" table:number-columns-repeated="16382"/>
        </table:table-row>
        <table:table-row table:style-name="ro15">
          <table:table-cell table:style-name="ce42" office:value-type="string" calcext:value-type="string">
            <text:p>Family: ARUGULA (Eruca sativa)</text:p>
            <text:p>Variety: ASTRO</text:p>
            <text:p>Original Seed Source: High Mowing Comments: Direct sow 1/4” deep;  thin to 6” apart; size 6-12”; 21-40 days; sun/partial shade;</text:p>
            <text:p>grow year-round in the desert; leaves can be spicier in summertime.  Easy to grow.</text:p>
          </table:table-cell>
          <table:table-cell table:style-name="ce42"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5">
          <table:table-cell office:value-type="string" calcext:value-type="string">
            <text:p>Family: ARUGULA (Eruca sativa)</text:p>
            <text:p>Variety: Arugula Comments: Direct sow 1/4” deep;  thin to 6” apart; size 6-12”; 40 days; sun/partial shade; grow year-round in the desert; leaves can be spicier in summertime.  Easy to grow.</text:p>
          </table:table-cell>
          <table:table-cell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5">
          <table:table-cell table:style-name="ce42" office:value-type="string" calcext:value-type="string">
            <text:p>Family: ARUGULA (Eruca vesicaria)</text:p>
            <text:p>Variety: Rocket</text:p>
            <text:p>Original Seed Source: Botanical Interests</text:p>
            <text:p>Comments: Direct sow 1/4” deep;  thin to 6” apart; size 6-12”; 40 days; sun/partial shade; grow year-round in the desert; leaves can be spicier in summertime.  Easy to grow.</text:p>
          </table:table-cell>
          <table:table-cell table:style-name="ce42" office:value-type="string" calcext:value-type="string">
            <text:p>2022</text:p>
            <text:p>EDIBLE</text:p>
            <text:p>All Season In the Desert</text:p>
            <text:p>Various Seeds</text:p>
            <text:p>Advanced Seed Saver</text:p>
          </table:table-cell>
          <table:table-cell table:style-name="Default" table:number-columns-repeated="16382"/>
        </table:table-row>
        <table:table-row table:style-name="ro15">
          <table:table-cell office:value-type="string" calcext:value-type="string">
            <text:p>Family: ARUGULA (Eruca sativa)</text:p>
            <text:p>Variety: ASTRO</text:p>
            <text:p>Original Seed Source: High Mowing Comments: Direct sow 1/4” deep;  thin to 6” apart; size 6-12”; 21-40 days; sun/partial shade;</text:p>
            <text:p>grow year-round in the desert; leaves can be spicier in summertime.  Easy to grow.</text:p>
          </table:table-cell>
          <table:table-cell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5">
          <table:table-cell table:style-name="ce42" office:value-type="string" calcext:value-type="string">
            <text:p>Family: ARUGULA (Eruca sativa)</text:p>
            <text:p>Variety: Arugula Comments: Direct sow 1/4” deep;  thin to 6” apart; size 6-12”; 40 days; sun/partial shade; grow year-round in the desert; leaves can be spicier in summertime.  Easy to grow.</text:p>
          </table:table-cell>
          <table:table-cell table:style-name="ce42"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5">
          <table:table-cell office:value-type="string" calcext:value-type="string">
            <text:p>Family: ARUGULA (Eruca vesicaria)</text:p>
            <text:p>Variety: Rocket</text:p>
            <text:p>Original Seed Source: Botanical Interests</text:p>
            <text:p>Comments: Direct sow 1/4” deep;  thin to 6” apart; size 6-12”; 40 days; sun/partial shade; grow year-round in the desert; leaves can be spicier in summertime.  Easy to grow.</text:p>
          </table:table-cell>
          <table:table-cell office:value-type="string" calcext:value-type="string">
            <text:p>2022</text:p>
            <text:p>EDIBLE</text:p>
            <text:p>All Season In the Desert</text:p>
            <text:p>Various Seeds</text:p>
            <text:p>Advanced Seed Saver</text:p>
          </table:table-cell>
          <table:table-cell table:style-name="Default" table:number-columns-repeated="16382"/>
        </table:table-row>
        <table:table-row table:style-name="ro15">
          <table:table-cell table:style-name="ce42" office:value-type="string" calcext:value-type="string">
            <text:p>Family: Baby GREENS (Eruca vesicaria sativa)</text:p>
            <text:p>Variety: Arugula</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42" office:value-type="string" calcext:value-type="string">
            <text:p>2022</text:p>
            <text:p>EDIBLE</text:p>
            <text:p>All Season</text:p>
            <text:p>25-50 Seeds</text:p>
            <text:p>Intermediate Seed Saver</text:p>
          </table:table-cell>
          <table:table-cell table:style-name="Default" table:number-columns-repeated="16382"/>
        </table:table-row>
        <table:table-row table:style-name="ro15">
          <table:table-cell office:value-type="string" calcext:value-type="string">
            <text:p>Family: Baby GREENS (Brassica, assorted)</text:p>
            <text:p>Variety: Must Have Mustards</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office:value-type="string" calcext:value-type="string">
            <text:p>2022</text:p>
            <text:p>EDIBLE</text:p>
            <text:p>All Season</text:p>
            <text:p>30+ Seeds</text:p>
            <text:p>Hybrid Do Not Save</text:p>
            <text:p>Seeds</text:p>
          </table:table-cell>
          <table:table-cell table:style-name="Default" table:number-columns-repeated="16382"/>
        </table:table-row>
        <table:table-row table:style-name="ro15">
          <table:table-cell table:style-name="ce42" office:value-type="string" calcext:value-type="string">
            <text:p>Family: Baby GREENS (Assorted Brassica)</text:p>
            <text:p>Variety: Mixed Assortment Comments: Plant 1/8” deep about 15 seeds per foot in a flat. Does not require thinning. Harvest when 2-4 inches tall to add to salads or smoothies.</text:p>
          </table:table-cell>
          <table:table-cell table:style-name="ce42" office:value-type="string" calcext:value-type="string">
            <text:p>2022</text:p>
            <text:p>EDIBLE</text:p>
            <text:p>All Season</text:p>
            <text:p>20+ Seeds</text:p>
            <text:p>Intermediate Seed Saver</text:p>
          </table:table-cell>
          <table:table-cell table:style-name="Default" table:number-columns-repeated="16382"/>
        </table:table-row>
        <table:table-row table:style-name="ro15">
          <table:table-cell office:value-type="string" calcext:value-type="string">
            <text:p>Family: Baby GREENS (Pisum sativum)</text:p>
            <text:p>Variety: Pea Shoots</text:p>
            <text:p>Original Seed Source: Botanical Interests Comments: Plant 1/2” deep about 1” apart in a flat. Keep in an area with temperature between 60-80. Does not require thinning. Harvest when 2-4 inches tall to add to salads or smoothies.</text:p>
          </table:table-cell>
          <table:table-cell office:value-type="string" calcext:value-type="string">
            <text:p>2022</text:p>
            <text:p>EDIBLE</text:p>
            <text:p>All Season</text:p>
            <text:p>30-50 Seeds</text:p>
            <text:p>Intermediate Seed Saver</text:p>
          </table:table-cell>
          <table:table-cell table:style-name="Default" table:number-columns-repeated="16382"/>
        </table:table-row>
        <table:table-row table:style-name="ro15">
          <table:table-cell table:style-name="ce42" office:value-type="string" calcext:value-type="string">
            <text:p>Family: Baby GREENS (Brassica oleracea)</text:p>
            <text:p>Variety: Red Russian Kale</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42" office:value-type="string" calcext:value-type="string">
            <text:p>2023</text:p>
            <text:p>EDIBLE</text:p>
            <text:p>All Season</text:p>
            <text:p>20+ Seeds</text:p>
            <text:p>Intermediate Seed Saver</text:p>
          </table:table-cell>
          <table:table-cell table:style-name="Default" table:number-columns-repeated="16382"/>
        </table:table-row>
        <table:table-row table:style-name="ro15">
          <table:table-cell office:value-type="string" calcext:value-type="string">
            <text:p>Family: Baby GREENS (Assorted species)</text:p>
            <text:p>Variety: Smoothie Mix</text:p>
            <text:p>Original Seed Source: Botanical Interests Comments: Plant 1/8” deep about 15 seeds per foot in a flat. Does not require thinning. Harvest when 2-4 inches tall to add to salads or smoothies. Includes spinach, Early Wonder beets, Bulls Blood beets, Swiss chard and Romaine lettuce.</text:p>
          </table:table-cell>
          <table:table-cell office:value-type="string" calcext:value-type="string">
            <text:p>2023</text:p>
            <text:p>EDIBLE</text:p>
            <text:p>All Season</text:p>
            <text:p>40 Seeds</text:p>
            <text:p>Intermediate Seed Saver</text:p>
          </table:table-cell>
          <table:table-cell table:style-name="Default" table:number-columns-repeated="16382"/>
        </table:table-row>
        <table:table-row table:style-name="ro15">
          <table:table-cell table:style-name="ce42" office:value-type="string" calcext:value-type="string">
            <text:p>Family: Baby GREENS (Assorted Brassica)</text:p>
            <text:p>Variety: Superfoods</text:p>
            <text:p>Original Seed Source: Botanical Interests Comments: Plant 1/8” deep about 15 seeds per foot in a flat. Does not require thinning. Harvest when 2-4 inches tall to add to salads or smoothies. Includes Kale, Broccoli, Collards, Kohlrabi, Turnip, Bok Choy.</text:p>
          </table:table-cell>
          <table:table-cell table:style-name="ce42" office:value-type="string" calcext:value-type="string">
            <text:p>2021</text:p>
            <text:p>EDIBLE</text:p>
            <text:p>All Season</text:p>
            <text:p>20+ Seeds</text:p>
            <text:p>Intermediate Seed Saver</text:p>
          </table:table-cell>
          <table:table-cell table:style-name="Default" table:number-columns-repeated="16382"/>
        </table:table-row>
        <table:table-row table:style-name="ro15">
          <table:table-cell office:value-type="string" calcext:value-type="string">
            <text:p>Family: Baby GREENS (Eruca vesicaria sativa)</text:p>
            <text:p>Variety: Arugula</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office:value-type="string" calcext:value-type="string">
            <text:p>2022</text:p>
            <text:p>EDIBLE</text:p>
            <text:p>All Season</text:p>
            <text:p>25-50 Seeds</text:p>
            <text:p>Intermediate Seed Saver</text:p>
          </table:table-cell>
          <table:table-cell table:style-name="Default" table:number-columns-repeated="16382"/>
        </table:table-row>
        <table:table-row table:style-name="ro15">
          <table:table-cell table:style-name="ce42" office:value-type="string" calcext:value-type="string">
            <text:p>Family: Baby GREENS (Brassica, assorted)</text:p>
            <text:p>Variety: Must Have Mustards</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42" office:value-type="string" calcext:value-type="string">
            <text:p>2022</text:p>
            <text:p>EDIBLE</text:p>
            <text:p>All Season</text:p>
            <text:p>30+ Seeds</text:p>
            <text:p>Hybrid Do Not</text:p>
            <text:p>Save Seeds</text:p>
          </table:table-cell>
          <table:table-cell table:style-name="Default" table:number-columns-repeated="16382"/>
        </table:table-row>
        <table:table-row table:style-name="ro15">
          <table:table-cell office:value-type="string" calcext:value-type="string">
            <text:p>Family: Baby GREENS (Assorted Brassica)</text:p>
            <text:p>Variety: Mixed Assortment Comments: Plant 1/8” deep about 15 seeds per foot in a flat. Does not require thinning. Harvest when 2-4 inches tall to add to salads or smoothies.</text:p>
          </table:table-cell>
          <table:table-cell office:value-type="string" calcext:value-type="string">
            <text:p>2022</text:p>
            <text:p>EDIBLE</text:p>
            <text:p>All Season</text:p>
            <text:p>20+ Seeds</text:p>
            <text:p>Intermediate Seed Saver</text:p>
          </table:table-cell>
          <table:table-cell table:style-name="Default" table:number-columns-repeated="16382"/>
        </table:table-row>
        <table:table-row table:style-name="ro15">
          <table:table-cell table:style-name="ce42" office:value-type="string" calcext:value-type="string">
            <text:p>Family: Baby GREENS (Pisum sativum)</text:p>
            <text:p>Variety: Pea Shoots</text:p>
            <text:p>Original Seed Source: Botanical Interests</text:p>
            <text:p>Comments: Plant 1/2” deep about 1” apart in a flat. Keep in an area with temperature between 60-80. Does not require thinning. Harvest when 2-4 inches tall to add to salads or smoothies.</text:p>
          </table:table-cell>
          <table:table-cell table:style-name="ce42" office:value-type="string" calcext:value-type="string">
            <text:p>2022</text:p>
            <text:p>EDIBLE</text:p>
            <text:p>All Season</text:p>
            <text:p>30-50 Seeds</text:p>
            <text:p>Intermediate Seed Saver</text:p>
          </table:table-cell>
          <table:table-cell table:style-name="Default" table:number-columns-repeated="16382"/>
        </table:table-row>
        <table:table-row table:style-name="ro15">
          <table:table-cell office:value-type="string" calcext:value-type="string">
            <text:p>Family: BEAN, COMMON (Phaseolus vulgaris)</text:p>
            <text:p>Variety: Black Turtle—Dry Bean</text:p>
            <text:p>Original Seed Source:</text:p>
            <text:p>www.survivalseeds4patriots.com Seed Vault</text:p>
            <text:p>Comments: Direct sow outdoors after last frost.  Plant 1” deep, 4” apart; half-runner type (needs support).  Used in Mexican, Creole, and Cajun recipes.</text:p>
            <text:p>Soil Temp Range: 60°-95° Optimum: 80°</text:p>
          </table:table-cell>
          <table:table-cell office:value-type="string" calcext:value-type="string">
            <text:p>2014</text:p>
            <text:p>EDIBLE</text:p>
            <text:p>Warm Season</text:p>
            <text:p>12+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BEAN, COMMON (Phaseolus vulgaris)</text:p>
            <text:p>Variety: Blue Lake - Green Bean, Pole Type</text:p>
            <text:p>Original Seed Source: Ferry Morse</text:p>
            <text:p>Comments: Plant early spring after frost and soil temp higher than 60 degrees. Direct sow 1-2” deep, 2-3” apart. Grow on trellis, 5-6” dark green pods; 55 days.  Great for</text:p>
            <text:p>canning/freezing/eating raw.  Will cross with other beans.</text:p>
          </table:table-cell>
          <table:table-cell table:style-name="ce42" office:value-type="string" calcext:value-type="string">
            <text:p>2022</text:p>
            <text:p>EDIBLE</text:p>
            <text:p>Warm Season</text:p>
            <text:p>5 Seeds</text:p>
            <text:p>Easy Seed Saver</text:p>
            <text:p>Germination: 6-7 days</text:p>
          </table:table-cell>
          <table:table-cell table:style-name="Default" table:number-columns-repeated="16382"/>
        </table:table-row>
        <table:table-row table:style-name="ro15">
          <table:table-cell office:value-type="string" calcext:value-type="string">
            <text:p>Family: BEAN, COMMON (Phaseolus vulgaris)</text:p>
            <text:p>Variety: Blue Lake - Green Bean, Bush Type</text:p>
            <text:p>Original Seed Source: Ferry-Morse</text:p>
            <text:p>Comments: Plant early spring after frost and soil temp higher than 60 degrees. Direct sow 1” deep, 4” apart. Compact bush to 16”; 5-6” dark green pods; 58 days.  Great for canning/freezing/eating raw.  Will cross with other beans.</text:p>
          </table:table-cell>
          <table:table-cell office:value-type="string" calcext:value-type="string">
            <text:p>2022</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COMMON BEAN (Phaseolus vulgaris)</text:p>
            <text:p>Variety: Borlotto di Vigevano Nano, Bush Type</text:p>
            <text:p>Original Seed Source: rareseeds.com  Comments: Straight, round pods splashed with red. Plant early spring after frost and soil temp higher than 60 degrees. Soak beans for 2 hours before planting speeds germination. Direct sow 1-2” deep, 6-12” apart, full sun. Use as snap or dry</text:p>
            <text:p>bean. Keep snap beans well picked since production slows with maturity. 60 days</text:p>
            <text:p>Soil Temp Range: 60°-95° Optimum: 80°</text:p>
          </table:table-cell>
          <table:table-cell table:style-name="ce42"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BEAN, COMMON (Phaseolus vulgaris) Variety: Burpee Stringless - Green Bean, Bush Type</text:p>
            <text:p>Original Seed Source: Burpee</text:p>
            <text:p>Comments: Plant early spring after frost and soil temp higher than 60 degrees. Direct sow 1-2” deep, 2-3” apart. Compact bush to 16”; 5-6” dark green pods; 55 days.  Great for canning/freezing/eating raw.  Will cross with other beans.</text:p>
            <text:p>Soil Temp Range: 60°-95° Optimum: 80°</text:p>
          </table:table-cell>
          <table:table-cell office:value-type="string" calcext:value-type="string">
            <text:p>2020</text:p>
            <text:p>EDIBLE</text:p>
            <text:p>Warm Season</text:p>
            <text:p>15+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COMMON BEAN (Phaseolus vulgaris)</text:p>
            <text:p>Variety: Cherokee Trail of Tears (pole type)</text:p>
            <text:p>Original Seed Source: seedtreasures.com Comments: Direct sow outdoors after last frost.  Plant 1.5” deep, 4” apart; pole type.  Sweet, purple-tinged snap bean at 70 days; matures to shiny black bean at 90 days dry.  The Cherokee women sewed this bean into the hem of their skirts on the tragic forced march to Oklahoma. Will cross-pollinate with other beans.</text:p>
            <text:p>Soil Temp Range: 60°-95° Optimum: 80°</text:p>
          </table:table-cell>
          <table:table-cell table:style-name="ce42" office:value-type="string" calcext:value-type="string">
            <text:p>2017</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BEAN, COMMON (Phaseolus vulgaris)</text:p>
            <text:p>Variety: Contender—Snap/Green Bean (Bush type)</text:p>
            <text:p>Original Seed Source: Ferry Morse</text:p>
            <text:p>Comments: Direct sow outdoors after last frost.  Plant 1.5” deep, 4” apart; bush type. Early variety (40 days); large, stringless, tender, compact bush, tolerates heat. Full sun; 40 days. Will cross-pollinate with other beans.</text:p>
          </table:table-cell>
          <table:table-cell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5">
          <table:table-cell table:style-name="ce42" office:value-type="string" calcext:value-type="string">
            <text:p>Family: BEAN, COMMON (Phaseolus vulgaris)</text:p>
            <text:p>Variety: Eureka, Bush Yellow Wax</text:p>
            <text:p>Original Seed Source: Botanical Interests</text:p>
            <text:p>Comments: Plant 1-2 weeks after frost and soil temp higher than 60 degrees. Direct sow 1” deep, 4-6” apart. Tender pods; heavy yielding; 5-6” pods; 50-55 days.  Great for</text:p>
            <text:p>canning/freezing/eating raw.  Will cross with other beans.</text:p>
            <text:p>Soil Temp Range: 60°-95° Optimum: 80°</text:p>
          </table:table-cell>
          <table:table-cell table:style-name="ce42" office:value-type="string" calcext:value-type="string">
            <text:p>2021</text:p>
            <text:p>EDIBLE</text:p>
            <text:p>Warm Season</text:p>
            <text:p>10 Seeds</text:p>
            <text:p>Easy Seed Saver</text:p>
            <text:p>Germination: 6-12 days</text:p>
            <text:p>@ 80 degrees</text:p>
          </table:table-cell>
          <table:table-cell table:style-name="Default" table:number-columns-repeated="16382"/>
        </table:table-row>
        <table:table-row table:style-name="ro15">
          <table:table-cell office:value-type="string" calcext:value-type="string">
            <text:p>Family: BEAN, COMMON (Phaseolus vulgaris)</text:p>
            <text:p>Variety: Purple Teepee  (Pole type)</text:p>
            <text:p>Original Seed Source: Baker Creek Heirloom Seeds—www.rareseeds.com</text:p>
            <text:p>Comments: Direct sow outdoors after last frost.  Plant 1.5” deep, 6-12” apart; can soak seed 1-2 hours before planting to speed germination. 60 days, extremely productive; pods held above foliage.  Pick when 4-5 inches for tender snaps.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COMMON BEAN (Phaseolus vulgaris)</text:p>
            <text:p>Variety: Frijol Chivita (“Little Goat”)</text:p>
            <text:p>Grown By: Andy Ward</text:p>
            <text:p>Where Grown: Hereford, AZ</text:p>
            <text:p>Original Seed Source: www.nativeseeds.org Comments: Pole or bush bean; eaten young as green beans or dried and shelled; plant in spring or with summer rains</text:p>
            <text:p>1” deep 6” apart. Separate varieties by 10 ft.  Gold &amp; White Jacob’s Cattle bean from arid eastern Tarahumara; aka, Golondrina or Cinco Minutos</text:p>
            <text:p>Minutos.</text:p>
          </table:table-cell>
          <table:table-cell table:style-name="ce42" office:value-type="string" calcext:value-type="string">
            <text:p>2016</text:p>
            <text:p>EDIBLE</text:p>
            <text:p>Warm Season</text:p>
            <text:p>10 Seeds</text:p>
            <text:p>Easy Seed Saver</text:p>
          </table:table-cell>
          <table:table-cell table:style-name="Default" table:number-columns-repeated="16382"/>
        </table:table-row>
        <table:table-row table:style-name="ro15">
          <table:table-cell office:value-type="string" calcext:value-type="string">
            <text:p>Family:  COMMON BEAN (Phaseolus vulgaris)</text:p>
            <text:p>Variety: Frijol Chivita (“Little Goat”)</text:p>
            <text:p>Grown By: Native Seed/SEARCH Farm</text:p>
            <text:p>Where Grown: Patagonia, AZ</text:p>
            <text:p>Original Seed Source: www.nativeseeds.org Comments: Pole or bush bean; eaten young as green beans or dried and shelled; plant in spring or with summer rains</text:p>
            <text:p>1” deep 6” apart. Separate varieties by 10 ft.  Gold &amp; White Jacob’s Cattle bean from arid eastern Tarahumara; aka, Golondrina or Cinco Minutos</text:p>
            <text:p>Minutos.</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COMMON BEAN (Phaseolus vulgaris)</text:p>
            <text:p>Variety: Frijol de Cerocahui</text:p>
            <text:p>Grown By: Native Seed/SEARCH Farm</text:p>
            <text:p>Where Grown: Patagonia, AZ</text:p>
            <text:p>Original Seed Source: www.nativeseeds.org</text:p>
            <text:p>Comments: Pole or bush bean; eaten young as green beans or dried and shelled; plant with summer rains 1” deep 6” apart. Separate varieties by 10 ft.  Smallish beige/tan bean from</text:p>
            <text:p>Barranca del Cobre from farmer who fled violence in region.</text:p>
          </table:table-cell>
          <table:table-cell table:style-name="ce42" office:value-type="string" calcext:value-type="string">
            <text:p>2016</text:p>
            <text:p>EDIBLE</text:p>
            <text:p>Warm Season</text:p>
            <text:p>10 Seeds</text:p>
            <text:p>Easy Seed Saver</text:p>
          </table:table-cell>
          <table:table-cell table:style-name="Default" table:number-columns-repeated="16382"/>
        </table:table-row>
        <table:table-row table:style-name="ro15">
          <table:table-cell office:value-type="string" calcext:value-type="string">
            <text:p>Family: BEAN, COMMON (Phaseolus vulgaris)</text:p>
            <text:p>Variety: Ferrari - Bush Type</text:p>
            <text:p>Original Seed Source: Botanical Interests</text:p>
            <text:p>Comments: Plant early spring after frost and soil is temp higher than 60 degrees. Direct sow 4” apart. Compact bush to 16”; 5-6” dark green pods; 58 days.  Great for canning/freezing/eating raw.</text:p>
            <text:p>Will cross with other beans.</text:p>
          </table:table-cell>
          <table:table-cell office:value-type="string" calcext:value-type="string">
            <text:p>2022</text:p>
            <text:p>EDIBLE</text:p>
            <text:p>Warm Season</text:p>
            <text:p>8 Seeds</text:p>
            <text:p>Easy Seed Saver</text:p>
            <text:p>Germination: 6-7 days</text:p>
          </table:table-cell>
          <table:table-cell table:style-name="Default" table:number-columns-repeated="16382"/>
        </table:table-row>
        <table:table-row table:style-name="ro15">
          <table:table-cell table:style-name="ce42" office:value-type="string" calcext:value-type="string">
            <text:p>Family: BEAN, COMMON (Phaseolus vulgaris)</text:p>
            <text:p>Variety: Gold Rush, Bush Yellow Wax</text:p>
            <text:p>Original Seed Source: Botanical Interests</text:p>
            <text:p>Comments: Plant 1-2 weeks after frost and soil temp higher than 60 degrees. Direct sow 1” deep, 4-6” apart. Tender pods; heavy yielding; 5-6” pods; 50-55 days. Great for canning/freezing/eating raw.  Will cross with</text:p>
            <text:p>other beans.</text:p>
          </table:table-cell>
          <table:table-cell table:style-name="ce42" office:value-type="string" calcext:value-type="string">
            <text:p>2023</text:p>
            <text:p>EDIBLE</text:p>
            <text:p>Warm Season</text:p>
            <text:p>10 Seeds</text:p>
            <text:p>Easy Seed Saver</text:p>
            <text:p>Germination: 6-12 days</text:p>
          </table:table-cell>
          <table:table-cell table:style-name="Default" table:number-columns-repeated="16382"/>
        </table:table-row>
        <table:table-row table:style-name="ro15">
          <table:table-cell office:value-type="string" calcext:value-type="string">
            <text:p>Family: BEAN, COMMON (Phaseolus vulgaris)</text:p>
            <text:p>Variety: Harvester—Snap/Green Bean (Bush type)</text:p>
            <text:p>Original Seed Source: americanseedco.com Comments: Direct sow outdoors after last frost.  Plant 1.5” deep, 4” apart; bush type. Straight, smooth pods, compact bush; disease resistant.  Full sun; 55 days.  To freeze, blanch 3 minutes, ice bath to cool, drain, freeze.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COMMON BEAN (Phaseolus vulgaris)</text:p>
            <text:p>Variety: Hopi Black</text:p>
            <text:p>Grown By: Linda Lawson, CC Master Gardener</text:p>
            <text:p>Where Grown: Sierra Vista, AZ</text:p>
            <text:p>Original Seed Source: www.nativeseeds.org</text:p>
            <text:p>Comments: Pole bean; eaten young as green beans or dried and shelled; plant with summer rains 1” deep 6” apart. Separate varieties by 10 ft.  Small round bean, dark lilac flowers. Can</text:p>
            <text:p>cross with other beans.</text:p>
          </table:table-cell>
          <table:table-cell table:style-name="ce42" office:value-type="string" calcext:value-type="string">
            <text:p>2017</text:p>
            <text:p>EDIBLE</text:p>
            <text:p>Warm Season</text:p>
            <text:p>6 Seeds</text:p>
            <text:p>Easy Seed Saver</text:p>
          </table:table-cell>
          <table:table-cell table:style-name="Default" table:number-columns-repeated="16382"/>
        </table:table-row>
        <table:table-row table:style-name="ro15">
          <table:table-cell office:value-type="string" calcext:value-type="string">
            <text:p>Family:  COMMON BEAN (Phaseolus vulgaris)</text:p>
            <text:p>Variety: Hopi Red</text:p>
            <text:p>Grown By: Native Seed/SEARCH Farm</text:p>
            <text:p>Where Grown: Patagonia, AZ</text:p>
            <text:p>Original Seed Source: www.nativeseeds.org</text:p>
            <text:p>Comments: Pole bean; eaten young as green beans or dried and shelled; plant with summer rains 1” deep 6” apart. Separate varieties by 10 ft.  Early maturing; white flowers. Can cross</text:p>
            <text:p>with other beans.</text:p>
          </table:table-cell>
          <table:table-cell office:value-type="string" calcext:value-type="string">
            <text:p>2016</text:p>
            <text:p>EDIBLE</text:p>
            <text:p>Warm Season</text:p>
            <text:p>15+ Seeds</text:p>
            <text:p>Easy Seed Saver</text:p>
          </table:table-cell>
          <table:table-cell table:style-name="Default" table:number-columns-repeated="16382"/>
        </table:table-row>
        <table:table-row table:style-name="ro15">
          <table:table-cell table:style-name="ce42" office:value-type="string" calcext:value-type="string">
            <text:p>Family: BEAN, COMMON (Phaseolus vulgaris)</text:p>
            <text:p>Variety: Jade - Green Bean, Bush Type</text:p>
            <text:p>Original Seed Source: Ferry-Morse</text:p>
            <text:p>Comments: Plant early spring after frost and soil temp higher than 60 degrees. Direct sow 1” deep, 4” apart. Compact bush to 16”; 5-6” dark green pods; 58 days.  Great for canning/freezing/eating raw.  Will cross with other beans.</text:p>
          </table:table-cell>
          <table:table-cell table:style-name="ce42"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5">
          <table:table-cell office:value-type="string" calcext:value-type="string">
            <text:p>Family: BEAN, COMMON (Phaseolus vulgaris)</text:p>
            <text:p>Variety: Kentucky Blue (pole)</text:p>
            <text:p>Original Seed Source: Ferry-Morse</text:p>
            <text:p>Comments: Direct sow outdoors after last frost. Plant 1.5” deep, 4” apart; pole type.  Popular for its flavor and tenderness.  Will cross-pollinate with other beans.</text:p>
          </table:table-cell>
          <table:table-cell office:value-type="string" calcext:value-type="string">
            <text:p>2022</text:p>
            <text:p>EDIBLE</text:p>
            <text:p>Warm Season</text:p>
            <text:p>11-12 Seeds</text:p>
            <text:p>Easy Seed Saver</text:p>
            <text:p>Germination: 6-8 days</text:p>
          </table:table-cell>
          <table:table-cell table:style-name="Default" table:number-columns-repeated="16382"/>
        </table:table-row>
        <table:table-row table:style-name="ro15">
          <table:table-cell table:style-name="ce42" office:value-type="string" calcext:value-type="string">
            <text:p>Family: BEAN, COMMON (Phaseolus vulgaris)</text:p>
            <text:p>Variety: Kentucky Wonder (pole type)</text:p>
            <text:p>Original Seed Source: americanseedco.com</text:p>
            <text:p>Comments: Direct sow outdoors after last frost.  Plant 1.5” deep, 4” apart; pole type.  Popular for its fine table quality.</text:p>
            <text:p>Will cross-pollinate with other beans.</text:p>
            <text:p>Soil Temp Range: 60°-95° Optimum: 80°</text:p>
          </table:table-cell>
          <table:table-cell table:style-name="ce42" office:value-type="string" calcext:value-type="string">
            <text:p>2022</text:p>
            <text:p>EDIBLE</text:p>
            <text:p>Warm Season 11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COMMON BEAN (Phaseolus vulgaris)</text:p>
            <text:p>Variety: Pinto - Bush Type</text:p>
            <text:p>Original Seed Source:</text:p>
            <text:p>www.survivalseeds4patriots.com Seed Vault</text:p>
            <text:p>Comments: Direct sow outdoors after last frost; 4” apart and 1” deep; rows 24” apart. Full sun; 90-95 days. Harvest when pods are completely dried while still on vine or eat green and young as snap bean.</text:p>
            <text:p>Soil Temp Range: 60°-95° Optimum: 80°</text:p>
          </table:table-cell>
          <table:table-cell office:value-type="string" calcext:value-type="string">
            <text:p>2014</text:p>
            <text:p>EDIBLE</text:p>
            <text:p>Warm Season</text:p>
            <text:p>15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BEAN, COMMON (Phaseolus vulgaris)</text:p>
            <text:p>Variety: Provider—Snap/Green Bean (Bush type)</text:p>
            <text:p>Original Seed Source: Seed Savers Exchange Comments: Direct sow outdoors after last frost.  Plant 1” deep, 4” apart; bush type Full sun; 50 days; 5-6” pods. Harvest frequently to encourage continued bean production. Will cross- pollinate with other beans. . Produces unusually high yield of tender green beans. Very disease resistant.</text:p>
          </table:table-cell>
          <table:table-cell table:style-name="ce42" office:value-type="string" calcext:value-type="string">
            <text:p>2022</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BEAN, COMMON (Phaseolus vulgaris)</text:p>
            <text:p>Variety: Purple Teepee  (Bush type)</text:p>
            <text:p>Original Seed Source: Baker Creek Heirloom Seeds—www.rareseeds.com</text:p>
            <text:p>Comments: Direct sow outdoors after last frost.  Plant 1.5” deep, 6-12” apart; can soak seed 1-2 hours before planting to speed germination. 60 days, extremely productive; pods held above foliage.  Pick when 4-5 inches for tender snaps.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BEAN, COMMON (Phaseolus vulgaris)</text:p>
            <text:p>Variety: Roma II (Bush type)</text:p>
            <text:p>Original Seed Source: Baker Creek Heirloom Seeds</text:p>
            <text:p>www.rareseeds.com</text:p>
            <text:p>Comments: Direct sow outdoors after last frost.  Sow seeds 1.5” deep, 6-12” apart; bush type. Produces unusually high yield of 6-7” long pods that are wide.  Full sun.  Keep pods well picked to encourage production.  To freeze: blanch 3 minutes, ice bath to cool, drain, freeze. Will cross-pollinate with other beans.</text:p>
            <text:p>Soil Temp Range: 60°-95° Optimum: 80°</text:p>
          </table:table-cell>
          <table:table-cell table:style-name="ce42" office:value-type="string" calcext:value-type="string">
            <text:p>2017</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BEAN, COMMON (Phaseolus vulgaris)</text:p>
            <text:p>Variety: Royal Burgandy  (Bush type)</text:p>
            <text:p>Original Seed Source: Botanical Interests</text:p>
            <text:p>Comments: Direct sow outdoors after last frost.  Plant 1.5” deep, 6-12” apart. 55 days. Pick when 4-5 inches for tender snaps. Bright purple pods turn green when cooked. Not heat tolerant, is cool stable and resistant to</text:p>
          </table:table-cell>
          <table:table-cell office:value-type="string" calcext:value-type="string">
            <text:p>2024</text:p>
            <text:p>EDIBLE</text:p>
            <text:p>Warm Season 10 Seeds</text:p>
            <text:p>Easy Seed Saver</text:p>
            <text:p>Germination: 6-12 days</text:p>
          </table:table-cell>
          <table:table-cell table:style-name="Default" table:number-columns-repeated="16382"/>
        </table:table-row>
        <table:table-row table:style-name="ro15">
          <table:table-cell table:style-name="ce42" office:value-type="string" calcext:value-type="string">
            <text:p>Family: COMMON BEAN (Phaseolus vulgaris)</text:p>
            <text:p>Variety: Tarahumara Capirame—Dry Bean</text:p>
            <text:p>Grown by:  Andy Ward</text:p>
            <text:p>Where Grown:  Hereford, AZ</text:p>
            <text:p>Original Seed Source: nativeseeds.org</text:p>
            <text:p>Comments: Direct sow outdoors after last frost.  Plant 1” deep, 4” apart; bush to pole type.  Early Tarahumara variety. From central Tarahumara region.</text:p>
            <text:p>Soil Temp Range: 60°-95° Optimum: 80°</text:p>
          </table:table-cell>
          <table:table-cell table:style-name="ce42" office:value-type="string" calcext:value-type="string">
            <text:p>2014</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BEAN, COMMON (Phaseolus vulgaris)</text:p>
            <text:p>Variety: Tendergreen Improved, Bush Type</text:p>
            <text:p>Original Seed Source: Ferry-Morse Comments: Plant early spring after frost and soil temp higher than 60 degrees. Direct sow 1 1/2” deep, 4-6” apart. Compact type; heavy yielding; 6” pods; 55-60 days.  Great for canning/freezing/eating raw.  Will cross with other beans.</text:p>
          </table:table-cell>
          <table:table-cell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5">
          <table:table-cell table:style-name="ce42" office:value-type="string" calcext:value-type="string">
            <text:p>Family: BEAN, COMMON (Phaseolus vulgaris)</text:p>
            <text:p>Variety: Tendergreen—Snap/Green Bean (Bush type)</text:p>
            <text:p>Original Seed Source: americanseedco.com Comments: Direct sow outdoors after last frost.  Plant 1.5” deep, 4” apart; bush type. Stringless pods 5-6 inches long; very productive.  Full sun; 52 days.  To freeze, blanch 3 minutes, ice bath to cool, drain, freeze. Will cross-pollinate with other beans.</text:p>
            <text:p>Soil Temp Range: 60°-95° Optimum: 80°</text:p>
          </table:table-cell>
          <table:table-cell table:style-name="ce42"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BEAN, COMMON (Phaseolus vulgaris)</text:p>
            <text:p>Variety: Tavera—Snap/Green Bean (Bush type)</text:p>
            <text:p>Original Seed Source: Botanical Interests</text:p>
            <text:p>Comments: Direct sow outdoors after last frost.  Plant 1” deep, 4” apart; bush type.  Full sun; 54 days. Harvest frequently and at a petite size to encourage continued bean production. Will cross-pollinate with other beans. .</text:p>
            <text:p>Produces unusually high yield of tender French filet green beans. Very disease resistant.</text:p>
          </table:table-cell>
          <table:table-cell office:value-type="string" calcext:value-type="string">
            <text:p>2023</text:p>
            <text:p>EDIBLE</text:p>
            <text:p>Warm Season</text:p>
            <text:p>10 Seeds</text:p>
            <text:p>Easy Seed Saver</text:p>
            <text:p>Germination: 6-12 days</text:p>
          </table:table-cell>
          <table:table-cell table:style-name="Default" table:number-columns-repeated="16382"/>
        </table:table-row>
        <table:table-row table:style-name="ro15">
          <table:table-cell table:style-name="ce42" office:value-type="string" calcext:value-type="string">
            <text:p>Family: BEAN, EDAMAME (Glycine max)</text:p>
            <text:p>Variety: Chiba Green</text:p>
            <text:p>Original Seed Source:  Botanical Interests</text:p>
            <text:p>Comments: Direct sow outdoors  1-2 weeks after last frost; 4” apart and 1” deep; rows or basins. Large dark green pods with high percentage of three bean pods. Shell and add to pasta or stir fries. Cholesterol free soybeans that are rich in protein. 60-70 days. Above</text:p>
            <text:p>90 F, beans don’t form.</text:p>
          </table:table-cell>
          <table:table-cell table:style-name="ce42" office:value-type="string" calcext:value-type="string">
            <text:p>2022</text:p>
            <text:p>EDIBLE</text:p>
            <text:p>Warm Season</text:p>
            <text:p>6 Seeds</text:p>
            <text:p>Easy Seed Saver</text:p>
            <text:p>Germination: 10 days</text:p>
          </table:table-cell>
          <table:table-cell table:style-name="Default" table:number-columns-repeated="16382"/>
        </table:table-row>
        <table:table-row table:style-name="ro15">
          <table:table-cell office:value-type="string" calcext:value-type="string">
            <text:p>Family: FAVA BEAN (Vicia faba)</text:p>
            <text:p>Variety: Windsor</text:p>
            <text:p>Seed Source: Botanical Interests</text:p>
            <text:p>Comments: Cold tolerant—great nitrogen fixing cover crop during winter months.  Pods 5-6 inches, 70 days, direct sow 1 1/2 inches deep, 4-6 inches apart. Can grow to 4 feet tall—you will need to stake the plants. Eat fresh or dried.</text:p>
          </table:table-cell>
          <table:table-cell office:value-type="string" calcext:value-type="string">
            <text:p>2022</text:p>
            <text:p>EDIBLE</text:p>
            <text:p>Warm Season</text:p>
            <text:p>5-6 Seeds</text:p>
            <text:p>Easy Seed Saver</text:p>
            <text:p>Germination: 6-7 days</text:p>
          </table:table-cell>
          <table:table-cell table:style-name="Default" table:number-columns-repeated="16382"/>
        </table:table-row>
        <table:table-row table:style-name="ro15">
          <table:table-cell table:style-name="ce42" office:value-type="string" calcext:value-type="string">
            <text:p>Family:  BEAN, GARBANZO (Cicer arietinum)</text:p>
            <text:p>Variety: CHICKPEA</text:p>
            <text:p>Comments: Sow 1 1/2-2” deep about 6” apart directly in the ground in full sun about the date of average last frost or slightly earlier. Can be planted inside several weeks earlier. Grows about 18” tall. Harvest in about 100 days for dry chickpeas.</text:p>
            <text:p>Soil Temp:  Range: 65-80 degrees</text:p>
          </table:table-cell>
          <table:table-cell table:style-name="ce42" office:value-type="string" calcext:value-type="string">
            <text:p>2017</text:p>
            <text:p>EDIBLE</text:p>
            <text:p>Cool Season</text:p>
            <text:p>15+ Seeds</text:p>
            <text:p>Easy Seed Saver</text:p>
          </table:table-cell>
          <table:table-cell table:style-name="Default" table:number-columns-repeated="16382"/>
        </table:table-row>
        <table:table-row table:style-name="ro15">
          <table:table-cell office:value-type="string" calcext:value-type="string">
            <text:p>Family: HALF-RUNNER BEAN (Phaseolus coccineus)</text:p>
            <text:p>Variety: Bolita (original variety brought by Spanish to New Mexico)</text:p>
            <text:p>Original Seed Source: Baker Creek Heirloom Seeds</text:p>
            <text:p>www.rareseeds.com Comments: Early producing vines.  As dry bean, better than Pinto, cooks fast with creamy texture.  Can be eaten as snap bean. Direct sow 1- 2” deep, 6” apart after last frost in full sun. Must trellis. Keep snaps</text:p>
            <text:p>picked or let pods dry on vine for dry bean.  This small, creamy tan bean is the tastiest part of several centuries of New Mexico history.</text:p>
            <text:p>Soil Temp Range: 60°-95° Optimum: 80°</text:p>
          </table:table-cell>
          <table:table-cell office:value-type="string" calcext:value-type="string">
            <text:p>2018</text:p>
            <text:p>EDIBLE</text:p>
            <text:p>Warm Season</text:p>
            <text:p>10+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BEAN, LIMA (Phaseolus lunatus)</text:p>
            <text:p>Variety: Christmas Pole (Heirloom)</text:p>
            <text:p>Original Seed Source: Baker Creek Heirloom Seeds</text:p>
            <text:p>Comments: Direct sow outdoors after last frost; 6” apart and 1” deep; full sun; trellis.  Presoaking 1-2 hours speeds germination.  Limas love it warm but won’t thrive in extreme heat.  Beans will rot if soil is cold or very wet. These are very large white beans with beautiful dark red splashes.</text:p>
            <text:p>Soil Temp Range: 60°-95° Optimum: 80°</text:p>
          </table:table-cell>
          <table:table-cell table:style-name="ce42" office:value-type="string" calcext:value-type="string">
            <text:p>2018</text:p>
            <text:p>EDIBLE</text:p>
            <text:p>Warm Season</text:p>
            <text:p>5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BEAN, LIMA (Phaseolus lunatus)</text:p>
            <text:p>Variety: Hopi Yellow</text:p>
            <text:p>Grown by:  Native Seed/SEARCH  www.nativeseeds.org</text:p>
            <text:p>Comments: Direct sow outdoors after last frost; 6” apart and 1” deep; rows or basins; trellis.  Beans are shades of orange with black mottling. Eaten green, dried and sprouted or dried. Tolerant of salt and alkaline soils.</text:p>
            <text:p>Soil Temp Range: 60°-95° Optimum: 80°</text:p>
          </table:table-cell>
          <table:table-cell office:value-type="string" calcext:value-type="string">
            <text:p>2020</text:p>
            <text:p>EDIBLE</text:p>
            <text:p>Warm Season</text:p>
            <text:p>7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BEAN, LIMA (Phaseolus lunatus)</text:p>
            <text:p>Variety: Pima Beige</text:p>
            <text:p>Grown by:  Native Seed/SEARCH  www.nativeseeds.org Original Seed Source: collected from Gila River Indian Community in Arizona</text:p>
            <text:p>Comments: Direct sow outdoors after last frost; 6” apart and 1” deep; rows or basins; trellis.  Broad, flat beans eaten green or dried. Tolerant of salt and alkaline soils.</text:p>
            <text:p>Soil Temp Range: 60°-95° Optimum: 80°</text:p>
          </table:table-cell>
          <table:table-cell table:style-name="ce42" office:value-type="string" calcext:value-type="string">
            <text:p>2017</text:p>
            <text:p>EDIBLE</text:p>
            <text:p>Warm Season</text:p>
            <text:p>5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RUNNER BEAN (Phaseolus coccineus)</text:p>
            <text:p>Variety: Black Coat (Heirloom dating to 1600’s)</text:p>
            <text:p>Original Seed Source: Baker Creek Heirloom Seeds www.rareseeds.com</text:p>
            <text:p>Comments: Produce 3-4” pods that can be eaten as snap bean or as a dry bean. Direct sow 2 weeks before last frost 1-2” deep, 6” apart, full sun. Must trellis. Keep snaps well picked; production slows as seeds mature.  Gorgeous blooms of tangerine to cherry red that hummingbirds love! Mature beans change from pink to purple to ebony.  Fantastic used</text:p>
            <text:p>like a kidney bean.  Creamy texture.</text:p>
            <text:p>Soil Temp Range: 60°-95° Optimum: 80°</text:p>
          </table:table-cell>
          <table:table-cell office:value-type="string" calcext:value-type="string">
            <text:p>2018</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RUNNER BEAN (Phaseolus coccineus)</text:p>
            <text:p>Variety: Scarlet Emporer</text:p>
            <text:p>Original Seed Source: Botanical Interest, Inc</text:p>
            <text:p>Comments: Showy RED flowers produce 6-8” pods that can be eaten as a green bean (75 days to harvest) or as a dry bean. Direct sow 2 weeks before last frost 1-3” deep, 4-6” apart. Must trellis. Soil Temp Range: 60°-95° Optimum: 80°</text:p>
          </table:table-cell>
          <table:table-cell table:style-name="ce42" office:value-type="string" calcext:value-type="string">
            <text:p>2018</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RUNNER BEAN (Phaseolus coccineus)</text:p>
            <text:p>Variety: Sunset (with lovely peach blossoms)</text:p>
            <text:p>Original Seed Source: Baker Creek Heirloom Seeds www.rareseeds.com</text:p>
            <text:p>Comments: produce 6-8” pods that can be eaten as a snap bean (75 days to harvest) or as a dry bean. Soak 1-2 hours before planting to aid germination. Direct sow after last frost 1-2” deep, 6” apart, full sun. Must trellis.  Keep snaps well</text:p>
            <text:p>picked; production slows as seeds mature.</text:p>
            <text:p>Soil Temp Range: 60°-95° Optimum: 80°</text:p>
          </table:table-cell>
          <table:table-cell office:value-type="string" calcext:value-type="string">
            <text:p>2018</text:p>
            <text:p>EDIBLE</text:p>
            <text:p>Cool Season in the Desert</text:p>
            <text:p>10+ Seeds</text:p>
            <text:p>Easy Seed Saver</text:p>
            <text:p>Germination: 6-7 days</text:p>
            <text:p>@ 80 degrees</text:p>
          </table:table-cell>
          <table:table-cell table:style-name="Default" table:number-columns-repeated="16382"/>
        </table:table-row>
        <table:table-row table:style-name="ro15">
          <table:table-cell table:style-name="ce42" office:value-type="string" calcext:value-type="string">
            <text:p>Family: BEAN, RUNNER (Phaseolus coccineus)</text:p>
            <text:p>Variety: Tarahumara Bordal</text:p>
            <text:p>Original Seed Source: Native Seed/SEARCH</text:p>
            <text:p>Comments: Showy flowers produce 6-8” pods that can be eaten as a green bean or dry bean. Large white beans. Direct sow 1” deep, 6” apart after frost danger. May  bush or vine. Flower may drop if too hot. Varieties will cross.</text:p>
            <text:p>Soil Temp Range: 60°-95° Optimum: 80°</text:p>
          </table:table-cell>
          <table:table-cell table:style-name="ce42" office:value-type="string" calcext:value-type="string">
            <text:p>2017</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5">
          <table:table-cell office:value-type="string" calcext:value-type="string">
            <text:p>Family:  BEAN, TEPARY (Phaseolus acutifolius)</text:p>
            <text:p>Variety: Blue Speckled</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TEPARY BEAN (Phaseolus acutifolius)</text:p>
            <text:p>Variety: Brown</text:p>
            <text:p>Comments: Pole Bean, used as dry bean; tolerate heat, drought, and alkaline soils; plant at monsoon time 1/2” deep 4” apart; do not tolerate overwatering; do not plant with other beans (potential bean mosaic virus); harvest as pods and let dry thoroughly.</text:p>
          </table:table-cell>
          <table:table-cell table:style-name="ce42" office:value-type="string" calcext:value-type="string">
            <text:p>2022</text:p>
            <text:p>EDIBLE</text:p>
            <text:p>Warm Season</text:p>
            <text:p>12 Seeds</text:p>
            <text:p>Easy Seed Saver</text:p>
          </table:table-cell>
          <table:table-cell table:style-name="Default" table:number-columns-repeated="16382"/>
        </table:table-row>
        <table:table-row table:style-name="ro15">
          <table:table-cell office:value-type="string" calcext:value-type="string">
            <text:p>Family:  TEPARY BEAN (Phaseolus acutifolius)</text:p>
            <text:p>Variety: S-CHUUK Bavi (Black)</text:p>
            <text:p>Grown By: Ramona Farms</text:p>
            <text:p>Where Grown: Gila Indian Reservation, AZ</text:p>
            <text:p>Comments: Pole Bean, used as dry bean; tolerate heat, drought, and alkaline soils; plant at monsoon time 1/2”</text:p>
            <text:p>deep 4” apart; do not tolerate overwatering; do not plant with other beans (potential bean mosaic virus); harvest as</text:p>
          </table:table-cell>
          <table:table-cell office:value-type="string" calcext:value-type="string">
            <text:p>2022</text:p>
            <text:p>EDIBLE</text:p>
            <text:p>Warm Season</text:p>
            <text:p>105 Seeds</text:p>
            <text:p>Easy Seed Saver</text:p>
          </table:table-cell>
          <table:table-cell table:style-name="Default" table:number-columns-repeated="16382"/>
        </table:table-row>
        <table:table-row table:style-name="ro15">
          <table:table-cell table:style-name="ce42" office:value-type="string" calcext:value-type="string">
            <text:p>Family:  TEPARY BEAN (Phaseolus acutifolius)</text:p>
            <text:p>Variety: Pinacate</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table:style-name="ce42" office:value-type="string" calcext:value-type="string">
            <text:p>2016</text:p>
            <text:p>EDIBLE</text:p>
            <text:p>Warm Season</text:p>
            <text:p>10 Seeds</text:p>
            <text:p>Easy Seed Saver</text:p>
          </table:table-cell>
          <table:table-cell table:style-name="Default" table:number-columns-repeated="16382"/>
        </table:table-row>
        <table:table-row table:style-name="ro15">
          <table:table-cell office:value-type="string" calcext:value-type="string">
            <text:p>Family:  TEPARY BEAN (Phaseolus acutifolius)</text:p>
            <text:p>Variety: S-OAM Bavi (Brown)</text:p>
            <text:p>Grown By: Ramona Farms</text:p>
            <text:p>Where Grown: Gila Indian Reservation, AZ</text:p>
            <text:p>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8</text:p>
            <text:p>EDIBLE</text:p>
            <text:p>Warm Season</text:p>
            <text:p>20 Seeds</text:p>
            <text:p>Easy Seed Saver</text:p>
          </table:table-cell>
          <table:table-cell table:style-name="Default" table:number-columns-repeated="16382"/>
        </table:table-row>
        <table:table-row table:style-name="ro15">
          <table:table-cell table:style-name="ce42" office:value-type="string" calcext:value-type="string">
            <text:p>Family:  TEPARY BEAN (Phaseolus acutifolius) Variety: San Pedro Wild Tepary (latifolius) Grown By: Andy Ward</text:p>
            <text:p>Where Grown: Hereford, AZ</text:p>
            <text:p>Original Seed Source: locally harvested wild Comments: Pole bean; used as dry bean; tolerates heat, drought, and alkaline soils; plant at monsoon time 1/2” deep 4” apart; does not tolerate overwatering; do not plant with other beans. Harvested wild by Andy; certified by NS/S.  More difficult to cultivate than domestics; try this piece of AZ ag history &amp; wild plant conservation.  Scarify lightly before</text:p>
            <text:p>planting.</text:p>
          </table:table-cell>
          <table:table-cell table:style-name="ce42" office:value-type="string" calcext:value-type="string">
            <text:p>2016</text:p>
            <text:p>EDIBLE</text:p>
            <text:p>Warm Season</text:p>
            <text:p>15 Seeds</text:p>
            <text:p>Advanced Seed Saver</text:p>
          </table:table-cell>
          <table:table-cell table:style-name="Default" table:number-columns-repeated="16382"/>
        </table:table-row>
        <table:table-row table:style-name="ro15">
          <table:table-cell office:value-type="string" calcext:value-type="string">
            <text:p>Family:  BEAN, TEPARY (Phaseolus acutifolius)</text:p>
            <text:p>Variety: Sycamore Canyon Wild</text:p>
            <text:p>Grown By: Native Seed/SEARCH Farm Where Grown: Sycamore Cayon, AZ Original Seed Source: www.nativeseeds.org</text:p>
            <text:p>Comments: Pole or bush bean; used as dry bean; tolerate heat, drought, and alkaline soils. Scarify before planting by lightly sanding. Plant at monsoon time 1/2” deep 4” apart; keep moist until germination but do not tolerate overwatering.</text:p>
            <text:p>Harvest as pods brown/let dry thoroughly.</text:p>
          </table:table-cell>
          <table:table-cell office:value-type="string" calcext:value-type="string">
            <text:p>2020</text:p>
            <text:p>EDIBLE</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BEAN, TEPARY (Phaseolus acutifolius)</text:p>
            <text:p>Variety: Tohono O’odham Brown</text:p>
            <text:p>Grown By: Native Seed/SEARCH Farm</text:p>
            <text:p>Where Grown: Patagonia, AZ</text:p>
            <text:p>Original Seed Source: www.nativeseeds.org Comments: Pole or bush bean; used as dry bean; tolerate heat, drought, and alkaline soils; plant at monsoon time 1/2” deep 4” apart; do not tolerate overwatering; do not plant with other beans (potential bean mosaic virus); harvest as pods</text:p>
            <text:p>brown/let dry thoroughly.</text:p>
          </table:table-cell>
          <table:table-cell table:style-name="ce42" office:value-type="string" calcext:value-type="string">
            <text:p>2019</text:p>
            <text:p>EDIBLE</text:p>
            <text:p>Warm Season</text:p>
            <text:p>10 Seeds</text:p>
            <text:p>Easy Seed Saver</text:p>
          </table:table-cell>
          <table:table-cell table:style-name="Default" table:number-columns-repeated="16382"/>
        </table:table-row>
        <table:table-row table:style-name="ro15">
          <table:table-cell office:value-type="string" calcext:value-type="string">
            <text:p>Family:  TEPARY BEAN (Phaseolus acutifolius)</text:p>
            <text:p>Variety: S-TOTOAH Bavi (White)</text:p>
            <text:p>Grown By: Ramona Farms</text:p>
            <text:p>Where Grown: Gila Indian Reservation, AZ</text:p>
            <text:p>Comments: Pole Bean, used as dry bean; tolerate heat, drought, and alkaline soils; plant at monsoon time 1/2” deep 4” apart; does not tolerate overwatering; do not plant with other beans (potential bean mosaic virus); harvest as pods brown/let</text:p>
            <text:p>dry thoroughly.</text:p>
          </table:table-cell>
          <table:table-cell office:value-type="string" calcext:value-type="string">
            <text:p>2018</text:p>
            <text:p>EDIBLE</text:p>
            <text:p>Warm Season</text:p>
            <text:p>15-20 Seeds</text:p>
            <text:p>Easy Seed Saver</text:p>
          </table:table-cell>
          <table:table-cell table:style-name="Default" table:number-columns-repeated="16382"/>
        </table:table-row>
        <table:table-row table:style-name="ro15">
          <table:table-cell table:style-name="ce42" office:value-type="string" calcext:value-type="string">
            <text:p>Family:  BEAN, TEPARY (Phaseolus acutifolius)</text:p>
            <text:p>Variety: Yellow</text:p>
            <text:p>Grown By: Native Seed/SEARCH Farm</text:p>
            <text:p>Original Seed Source: www.nativeseeds.org Comments: Pole or bush bean; used as dry bean; tolerate heat, drought, and alkaline soils; plant at monsoon time 1/2” deep 4” apart; do not tolerate overwatering; do not plant with other beans (potential bean mosaic virus); harvest as pods</text:p>
            <text:p>brown/let dry thoroughly.</text:p>
          </table:table-cell>
          <table:table-cell table:style-name="ce42" office:value-type="string" calcext:value-type="string">
            <text:p>2019</text:p>
            <text:p>EDIBLE</text:p>
            <text:p>Warm Season</text:p>
            <text:p>10 Seeds</text:p>
            <text:p>Easy Seed Saver</text:p>
          </table:table-cell>
          <table:table-cell table:style-name="Default" table:number-columns-repeated="16382"/>
        </table:table-row>
        <table:table-row table:style-name="ro15">
          <table:table-cell office:value-type="string" calcext:value-type="string">
            <text:p>Family:  BEAN, TEPARY (Phaseolus acutifolius)</text:p>
            <text:p>Variety: Colonia Morelos, Speckled</text:p>
            <text:p>Grown By: Andy Ward</text:p>
            <text:p>Where Grown: Sierra Vist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5+ Seeds</text:p>
            <text:p>Easy Seed Saver</text:p>
          </table:table-cell>
          <table:table-cell table:style-name="Default" table:number-columns-repeated="16382"/>
        </table:table-row>
        <table:table-row table:style-name="ro15">
          <table:table-cell table:style-name="ce42" office:value-type="string" calcext:value-type="string">
            <text:p>Family:  BEAN, YARDLONG (Vigna unguiculate</text:p>
            <text:p>Sesquipedalis) Variety: Orient Wonder  Original Seed Source: Botanical Interests </text:p>
            <text:p>Comments: 18” pods. This is a tender bean for </text:p>
            <text:p>stir fry, do not overcook. LONG vines; trellis at </text:p>
            <text:p>least 8 feet! Plant in warm soil 1” deep, 4-6 inches </text:p>
            <text:p>apart in full sun; keep pods picked to encourage </text:p>
            <text:p>production. Pods are stringless.</text:p>
          </table:table-cell>
          <table:table-cell table:style-name="ce42" office:value-type="string" calcext:value-type="string">
            <text:p>2018</text:p>
            <text:p>EDIBLE</text:p>
            <text:p>Warm Season</text:p>
            <text:p>5 Seeds</text:p>
            <text:p>Easy Seed Saver</text:p>
          </table:table-cell>
          <table:table-cell table:style-name="Default" table:number-columns-repeated="16382"/>
        </table:table-row>
        <table:table-row table:style-name="ro15">
          <table:table-cell office:value-type="string" calcext:value-type="string">
            <text:p>Variety: Chinese Red Noodle</text:p>
            <text:p>Original Seed Source: Baker Creek Heirloom Seeds—www.rareseeds.com</text:p>
            <text:p>Comments: Deep red 18” pods keep most of their color when sautéed.  This is a tender bean for stir fry (not boiled); do not overcook.  LONG vines; trellis at least 8 feet!  Plant in warm soil 1” deep, 4-6 inches apart in full sun; keep pods</text:p>
            <text:p>picked to encourage production.  Pods are stringless.</text:p>
          </table:table-cell>
          <table:table-cell/>
          <table:table-cell table:style-name="Default" table:number-columns-repeated="16382"/>
        </table:table-row>
        <table:table-row table:style-name="ro15">
          <table:table-cell table:style-name="ce42" office:value-type="string" calcext:value-type="string">
            <text:p>Family:  BEAN, YARDLONG (Vigna unguiculate)</text:p>
            <text:p>Variety: Orient Wonder</text:p>
            <text:p>Original Seed Source: Botanical Interests</text:p>
            <text:p>Comments: 18” pods.  This is a tender bean for stir fry, do not overcook.  LONG vines; trellis at least 8 feet!  Plant in warm soil 1” deep, 4-6 inches apart in full sun; keep pods picked to encourage production.  Pods are stringless.</text:p>
          </table:table-cell>
          <table:table-cell table:style-name="ce42" office:value-type="string" calcext:value-type="string">
            <text:p>2021</text:p>
            <text:p>EDIBLE</text:p>
            <text:p>Warm Season</text:p>
            <text:p>5 Seeds</text:p>
            <text:p>Easy Seed Saver</text:p>
          </table:table-cell>
          <table:table-cell table:style-name="Default" table:number-columns-repeated="16382"/>
        </table:table-row>
        <table:table-row table:style-name="ro15">
          <table:table-cell office:value-type="string" calcext:value-type="string">
            <text:p>Family: BEET (Beta vulgaris)</text:p>
            <text:p>Variety: Albino</text:p>
            <text:p>Original Seed Source: Baker Creek Heirloom Seeds  www.rareseeds.com</text:p>
            <text:p>Comments: Super sweet, pure white heirloom from Holland; sow in ground 2-4 weeks before last frost 1/2 inch deep; 4-6 inches apart; thin to 1 plant every 4 inches; keep soil evenly moist; will cross with other beets or Swiss Chard;</text:p>
            <text:p>greens are good to eat.</text:p>
            <text:p>Soil Temp Range: 40°-95° Optimum: 85°</text:p>
          </table:table-cell>
          <table:table-cell office:value-type="string" calcext:value-type="string">
            <text:p>2018</text:p>
            <text:p>EDIBLE</text:p>
            <text:p>Cool Season</text:p>
            <text:p>20+ Seeds</text:p>
            <text:p>Advanced Seed Saver</text:p>
            <text:p>Germination: 5-7 days</text:p>
            <text:p>@ 85 degrees</text:p>
          </table:table-cell>
          <table:table-cell table:style-name="Default" table:number-columns-repeated="16382"/>
        </table:table-row>
        <table:table-row table:style-name="ro15">
          <table:table-cell table:style-name="ce42" office:value-type="string" calcext:value-type="string">
            <text:p>Family:  BEET (Beta vulgaris)</text:p>
            <text:p>Variety: Avalanche</text:p>
            <text:p>Original Seed Source: Botanical Interests</text:p>
            <text:p>Comments: Sweet, creamy white beet with mild flavor. Direct sow outside early spring or fall. Plant 1/2” deep, 4” apart, in rows 12” apart. Full Sun; 60 days. Fruit matures to 3” diameter.</text:p>
          </table:table-cell>
          <table:table-cell table:style-name="ce42" office:value-type="string" calcext:value-type="string">
            <text:p>2022</text:p>
            <text:p>EDIBLE</text:p>
            <text:p>Cool Season</text:p>
            <text:p>7 Seeds</text:p>
            <text:p>Intermediate Seed Saver</text:p>
            <text:p>Germination: 5-6 days</text:p>
          </table:table-cell>
          <table:table-cell table:style-name="Default" table:number-columns-repeated="16382"/>
        </table:table-row>
        <table:table-row table:style-name="ro15">
          <table:table-cell office:value-type="string" calcext:value-type="string">
            <text:p>Family: BEET (Beta vulgaris)</text:p>
            <text:p>Variety: Chioggia Guardsmark</text:p>
            <text:p>Original Seed Source: Johnny’s Seeds Comments: Italian heirloom, alternating red/white concentric rings remain when cooked; sweet, raw/boiled/baked/pickled; sow in ground 1/2 in deep 3-4 seeds per in. Thin to 2 in apart. Will cross with other beets or Swiss Chard.</text:p>
            <text:p>Soil Temp Range: 40°-95° Optimum: 85°</text:p>
          </table:table-cell>
          <table:table-cell office:value-type="string" calcext:value-type="string">
            <text:p>2018</text:p>
            <text:p>EDIBLE</text:p>
            <text:p>Cool Season</text:p>
            <text:p>20—25 Seeds</text:p>
            <text:p>Intermediate Seed Saver</text:p>
            <text:p>Germination: 5-7 days</text:p>
            <text:p>@ 85 degrees</text:p>
          </table:table-cell>
          <table:table-cell table:style-name="Default" table:number-columns-repeated="16382"/>
        </table:table-row>
        <table:table-row table:style-name="ro15">
          <table:table-cell table:style-name="ce42" office:value-type="string" calcext:value-type="string">
            <text:p>Family: BEET (Beta vulgaris)</text:p>
            <text:p>Variety: Chioggia</text:p>
            <text:p>Original Seed Source: Botanical Interests</text:p>
            <text:p>Comments: Italian heirloom, alternating red/white concentric rings remain when cooked; sweet boiled/baked/pickled. Sow 1/2” in ground  4 inches apart. 55 days. Will cross with other beets or Swiss Chard.</text:p>
          </table:table-cell>
          <table:table-cell table:style-name="ce42" office:value-type="string" calcext:value-type="string">
            <text:p>2023</text:p>
            <text:p>EDIBLE</text:p>
            <text:p>Cool Season</text:p>
            <text:p>10 Seeds</text:p>
            <text:p>Intermediate Seed Saver</text:p>
            <text:p>Germination: 5-21 days</text:p>
          </table:table-cell>
          <table:table-cell table:style-name="Default" table:number-columns-repeated="16382"/>
        </table:table-row>
        <table:table-row table:style-name="ro15">
          <table:table-cell office:value-type="string" calcext:value-type="string">
            <text:p>Family: BEET (Beta vulgaris)</text:p>
            <text:p>Variety: Crosby’s Egyptian</text:p>
            <text:p>Original Seed Source: Baker Creek Heirloom Seeds  www.rareseeds.com</text:p>
            <text:p>Comments: Red beet brought to U.S. in 1869.  Sow in ground 2-4 weeks before last frost 1/2 inch deep; 4-6 inches apart; full sun; thin to 1 plant every 4 inches; keep soil evenly moist; will cross with other beets or Swiss Chard; greens are</text:p>
            <text:p>good to eat.  Sow again in fall for late crop.r</text:p>
            <text:p>Soil Temp Range: 40°-95° Optimum: 85°</text:p>
          </table:table-cell>
          <table:table-cell office:value-type="string" calcext:value-type="string">
            <text:p>2018</text:p>
            <text:p>EDIBLE</text:p>
            <text:p>Cool Season</text:p>
            <text:p>20+ Seeds</text:p>
            <text:p>Advanced Seed Saver</text:p>
            <text:p>Germination: 5-7 days</text:p>
            <text:p>@ 85 degrees</text:p>
          </table:table-cell>
          <table:table-cell table:style-name="Default" table:number-columns-repeated="16382"/>
        </table:table-row>
        <table:table-row table:style-name="ro15">
          <table:table-cell table:style-name="ce42" office:value-type="string" calcext:value-type="string">
            <text:p>Family:  BEET (Beta vulgaris)</text:p>
            <text:p>Variety: Detroit Dark Red</text:p>
            <text:p>Seed Source: Ferry Morse Organic</text:p>
            <text:p>Comments: Direct sow outside early spring or fall. Plant 1/2” deep, 4” apart, in rows 12” apart. Full Sun; 60 days. Fruit matures to 3” diameter; deep red and sweet; great for canning and pickling.</text:p>
          </table:table-cell>
          <table:table-cell table:style-name="ce42" office:value-type="string" calcext:value-type="string">
            <text:p>2024</text:p>
            <text:p>EDIBLE</text:p>
            <text:p>Cool Season</text:p>
            <text:p>25-30 Seeds</text:p>
            <text:p>Intermediate Seed Saver</text:p>
            <text:p>Germination: 5-6 days</text:p>
          </table:table-cell>
          <table:table-cell table:style-name="Default" table:number-columns-repeated="16382"/>
        </table:table-row>
        <table:table-row table:style-name="ro15">
          <table:table-cell office:value-type="string" calcext:value-type="string">
            <text:p>Family:  BEET (Beta vulgaris)</text:p>
            <text:p>Variety: Early Wonder</text:p>
            <text:p>Comments: Direct sow outside early spring or fall. Plant 1/4”-1/2” deep, 3” apart, in rows 12” apart. Full Sun; 60 days. Fruit matures to 3” diameter; deep red and sweet; great for canning.</text:p>
            <text:p>Soil Temp Range: 40– 95 Optimum: 85°</text:p>
          </table:table-cell>
          <table:table-cell office:value-type="string" calcext:value-type="string">
            <text:p>2020</text:p>
            <text:p>EDIBLE</text:p>
            <text:p>Cool Season</text:p>
            <text:p>25 Seeds</text:p>
            <text:p>Intermediate Seed Saver</text:p>
            <text:p>Germination: 5-6 days</text:p>
            <text:p>@ 85 degrees</text:p>
          </table:table-cell>
          <table:table-cell table:style-name="Default" table:number-columns-repeated="16382"/>
        </table:table-row>
        <table:table-row table:style-name="ro15">
          <table:table-cell table:style-name="ce42" office:value-type="string" calcext:value-type="string">
            <text:p>Family: BEET (Beta vulgaris)</text:p>
            <text:p>Variety: Golden Boy</text:p>
            <text:p>Original Seed Source: Botanical Interests</text:p>
            <text:p>Comments: Golden-orange meat, sweet raw or cooked; sow in ground 2-4 weeks before last frost 1/2 inch</text:p>
            <text:p>deep; 4-6 inches apart; thin to 1 plant every 4 inches; will cross with other beets or Swiss Chard; good for pickling; 55 days.</text:p>
            <text:p>Won’t “bleed” like red beets; greens are good to eat.</text:p>
          </table:table-cell>
          <table:table-cell table:style-name="ce42" office:value-type="string" calcext:value-type="string">
            <text:p>2024</text:p>
            <text:p>EDIBLE</text:p>
            <text:p>Cool Season</text:p>
            <text:p>15-20 Seeds</text:p>
            <text:p>Advanced Seed Saver</text:p>
            <text:p>Germination: 5-7 days</text:p>
          </table:table-cell>
          <table:table-cell table:style-name="Default" table:number-columns-repeated="16382"/>
        </table:table-row>
        <table:table-row table:style-name="ro15">
          <table:table-cell office:value-type="string" calcext:value-type="string">
            <text:p>Family:  BEET (Beta vulgaris)</text:p>
            <text:p>Variety: Gourmet Blend</text:p>
            <text:p>Original Seed Source: Botanical Interests</text:p>
            <text:p>Comments: Direct sow outside early spring or fall. Plant 1/4”-1/2” deep, 3” apart, in rows 12” apart. Full Sun; 60 days. Fruit matures to 3” diameter. Blend includes Detroit Dark Red with deep red roots, Chiogga with interior rings of bright pink</text:p>
            <text:p>and white, and Golden with bright yellow flesh.</text:p>
          </table:table-cell>
          <table:table-cell office:value-type="string" calcext:value-type="string">
            <text:p>2022</text:p>
            <text:p>EDIBLE</text:p>
            <text:p>Cool Season</text:p>
            <text:p>10 Seeds</text:p>
            <text:p>Intermediate Seed Saver</text:p>
            <text:p>Germination: 5-6 days</text:p>
            <text:p>Matures 65 days</text:p>
          </table:table-cell>
          <table:table-cell table:style-name="Default" table:number-columns-repeated="16382"/>
        </table:table-row>
        <table:table-row table:style-name="ro15">
          <table:table-cell table:style-name="ce42" office:value-type="string" calcext:value-type="string">
            <text:p>Family:  BEET (Beta vulgaris)</text:p>
            <text:p>Variety: Ruby Queen</text:p>
            <text:p>Original Source: Ferry Morse</text:p>
            <text:p>Comments: Direct sow outside early spring or fall. Plant 1/2” deep, 3” apart, in rows 18” apart. Full Sun; 55 days. Fruit matures to 3” diameter; deep red and sweet; great for canning.</text:p>
          </table:table-cell>
          <table:table-cell table:style-name="ce42" office:value-type="string" calcext:value-type="string">
            <text:p>2023</text:p>
            <text:p>EDIBLE</text:p>
            <text:p>Cool Season</text:p>
            <text:p>12 Seeds</text:p>
            <text:p>Intermediate Seed Saver</text:p>
            <text:p>Germination: 10-12 days</text:p>
          </table:table-cell>
          <table:table-cell table:style-name="Default" table:number-columns-repeated="16382"/>
        </table:table-row>
        <table:table-row table:style-name="ro15">
          <table:table-cell office:value-type="string" calcext:value-type="string">
            <text:p>Family: BEET (Beta vulgaris)</text:p>
            <text:p>Variety: Touchstone Gold</text:p>
            <text:p>Original Seed Source: Johnny’s Seeds</text:p>
            <text:p>Comments: Yellow beet with red skin. Plant seeds 4” apart, 1/2 in deep, rows 12-18 in apart. Cool temperatures produce best flesh. Keep well irrigated to prevent scab. Will cross with other beets or Swiss Chard.</text:p>
          </table:table-cell>
          <table:table-cell office:value-type="string" calcext:value-type="string">
            <text:p>2018</text:p>
            <text:p>EDIBLE</text:p>
            <text:p>Cool Season</text:p>
            <text:p>10+ Seeds</text:p>
            <text:p>Intermediate Seed Saver</text:p>
            <text:p>Germination: 5-7 days</text:p>
          </table:table-cell>
          <table:table-cell table:style-name="Default" table:number-columns-repeated="16382"/>
        </table:table-row>
        <table:table-row table:style-name="ro15">
          <table:table-cell table:style-name="ce42" office:value-type="string" calcext:value-type="string">
            <text:p>Family:  BEAN, TEPARY (Phaseolus acutifolius)</text:p>
            <text:p>Variety: Black S-Chuuk Bavi</text:p>
            <text:p>Grown By:</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table:style-name="ce42" office:value-type="string" calcext:value-type="string">
            <text:p>2019</text:p>
            <text:p>EDIBLE</text:p>
            <text:p>Warm Season</text:p>
            <text:p>10 Seeds</text:p>
            <text:p>Easy Seed Saver</text:p>
          </table:table-cell>
          <table:table-cell table:style-name="Default" table:number-columns-repeated="16382"/>
        </table:table-row>
        <table:table-row table:style-name="ro15">
          <table:table-cell office:value-type="string" calcext:value-type="string">
            <text:p>Family: BROCCOLI (Brassica oleracea var.italica)</text:p>
            <text:p>Variety: Bay Meadows</text:p>
            <text:p>Original Seed Source: Johnny’s Seeds</text:p>
            <text:p>Comments: Sow 1/4” deep, 18-24” apart.  Full sun. Harvest</text:p>
            <text:p>the main head before the flowers open. Side shoots may be harvested continually.</text:p>
          </table:table-cell>
          <table:table-cell office:value-type="string" calcext:value-type="string">
            <text:p>2018</text:p>
            <text:p>EDIBLE</text:p>
            <text:p>Cool Season</text:p>
            <text:p>18+ Seeds</text:p>
            <text:p>Hybrid  Do Not Save</text:p>
            <text:p>Seeds</text:p>
          </table:table-cell>
          <table:table-cell table:style-name="Default" table:number-columns-repeated="16382"/>
        </table:table-row>
        <table:table-row table:style-name="ro15">
          <table:table-cell table:style-name="ce42" office:value-type="string" calcext:value-type="string">
            <text:p>Family: BROCCOLI (Brassica oleracea var. italica)</text:p>
            <text:p>Variety: Belstar Seed Source: Botanical Interests</text:p>
            <text:p>Comments: Sow indoors 6 weeks before first  frost, 1/8” deep. At transplant, plant 24-30” apart. 65-70 days, full sun. Handles heat stress better than most.</text:p>
          </table:table-cell>
          <table:table-cell table:style-name="ce42" office:value-type="string" calcext:value-type="string">
            <text:p>2024</text:p>
            <text:p>EDIBLE</text:p>
            <text:p>Cool Season</text:p>
            <text:p>5 Seeds</text:p>
            <text:p>Hybrid  Do Not Save</text:p>
            <text:p>Seeds</text:p>
            <text:p>Germination: 7-14 days</text:p>
          </table:table-cell>
          <table:table-cell table:style-name="Default" table:number-columns-repeated="16382"/>
        </table:table-row>
        <table:table-row table:style-name="ro15">
          <table:table-cell office:value-type="string" calcext:value-type="string">
            <text:p>Family: BROCCOLI (Brassica oleracea var italica)</text:p>
            <text:p>Variety: Burgundy</text:p>
            <text:p>Original Seed Source: Botanical Interests</text:p>
            <text:p>Comments: Sow 1/8” deep, 24-36”” apart.  68-75 days, full sun. Harvest the main head before the flowers open. Purple broccoli are known to be quite tender and flavorful.</text:p>
          </table:table-cell>
          <table:table-cell office:value-type="string" calcext:value-type="string">
            <text:p>2024</text:p>
            <text:p>EDIBLE</text:p>
            <text:p>Cool Season</text:p>
            <text:p>3 Seeds</text:p>
            <text:p>Hybrid  Do Not Save</text:p>
            <text:p>Seeds</text:p>
            <text:p>Germination: 5-17 days</text:p>
          </table:table-cell>
          <table:table-cell table:style-name="Default" table:number-columns-repeated="16382"/>
        </table:table-row>
        <table:table-row table:style-name="ro15">
          <table:table-cell table:style-name="ce42" office:value-type="string" calcext:value-type="string">
            <text:p>Family: BROCCOLI (Brassica oleracea)</text:p>
            <text:p>Variety: Calabrese</text:p>
            <text:p>Original Seed Source:</text:p>
            <text:p>www.survivalseeds4patriots.com Seed Vault</text:p>
            <text:p>Comments: Sow indoors 6 weeks before last frost, 1/4” deep. At transplant, plant 24-30” apart.  50 days, full sun</text:p>
            <text:p>Soil Temp Optimum: 85°</text:p>
          </table:table-cell>
          <table:table-cell table:style-name="ce42" office:value-type="string" calcext:value-type="string">
            <text:p>2014</text:p>
            <text:p>EDIBLE</text:p>
            <text:p>Cool Season</text:p>
            <text:p>30+ Seeds</text:p>
            <text:p>Advanced Seed Saver</text:p>
            <text:p>Germination: 4-5 days</text:p>
            <text:p>@ 85 degrees</text:p>
          </table:table-cell>
          <table:table-cell table:style-name="Default" table:number-columns-repeated="16382"/>
        </table:table-row>
        <table:table-row table:style-name="ro15">
          <table:table-cell office:value-type="string" calcext:value-type="string">
            <text:p>Family: BROCCOLI (Brassica oleracea var botrytis)</text:p>
            <text:p>Variety: Romanesco</text:p>
            <text:p>Original Seed Source: Botanical Interest</text:p>
            <text:p>Comments: Sow 1/4” deep, 24-36”” apart.  75-100 days, full sun. Harvest the main head before the flowers open.</text:p>
            <text:p>Somewhere between broccoli and cauliflower with 5”-6” heads. Cooked it has nutty flavor and texture similar to</text:p>
            <text:p>cauliflower.</text:p>
          </table:table-cell>
          <table:table-cell office:value-type="string" calcext:value-type="string">
            <text:p>2022</text:p>
            <text:p>EDIBLE</text:p>
            <text:p>Cool Season</text:p>
            <text:p>18+ Seeds</text:p>
            <text:p>Advanced Seed Saver</text:p>
            <text:p>Germination: 4-5 days</text:p>
          </table:table-cell>
          <table:table-cell table:style-name="Default" table:number-columns-repeated="16382"/>
        </table:table-row>
        <table:table-row table:style-name="ro15">
          <table:table-cell table:style-name="ce42" office:value-type="string" calcext:value-type="string">
            <text:p>Family: BROCCOLI (Brassica oleracea var botrytis)</text:p>
            <text:p>Variety: Thompson</text:p>
            <text:p>Original Seed Source: Territorial Seed Co.</text:p>
            <text:p>Comments: Sow 1/4” deep, 24-36”” apart.  70 days, full sun. Harvest the main head before the flowers open. Somewhere between broccoli and broccoli raab.</text:p>
          </table:table-cell>
          <table:table-cell table:style-name="ce42" office:value-type="string" calcext:value-type="string">
            <text:p>2015</text:p>
            <text:p>EDIBLE</text:p>
            <text:p>Cool Season</text:p>
            <text:p>5+ Seeds</text:p>
            <text:p>Advanced Seed Saver</text:p>
            <text:p>Germination: 5-17 days</text:p>
          </table:table-cell>
          <table:table-cell table:style-name="Default" table:number-columns-repeated="16382"/>
        </table:table-row>
        <table:table-row table:style-name="ro15">
          <table:table-cell office:value-type="string" calcext:value-type="string">
            <text:p>Family: BROCCOLI (Brassica oleracea)</text:p>
            <text:p>Variety: Waltham 29 Comments: Sow 1/4” deep, 18-24” apart.  50 days, full sun. Harvest the main head before the flowers open. Side shoots may be harvested continually.</text:p>
          </table:table-cell>
          <table:table-cell office:value-type="string" calcext:value-type="string">
            <text:p>2020</text:p>
            <text:p>EDIBLE</text:p>
            <text:p>Cool Season</text:p>
            <text:p>30+ Seeds</text:p>
            <text:p>Advanced Seed Saver</text:p>
            <text:p>Germination: 4-5 days</text:p>
          </table:table-cell>
          <table:table-cell table:style-name="Default" table:number-columns-repeated="16382"/>
        </table:table-row>
        <table:table-row table:style-name="ro15">
          <table:table-cell table:style-name="ce42" office:value-type="string" calcext:value-type="string">
            <text:p>Family: BROCCOLI (Brassica oleracea var. alboglabra)</text:p>
            <text:p>Variety: Chinese Broccoli Kailaan</text:p>
            <text:p>Seed Source: Botanical Interests</text:p>
            <text:p>Comments: Prefers a well drained, fertile soil high in organic matter. Sow directly in outside beds or in flats, 1/4”</text:p>
            <text:p>deep. Soil should be warm for germination and cool for growing. Prefers consistent moisture so irrigate regularly.</text:p>
          </table:table-cell>
          <table:table-cell table:style-name="ce42" office:value-type="string" calcext:value-type="string">
            <text:p>2024</text:p>
            <text:p>EDIBLE</text:p>
            <text:p>Cool Season</text:p>
            <text:p>12-15 Seeds</text:p>
            <text:p>Advanced Seed Saver</text:p>
          </table:table-cell>
          <table:table-cell table:style-name="Default" table:number-columns-repeated="16382"/>
        </table:table-row>
        <table:table-row table:style-name="ro15">
          <table:table-cell office:value-type="string" calcext:value-type="string">
            <text:p>Family: BROCCOLI (Brassica oleracea)</text:p>
            <text:p>Variety: Mini (Broccolini)</text:p>
            <text:p>Comments: Prefers a well drained, fertile soil high in organic matter. Sow directly in outside beds or in flats, 1/4” deep. Soil should be warm for germination and cool</text:p>
            <text:p>for growing. Prefers consistent moisture so irrigate regularly.</text:p>
          </table:table-cell>
          <table:table-cell office:value-type="string" calcext:value-type="string">
            <text:p>2018</text:p>
            <text:p>EDIBLE</text:p>
            <text:p>Cool Season</text:p>
            <text:p>30+ Seeds</text:p>
            <text:p>Advanced Seed Saver</text:p>
          </table:table-cell>
          <table:table-cell table:style-name="Default" table:number-columns-repeated="16382"/>
        </table:table-row>
        <table:table-row table:style-name="ro15">
          <table:table-cell table:style-name="ce42" office:value-type="string" calcext:value-type="string">
            <text:p>Family: BROCCOLI Raab (Brassica Rapa)</text:p>
            <text:p>Variety: Rapini</text:p>
            <text:p>Original Seed Source: Botanical Interests</text:p>
            <text:p>Comments: Prefers a well drained, fertile soil high in organic matter. Sow directly in outside beds or in flats, 1/4” deep. Soil should be warm for germination and cool</text:p>
            <text:p>for growing. Prefers consistent moisture so irrigate regularly. Tender shoots and edible leaves.</text:p>
          </table:table-cell>
          <table:table-cell table:style-name="ce42" office:value-type="string" calcext:value-type="string">
            <text:p>2022</text:p>
            <text:p>EDIBLE</text:p>
            <text:p>Cool Season</text:p>
            <text:p>10+ Seeds</text:p>
            <text:p>Advanced Seed Saver</text:p>
          </table:table-cell>
          <table:table-cell table:style-name="Default" table:number-columns-repeated="16382"/>
        </table:table-row>
        <table:table-row table:style-name="ro15">
          <table:table-cell office:value-type="string" calcext:value-type="string">
            <text:p>Family:   BRUSSELS SPROUTS (Brassica oleracea var. gemmifera)</text:p>
            <text:p>Variety: Long Island Improved</text:p>
            <text:p>Seed Source: Botanical Interests</text:p>
            <text:p>Comments: Sow indoors or directly into soil.  Plant 1/4” under soil surface, 24 inches between plants. Full sun. Heads will grow on main stem right above leaf. Harvest when heads are about 1-2 inches and feels firm to the touch. Mature 85-110 days.</text:p>
          </table:table-cell>
          <table:table-cell office:value-type="string" calcext:value-type="string">
            <text:p>2023</text:p>
            <text:p>EDIBLE</text:p>
            <text:p>Cool Season</text:p>
            <text:p>Various Seeds</text:p>
            <text:p>Advanced Seed Saver</text:p>
            <text:p>Germination: 5-10 days</text:p>
          </table:table-cell>
          <table:table-cell table:style-name="Default" table:number-columns-repeated="16382"/>
        </table:table-row>
        <table:table-row table:style-name="ro15">
          <table:table-cell table:style-name="ce42" office:value-type="string" calcext:value-type="string">
            <text:p>Family: Cover Crop</text:p>
            <text:p>Variety: Common Buckwheat (Fagopyrum esculentum)</text:p>
            <text:p>Original Seed Source: Botanical Interests Comments: Not a wheat but an “ancient grain” related to rhubarb. Scatter seed spring through fall in full sun when soil is above 55 degrees. Requires little water after germination.  Fast growing “smother” crop to inhibit growth of common garden weeds; easy to till into garden with shovel or rototiller; can use cut plants for mulch.  POLLINATOR ATTRACTOR; especially bees. Late summer planting gives honeybees winter food supply. Buckwheat honey is exquisite!  Plant has beautiful white flowers you can add to bouquets.  Seeds are a powerhouse of</text:p>
            <text:p>protein, fiber, &amp; minerals—low glycemic index. Easy to use as sprouts.</text:p>
          </table:table-cell>
          <table:table-cell table:style-name="ce42" office:value-type="string" calcext:value-type="string">
            <text:p>2022</text:p>
            <text:p>Edible</text:p>
            <text:p>Warm Season</text:p>
            <text:p>50+ Seeds</text:p>
            <text:p>Intermediate Seed Saver</text:p>
            <text:p>Germination: 5-6 days</text:p>
            <text:p>@ 70 degrees</text:p>
          </table:table-cell>
          <table:table-cell table:style-name="Default" table:number-columns-repeated="16382"/>
        </table:table-row>
        <table:table-row table:style-name="ro15">
          <table:table-cell office:value-type="string" calcext:value-type="string">
            <text:p>Family: CABBAGE (Brassica rapa subsp. narinosa)</text:p>
            <text:p>Variety: Bok Choy Tatsoi—Rosette</text:p>
            <text:p>Original Seed Source: Botanical Interest Comments: Quick growing, non-heading, ancient Chinese cabbage. Direct sow 1/4” under soil surface 24 inches apart. Frost and very cold tolerant. More flavorful than regular bok choy. Ready to harvest in about 45 days.</text:p>
            <text:p>Seed saving biennial from seed stalk the second year.</text:p>
          </table:table-cell>
          <table:table-cell office:value-type="string" calcext:value-type="string">
            <text:p>2023</text:p>
            <text:p>EDIBLE</text:p>
            <text:p>Cool Season</text:p>
            <text:p>6 Seeds</text:p>
            <text:p>Advanced Seed Saver</text:p>
          </table:table-cell>
          <table:table-cell table:style-name="Default" table:number-columns-repeated="16382"/>
        </table:table-row>
        <table:table-row table:style-name="ro15">
          <table:table-cell table:style-name="ce42" office:value-type="string" calcext:value-type="string">
            <text:p>Family: CABBAGE (Brassica oleracea)</text:p>
            <text:p>Variety: Brunswick</text:p>
            <text:p>Original Seed Source: GMO Free USA</text:p>
            <text:p>Comments: Sow indoors 4-6 weeks prior to desired transplant date: 4 weeks before last frost in spring or 6 weeks before first frost in fall.  Plant 1/4” deep at no more than 75 degrees F daytime; 50 degrees at night,</text:p>
            <text:p>need lots of sunlight or grow light, transplant at 2-4 true leaves 24 inches apart. Full sun.</text:p>
          </table:table-cell>
          <table:table-cell table:style-name="ce42" office:value-type="string" calcext:value-type="string">
            <text:p>2018</text:p>
            <text:p>EDIBLE</text:p>
            <text:p>Cool Season</text:p>
            <text:p>15+ Seeds</text:p>
            <text:p>Advanced Seed Saver</text:p>
            <text:p>Germination: 4-5 days</text:p>
          </table:table-cell>
          <table:table-cell table:style-name="Default" table:number-columns-repeated="16382"/>
        </table:table-row>
        <table:table-row table:style-name="ro15">
          <table:table-cell office:value-type="string" calcext:value-type="string">
            <text:p>Family: CABBAGE (Brassica rapa)</text:p>
            <text:p>Variety: Chinese — Hilton</text:p>
            <text:p>Original Seed Source: Baker Creek Heirloom Seeds</text:p>
            <text:p>www.rareseeds.com Comments: 70 day Napa-type Chinese cabbage. Great raw, stir fried, or for kimchi.  Start indoors 4-6 weeks prior to desired transplant date (4 wks before last frost in spring or 6 wks before first frost in fall). Plant 1/4” under soil surface; transplant ready when 2-4 true leaves have developed, 24 inches apart.  Thrive best in temps between 45 and 75 degrees.  Seed saving biennial from seed stalk the second year.</text:p>
            <text:p>Soil Temp Range: 45°-75° Optimum: 75°</text:p>
          </table:table-cell>
          <table:table-cell office:value-type="string" calcext:value-type="string">
            <text:p>2018</text:p>
            <text:p>EDIBLE</text:p>
            <text:p>Cool Season</text:p>
            <text:p>20+ Seeds</text:p>
            <text:p>Advanced Seed Saver</text:p>
            <text:p>Germination: 4-5 days</text:p>
            <text:p>@ 75 degrees</text:p>
          </table:table-cell>
          <table:table-cell table:style-name="Default" table:number-columns-repeated="16382"/>
        </table:table-row>
        <table:table-row table:style-name="ro15">
          <table:table-cell table:style-name="ce42" office:value-type="string" calcext:value-type="string">
            <text:p>Family: CABBAGE (Brassica rapa)</text:p>
            <text:p>Variety: Chinese — Pai Tsai</text:p>
            <text:p>Original Seed Source: Baker Creek Heirloom Seeds</text:p>
            <text:p>www.rareseeds.com Comments: Quick growing, non-heading Chinese cabbage. Flowers have a candy-sweet, nutty flavor!  Start indoors 4-6 weeks prior to desired transplant date.  Plant 1/4” under soil surface; transplant ready when 2-4 true leaves have developed. Plant 24 inches apart in cold frame or garden.  Thrive best in temps between 45 and 75 degrees.</text:p>
            <text:p>Seed saving biennial from seed stalk the second year.</text:p>
          </table:table-cell>
          <table:table-cell table:style-name="ce42" office:value-type="string" calcext:value-type="string">
            <text:p>2018</text:p>
            <text:p>EDIBLE</text:p>
            <text:p>Cool Season</text:p>
            <text:p>20+ Seeds</text:p>
            <text:p>Advanced Seed Saver</text:p>
            <text:p>Germination: 4-5 days</text:p>
            <text:p>@ 80 degrees</text:p>
          </table:table-cell>
          <table:table-cell table:style-name="Default" table:number-columns-repeated="16382"/>
        </table:table-row>
        <table:table-row table:style-name="ro15">
          <table:table-cell office:value-type="string" calcext:value-type="string">
            <text:p>Family: CABBAGE (Brassica oleracea)</text:p>
            <text:p>Variety: Copenhagen Market</text:p>
            <text:p>Comments: Sow indoors or directly into soil.  Plant 1/4” under soil surface, 18 inches between plants. Full sun. Harvest when head is about 6-8 inches and feels firm to the touch.</text:p>
            <text:p>Soil Temp Range: 40°-100°</text:p>
          </table:table-cell>
          <table:table-cell office:value-type="string" calcext:value-type="string">
            <text:p>2020</text:p>
            <text:p>EDIBLE</text:p>
            <text:p>Cool Season</text:p>
            <text:p>25+ Seeds</text:p>
            <text:p>Advanced Seed Saver</text:p>
            <text:p>Germination: 4-5 days</text:p>
          </table:table-cell>
          <table:table-cell table:style-name="Default" table:number-columns-repeated="16382"/>
        </table:table-row>
        <table:table-row table:style-name="ro15">
          <table:table-cell table:style-name="ce42" office:value-type="string" calcext:value-type="string">
            <text:p>Family: CABBAGE (Brassica rapa)</text:p>
            <text:p>Variety: Oriental—Extra Dwarf Pak Choy</text:p>
            <text:p>Original Seed Source: Baker Creek Heirloom Seeds</text:p>
            <text:p>www.rareseeds.com Comments: Tiny Pak Choy is picked at 2” tall! Apt to bolt in frosty weather or summer heat.  Direct sow in cool spring or fall conditions.  Sow no deeper than 1/4” in moist, rich, well-</text:p>
            <text:p>draining soil.  Space 6-12” apart in rows 18-24” apart.  Thrive best in temps between 45 and 75 degrees.</text:p>
            <text:p>Soil Temp Range: 45°-75° Optimum: 75°</text:p>
          </table:table-cell>
          <table:table-cell table:style-name="ce42" office:value-type="string" calcext:value-type="string">
            <text:p>2018</text:p>
            <text:p>EDIBLE</text:p>
            <text:p>Cool Season</text:p>
            <text:p>20+ Seeds</text:p>
            <text:p>Advanced Seed Saver</text:p>
            <text:p>Germination: 4-5 days</text:p>
            <text:p>@ 75 degrees</text:p>
          </table:table-cell>
          <table:table-cell table:style-name="Default" table:number-columns-repeated="16382"/>
        </table:table-row>
        <table:table-row table:style-name="ro15">
          <table:table-cell office:value-type="string" calcext:value-type="string">
            <text:p>Family: CABBAGE (Brassica oleracea)</text:p>
            <text:p>Variety: Golden Acre - Heirloom</text:p>
            <text:p>Original Seed Source:</text:p>
            <text:p>www.survivalseeds4patriots.com Seed Vault</text:p>
            <text:p>Comments: Sow indoors or directly into soil.  Plant 1/4” under soil surface, 24-30 inches between plants. Full sun.</text:p>
            <text:p>Seed saving biennial from seed stalk the second year. 65-70 days, 3 pounds</text:p>
            <text:p>Soil Temp Range: 40°-100° Optimum: 80°</text:p>
          </table:table-cell>
          <table:table-cell office:value-type="string" calcext:value-type="string">
            <text:p>2014</text:p>
            <text:p>EDIBLE</text:p>
            <text:p>Cool Season</text:p>
            <text:p>25+ Seeds</text:p>
            <text:p>Advanced Seed Saver</text:p>
            <text:p>Germination: 4-5 days</text:p>
            <text:p>@ 80 degrees</text:p>
          </table:table-cell>
          <table:table-cell table:style-name="Default" table:number-columns-repeated="16382"/>
        </table:table-row>
        <table:table-row table:style-name="ro15">
          <table:table-cell table:style-name="ce42" office:value-type="string" calcext:value-type="string">
            <text:p>Family:   CABBAGE—Napa (Brassica rapa subsp. pekinensis)</text:p>
            <text:p>Variety: One Kilo Slow Bolt</text:p>
            <text:p>Original Seed Source: Botanical Interests</text:p>
            <text:p>Comments: Sow indoors 4-6 weeks prior to desired transplant date: 4 weeks before last frost in spring or 6 weeks before first frost in fall.  Plant 1/4” deep. Needs lots of sunlight or grow light, transplant at 2-4 true leaves 24 inches apart. Full sun.</text:p>
            <text:p>Grows best at 60°-65°. Matures 50-55 days</text:p>
          </table:table-cell>
          <table:table-cell table:style-name="ce42" office:value-type="string" calcext:value-type="string">
            <text:p>2021</text:p>
            <text:p>EDIBLE</text:p>
            <text:p>Cool Season</text:p>
            <text:p>10-15 Seeds</text:p>
            <text:p>Advanced Seed Saver</text:p>
            <text:p>Germination: 4-5 days</text:p>
            <text:p>Hybrid—do not save seeds</text:p>
          </table:table-cell>
          <table:table-cell table:style-name="Default" table:number-columns-repeated="16382"/>
        </table:table-row>
        <table:table-row table:style-name="ro15">
          <table:table-cell office:value-type="string" calcext:value-type="string">
            <text:p>Family: CABBAGE (Brassica rapa)</text:p>
            <text:p>Variety: Chinese — Pai Tsai</text:p>
            <text:p>Original Seed Source: Baker Creek Heirloom Seeds</text:p>
            <text:p>www.rareseeds.com Comments: Quick growing, non-heading Chinese cabbage. Flowers have a candy-sweet, nutty flavor!  Start indoors 4-6 weeks prior to desired transplant date.  Plant 1/4” under soil surface; transplant ready when 2-4 true leaves have developed. Plant 24 inches apart in cold frame or garden.  Thrive best in temps between 45 and 75 degrees.</text:p>
            <text:p>Seed saving biennial from seed stalk the second year.</text:p>
          </table:table-cell>
          <table:table-cell office:value-type="string" calcext:value-type="string">
            <text:p>2018</text:p>
            <text:p>EDIBLE</text:p>
            <text:p>Cool Season</text:p>
            <text:p>20+ Seeds</text:p>
            <text:p>Advanced Seed Saver</text:p>
            <text:p>Germination: 4-5 days</text:p>
            <text:p>@ 80 degrees</text:p>
          </table:table-cell>
          <table:table-cell table:style-name="Default" table:number-columns-repeated="16382"/>
        </table:table-row>
        <table:table-row table:style-name="ro15">
          <table:table-cell table:style-name="ce42" office:value-type="string" calcext:value-type="string">
            <text:p>Family: CABBAGE Raddicchio (Chichorium intybus)</text:p>
            <text:p>Variety: Palla Rossa Mavrik</text:p>
            <text:p>Original Seed Source: Botanical Interest</text:p>
            <text:p>Comments: Plant seeds 1/4” deep indoors 8-10 weeks before average first fall frost then transplant about 4 weeks later 8-10 inches apart. Seeds go dormant over 77F. Great in salads.</text:p>
          </table:table-cell>
          <table:table-cell table:style-name="ce42" office:value-type="string" calcext:value-type="string">
            <text:p>2022</text:p>
            <text:p>EDIBLE</text:p>
            <text:p>Cool Season</text:p>
            <text:p>10+ Seeds</text:p>
            <text:p>Advanced Seed Saver</text:p>
            <text:p>Germination: 5-15 days</text:p>
          </table:table-cell>
          <table:table-cell table:style-name="Default" table:number-columns-repeated="16382"/>
        </table:table-row>
        <table:table-row table:style-name="ro15">
          <table:table-cell office:value-type="string" calcext:value-type="string">
            <text:p>Family: CABBAGE (Brassica oleracea)</text:p>
            <text:p>Variety: Violaceo di Verona</text:p>
            <text:p>Original Seed Source: Baker Creek Heirloom Seeds</text:p>
            <text:p>Comments: Sow indoors 4-6 weeks prior to desired transplant date. Plant 1/4” deep at no more than 75 degrees F daytime; 50 degrees at night, need lots of sunlight or grow light, transplant at 2-4 true leaves 18”-20” inches apart. Full sun. Originating in Northern Italy. Frost hardy &amp; heat tolerant.</text:p>
            <text:p>Violet wrapper leaves and yellow-green inside.</text:p>
          </table:table-cell>
          <table:table-cell office:value-type="string" calcext:value-type="string">
            <text:p>2021</text:p>
            <text:p>EDIBLE</text:p>
            <text:p>Cool Season</text:p>
            <text:p>5+ Seeds</text:p>
            <text:p>Advanced Seed Saver</text:p>
            <text:p>Germination: 7-10 days</text:p>
            <text:p>@ 75 degrees</text:p>
          </table:table-cell>
          <table:table-cell table:style-name="Default" table:number-columns-repeated="16382"/>
        </table:table-row>
        <table:table-row table:style-name="ro15">
          <table:table-cell table:style-name="ce42" office:value-type="string" calcext:value-type="string">
            <text:p>Family: CACTUS (Opuntia microdasys)</text:p>
            <text:p>Variety: Polka Dot Prickly Pear</text:p>
            <text:p>Seed Source: BJ Searcy, Master Gardener</text:p>
            <text:p>Comments: Plant in clean shallow container with well draining soil (commercial cactus soil or a mix of equal parts compost, horticulture sand and perlite). Spread seeds on top of soil and cover with a very thin layer of soil or vermiculite..</text:p>
            <text:p>Moisten lightly, cover with a transparent lid and place in direct sunlight. Keep at a steady temperature. Keep moist but not wet. Uncover when spines appear. Transplant when cactus is well</text:p>
            <text:p>established.</text:p>
          </table:table-cell>
          <table:table-cell table:style-name="ce42" office:value-type="string" calcext:value-type="string">
            <text:p>2018</text:p>
            <text:p>Decorative</text:p>
            <text:p>Warm Season</text:p>
            <text:p>10+ Seeds</text:p>
            <text:p>Easy Seed Saver</text:p>
            <text:p>Germination: 30-365 days</text:p>
          </table:table-cell>
          <table:table-cell table:style-name="Default" table:number-columns-repeated="16382"/>
        </table:table-row>
        <table:table-row table:style-name="ro15">
          <table:table-cell office:value-type="string" calcext:value-type="string">
            <text:p>Family: CANE (Saccharum officinarum)</text:p>
            <text:p>Variety: Sugar, Red Apache</text:p>
            <text:p>Comments: Sow seeds directly two weeks after last frost and soil temp is at least 60 degrees. Plant seeds 1”-1 1/2” deep, 8-10 inches apart with rows 36”-42” apart. Keep evenly moist. Flowering reduces sugar production. Cut canes before first frost and cover.</text:p>
          </table:table-cell>
          <table:table-cell office:value-type="string" calcext:value-type="string">
            <text:p>2023</text:p>
            <text:p>Warm Season Perennial</text:p>
            <text:p>10 Seeds</text:p>
            <text:p>10 days germination 12 months to Harvest</text:p>
          </table:table-cell>
          <table:table-cell table:style-name="Default" table:number-columns-repeated="16382"/>
        </table:table-row>
        <table:table-row table:style-name="ro15">
          <table:table-cell table:style-name="ce42" office:value-type="string" calcext:value-type="string">
            <text:p>Family: CANE (Saccharum officinarum)</text:p>
            <text:p>Variety: Sugar</text:p>
            <text:p>Comments: 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42" office:value-type="string" calcext:value-type="string">
            <text:p>2023</text:p>
            <text:p>Warm Season Perennial</text:p>
            <text:p>10 Seeds</text:p>
            <text:p>10 days germination 12 months to Harvest</text:p>
          </table:table-cell>
          <table:table-cell table:style-name="Default" table:number-columns-repeated="16382"/>
        </table:table-row>
        <table:table-row table:style-name="ro15">
          <table:table-cell office:value-type="string" calcext:value-type="string">
            <text:p>Family: CARROT (Daucus carota)</text:p>
            <text:p>Variety: Danvers Half Long</text:p>
            <text:p>Original Seed Source: Ferry-Morse</text:p>
            <text:p>Comments: Very uniform; heavy cropping; 7 inches long. Sow direct into rich soil high in phosphorus &amp; potassium (moderate nitrogen); harvest 70 days.  Excellent for freezing.  Seeds are biennial.</text:p>
          </table:table-cell>
          <table:table-cell office:value-type="string" calcext:value-type="string">
            <text:p>2023</text:p>
            <text:p>EDIBLE</text:p>
            <text:p>Warm Season</text:p>
            <text:p>10+ Seeds</text:p>
            <text:p>Advanced Seed Saver</text:p>
            <text:p>Germination: 4-6 days</text:p>
          </table:table-cell>
          <table:table-cell table:style-name="Default" table:number-columns-repeated="16382"/>
        </table:table-row>
        <table:table-row table:style-name="ro15">
          <table:table-cell table:style-name="ce42" office:value-type="string" calcext:value-type="string">
            <text:p>Family: CARROT (Bolero nantes)</text:p>
            <text:p>Variety: French Carrots</text:p>
            <text:p>Grown by: Holly Vennum, Mother Tree Gardens,  &amp; Master Gardener</text:p>
            <text:p>Comments: Plant 1/4” deep, thin to 2”. Harvest either as slim baby carrots or as full sized. Sweet flavored</text:p>
          </table:table-cell>
          <table:table-cell table:style-name="ce42" office:value-type="string" calcext:value-type="string">
            <text:p>2022</text:p>
            <text:p>EDIBLE</text:p>
            <text:p>Cool Season</text:p>
            <text:p>Various Seeds</text:p>
            <text:p>Advanced Seed Saver</text:p>
            <text:p>Germination: 10-21 days</text:p>
          </table:table-cell>
          <table:table-cell table:style-name="Default" table:number-columns-repeated="16382"/>
        </table:table-row>
        <table:table-row table:style-name="ro15">
          <table:table-cell office:value-type="string" calcext:value-type="string">
            <text:p>Family: CARROT (Daucus carota)</text:p>
            <text:p>Variety: Long Impersonator Comments: Plant 1/4” deep, thin to 3”. Pick when tops of roots are 3/4-1 inch in diameter.</text:p>
          </table:table-cell>
          <table:table-cell office:value-type="string" calcext:value-type="string">
            <text:p>2020</text:p>
            <text:p>EDIBLE</text:p>
            <text:p>Cool Season</text:p>
            <text:p>10+ Seeds</text:p>
            <text:p>Advanced Seed Saver</text:p>
            <text:p>Germination: 8 to 12 days</text:p>
          </table:table-cell>
          <table:table-cell table:style-name="Default" table:number-columns-repeated="16382"/>
        </table:table-row>
        <table:table-row table:style-name="ro15">
          <table:table-cell table:style-name="ce42" office:value-type="string" calcext:value-type="string">
            <text:p>Family: CARROT (Daucus carota)</text:p>
            <text:p>Variety: Petite Sweet</text:p>
            <text:p>Original Seed Source: americanseedco.com</text:p>
            <text:p>Comments: Gourmet baby carrot 3-4 inches long.  Sow direct into rich soil high in phosphorus &amp; potassium (moderate nitrogen); 3-5 seeds every inch; harvest 65 days.  Compact</text:p>
            <text:p>roots; good for canning.  Seeds are biennial.</text:p>
            <text:p>Soil Temp Range: 40°-95° Optimum: 85°</text:p>
          </table:table-cell>
          <table:table-cell table:style-name="ce42" office:value-type="string" calcext:value-type="string">
            <text:p>2016</text:p>
            <text:p>EDIBLE</text:p>
            <text:p>Warm Season</text:p>
            <text:p>50+ Seeds</text:p>
            <text:p>Advanced Seed Saver</text:p>
            <text:p>Germination: 4-6 days</text:p>
            <text:p>@ 85 degrees</text:p>
          </table:table-cell>
          <table:table-cell table:style-name="Default" table:number-columns-repeated="16382"/>
        </table:table-row>
        <table:table-row table:style-name="ro15">
          <table:table-cell office:value-type="string" calcext:value-type="string">
            <text:p>Family: CARROT (Daucus carota)</text:p>
            <text:p>Variety: Pusa Rudhira Red</text:p>
            <text:p>Original Seed Source: Baker Creek Heirloom Seeds</text:p>
            <text:p>www.rareseeds.com Comments: This variety is high in beta-carotene and lycopene.  Early sow 2-3 weeks before last spring frost. Seeds should be surface sown or minimally covered.</text:p>
            <text:p>Keep moist until seedlings are strong.  Sow in intervals until one month before fall frost.  Seeds are biennial.</text:p>
            <text:p>Soil Temp Range: 40°-95° Optimum: 85°</text:p>
          </table:table-cell>
          <table:table-cell office:value-type="string" calcext:value-type="string">
            <text:p>2018</text:p>
            <text:p>EDIBLE</text:p>
            <text:p>Warm Season</text:p>
            <text:p>20+ Seeds</text:p>
            <text:p>Advanced Seed Saver</text:p>
            <text:p>Germination: 4 to 6 days</text:p>
            <text:p>@ 85 degrees</text:p>
          </table:table-cell>
          <table:table-cell table:style-name="Default" table:number-columns-repeated="16382"/>
        </table:table-row>
        <table:table-row table:style-name="ro15">
          <table:table-cell table:style-name="ce42" office:value-type="string" calcext:value-type="string">
            <text:p>Family: CARROT (Daucus carota)</text:p>
            <text:p>Variety: Purple</text:p>
            <text:p>Comments: Plant 1/4” deep, thin to 2”. Pick when tops of roots are 3/4-1 inch in diameter. Carrots are uniform, purple, long and slender. Carrots mature all at once.</text:p>
          </table:table-cell>
          <table:table-cell table:style-name="ce42" office:value-type="string" calcext:value-type="string">
            <text:p>2021</text:p>
            <text:p>EDIBLE</text:p>
            <text:p>Cool Season</text:p>
            <text:p>10+ Seeds</text:p>
            <text:p>Hybrid Do Not Save Seeds</text:p>
            <text:p>Germination: 4 to 6 days</text:p>
          </table:table-cell>
          <table:table-cell table:style-name="Default" table:number-columns-repeated="16382"/>
        </table:table-row>
        <table:table-row table:style-name="ro15">
          <table:table-cell office:value-type="string" calcext:value-type="string">
            <text:p>Family: CARROT (Daucus carota)</text:p>
            <text:p>Variety: Red Cored Chantenay</text:p>
            <text:p>Grown By: Native Seed/SEARCH Farm</text:p>
            <text:p>Where Grown: Patagonia, AZ</text:p>
            <text:p>Original Seed Source: www.nativeseeds.org Comments: Rich soil high in phosphorus &amp; potassium (moderate nitrogen). Superior eating. Seeds are biennial.</text:p>
            <text:p>Soil Temp Range: 40°-95° Optimum: 85°</text:p>
          </table:table-cell>
          <table:table-cell office:value-type="string" calcext:value-type="string">
            <text:p>2016</text:p>
            <text:p>EDIBLE</text:p>
            <text:p>Warm Season</text:p>
            <text:p>100 Seeds</text:p>
            <text:p>Advanced Seed Saver</text:p>
            <text:p>Germination: 4 to 6 days</text:p>
            <text:p>@ 85 degrees</text:p>
          </table:table-cell>
          <table:table-cell table:style-name="Default" table:number-columns-repeated="16382"/>
        </table:table-row>
        <table:table-row table:style-name="ro15">
          <table:table-cell table:style-name="ce42" office:value-type="string" calcext:value-type="string">
            <text:p>Family: CARROT (Daucus carota)</text:p>
            <text:p>Variety: Rainbow</text:p>
            <text:p>Original Seed Source: Ferry Morse</text:p>
            <text:p>Comments: Plant 1/4” deep, thin to 2”. Pick when tops of roots are 3/4-1 inch in diameter. Carrots are uniform, long and slender in an array of yellow and orange tones. Carrots mature all at once.</text:p>
          </table:table-cell>
          <table:table-cell table:style-name="ce42" office:value-type="string" calcext:value-type="string">
            <text:p>2021</text:p>
            <text:p>EDIBLE</text:p>
            <text:p>Cool Season</text:p>
            <text:p>10+ Seeds</text:p>
            <text:p>Hybrid Do Not Save Seeds</text:p>
            <text:p>Germination: 4 to 6 days</text:p>
          </table:table-cell>
          <table:table-cell table:style-name="Default" table:number-columns-repeated="16382"/>
        </table:table-row>
        <table:table-row table:style-name="ro15">
          <table:table-cell office:value-type="string" calcext:value-type="string">
            <text:p>Family: CARROT (Daucus carota)</text:p>
            <text:p>Variety: Scarlet Nantes</text:p>
            <text:p>Original Seed Source:</text:p>
            <text:p>www.survivalseeds4patriots.com Seed Vault</text:p>
            <text:p>Comments: Sow direct into rich soil high in phosphorus &amp; Potassium (moderate nitrogen).  Seeds are biennial.</text:p>
            <text:p>Soil Temp Range: 40°-95° Optimum: 85°</text:p>
          </table:table-cell>
          <table:table-cell office:value-type="string" calcext:value-type="string">
            <text:p>2014</text:p>
            <text:p>EDIBLE</text:p>
            <text:p>Warm Season</text:p>
            <text:p>75-80 Seeds</text:p>
            <text:p>Advanced Seed Saver</text:p>
            <text:p>Germination: 4-6 days</text:p>
            <text:p>@ 85 degrees</text:p>
          </table:table-cell>
          <table:table-cell table:style-name="Default" table:number-columns-repeated="16382"/>
        </table:table-row>
        <table:table-row table:style-name="ro15">
          <table:table-cell table:style-name="ce42" office:value-type="string" calcext:value-type="string">
            <text:p>Family: CARROT (Daucus carota)</text:p>
            <text:p>Variety: Scarlet Nantes Comments: Plant 1/4” deep, thin to 2”. Pick when tops of roots are 3/4-1 inch in diameter.</text:p>
          </table:table-cell>
          <table:table-cell table:style-name="ce42" office:value-type="string" calcext:value-type="string">
            <text:p>2020</text:p>
            <text:p>EDIBLE</text:p>
            <text:p>Cool Season</text:p>
            <text:p>50+ Seeds</text:p>
            <text:p>Advanced Seed Saver</text:p>
            <text:p>Germination: 4 to 6 days</text:p>
          </table:table-cell>
          <table:table-cell table:style-name="Default" table:number-columns-repeated="16382"/>
        </table:table-row>
        <table:table-row table:style-name="ro15">
          <table:table-cell office:value-type="string" calcext:value-type="string">
            <text:p>Family: CARROT (Daucus carota)</text:p>
            <text:p>Variety: Tender Sweet Comments: Plant 1/4” deep, thin to 2”. Pick when tops of roots are 3/4-1 inch in diameter. Flavorful, 10 inch coreless carrot. Holds color when cooked.</text:p>
          </table:table-cell>
          <table:table-cell office:value-type="string" calcext:value-type="string">
            <text:p>2023</text:p>
            <text:p>EDIBLE</text:p>
            <text:p>Cool Season</text:p>
            <text:p>15+ Seeds</text:p>
            <text:p>Advanced Seed Saver</text:p>
            <text:p>Germination: 14-25 days</text:p>
          </table:table-cell>
          <table:table-cell table:style-name="Default" table:number-columns-repeated="16382"/>
        </table:table-row>
        <table:table-row table:style-name="ro15">
          <table:table-cell table:style-name="ce42" office:value-type="string" calcext:value-type="string">
            <text:p>Family: CARROT (Daucus carota)</text:p>
            <text:p>Variety: Zanahoria Tendersweet</text:p>
            <text:p>Original Seed Source: Ferry Morse</text:p>
            <text:p>Comments: Sow direct into rich soil high in phosphorus &amp; potassium (moderate nitrogen) after all danger of frost; harvest 65 days. Seeds are biennial.</text:p>
            <text:p>Soil Temp Range: 40°-95° Optimum: 85°</text:p>
          </table:table-cell>
          <table:table-cell table:style-name="ce42" office:value-type="string" calcext:value-type="string">
            <text:p>2016</text:p>
            <text:p>EDIBLE</text:p>
            <text:p>Warm Season</text:p>
            <text:p>50+ Seeds</text:p>
            <text:p>Advanced Seed Saver</text:p>
            <text:p>Germination: 4-6 days</text:p>
            <text:p>@ 85 degrees</text:p>
          </table:table-cell>
          <table:table-cell table:style-name="Default" table:number-columns-repeated="16382"/>
        </table:table-row>
        <table:table-row table:style-name="ro15">
          <table:table-cell office:value-type="string" calcext:value-type="string">
            <text:p>Family:CAULIFLOWER (Brassica oleracea var.botrytis)</text:p>
            <text:p>Variety: Romanesco Seed Source: Botanical Interests</text:p>
            <text:p>Comments: Sow 1/4” deep with 12-16” between plants. Full Sun, 80 days. Heads have spirals of  a lime green. It has a delicious nutty flavor.</text:p>
          </table:table-cell>
          <table:table-cell office:value-type="string" calcext:value-type="string">
            <text:p>2024</text:p>
            <text:p>EDIBLE</text:p>
            <text:p>Cool Season</text:p>
            <text:p>5 Seeds</text:p>
            <text:p>Advanced Seed Saver</text:p>
            <text:p>Germination: 5-7 days</text:p>
          </table:table-cell>
          <table:table-cell table:style-name="Default" table:number-columns-repeated="16382"/>
        </table:table-row>
        <table:table-row table:style-name="ro15">
          <table:table-cell table:style-name="ce42" office:value-type="string" calcext:value-type="string">
            <text:p>Family: CAULIFLOWER (Brassica oleracea)</text:p>
            <text:p>Variety: Early Snowball</text:p>
            <text:p>Original Seed Source: Botanical Interests</text:p>
            <text:p>Comments: Sow 1/4” deep with 12-16” between plants. Full Sun, 65 days. Harvest when head turns to bright white.</text:p>
          </table:table-cell>
          <table:table-cell table:style-name="ce42" office:value-type="string" calcext:value-type="string">
            <text:p>2022</text:p>
            <text:p>EDIBLE</text:p>
            <text:p>Cool Season</text:p>
            <text:p>22+ Seeds</text:p>
            <text:p>Advanced Seed Saver</text:p>
            <text:p>Germination: 8-10 days</text:p>
          </table:table-cell>
          <table:table-cell table:style-name="Default" table:number-columns-repeated="16382"/>
        </table:table-row>
        <table:table-row table:style-name="ro15">
          <table:table-cell office:value-type="string" calcext:value-type="string">
            <text:p>Family: CAULIFLOWER (Brassica oleracea)</text:p>
            <text:p>Variety: Snowball</text:p>
            <text:p>Seed Source: Ferry-Morse</text:p>
            <text:p>Comments: Sow indoors 5-7 weeks before planting outdoors in early fall. Or plant outdoors when evenings start being cool. Plant 1/4” deep with 12-16” between plants. Full Sun, 65-70 days. When heads start to form, tuck or tie leaves over the head to reduce sun exposure. Harvest when head turns</text:p>
            <text:p>to bright white and is outgrowing leaf cover.</text:p>
          </table:table-cell>
          <table:table-cell office:value-type="string" calcext:value-type="string">
            <text:p>2023</text:p>
            <text:p>EDIBLE</text:p>
            <text:p>Cool Season</text:p>
            <text:p>10 Seeds</text:p>
            <text:p>Advanced Seed Saver</text:p>
            <text:p>Germination: 5-10 days</text:p>
          </table:table-cell>
          <table:table-cell table:style-name="Default" table:number-columns-repeated="16382"/>
        </table:table-row>
        <table:table-row table:style-name="ro15">
          <table:table-cell table:style-name="ce42" office:value-type="string" calcext:value-type="string">
            <text:p>Family: CELERIAC (Apium graveolens)</text:p>
            <text:p>Variety: Giant Prague (Root Celery)</text:p>
            <text:p>Original Seed Source: Baker Creek Heirloom Seeds—www.rareseeds.com</text:p>
            <text:p>Comments: Root celery with large white roots superb for frying or in soup.  Taste is much like regular celery.  Needs mild weather. Start indoors up to 8 weeks before last frost.  Tiny seeds should be surface- sown and not covered (or covered very lightly); important:  keep uniformly moist until seedlings are strong.  Keep at 70-75 degrees to</text:p>
            <text:p>germinate.  Germination will take from 2 to 3 weeks.</text:p>
            <text:p>Soil Temp Range: 70-75° Optimum: 75°</text:p>
          </table:table-cell>
          <table:table-cell table:style-name="ce42" office:value-type="string" calcext:value-type="string">
            <text:p>2018</text:p>
            <text:p>EDIBLE</text:p>
            <text:p>Warm Season</text:p>
            <text:p>20+ Seeds</text:p>
            <text:p>Advanced Seed Saver</text:p>
            <text:p>Germination: 2-3 weeks</text:p>
            <text:p>@ 75 degrees</text:p>
          </table:table-cell>
          <table:table-cell table:style-name="Default" table:number-columns-repeated="16382"/>
        </table:table-row>
        <table:table-row table:style-name="ro15">
          <table:table-cell office:value-type="string" calcext:value-type="string">
            <text:p>Family: Celery (Apium graveolens)</text:p>
            <text:p>Variety: Tall Utah 52-70</text:p>
            <text:p>Bad label won’t print use Utah Tall</text:p>
            <text:p>Comments: Sow indoors 8-12 weeks before last frost, 1/8” deep;  thin to 10” apart upon transplant after last frost. Keep mulched for better results.</text:p>
            <text:p>Thin stalks with lots of leaves.</text:p>
          </table:table-cell>
          <table:table-cell office:value-type="string" calcext:value-type="string">
            <text:p>2020</text:p>
            <text:p>EDIBLE</text:p>
            <text:p>All Season In the Desert 50+ Seeds</text:p>
            <text:p>Advanced Seed Saver</text:p>
          </table:table-cell>
          <table:table-cell table:style-name="Default" table:number-columns-repeated="16382"/>
        </table:table-row>
        <table:table-row table:style-name="ro15">
          <table:table-cell table:style-name="ce42" office:value-type="string" calcext:value-type="string">
            <text:p>Family: Celery (Apium graveolens)</text:p>
            <text:p>Variety: Tall Utah 52-70</text:p>
            <text:p>Comments: Sow indoors 8-12 weeks before last frost, 1/8” deep;  thin to 10” apart upon transplant after last frost. Keep mulched for better results.</text:p>
            <text:p>Thin stalks with lots of leaves</text:p>
          </table:table-cell>
          <table:table-cell table:style-name="ce42" office:value-type="string" calcext:value-type="string">
            <text:p>2020</text:p>
            <text:p>EDIBLE</text:p>
            <text:p>Cool Season</text:p>
            <text:p>15-20 Seeds</text:p>
            <text:p>Intermediate Seed Saver</text:p>
          </table:table-cell>
          <table:table-cell table:style-name="Default" table:number-columns-repeated="16382"/>
        </table:table-row>
        <table:table-row table:style-name="ro15">
          <table:table-cell office:value-type="string" calcext:value-type="string">
            <text:p>Family:   Pepper Chili Anaheim(Capsicum annuum)</text:p>
            <text:p>Variety: Anaheim Large</text:p>
            <text:p>Original Seed Source: Mary Jackson</text:p>
            <text:p>Comments: Start inside 1/4” deep in loose soil 8-10 weeks before last frost.  Slow to germinate; need warmth; plant 12- 16” apart in full sun. Size to 6”; 70 to 80 days.  Save seeds</text:p>
            <text:p>from fully ripe, slightly shriveled fruit. Can cross pollinate.</text:p>
          </table:table-cell>
          <table:table-cell office:value-type="string" calcext:value-type="string">
            <text:p>2017</text:p>
            <text:p>EDIBLE</text:p>
            <text:p>Warm Season</text:p>
            <text:p>5+ Seeds</text:p>
            <text:p>Easy Seed Saver</text:p>
            <text:p>Germination: 8-10 days</text:p>
          </table:table-cell>
          <table:table-cell table:style-name="Default" table:number-columns-repeated="16382"/>
        </table:table-row>
        <table:table-row table:style-name="ro15">
          <table:table-cell table:style-name="ce42" office:value-type="string" calcext:value-type="string">
            <text:p>Family: CHILE Anaheim(Capsicum annuum)</text:p>
            <text:p>Variety: NuMex Joe E Parker</text:p>
            <text:p>Original Seed Source: Botan</text:p>
            <text:p>Comments: Start inside 1/4” deep in loose soil 8-10 weeks before last frost.  Slow to germinate; need warmth; plant 12- 16” apart in full sun. Size to 6”; 70 to 80 days.  Save seeds</text:p>
            <text:p>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CHILE (Capsicum annuum)</text:p>
            <text:p>Variety: Cayenne (Large, Hot)</text:p>
            <text:p>Grown By:  Deborah Hargrove, Hereford AZ Original Seed Source: Greenlee’s Treasury of Seed Comments: Start inside 1/4” deep in loose soil 8-10 weeks before last frost.  Slow to germinate; need warmth; plant 12- 16” apart in full sun. Red, glossy, 10-12 inches; 70 days.  Save seeds from fully ripe, slightly shriveled fruit. Great for Picante Sauc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CHILE (Capsicum annuum)</text:p>
            <text:p>Variety: Chiltepin (glabriusculum) Devil’s River VERY HOT 50K-100K SHU</text:p>
            <text:p>Grown By:  Native Seed/SEARCH www.nativeseeds.org Original Seed Source: Original plants wild-harvested in 1952 near Del Rio, TX, a spot now under the Amistad Reservoir.</text:p>
            <text:p>Comments: Perennial Shrub, 3.5 to 9 feet.  Plant in well-drained soil at 75 degrees+.  Keep moist, NOT WET. Germination 4-8 weeks. Best to start indoors; transplant in shade or filtered light. In areas w/o</text:p>
            <text:p>hard frost, shrub can live 35-50 years.  Wash hands after handling seeds.</text:p>
          </table:table-cell>
          <table:table-cell table:style-name="ce42" office:value-type="string" calcext:value-type="string">
            <text:p>2017</text:p>
            <text:p>EDIBLE</text:p>
            <text:p>Warm Season</text:p>
            <text:p>5 Seeds</text:p>
            <text:p>Advanced Seed Saver</text:p>
            <text:p>Germination: 4-8 weeks</text:p>
            <text:p>@ 75+ degrees</text:p>
          </table:table-cell>
          <table:table-cell table:style-name="Default" table:number-columns-repeated="16382"/>
        </table:table-row>
        <table:table-row table:style-name="ro15">
          <table:table-cell office:value-type="string" calcext:value-type="string">
            <text:p>Family: CHILE (Capsicum annuum)</text:p>
            <text:p>Variety: Chiltepin (glabriusculum) VERY HOT 50K-100K SHU</text:p>
            <text:p>Grown By:  Native Seed/SEARCH www.nativeseeds.org Original Seed Source: Collected from the Pimas near the Rio Yaqui in Sonora, Mexico</text:p>
            <text:p>Comments: Perennial Shrub, 3.5 to 9 feet.  Plant in well- drained soil at 75 degrees+.  Keep moist, NOT WET. Germination 4-8 weeks. Best to start indoors; transplant in shade or filtered light. In areas w/o hard frost, shrub can live</text:p>
            <text:p>35-50 years.  Wash hands after handling seeds.</text:p>
          </table:table-cell>
          <table:table-cell office:value-type="string" calcext:value-type="string">
            <text:p>2017</text:p>
            <text:p>EDIBLE</text:p>
            <text:p>Warm Season</text:p>
            <text:p>5 Seeds</text:p>
            <text:p>Advanced Seed Saver</text:p>
            <text:p>Germination: 4-8 weeks</text:p>
            <text:p>@ 75+ degrees</text:p>
          </table:table-cell>
          <table:table-cell table:style-name="Default" table:number-columns-repeated="16382"/>
        </table:table-row>
        <table:table-row table:style-name="ro15">
          <table:table-cell table:style-name="ce42" office:value-type="string" calcext:value-type="string">
            <text:p>Family: PEPPER, CHILE (Capsicum annuum)</text:p>
            <text:p>Variety: Chiltepin (Phoenix) VERY HOT 50K-100K SHU</text:p>
            <text:p>Original Seed Source: Native Seed Search Comments: Perennial Shrub, 3.5 to 9 feet or more. Start seeds inside in sandy soil, 8-10 weeks before last frost.   Plant 1/4 in deep.  Keep warm and moist, NOT WET. Germination 4-8 weeks. Transplant 12-16” apart in partial shade. In areas w/o hard frost, shrub can live 35-50 years.  Wash hands after handling seeds. Allow</text:p>
            <text:p>fruit to ripen on the plant.</text:p>
          </table:table-cell>
          <table:table-cell table:style-name="ce42" office:value-type="string" calcext:value-type="string">
            <text:p>2019</text:p>
            <text:p>EDIBLE</text:p>
            <text:p>Warm Season</text:p>
            <text:p>5+ Seeds</text:p>
            <text:p>Advanced Seed Saver</text:p>
            <text:p>Germination: 4-8 weeks</text:p>
            <text:p>@ 75+ degrees</text:p>
          </table:table-cell>
          <table:table-cell table:style-name="Default" table:number-columns-repeated="16382"/>
        </table:table-row>
        <table:table-row table:style-name="ro15">
          <table:table-cell office:value-type="string" calcext:value-type="string">
            <text:p>Family: CHILE (Capsicum annuum)</text:p>
            <text:p>Variety: Cochiti (Medium to Medium Hot) 3-4” frui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CHILE (Capsicum annuum)</text:p>
            <text:p>Variety: Serrano (Medium Hot)</text:p>
            <text:p>Grown By: Deborah Avery-Hargrove (CCMGA Master Gardener)</text:p>
            <text:p>Where Grown: Hereford, AZ</text:p>
            <text:p>Original Seed Source: rareseeds.com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CHILE (Capsicum annuum)</text:p>
            <text:p>Variety: Early Jalapeno  (HOT-Very Hot)</text:p>
            <text:p>Grown by: Deborah Hargrove, CCMGA Master Gardener</text:p>
            <text:p>Original Seed Source: www.seedtreasures.com</text:p>
            <text:p>Comments: Prolific, shiny, dark green hot pepper. Produces all season.  Start inside 1/4” deep in loose soil 8-10 weeks before last frost.  Slow to germinate; need warmth. Save seeds from fully ripe, slightly shriveled fruit. Can cross</text:p>
            <text:p>pollinat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CHILE (Capsicum annuum)</text:p>
            <text:p>Variety: Havasu Hot</text:p>
            <text:p>(Medium heat, 3,000 to 5,000 SHU)</text:p>
            <text:p>Original Seed Source: www.bonnieplants.com Comments: Start inside 1/4” deep in loose soil 8-10 weeks before last frost.  Slow to germinate; need warmth; plant 12- 16” apart in full sun. Size to 3.5”; good for stuffing, pickling,</text:p>
            <text:p>frying.  Typically harvested yellow; tasty when red.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CHILE (Capsicum annuum)</text:p>
            <text:p>Variety: Multicolored, HOT Grown By: Bill Cook Where Grown: Duncan, AZ</text:p>
            <text:p>Original Seed Source: Greenlee Treasury of Seed Comments: Multi-colored, Anaheim size &amp; heat. Start inside 1/4” deep in loose soil 8-10 weeks before last frost.</text:p>
            <text:p>Slow to germinate; need warmth; plant 12-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10+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CHILE (Capsicum annuum) Variety: New Mexico 6-4L Pepper (Mild heat, 500 to 1,000 SHU)</text:p>
            <text:p>Original Seed Source: www.bonnieplants.com Comments: Start inside 1/4” deep in loose soil 8-10 weeks before last frost.  Slow to germinate; need warmth; plant 12-</text:p>
            <text:p>16” apart in full sun. Size to 6”; 70 to 80 days.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CHILE (Capsicum annuum)</text:p>
            <text:p>Variety: Ordono  (HOT)</text:p>
            <text:p>Original Seed Source: Native Seed/SEARCH Comments: Stunning ornamental chile from Batopilas Canyon, Chihuahua, Mexico. Hot &amp; edible. Upright fruit mature to purple, yellow, orange, then red.  Start inside 1/4” deep in loose soil 8-10 weeks before last frost.  Slow to</text:p>
            <text:p>germinate; need warmth; great container plant. Save seeds from fully ripe, slightly shriveled fruit. Can cross pollinate.</text:p>
            <text:p>Soil Temp Range: 60°-95° Optimum: 85°</text:p>
          </table:table-cell>
          <table:table-cell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PEPPER CHILE (Capsicum annuum)</text:p>
            <text:p>Variety: Padron (Mild heat 500-2,500 SHU)</text:p>
            <text:p>Original Seed Source: Botanical Interests</text:p>
            <text:p>Comments: Start inside 1/4” deep in loose soil 8-10 weeks before last frost.  Slow to germinate; need warmth; plant</text:p>
            <text:p>18”-24” apart in full sun/partial in shade low desert. Save seeds</text:p>
            <text:p>from fully ripe, slightly shriveled fruit. Can cross pollinate.</text:p>
          </table:table-cell>
          <table:table-cell table:style-name="ce42"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5">
          <table:table-cell office:value-type="string" calcext:value-type="string">
            <text:p>Family: Pepper, CHILE (Capsicum annuum)</text:p>
            <text:p>Variety: Poblano (when fresh), Ancho (when when dried)  (Medium Hot)</text:p>
            <text:p>Grown By: Mary Jackson, Master Gardener</text:p>
            <text:p>Comments: Start inside 1/4” deep in loose soil 8- 10 weeks before last frost.  Slow to germinate; need warmth; plant 12-16” apart in full sun/partial in shade low desert. Save seeds from fully ripe, slightly shriveled fruit. Can cross pollinate.</text:p>
          </table:table-cell>
          <table:table-cell office:value-type="string" calcext:value-type="string">
            <text:p>2018</text:p>
            <text:p>EDIBLE</text:p>
            <text:p>Warm Season</text:p>
            <text:p>10 Seeds</text:p>
            <text:p>Easy Seed Saver</text:p>
            <text:p>Germination: 8-10 days</text:p>
          </table:table-cell>
          <table:table-cell table:style-name="Default" table:number-columns-repeated="16382"/>
        </table:table-row>
        <table:table-row table:style-name="ro15">
          <table:table-cell table:style-name="ce42" office:value-type="string" calcext:value-type="string">
            <text:p>Family: CHILE (Capsicum annuum)</text:p>
            <text:p>Variety: Quatro Milpas (Mild)</text:p>
            <text:p>Grown By: Native Seed/SEARCH Farm</text:p>
            <text:p>Where Grown: Patagonia, AZ</text:p>
            <text:p>Original Seed Source: www.nativeseeds.org Comments: Large, fleshy chile grown in Quatro Milpas, Sonora. Fruit ripens to dark brownish-red. Start inside 1/4” deep in loose soil 8- 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CHILE (Capsicum annuum)</text:p>
            <text:p>Variety: San Felipe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CHILE (Capsicum annuum)</text:p>
            <text:p>Variety: Sandia Hot Pepper (NuMex Sandia-Heirloom)</text:p>
            <text:p>(Mild heat, 500 to 2,500 SHU)</text:p>
            <text:p>Original Seed Source: www.bonnieplants.com Comments: Start inside 1/4” deep in loose soil 8-10 weeks before last frost.  Slow to germinate; need warmth; plant 12- 16” apart in full sun. Size to 6”; 77 to 80 days.  Save seeds from fully ripe, slightly shriveled fruit. Can cross pollinate.</text:p>
            <text:p>Heat increases as fruit ripens to red.</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CHILE (Capsicum annuum) Variety: Santa Fe Grande (Guero) (Mild heat, 500 to 750 SHU)</text:p>
            <text:p>Original Seed Source: www.bonnieplants.com Comments: Start inside 1/4” deep in loose soil 8-10 weeks before last frost.  Slow to germinate; need warmth; plant 12- 16” apart in full sun. Size to 3.5”; 75 to 80 days; matures</text:p>
            <text:p>yellow to orange to red. Save seeds from fully ripe, slightly shriveled fruit. Can cross pollinate.</text:p>
            <text:p>Soil Temp Range: 60°-95° Optimum: 85°</text:p>
          </table:table-cell>
          <table:table-cell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CHILE (Capsicum annuum)</text:p>
            <text:p>Variety: Santo Domingo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PEPPER CHILE (Capsicum annuum)</text:p>
            <text:p>Variety: Serrano (Medium Hot 10,000-20,000 SHU)</text:p>
            <text:p>Original Seed Source: Botanical Interests</text:p>
            <text:p>Comments: Start inside 1/4” deep in loose soil 8-10 weeks before last frost.  Slow to germinate; need warmth; plant</text:p>
            <text:p>18”-24” apart in full sun/partial in shade low desert. Save seeds</text:p>
            <text:p>from fully ripe, slightly shriveled fruit. Can cross pollinate.</text:p>
          </table:table-cell>
          <table:table-cell office:value-type="string" calcext:value-type="string">
            <text:p>2020</text:p>
            <text:p>EDIBLE</text:p>
            <text:p>Warm Season</text:p>
            <text:p>5+ Seeds</text:p>
            <text:p>Easy Seed Saver</text:p>
            <text:p>Germination: 18-25 days</text:p>
          </table:table-cell>
          <table:table-cell table:style-name="Default" table:number-columns-repeated="16382"/>
        </table:table-row>
        <table:table-row table:style-name="ro15">
          <table:table-cell table:style-name="ce42" office:value-type="string" calcext:value-type="string">
            <text:p>Family: CHILE (Capsicum annuum)</text:p>
            <text:p>Variety: Tesuque (variable to Hot) Comments: Make authentic red chili powder from these chilies! Best for drying. Start inside 1/4” deep in loose soil 8- 10 weeks before last frost.  Slow to germinate; need warmth; plant 12-16” apart in full sun. Save seeds from fully ripe, slightly shriveled fruit. Can cross pollinate. 75 to 80 days (cultivated for generations at the Tesuque Pueblo of New Mexico)</text:p>
          </table:table-cell>
          <table:table-cell table:style-name="ce42" office:value-type="string" calcext:value-type="string">
            <text:p>2022</text:p>
            <text:p>EDIBLE</text:p>
            <text:p>Warm Season</text:p>
            <text:p>10 Seeds</text:p>
            <text:p>Easy Seed Saver</text:p>
            <text:p>Germination: 8-10 days</text:p>
          </table:table-cell>
          <table:table-cell table:style-name="Default" table:number-columns-repeated="16382"/>
        </table:table-row>
        <table:table-row table:style-name="ro15">
          <table:table-cell office:value-type="string" calcext:value-type="string">
            <text:p>Family: CHILE (Capsicum annuum)</text:p>
            <text:p>Variety: Thai Red Chilli</text:p>
            <text:p>Original Seed Source: Baker Creek Heirloom Seeds—www.rareseeds.com</text:p>
            <text:p>Comments: Start indoors barely covering seeds in loose, rich soil 8-10 weeks before last frost.  Slow to germinate; need warmth; move to sunny window or grow light after sprouting. In ground, plant 12-16” apart in full sun.  Save seeds from fully ripe, slightly shriveled fruit. Can cross pollinate. Small pointed</text:p>
            <text:p>fruit great for drying.</text:p>
            <text:p>Soil Temp Range: 60°-95° Optimum: 85°</text:p>
          </table:table-cell>
          <table:table-cell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CHILE (Capsicum annuum)</text:p>
            <text:p>Variety: Tien Tsin (The Chinese Red-6 to 30 times hotter than Jalapeno-50K-75K SHU)</text:p>
            <text:p>Original Seed Source: www.bonnieplants.com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CHILE (Capsicum frutescens)</text:p>
            <text:p>Variety: Tobasco (Hot)</text:p>
            <text:p>Grown By: Native Seed/SEARCH Farm</text:p>
            <text:p>Where Grown: Patagonia, AZ</text:p>
            <text:p>Original Seed Source: www.nativeseeds.org Comments: Start inside 1/4” deep in loose soil 8-10 weeks before last frost.  Slow to germinate; need warmth; plant 12-16” apart in full</text:p>
            <text:p>sun/partial shade in low desert. Save seeds from fully ripe, slightly shriveled fruit. Can cross pollinate. Great container plant!</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CHILE (Capsicum annuum)</text:p>
            <text:p>Variety: Zia Pueblo Mix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COLLARD GREENS (Brassica oleracea)</text:p>
            <text:p>Variety: Georgia Southern Comments: Direct sow 1/4” deep,  12” apart. Best when harvested before the leaves are 10 inches in length.</text:p>
          </table:table-cell>
          <table:table-cell office:value-type="string" calcext:value-type="string">
            <text:p>2020</text:p>
            <text:p>EDIBLE</text:p>
            <text:p>Cool Season</text:p>
            <text:p>25 Seeds</text:p>
            <text:p>Intermediate Seed Saver</text:p>
            <text:p>Germination: 5-6 days</text:p>
          </table:table-cell>
          <table:table-cell table:style-name="Default" table:number-columns-repeated="16382"/>
        </table:table-row>
        <table:table-row table:style-name="ro15">
          <table:table-cell table:style-name="ce42" office:value-type="string" calcext:value-type="string">
            <text:p>Family: CORN, ANCIENT (Zea mays parvaglumis)</text:p>
            <text:p>Variety: Mexican Annual Teosinte</text:p>
            <text:p>Original Seed Source: www.nativeseeds.org</text:p>
            <text:p>Wild ancestor to domesticated corn however the ears are very small with only 1 row of seeds and plant has multiple stalks. Plant height is less than 5ft with tassels - late maturing, in fall. Good for cross pollinating other corn planted late for better seeds without negatively affecting quality of future corn.</text:p>
            <text:p>Comments: Plant in spring 1” deep in rows or basin.  Needs rich soil and moisture.</text:p>
          </table:table-cell>
          <table:table-cell table:style-name="ce42" office:value-type="string" calcext:value-type="string">
            <text:p>2020</text:p>
            <text:p>EDIBLE</text:p>
            <text:p>Warm Season</text:p>
            <text:p>10 Seeds</text:p>
            <text:p>Advanced Seed Saver</text:p>
          </table:table-cell>
          <table:table-cell table:style-name="Default" table:number-columns-repeated="16382"/>
        </table:table-row>
        <table:table-row table:style-name="ro15">
          <table:table-cell office:value-type="string" calcext:value-type="string">
            <text:p>Family: CORN, DECORATIVE (Zea mays)</text:p>
            <text:p>Variety: Brown</text:p>
            <text:p>Comments: Plant in spring 1” deep in rows or clusters. Plants should be no more than 8-12 inches apart to get best pollination. All species will cross pollinate so planting different species several weeks apart is recommended. Dark brown</text:p>
            <text:p>kernels typically for decorative purposes.</text:p>
          </table:table-cell>
          <table:table-cell office:value-type="string" calcext:value-type="string">
            <text:p>2018</text:p>
            <text:p>DECORATIVE</text:p>
            <text:p>Warm Season</text:p>
            <text:p>25+ Seeds</text:p>
            <text:p>Easy Seed Saver</text:p>
          </table:table-cell>
          <table:table-cell table:style-name="Default" table:number-columns-repeated="16382"/>
        </table:table-row>
        <table:table-row table:style-name="ro15">
          <table:table-cell table:style-name="ce42" office:value-type="string" calcext:value-type="string">
            <text:p>Family: CORN, DECORATIVE (Zea mays)</text:p>
            <text:p>Variety: Multicolored, small kernals</text:p>
            <text:p>Comments: Plant in spring 1” deep in rows or clusters. Plants should be no more than 8-12 inches apart to get best pollination. All species will cross pollinate so planting different species several weeks apart is recommended.  Typically for</text:p>
            <text:p>decorative purposes.</text:p>
          </table:table-cell>
          <table:table-cell table:style-name="ce42" office:value-type="string" calcext:value-type="string">
            <text:p>2018</text:p>
            <text:p>DECORATIVE</text:p>
            <text:p>Warm Season</text:p>
            <text:p>25+ Seeds</text:p>
            <text:p>Easy Seed Saver</text:p>
          </table:table-cell>
          <table:table-cell table:style-name="Default" table:number-columns-repeated="16382"/>
        </table:table-row>
        <table:table-row table:style-name="ro15">
          <table:table-cell office:value-type="string" calcext:value-type="string">
            <text:p>Family: CORN, DECORATIVE (Zea mays)</text:p>
            <text:p>Variety: Multicolored</text:p>
            <text:p>Comments: Plant in spring 1” deep in rows or clusters. Plants should be no more than 8-12 inches apart to get best pollination. All species will cross pollinate so planting different species several weeks apart is recommended.  Typically for</text:p>
            <text:p>decorative purposes.</text:p>
          </table:table-cell>
          <table:table-cell office:value-type="string" calcext:value-type="string">
            <text:p>2018</text:p>
            <text:p>DECORATIVE</text:p>
            <text:p>Warm Season</text:p>
            <text:p>25+ Seeds</text:p>
            <text:p>Easy Seed Saver</text:p>
          </table:table-cell>
          <table:table-cell table:style-name="Default" table:number-columns-repeated="16382"/>
        </table:table-row>
        <table:table-row table:style-name="ro15">
          <table:table-cell table:style-name="ce42" office:value-type="string" calcext:value-type="string">
            <text:p>Family: CORN, DECORATIVE (Zea mays)</text:p>
            <text:p>Variety: Ruby Red</text:p>
            <text:p>Comments: Plant in spring 1” deep in rows or clusters. Plants should be no more than 8-12 inches apart to get best pollination. All species will cross pollinate so planting different species several weeks apart is recommended. Dark red kernels</text:p>
            <text:p>typically for decorative purposes.</text:p>
          </table:table-cell>
          <table:table-cell table:style-name="ce42" office:value-type="string" calcext:value-type="string">
            <text:p>2018</text:p>
            <text:p>DECORATIVE</text:p>
            <text:p>Warm Season</text:p>
            <text:p>25+ Seeds</text:p>
            <text:p>Easy Seed Saver</text:p>
          </table:table-cell>
          <table:table-cell table:style-name="Default" table:number-columns-repeated="16382"/>
        </table:table-row>
        <table:table-row table:style-name="ro15">
          <table:table-cell office:value-type="string" calcext:value-type="string">
            <text:p>Family: CORN, FLOUR (Zea mays)</text:p>
            <text:p>Variety: Hopi Blue (Sakwapu)</text:p>
            <text:p>Grown by: BJ Searcy, Master Gardener</text:p>
            <text:p>Comments: Blue kernels ground to make ceremonial piki bread, cornmeal and hominy.  Plants height is less than 5ft with tassels - early maturing  62 days to pollination; 106 days to dried ears.  Plant in spring 1” deep in rows or basin.  Needs rich soil and moisture. All</text:p>
            <text:p>species will cross pollinate. Heat tolerant.</text:p>
          </table:table-cell>
          <table:table-cell office:value-type="string" calcext:value-type="string">
            <text:p>2021</text:p>
            <text:p>EDIBLE</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CORN, FLOUR (Zea mays)</text:p>
            <text:p>Variety: Hopi Greasy Head (Wiekte)</text:p>
            <text:p>Grown By: Andy Ward</text:p>
            <text:p>Where Grown: Hereford, AZ</text:p>
            <text:p>Original Seed Source: www.nativeseeds.org Comments: Plum-colored kernels on 10-12” ears  Plants  are short (3ft) - early maturing  56 days to pollination; 103 days to dried ears.  Kernels have an oily, or “greasy” appearance.Plant in spring 1” deep in rows or basis.  Hopi use for Home Dance Ceremony in July. All species will cross</text:p>
            <text:p>pollinate.  Rare seed.</text:p>
          </table:table-cell>
          <table:table-cell table:style-name="ce42" office:value-type="string" calcext:value-type="string">
            <text:p>2017</text:p>
            <text:p>EDIBLE</text:p>
            <text:p>Warm Season</text:p>
            <text:p>20+ Seeds</text:p>
            <text:p>Easy Seed Saver</text:p>
          </table:table-cell>
          <table:table-cell table:style-name="Default" table:number-columns-repeated="16382"/>
        </table:table-row>
        <table:table-row table:style-name="ro15">
          <table:table-cell office:value-type="string" calcext:value-type="string">
            <text:p>Family: CORN, SWEET (Zea mays)</text:p>
            <text:p>Variety: Golden Bantam</text:p>
            <text:p>Original Seed Source: www.survivalseeds4patriots.com</text:p>
            <text:p>Comments: Plant in loose, well worked soil after soil warms above 65 degrees.  Heavy feeder.  Direct sow 1-1.5 inches deep, 5-10 inches apart in rows 3 feet apart. Thin to 6-8” apart. Keep weed free.  Full sun; 88 days.  The rule: The sweeter the corn the more water it needs and the warmer the</text:p>
            <text:p>soil temp must be.</text:p>
          </table:table-cell>
          <table:table-cell office:value-type="string" calcext:value-type="string">
            <text:p>2014</text:p>
            <text:p>EDIBLE</text:p>
            <text:p>Warm Season</text:p>
            <text:p>25 Seeds</text:p>
            <text:p>Easy Seed Saver</text:p>
          </table:table-cell>
          <table:table-cell table:style-name="Default" table:number-columns-repeated="16382"/>
        </table:table-row>
        <table:table-row table:style-name="ro15">
          <table:table-cell table:style-name="ce42" office:value-type="string" calcext:value-type="string">
            <text:p>Family: CORN, POPCORN (Zea mays)</text:p>
            <text:p>Variety: Flor del Rio</text:p>
            <text:p>Grown By:  Native Seed/SEARCH</text:p>
            <text:p>Where Grown: Patagonia, AZ</text:p>
            <text:p>Original Seed Source: www.nativeseeds.org Comments: Multi colored kernels on ears from 2-6” in length. Leave on plant until husks are dry &amp; brown for most vivid color.  Plant in spring 1” deep in rows 12” apart or 3-4 seeds in basins 18” apart.  All</text:p>
            <text:p>species will cross pollinate.  Grind for meal or pop. 110 days</text:p>
          </table:table-cell>
          <table:table-cell table:style-name="ce42" office:value-type="string" calcext:value-type="string">
            <text:p>2017</text:p>
            <text:p>EDIBLE</text:p>
            <text:p>Warm Season</text:p>
            <text:p>10 Seeds</text:p>
            <text:p>Advanced Seed Saver</text:p>
          </table:table-cell>
          <table:table-cell table:style-name="Default" table:number-columns-repeated="16382"/>
        </table:table-row>
        <table:table-row table:style-name="ro15">
          <table:table-cell office:value-type="string" calcext:value-type="string">
            <text:p>Family: CORN, POPCORN (Zea mays)</text:p>
            <text:p>Variety: Glass Gem Grown by: BJ Searcy, Master Gardener</text:p>
            <text:p>Comments: Plant in spring 1” deep in rows or clusters. Plants should be no more than 8-12 inches apart to get best pollination.  Plants height is typically 6-9 ft; 110-120 days to dried ears.  Leave on plant until husks are dry &amp; brown for most vivid color. Jewel-colored ears from 3-5” in length. All</text:p>
            <text:p>species will cross pollinate.  Use ears as decoration or pop.</text:p>
          </table:table-cell>
          <table:table-cell office:value-type="string" calcext:value-type="string">
            <text:p>2020</text:p>
            <text:p>EDIBLE</text:p>
            <text:p>Warm Season</text:p>
            <text:p>25 Seeds</text:p>
            <text:p>Easy Seed Saver</text:p>
          </table:table-cell>
          <table:table-cell table:style-name="Default" table:number-columns-repeated="16382"/>
        </table:table-row>
        <table:table-row table:style-name="ro15">
          <table:table-cell table:style-name="ce42" office:value-type="string" calcext:value-type="string">
            <text:p>Family: CORN, SWEET (Zea mays)</text:p>
            <text:p>Variety: Buttergold Hybrid</text:p>
            <text:p>Original Seed Source: Botanical Interests</text:p>
            <text:p>Comments: Plant in spring after last frost 1”-1 1/2” deep, 8- 12” apart in rows, clumps, or basins. For best results plant a number of short rows together to ensure pollination. Harvest</text:p>
            <text:p>when kernels are full and juicy, about 63 days. Up to 8-9 inch ears, 85 days; wind pollinated; all varieties will cross.</text:p>
          </table:table-cell>
          <table:table-cell table:style-name="ce42" office:value-type="string" calcext:value-type="string">
            <text:p>2021</text:p>
            <text:p>EDIBLE</text:p>
            <text:p>Warm Season</text:p>
            <text:p>10 Seeds</text:p>
            <text:p>Hybrid Do Not Save</text:p>
            <text:p>Seeds</text:p>
          </table:table-cell>
          <table:table-cell table:style-name="Default" table:number-columns-repeated="16382"/>
        </table:table-row>
        <table:table-row table:style-name="ro15">
          <table:table-cell office:value-type="string" calcext:value-type="string">
            <text:p>Family: CORN, SWEET (Zea mays)</text:p>
            <text:p>Variety: Painted Hill</text:p>
            <text:p>Original Seed Source: Botanical Interests Comments: Wind pollinated; all varieties will cross. Plant in early spring or 1” deep in rows, clumps, or basins. Cool</text:p>
            <text:p>tolerant. Color intensifies when dried.</text:p>
          </table:table-cell>
          <table:table-cell office:value-type="string" calcext:value-type="string">
            <text:p>2022</text:p>
            <text:p>EDIBLE</text:p>
            <text:p>Warm Season</text:p>
            <text:p>5 Seeds</text:p>
            <text:p>Advanced Seed Saver</text:p>
            <text:p>Maturity 65-80 days</text:p>
          </table:table-cell>
          <table:table-cell table:style-name="Default" table:number-columns-repeated="16382"/>
        </table:table-row>
        <table:table-row table:style-name="ro15">
          <table:table-cell table:style-name="ce42" office:value-type="string" calcext:value-type="string">
            <text:p>Family: CORN, SWEET (Zea mays)</text:p>
            <text:p>Variety: Peaches and Cream Hybrid</text:p>
            <text:p>Original Seed Source: Ferry-Morse</text:p>
            <text:p>Comments: Up to 7 1/2” inch ears, 65 days; wind pollinated; all varieties will cross. Plant in spring after last frost 1”-1 1/2” deep, 8-12” apart in rows, clumps, or basins. For best results plant a number of short rows together to ensure pollination. Harvest when kernels are full and juicy, about 83</text:p>
            <text:p>days.</text:p>
          </table:table-cell>
          <table:table-cell table:style-name="ce42" office:value-type="string" calcext:value-type="string">
            <text:p>2022</text:p>
            <text:p>EDIBLE</text:p>
            <text:p>Warm Season</text:p>
            <text:p>Various Seeds</text:p>
            <text:p>Hybrid Do Not Save</text:p>
            <text:p>Seeds</text:p>
          </table:table-cell>
          <table:table-cell table:style-name="Default" table:number-columns-repeated="16382"/>
        </table:table-row>
        <table:table-row table:style-name="ro15">
          <table:table-cell office:value-type="string" calcext:value-type="string">
            <text:p>Family: CORN, SWEET (Zea mays)</text:p>
            <text:p>Variety: Stowell’s Evergreen</text:p>
            <text:p>Grown By: BJ Searcy, Master Gardener, Whetstone, AZ Original Seed Source: www.nativeseeds.org Comments: Domesticated in Mexico by 6,700 BCE. “King of all White Sweet Corn Varieties” - up to 10 inch ears on 7 foot stalks, 90 days; wind pollinated; all varieties will</text:p>
            <text:p>cross. Plant in spring or with summer rains 1” deep, 8-12” apart in rows, clumps, or basins. Harvest when kernels are full and</text:p>
            <text:p>juicy. Heat tolerant.</text:p>
          </table:table-cell>
          <table:table-cell office:value-type="string" calcext:value-type="string">
            <text:p>2020</text:p>
            <text:p>EDIBLE</text:p>
            <text:p>Warm Season</text:p>
            <text:p>10 Seeds</text:p>
            <text:p>Advanced Seed Saver</text:p>
          </table:table-cell>
          <table:table-cell table:style-name="Default" table:number-columns-repeated="16382"/>
        </table:table-row>
        <table:table-row table:style-name="ro15">
          <table:table-cell table:style-name="ce42" office:value-type="string" calcext:value-type="string">
            <text:p>Family: CORN, SWEET (Zea mays)</text:p>
            <text:p>Variety: Silver ‘N Gold Hybrid</text:p>
            <text:p>Original Seed Source: Ferry-Morse</text:p>
            <text:p>Comments: Up to 8-9 inch ears, 65 days; wind pollinated; all varieties will cross. Plant in spring after last frost 1”-1 1/2” deep, 8-12” apart in rows, clumps, or basins. For best results plant a number of short rows together to ensure pollination.</text:p>
            <text:p>Harvest when kernels are full and juicy, about 85 days.</text:p>
          </table:table-cell>
          <table:table-cell table:style-name="ce42" office:value-type="string" calcext:value-type="string">
            <text:p>2022</text:p>
            <text:p>EDIBLE</text:p>
            <text:p>Warm Season</text:p>
            <text:p>Various Seeds</text:p>
            <text:p>Hybrid Do Not Save</text:p>
            <text:p>Seeds</text:p>
          </table:table-cell>
          <table:table-cell table:style-name="Default" table:number-columns-repeated="16382"/>
        </table:table-row>
        <table:table-row table:style-name="ro15">
          <table:table-cell office:value-type="string" calcext:value-type="string">
            <text:p>Family: CORN, SWEET (Zea mays)</text:p>
            <text:p>Variety: Silver Queen Hybrid</text:p>
            <text:p>Original Seed Source: Ferry-Morse</text:p>
            <text:p>Comments: Up to 8-9 inch ears, 85 days; wind pollinated; all varieties will cross. Plant in spring after last frost 1”-1 1/2” deep, 8-12” apart in rows, clumps, or basins. For best results plant a number of short rows together to ensure pollination.</text:p>
            <text:p>Harvest when kernels are full and juicy, about 85 days.</text:p>
          </table:table-cell>
          <table:table-cell office:value-type="string" calcext:value-type="string">
            <text:p>2023</text:p>
            <text:p>EDIBLE</text:p>
            <text:p>Warm Season</text:p>
            <text:p>20-30 Seeds</text:p>
            <text:p>Hybrid Do Not Save</text:p>
            <text:p>Seeds</text:p>
          </table:table-cell>
          <table:table-cell table:style-name="Default" table:number-columns-repeated="16382"/>
        </table:table-row>
        <table:table-row table:style-name="ro15">
          <table:table-cell table:style-name="ce42" office:value-type="string" calcext:value-type="string">
            <text:p>Family: Cover Crop Fava Bean (Vicia faba)</text:p>
            <text:p>Variety:  Sweet  Lorane Improved</text:p>
            <text:p>Original Seed Source: Botanical Interests Comments: Plant 6 to 8 weeks before last frost or 4 to 6 weeks before first frost. Soak seeds 12 to 24 hours before sowing. Plant seeds 3” deep with 2 to 4 seeds per square foot. For maximum nitrogen, harvest crop at peak bloom and work back into soil to increase organic matter. Cold hardy to 20F.</text:p>
          </table:table-cell>
          <table:table-cell table:style-name="ce42" office:value-type="string" calcext:value-type="string">
            <text:p>2022</text:p>
            <text:p>All Season</text:p>
            <text:p>Frost Tolerant</text:p>
            <text:p>10 Seeds</text:p>
            <text:p>Easy Seed Saver</text:p>
            <text:p>Annual Full Sun</text:p>
          </table:table-cell>
          <table:table-cell table:style-name="Default" table:number-columns-repeated="16382"/>
        </table:table-row>
        <table:table-row table:style-name="ro15">
          <table:table-cell office:value-type="string" calcext:value-type="string">
            <text:p>Family: COVER CROP Flower Crimson Clover</text:p>
            <text:p>(Trifolium incarnatum)</text:p>
            <text:p>Original Seed Source: Botanical Interests</text:p>
            <text:p>Comments: Sow outside 4-6 weeks weeks before first fall frost. Has long elongated flower heads with deep red long-lasting blossoms that attracts  beneficial insects.</text:p>
            <text:p>Like other clovers it fixes nitrogen but is fast growing for quick benefits. Deer resistant.</text:p>
          </table:table-cell>
          <table:table-cell office:value-type="string" calcext:value-type="string">
            <text:p>2022</text:p>
            <text:p>Blooms  Spring and Summer Cool Season</text:p>
            <text:p>50+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Cover Crop Soil Builder (Pisum sativum and</text:p>
            <text:p>Avina Sativa) Variety:  Peas and Oats</text:p>
            <text:p>Original Seed Source: Botanical Interests</text:p>
            <text:p>Comments: Sow as soon as soil can be worked; best to sow in fall or winter for growth during cool season.</text:p>
            <text:p>Scatter seeds about 3” apart and cover with 1” soil. Peas fix nitrogen and attract beneficial insects. Oats hold nitrogen, provide organic matter and suppress weeds.</text:p>
          </table:table-cell>
          <table:table-cell table:style-name="ce42" office:value-type="string" calcext:value-type="string">
            <text:p>2020</text:p>
            <text:p>All Season</text:p>
            <text:p>Frost Tolerant</text:p>
            <text:p>Various Seeds</text:p>
            <text:p>Easy Seed Saver</text:p>
          </table:table-cell>
          <table:table-cell table:style-name="Default" table:number-columns-repeated="16382"/>
        </table:table-row>
        <table:table-row table:style-name="ro15">
          <table:table-cell office:value-type="string" calcext:value-type="string">
            <text:p>Family: Bean COWPEA (Vigna unguiculata)</text:p>
            <text:p>Variety: California Blackeye #5 Bush</text:p>
            <text:p>Original Seed Source: Botanical Interests</text:p>
            <text:p>Comments: Soak seeds for 1-2 hours before planting (speeds germination); plant 1” deep, full sun, 3-4” apart.</text:p>
            <text:p>6-8 inch pods tinged with purple. Great shelled or dry.</text:p>
          </table:table-cell>
          <table:table-cell office:value-type="string" calcext:value-type="string">
            <text:p>2023</text:p>
            <text:p>EDIBLE</text:p>
            <text:p>Cool Season</text:p>
            <text:p>10-12 Seeds</text:p>
            <text:p>Easy Seed Saver</text:p>
            <text:p>Germination: 6-7 days</text:p>
          </table:table-cell>
          <table:table-cell table:style-name="Default" table:number-columns-repeated="16382"/>
        </table:table-row>
        <table:table-row table:style-name="ro15">
          <table:table-cell table:style-name="ce42" office:value-type="string" calcext:value-type="string">
            <text:p>Family: COWPEA (Vigna unguiculata)</text:p>
            <text:p>Variety: Holstein Black-eyed Peas</text:p>
            <text:p>Comments: Soak seeds for 1-2 hours before planting (speeds germination); plant 1” deep, full sun, 6” apart (seeds will rot if too cold or wet).  Trellis for runners up to 5 feet; 7-8 inch pods. Beans have the mottled look of Holstein cows. Great shelled or dry.</text:p>
            <text:p>Soil Temp Range: 65°-85° Optimum: 75°</text:p>
          </table:table-cell>
          <table:table-cell table:style-name="ce42" office:value-type="string" calcext:value-type="string">
            <text:p>2020</text:p>
            <text:p>EDIBLE</text:p>
            <text:p>All Season</text:p>
            <text:p>10 Seeds</text:p>
            <text:p>Easy Seed Saver</text:p>
            <text:p>Germination: 6-7 days</text:p>
            <text:p>@ 75 degrees</text:p>
          </table:table-cell>
          <table:table-cell table:style-name="Default" table:number-columns-repeated="16382"/>
        </table:table-row>
        <table:table-row table:style-name="ro15">
          <table:table-cell office:value-type="string" calcext:value-type="string">
            <text:p>Family: COWPEA (Vigna unguiculata) Variety: Pinkeye Purple Hull Bush(Shell or dried)</text:p>
            <text:p>Original Seed Source: Botanical Interests</text:p>
            <text:p>Comments: Soak seeds for 1-2 hours before planting (speeds germination); plant 1” deep, full sun,</text:p>
          </table:table-cell>
          <table:table-cell office:value-type="string" calcext:value-type="string">
            <text:p>2023</text:p>
            <text:p>EDIBLE</text:p>
            <text:p>Cool Season</text:p>
            <text:p>various Seeds</text:p>
            <text:p>Easy Seed Saver</text:p>
            <text:p>Germination: 6-7 days</text:p>
          </table:table-cell>
          <table:table-cell table:style-name="Default" table:number-columns-repeated="16382"/>
        </table:table-row>
        <table:table-row table:style-name="ro15">
          <table:table-cell table:style-name="ce42" office:value-type="string" calcext:value-type="string">
            <text:p>Family: COWPEA (Vigna unguiculata)</text:p>
            <text:p>Variety: Whippoorwill (Shell or dried)</text:p>
            <text:p>Original Seed Source: Baker Creek Heirloom Seeds</text:p>
            <text:p>Rareseeds.com Comments: Soak seeds for 1-2 hours before planting (speeds germination); plant 1” deep, full sun, 6” apart</text:p>
            <text:p>(seeds will rot if too cold or wet).  Trellis for runners up to 5 feet; 7-8 inch pods tinged with purple. Great shelled or dry.</text:p>
            <text:p>Soil Temp Range: 65°-85° Optimum: 75°</text:p>
          </table:table-cell>
          <table:table-cell table:style-name="ce42" office:value-type="string" calcext:value-type="string">
            <text:p>2018</text:p>
            <text:p>EDIBLE</text:p>
            <text:p>Cool Season</text:p>
            <text:p>5+ Seeds</text:p>
            <text:p>Easy Seed Saver</text:p>
            <text:p>Germination: 6-7 days</text:p>
            <text:p>@ 75 degrees</text:p>
          </table:table-cell>
          <table:table-cell table:style-name="Default" table:number-columns-repeated="16382"/>
        </table:table-row>
        <table:table-row table:style-name="ro15">
          <table:table-cell office:value-type="string" calcext:value-type="string">
            <text:p>Family: CUCUMBER (Cucumis sativus)</text:p>
            <text:p>Variety: Beit Alpha</text:p>
            <text:p>Grown By: Native Seed/SEARCH Farm</text:p>
            <text:p>Where Grown: Patagonia, AZ</text:p>
            <text:p>Original Seed Source: www.nativeseeds.org Comments: Heat tolerant, slicing/pickling, pick when 6-8” long, resists powdery mildew</text:p>
            <text:p>Soil Temp Range: 60°-105° Optimum: 95°</text:p>
          </table:table-cell>
          <table:table-cell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5">
          <table:table-cell table:style-name="ce42" office:value-type="string" calcext:value-type="string">
            <text:p>Family: CUCUMBER (Cucumis sativus)</text:p>
            <text:p>Variety: Lemon</text:p>
            <text:p>Grown By: Native Seed/SEARCH Farm</text:p>
            <text:p>Where Grown: Patagonia, AZ</text:p>
            <text:p>Original Seed Source: www.nativeseeds.org Comments: Heat tolerant, slicing/pickling, plant in rich, warm soil; fresh or pickled</text:p>
            <text:p>Soil Temp Range: 60°-105° Optimum: 95°</text:p>
          </table:table-cell>
          <table:table-cell table:style-name="ce42"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5">
          <table:table-cell office:value-type="string" calcext:value-type="string">
            <text:p>Family: CUCUMBER (Cucumis sativus)</text:p>
            <text:p>Variety: SMR 58</text:p>
            <text:p>Grown By: Native Seed/SEARCH Farm</text:p>
            <text:p>Where Grown: Patagonia, AZ</text:p>
            <text:p>Original Seed Source: www.nativeseeds.org Comments: The BEST open-pollinated pickling cuke; harvest at 6” max., resists scab spot rot and cucumber mosaic; dislikes herbs &amp; potatoes</text:p>
            <text:p>Soil Temp Range: 60°-105° Optimum: 95°</text:p>
          </table:table-cell>
          <table:table-cell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5">
          <table:table-cell table:style-name="ce42" office:value-type="string" calcext:value-type="string">
            <text:p>Family:  CUCUMBER (Cucumis sativus)</text:p>
            <text:p>Variety: Hokus (Gherkin)</text:p>
            <text:p>Original Seed Source: Botanical Interest</text:p>
            <text:p>Comments: Direct sow outside 1-2 weeks after danger of frost.  Plant 1/2” deep with 2-3 seeds per hill if sprawling, 12” apart if trellising.  Full sun; 55-60 days. Dark green 1 1/2” to 4”</text:p>
            <text:p>fruit.  A favorite for making sweet pickles.</text:p>
            <text:p>Soil Temp Range: 70– 90°</text:p>
          </table:table-cell>
          <table:table-cell table:style-name="ce42" office:value-type="string" calcext:value-type="string">
            <text:p>2022</text:p>
            <text:p>EDIBLE</text:p>
            <text:p>Warm Season</text:p>
            <text:p>5+ Seeds</text:p>
            <text:p>Intermediate Seed Saver</text:p>
            <text:p>Germination: 5-6 days</text:p>
            <text:p>@ 60 degrees</text:p>
          </table:table-cell>
          <table:table-cell table:style-name="Default" table:number-columns-repeated="16382"/>
        </table:table-row>
        <table:table-row table:style-name="ro15">
          <table:table-cell office:value-type="string" calcext:value-type="string">
            <text:p>Family:  CUCUMBER (Cucumis sativus)</text:p>
            <text:p>Variety: Marketmore 76</text:p>
            <text:p>Original Seed Source: Ferry-Morse</text:p>
            <text:p>Comments: Direct sow outside after danger of frost. Plant 1/2” deep with 2-3 seeds per hill, 24” apart if sprawling, 4” apart if trellising.  Full sun; 6o days. Fruit 6”-8” long. Good for slicing.</text:p>
          </table:table-cell>
          <table:table-cell office:value-type="string" calcext:value-type="string">
            <text:p>2024</text:p>
            <text:p>EDIBLE</text:p>
            <text:p>Warm Season</text:p>
            <text:p>5+ Seeds</text:p>
            <text:p>Intermediate Seed Saver</text:p>
            <text:p>Germination: 5-6 days</text:p>
          </table:table-cell>
          <table:table-cell table:style-name="Default" table:number-columns-repeated="16382"/>
        </table:table-row>
        <table:table-row table:style-name="ro15">
          <table:table-cell table:style-name="ce42" office:value-type="string" calcext:value-type="string">
            <text:p>Family:  CUCUMBER (Cucumis sativus)</text:p>
            <text:p>Variety: Muncher</text:p>
            <text:p>Original Seed Source: americanseedco.com</text:p>
            <text:p>Comments: Direct sow outside after danger of frost.</text:p>
            <text:p>Plant 1” below soil with 2-3 seeds per hill if spawling, 4” apart if trellising.  Full sun; 45 days. Fruit up to 6-8” long.  Early maturing slicer, bitter-free.</text:p>
            <text:p>Soil Temp Range: 60– 105 Optimum: 85°</text:p>
          </table:table-cell>
          <table:table-cell table:style-name="ce42" office:value-type="string" calcext:value-type="string">
            <text:p>2016</text:p>
            <text:p>EDIBLE</text:p>
            <text:p>Warm Season</text:p>
            <text:p>10+ Seeds</text:p>
            <text:p>Intermediate Seed Saver</text:p>
            <text:p>Germination: 5-6 days</text:p>
            <text:p>@ 85 degrees</text:p>
          </table:table-cell>
          <table:table-cell table:style-name="Default" table:number-columns-repeated="16382"/>
        </table:table-row>
        <table:table-row table:style-name="ro15">
          <table:table-cell office:value-type="string" calcext:value-type="string">
            <text:p>Family:  CUCUMBER (Cucumis sativus)</text:p>
            <text:p>Variety: National Pickling</text:p>
            <text:p>Original Seed Source: Ferry-Morse</text:p>
            <text:p>Comments: Direct sow outside after danger of frost.  Plant 1” below soil with 2-3 seeds per hill if spawling, 4” apart if trellising.  Full sun; 55-60 days. Dark green 5-6” fruit.  A favorite for pickling; extremely prolific.</text:p>
          </table:table-cell>
          <table:table-cell office:value-type="string" calcext:value-type="string">
            <text:p>2016</text:p>
            <text:p>EDIBLE</text:p>
            <text:p>Warm Season</text:p>
            <text:p>10+ Seeds</text:p>
            <text:p>Intermediate Seed Saver</text:p>
            <text:p>Germination: 5-6 days</text:p>
          </table:table-cell>
          <table:table-cell table:style-name="Default" table:number-columns-repeated="16382"/>
        </table:table-row>
        <table:table-row table:style-name="ro15">
          <table:table-cell table:style-name="ce42" office:value-type="string" calcext:value-type="string">
            <text:p>Family:  CUCUMBER (Cucumis sativus)</text:p>
            <text:p>Variety: Poinsett</text:p>
            <text:p>Original Seed Source: Botanical Interests</text:p>
            <text:p>Comments: Direct sow outside after danger of frost. Plant 1/2” below soil with 2-3 seeds per hill if spawling, 4” apart if trellising.  Full sun; 65 days. Fruit up to 6-8” long.</text:p>
            <text:p>High yield; disease resistance; thin skin; great slicer.</text:p>
            <text:p>Soil Temp Range: 60– 105 Optimum: 85°</text:p>
          </table:table-cell>
          <table:table-cell table:style-name="ce42" office:value-type="string" calcext:value-type="string">
            <text:p>2022</text:p>
            <text:p>EDIBLE</text:p>
            <text:p>Warm Season</text:p>
            <text:p>10+ Seeds</text:p>
            <text:p>Intermediate Seed Saver</text:p>
            <text:p>Germination: 5-6 days</text:p>
            <text:p>@ 85 degrees</text:p>
          </table:table-cell>
          <table:table-cell table:style-name="Default" table:number-columns-repeated="16382"/>
        </table:table-row>
        <table:table-row table:style-name="ro15">
          <table:table-cell office:value-type="string" calcext:value-type="string">
            <text:p>Family:  CUCUMBER (Cucumis sativus)</text:p>
            <text:p>Variety: Parisian Gherkin</text:p>
            <text:p>Original Seed Source: Botanical Interest</text:p>
            <text:p>Comments: Direct sow outside 1-2 weeks after danger of frost.  Plant 1/2” deep with 2-3 seeds 12” apart if trellising. Thin to 1 plant each hill. Full sun; 50 days. Dark green 1 1/2” to 4” fruit. A favorite for making sweet pickles.</text:p>
          </table:table-cell>
          <table:table-cell office:value-type="string" calcext:value-type="string">
            <text:p>2021</text:p>
            <text:p>EDIBLE</text:p>
            <text:p>Warm Season</text:p>
            <text:p>9+ Seeds</text:p>
            <text:p>Hybrid  Do Not Save</text:p>
            <text:p>Seeds</text:p>
            <text:p>Germination: 5-10 days</text:p>
          </table:table-cell>
          <table:table-cell table:style-name="Default" table:number-columns-repeated="16382"/>
        </table:table-row>
        <table:table-row table:style-name="ro15">
          <table:table-cell table:style-name="ce42" office:value-type="string" calcext:value-type="string">
            <text:p>Family:  CUCUMBER (Cucumis sativus)</text:p>
            <text:p>Variety: Sumter</text:p>
            <text:p>Original Seed Source: Ferry Morse</text:p>
            <text:p>Comments: Direct sow outside after danger of frost.  Plant 1/2” below soil with 2-3 seeds per hill 4’-5’ apart.  Full sun; 56 days. Fruit up to 9” long. A favorite for slicing and pickling; resists scab and tolerates mosaic.</text:p>
          </table:table-cell>
          <table:table-cell table:style-name="ce42" office:value-type="string" calcext:value-type="string">
            <text:p>2024</text:p>
            <text:p>EDIBLE</text:p>
            <text:p>Warm Season</text:p>
            <text:p>6 Seeds</text:p>
            <text:p>Intermediate Seed Saver</text:p>
            <text:p>Germination: 5-6 days</text:p>
          </table:table-cell>
          <table:table-cell table:style-name="Default" table:number-columns-repeated="16382"/>
        </table:table-row>
        <table:table-row table:style-name="ro15">
          <table:table-cell office:value-type="string" calcext:value-type="string">
            <text:p>Family:  CUCUMBER (Cucumis sativus)</text:p>
            <text:p>Variety: Slicer</text:p>
            <text:p>Original Seed Source: Ferry Morse</text:p>
            <text:p>Comments: Direct sow outside after danger of frost.  Plant 1/2” below soil with 2-3 seeds per hill if sprawling, 4” apart. Keep picked so the plant continues to produce.</text:p>
          </table:table-cell>
          <table:table-cell office:value-type="string" calcext:value-type="string">
            <text:p>2022</text:p>
            <text:p>EDIBLE</text:p>
            <text:p>Warm Season</text:p>
            <text:p>8+ Seeds</text:p>
            <text:p>Intermediate Seed Saver</text:p>
            <text:p>Germination: 8-10 days</text:p>
          </table:table-cell>
          <table:table-cell table:style-name="Default" table:number-columns-repeated="16382"/>
        </table:table-row>
        <table:table-row table:style-name="ro15">
          <table:table-cell table:style-name="ce42" office:value-type="string" calcext:value-type="string">
            <text:p>Family:  CUCUMBER (Cucumis sativus)</text:p>
            <text:p>Variety: Spacemaster (Bush)</text:p>
            <text:p>Original Seed Source: Ferry Morse</text:p>
            <text:p>Comments: Direct sow outside after danger of frost.  Plant 1/2” below soil with 2-3 seeds per hill 4’ apart. Its 2’-3’ vines make it ideal for small spaces Full sun; 62 days.</text:p>
          </table:table-cell>
          <table:table-cell table:style-name="ce42" office:value-type="string" calcext:value-type="string">
            <text:p>2021</text:p>
            <text:p>EDIBLE</text:p>
            <text:p>Warm Season</text:p>
            <text:p>10+ Seeds</text:p>
            <text:p>Intermediate Seed Saver</text:p>
            <text:p>Germination: 5-10 days</text:p>
          </table:table-cell>
          <table:table-cell table:style-name="Default" table:number-columns-repeated="16382"/>
        </table:table-row>
        <table:table-row table:style-name="ro15">
          <table:table-cell office:value-type="string" calcext:value-type="string">
            <text:p>Family:  CUCUMBER (Cucumis sativus)</text:p>
            <text:p>Variety: Straight Eight</text:p>
            <text:p>Original Seed Source: American Seed</text:p>
            <text:p>Comments: Direct sow outside after danger of frost. Plant 1/2” below soil with 2-3 seeds per hill if sprawling, 4” apart if trellising.  Full sun; 55-60 days. Fruit up to 8” long.</text:p>
            <text:p>Soil Temp Range: 60– 105 Optimum: 85°</text:p>
          </table:table-cell>
          <table:table-cell office:value-type="string" calcext:value-type="string">
            <text:p>2022</text:p>
            <text:p>EDIBLE</text:p>
            <text:p>Warm Season</text:p>
            <text:p>5+ Seeds</text:p>
            <text:p>Intermediate Seed Saver</text:p>
            <text:p>Germination: 7-14 days</text:p>
            <text:p>@ 85 degrees</text:p>
          </table:table-cell>
          <table:table-cell table:style-name="Default" table:number-columns-repeated="16382"/>
        </table:table-row>
        <table:table-row table:style-name="ro15">
          <table:table-cell table:style-name="ce42" office:value-type="string" calcext:value-type="string">
            <text:p>Family:  EGGPLANT (Solanum melongena)</text:p>
            <text:p>Variety: Black Beauty Original Seed Source: Botanical Interests</text:p>
            <text:p>Comments: Start indoors 8-10 weeks before last average frost or direct sow after frost. Sow seeds 1/2” deep. Transplant 24” apart. Full sun. Best when harvested at peak; when skin is tender no need to peel. Pick when glossy and dark purple. Skin should not spring back when pressed with thumb.</text:p>
          </table:table-cell>
          <table:table-cell table:style-name="ce42" office:value-type="string" calcext:value-type="string">
            <text:p>2022</text:p>
            <text:p>EDIBLE</text:p>
            <text:p>Warm Season</text:p>
            <text:p>6 Seeds</text:p>
            <text:p>Easy Seed Saver</text:p>
            <text:p>Germination: 10-20 days</text:p>
          </table:table-cell>
          <table:table-cell table:style-name="Default" table:number-columns-repeated="16382"/>
        </table:table-row>
        <table:table-row table:style-name="ro15">
          <table:table-cell office:value-type="string" calcext:value-type="string">
            <text:p>Family:  EGGPLANT (Solanum melongena)</text:p>
            <text:p>Variety: Listada de Gandia</text:p>
            <text:p>Comments: Start indoors 8-10 weeks before last average frost or direct sow after frost. Sow seeds 1/2” deep after last frost. Transplant 2436” apart. Full sun. Best when harvested at peak; skin is tender no need to peel. 6”-8” oval eggplants that</text:p>
            <text:p>thrive on heat. 75-90 days to mature from transplant.</text:p>
          </table:table-cell>
          <table:table-cell office:value-type="string" calcext:value-type="string">
            <text:p>2022</text:p>
            <text:p>EDIBLE</text:p>
            <text:p>Warm Season</text:p>
            <text:p>5 Seeds</text:p>
            <text:p>Easy Seed Saver</text:p>
            <text:p>Germination: 10-20 days</text:p>
          </table:table-cell>
          <table:table-cell table:style-name="Default" table:number-columns-repeated="16382"/>
        </table:table-row>
        <table:table-row table:style-name="ro15">
          <table:table-cell table:style-name="ce42" office:value-type="string" calcext:value-type="string">
            <text:p>Family:  EGGPLANT (Solanum melongena)</text:p>
            <text:p>Variety: Long Purple Original Seed Source: Botanical Interests</text:p>
            <text:p>Comments: Start indoors 10-12 weeks before last average frost or direct sow after frost. Sow seeds 1/4” deep. Transplant 36” apart. Full sun. Best when harvested at peak; skin is tender no need to peel. 6”-8” oval eggplants that thrive on heat. 75-90</text:p>
            <text:p>days to mature from transplant. Milder more delicate flavor.</text:p>
          </table:table-cell>
          <table:table-cell table:style-name="ce42" office:value-type="string" calcext:value-type="string">
            <text:p>2022</text:p>
            <text:p>EDIBLE</text:p>
            <text:p>Warm Season</text:p>
            <text:p>5 Seeds</text:p>
            <text:p>Easy Seed Saver</text:p>
            <text:p>Germination: 10-20 days</text:p>
          </table:table-cell>
          <table:table-cell table:style-name="Default" table:number-columns-repeated="16382"/>
        </table:table-row>
        <table:table-row table:style-name="ro15">
          <table:table-cell office:value-type="string" calcext:value-type="string">
            <text:p>Family: Fennel (Foeniculum vulgare var. azoricum)</text:p>
            <text:p>Variety: Finocchio</text:p>
            <text:p>Original Seed Source: Botanical Interests</text:p>
            <text:p>Comments: For “bulb”, sow in fall for cool season harvest. For foliage only; every 3 weeks after last frost until midsummer. Plant 1/4” deep 10” apart.</text:p>
            <text:p>Bulb has anise flavor, and can be eaten raw or cooked. Feathery foliage is a garnish for fish &amp; chicken. Seed can be harvested for a spice.</text:p>
          </table:table-cell>
          <table:table-cell office:value-type="string" calcext:value-type="string">
            <text:p>2024</text:p>
            <text:p>EDIBLE</text:p>
            <text:p>All Season</text:p>
            <text:p>10+ Seeds</text:p>
            <text:p>Beginner Seed Saver</text:p>
          </table:table-cell>
          <table:table-cell table:style-name="Default" table:number-columns-repeated="16382"/>
        </table:table-row>
        <table:table-row table:style-name="ro15">
          <table:table-cell table:style-name="ce42" office:value-type="string" calcext:value-type="string">
            <text:p>Family: Fennel (Foeniculum vulgare var. azoricum)</text:p>
            <text:p>Variety: Perfection</text:p>
            <text:p>Original Seed Source: Botanical Interests</text:p>
            <text:p>Comments: For “bulb”, sow in fall for cool season harvest. For foliage only; every 3 weeks after last frost until midsummer. Plant 1/4” deep 10” apart.</text:p>
            <text:p>Bulb has anise flavor, and can be eaten raw or cooked. Feathery foliage is a garnish for fish &amp; chicken. Seed can be harvested for a spice.</text:p>
          </table:table-cell>
          <table:table-cell table:style-name="ce42" office:value-type="string" calcext:value-type="string">
            <text:p>2020</text:p>
            <text:p>EDIBLE</text:p>
            <text:p>All Season</text:p>
            <text:p>10+ Seeds</text:p>
            <text:p>Beginner Seed Saver</text:p>
          </table:table-cell>
          <table:table-cell table:style-name="Default" table:number-columns-repeated="16382"/>
        </table:table-row>
        <table:table-row table:style-name="ro15">
          <table:table-cell office:value-type="string" calcext:value-type="string">
            <text:p>Family: Flax (Linaceae linum)</text:p>
            <text:p>Variety: GOLDEN</text:p>
            <text:p>Original Seed Source: One Degree Organics</text:p>
            <text:p>Comments: Plant 1/8” deep thickly in full sun. Grows best in poor, dry soil. Germinates in about a month.</text:p>
          </table:table-cell>
          <table:table-cell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5">
          <table:table-cell table:style-name="ce42" office:value-type="string" calcext:value-type="string">
            <text:p>Family: FLOWER African Daisy (Dimorphotheca sinuata)</text:p>
            <text:p>Variety: Cape Marigold Original Seed Source: Botanical Interests</text:p>
            <text:p>Comments: Start inside 4-6 weeks before average last frost. Outside, plant 1-2 weeks before average last frost. Seed depth 1/8”, with 8” apart. Pollinator attractor. Fairly drought tolerant</text:p>
          </table:table-cell>
          <table:table-cell table:style-name="ce42" office:value-type="string" calcext:value-type="string">
            <text:p>2020</text:p>
            <text:p>Blooms heaviest Cool Season</text:p>
            <text:p>Various Seeds</text:p>
            <text:p>Easy Seed Saver</text:p>
            <text:p>Annual Full Sun</text:p>
          </table:table-cell>
          <table:table-cell table:style-name="Default" table:number-columns-repeated="16382"/>
        </table:table-row>
        <table:table-row table:style-name="ro15">
          <table:table-cell office:value-type="string" calcext:value-type="string">
            <text:p>Family: FLOWER  ALYSSUM (Lobularia maritima)</text:p>
            <text:p>Variety: Allure Pastel Blend Original Seed Source: Botanical Interests</text:p>
            <text:p>Comments: Outside, plant 1-2 weeks before average last frost. Fall planting in mild climates for winter bloom. Sow a pinch every 6”.  Press seed lightly into soil surface. Light aids germination. Attracts pollinators and is drought and heat</text:p>
            <text:p>tolerant. Deer resistant.</text:p>
          </table:table-cell>
          <table:table-cell office:value-type="string" calcext:value-type="string">
            <text:p>2022</text:p>
            <text:p>All Season</text:p>
            <text:p>Various Seeds</text:p>
            <text:p>Easy Seed Saver</text:p>
            <text:p>Annual Full sun to part</text:p>
            <text:p>shade</text:p>
          </table:table-cell>
          <table:table-cell table:style-name="Default" table:number-columns-repeated="16382"/>
        </table:table-row>
        <table:table-row table:style-name="ro15">
          <table:table-cell table:style-name="ce42" office:value-type="string" calcext:value-type="string">
            <text:p>Family: FLOWER  ALYSSUM (Lobularia maritima)</text:p>
            <text:p>Variety: Oriental Nights Original Seed Source: Botanical Interests</text:p>
            <text:p>Comments: Start inside 4-6 weeks before average last frost. Outside, plant 1-2 weeks before average last frost. Fall planting in mild climates for winter bloom. Light aids germination.</text:p>
            <text:p>Press seed lightly into soil surface</text:p>
            <text:p>Soil Temp Range: 60°-85°</text:p>
          </table:table-cell>
          <table:table-cell table:style-name="ce42" office:value-type="string" calcext:value-type="string">
            <text:p>2020</text:p>
            <text:p>Cool Season</text:p>
            <text:p>Various Seeds</text:p>
            <text:p>Easy Seed Saver</text:p>
            <text:p>Annual Full sun to part</text:p>
            <text:p>shade</text:p>
          </table:table-cell>
          <table:table-cell table:style-name="Default" table:number-columns-repeated="16382"/>
        </table:table-row>
        <table:table-row table:style-name="ro15">
          <table:table-cell office:value-type="string" calcext:value-type="string">
            <text:p>Family: FLOWER  ALYSSUM (Lobularia maritima)</text:p>
            <text:p>Variety: Rosie O’Day</text:p>
            <text:p>Original Seed Source: Botanical Interests</text:p>
            <text:p>Comments: Start inside 4-6 weeks before average last frost. Outside, plant 1-2 weeks before average last frost. Fall planting in mild climates for winter bloom. Light aids germination. Press seed lightly into soil surface. Rosy pink blossoms</text:p>
          </table:table-cell>
          <table:table-cell office:value-type="string" calcext:value-type="string">
            <text:p>2022</text:p>
            <text:p>Cool Season</text:p>
            <text:p>Various Seeds</text:p>
            <text:p>Easy Seed Saver</text:p>
            <text:p>Annual Full sun to part</text:p>
            <text:p>shade</text:p>
          </table:table-cell>
          <table:table-cell table:style-name="Default" table:number-columns-repeated="16382"/>
        </table:table-row>
        <table:table-row table:style-name="ro15">
          <table:table-cell table:style-name="ce42" office:value-type="string" calcext:value-type="string">
            <text:p>Family: FLOWER  ALYSSUM (Lobularia maritima)</text:p>
            <text:p>Variety: Tiny Tim Original Seed Source: Botanical Interests</text:p>
            <text:p>Comments: Start inside 4-6 weeks before average last frost. Outside, plant 1-2 weeks before average last frost. Fall planting in mild climates for winter bloom. Light aids germination.</text:p>
            <text:p>Press seed lightly into soil surface</text:p>
            <text:p>Soil Temp Range: 60°-85°</text:p>
          </table:table-cell>
          <table:table-cell table:style-name="ce42" office:value-type="string" calcext:value-type="string">
            <text:p>2020</text:p>
            <text:p>Cool Season</text:p>
            <text:p>Various Seeds</text:p>
            <text:p>Easy Seed Saver</text:p>
            <text:p>Annual Full sun to part</text:p>
            <text:p>shade</text:p>
          </table:table-cell>
          <table:table-cell table:style-name="Default" table:number-columns-repeated="16382"/>
        </table:table-row>
        <table:table-row table:style-name="ro15">
          <table:table-cell office:value-type="string" calcext:value-type="string">
            <text:p>CCMG Seed Library Family: FLOWER A Seed Library Variety: Annual Cut Flower Mix</text:p>
            <text:p>Seed Source: Ferry Morse</text:p>
            <text:p>Comments: Scatter seeds 2-4 weeks before average last frost. Rake seeds in to 1/8”-1/4” depth and water gently and keep moist until plants are established.</text:p>
            <text:p>Varieties include calendula, batchelor button, zinnia,</text:p>
            <text:p>delphinium, baby’s breath, soapwort and more.</text:p>
          </table:table-cell>
          <table:table-cell office:value-type="string" calcext:value-type="string">
            <text:p>2022</text:p>
            <text:p>Warm Season</text:p>
            <text:p>20+ Seeds</text:p>
            <text:p>Advanced Seed Saver</text:p>
          </table:table-cell>
          <table:table-cell table:style-name="Default" table:number-columns-repeated="16382"/>
        </table:table-row>
        <table:table-row table:style-name="ro15">
          <table:table-cell table:style-name="ce42" office:value-type="string" calcext:value-type="string">
            <text:p>Family: FLOWER (Helianthus annus)</text:p>
            <text:p>Variety: Sunflower—Fort Apache</text:p>
            <text:p>Original Seed Source:  Native Seed Search Comments: Produces medium to large, yellow heads and seeds for roasting or eaten raw. Direct sow in desired position, as sunflowers do not transplant well.  Split or remove hard seed</text:p>
            <text:p>hulls. Plant 1” deep with 12-18 inches or more between plants. Sow in full sun in spring; tolerate heat and drought well.</text:p>
          </table:table-cell>
          <table:table-cell table:style-name="ce42" office:value-type="string" calcext:value-type="string">
            <text:p>2018</text:p>
            <text:p>Warm Season</text:p>
            <text:p>10 Seeds</text:p>
            <text:p>Easy Seed Saver</text:p>
          </table:table-cell>
          <table:table-cell table:style-name="Default" table:number-columns-repeated="16382"/>
        </table:table-row>
        <table:table-row table:style-name="ro15">
          <table:table-cell office:value-type="string" calcext:value-type="string">
            <text:p>Family: FLOWER Aster (Callistephus chinensis)</text:p>
            <text:p>Variety: China Aster Blend</text:p>
            <text:p>Original Seed Source: Botanical Interests</text:p>
            <text:p>Comments: Start inside 6-8 weeks before last frost. Sow outside 1 to 2 weeks after last frost. Plant 1/8” deep</text:p>
            <text:p>every 6-12”.  Makes wonderful cut flowers.</text:p>
          </table:table-cell>
          <table:table-cell office:value-type="string" calcext:value-type="string">
            <text:p>2022</text:p>
            <text:p>Blooms Summer to Fall</text:p>
            <text:p>Warm Season</text:p>
            <text:p>20+ Seeds</text:p>
            <text:p>Easy Seed Saver</text:p>
            <text:p>Annual Full Sun to Part Shade</text:p>
          </table:table-cell>
          <table:table-cell table:style-name="Default" table:number-columns-repeated="16382"/>
        </table:table-row>
        <table:table-row table:style-name="ro15">
          <table:table-cell table:style-name="ce42" office:value-type="string" calcext:value-type="string">
            <text:p>Family: FLOWER Aster (Callistephus chinensis)</text:p>
            <text:p>Variety: Tower Chamois</text:p>
            <text:p>Original Seed Source: Botanical Interests</text:p>
            <text:p>Comments: Start inside 6-8 weeks before last frost. Sow outside 1 to 2 weeks after last frost. Plant 1/8” deep</text:p>
            <text:p>every 6-12”.  Makes wonderful cut flowers.</text:p>
          </table:table-cell>
          <table:table-cell table:style-name="ce42" office:value-type="string" calcext:value-type="string">
            <text:p>2022</text:p>
            <text:p>Blooms Summer to Fall</text:p>
            <text:p>Warm Season</text:p>
            <text:p>10+ Seeds</text:p>
            <text:p>Easy Seed Saver</text:p>
            <text:p>Annual Full Sun to Part Shade</text:p>
          </table:table-cell>
          <table:table-cell table:style-name="Default" table:number-columns-repeated="16382"/>
        </table:table-row>
        <table:table-row table:style-name="ro15">
          <table:table-cell office:value-type="string" calcext:value-type="string">
            <text:p>Family: FLOWER</text:p>
            <text:p>Variety: Butterfly Garden Mix</text:p>
            <text:p>Original Seed Source: Botanical Interests</text:p>
            <text:p>Comments: Scatter seeds 2-4 weeks before average last frost. Rake seeds in to 1/8”-1/4” depth and water gently and keep moist until plants are established.  Approximately 13 varieties including Desert Lupine, Senna, Chia and Marigold, Globe Gilia, Firewheel, Dwarf Godetia, Coreopsis, Cornflower,</text:p>
            <text:p>and more.</text:p>
          </table:table-cell>
          <table:table-cell office:value-type="string" calcext:value-type="string">
            <text:p>2022</text:p>
            <text:p>Warm Season</text:p>
            <text:p>Various Seeds</text:p>
            <text:p>Advanced Seed Saver</text:p>
          </table:table-cell>
          <table:table-cell table:style-name="Default" table:number-columns-repeated="16382"/>
        </table:table-row>
        <table:table-row table:style-name="ro15">
          <table:table-cell table:style-name="ce42" office:value-type="string" calcext:value-type="string">
            <text:p>Family: FLOWER (Centaurea cyanus)</text:p>
            <text:p>Variety: Bachelor’s Button—Black Magic</text:p>
            <text:p>Original Seed Source:  Botanical Interests</text:p>
            <text:p>Comments: Drought tolerant, deer resistant and makes great cut or dried flowers. Self sows for continual growing . Direct sow 1-2 weeks before average last frost or in late summer for winter blooms. For optimum</text:p>
            <text:p>germination, chill seeds in the refrigerator 5 days before planting. Sow 1/4” deep, 8”-10” apart.</text:p>
          </table:table-cell>
          <table:table-cell table:style-name="ce42" office:value-type="string" calcext:value-type="string">
            <text:p>2021</text:p>
            <text:p>All Season Annual</text:p>
            <text:p>20-30 Seeds</text:p>
            <text:p>Easy Seed Saver</text:p>
            <text:p>Days to Germinate 7-14</text:p>
          </table:table-cell>
          <table:table-cell table:style-name="Default" table:number-columns-repeated="16382"/>
        </table:table-row>
        <table:table-row table:style-name="ro15">
          <table:table-cell office:value-type="string" calcext:value-type="string">
            <text:p>Family: FLOWER (Centaurea cyanus)</text:p>
            <text:p>Variety: Bachelor’s Button—Blue Boy</text:p>
            <text:p>Original Seed Source:  Botanical Interests</text:p>
            <text:p>Comments: Drought tolerant, deer resistant and makes great cut or dried flowers. Self sows for continual growing . Direct sow 1-2 weeks before average last frost or in late summer for winter blooms. For optimum</text:p>
            <text:p>germination, chill seeds in the refrigerator 5 days before planting. Sow 1/4” deep, 8”-10” apart.</text:p>
          </table:table-cell>
          <table:table-cell office:value-type="string" calcext:value-type="string">
            <text:p>2022</text:p>
            <text:p>All Season Annual</text:p>
            <text:p>20-30 Seeds</text:p>
            <text:p>Easy Seed Saver</text:p>
            <text:p>Days to Germinate 7-14</text:p>
          </table:table-cell>
          <table:table-cell table:style-name="Default" table:number-columns-repeated="16382"/>
        </table:table-row>
        <table:table-row table:style-name="ro15">
          <table:table-cell table:style-name="ce42" office:value-type="string" calcext:value-type="string">
            <text:p>Family: FLOWER BEE BALM (Monarda sp.)</text:p>
            <text:p>Variety: Lambada</text:p>
            <text:p>Original Seed Source: Botanical Interests</text:p>
            <text:p>Comments: Sow outside 2 to 4 weeks before last frost. Press seed gently onto surface of soil. Space 12” apart. Attracts pollinators. B. Deer resistant. Drought resistant. Unique, lavender-pink flower clusters. Petals are edible</text:p>
            <text:p>with a lemon-mint-oregano flavor. Pretty as cut flowers.</text:p>
          </table:table-cell>
          <table:table-cell table:style-name="ce42" office:value-type="string" calcext:value-type="string">
            <text:p>2022</text:p>
            <text:p>Blooms Summer and Fall</text:p>
            <text:p>Warm Season</text:p>
            <text:p>15</text:p>
            <text:p>Seeds</text:p>
            <text:p>Easy Seed Saver</text:p>
            <text:p>Annual Full Sun to Part</text:p>
            <text:p>Shade</text:p>
          </table:table-cell>
          <table:table-cell table:style-name="Default" table:number-columns-repeated="16382"/>
        </table:table-row>
        <table:table-row table:style-name="ro15">
          <table:table-cell office:value-type="string" calcext:value-type="string">
            <text:p>Family: FLOWER Black-eyed Susan (Rudbeckia hirta)</text:p>
            <text:p>Variety: Cherokee Sunset</text:p>
            <text:p>Grown By: Botanical Interests</text:p>
            <text:p>Comments:  Direct sow, pressing into surface about 18 inches apart. Start indoors, 8-10 weeks before last frost.</text:p>
            <text:p>Attracts pollinators.</text:p>
          </table:table-cell>
          <table:table-cell office:value-type="string" calcext:value-type="string">
            <text:p>2022</text:p>
            <text:p>Warm Season</text:p>
            <text:p>5 Seeds</text:p>
            <text:p>Easy Seed Saver</text:p>
            <text:p>Perennial in warm climates</text:p>
            <text:p>Germinates 10-</text:p>
            <text:p>15 days</text:p>
          </table:table-cell>
          <table:table-cell table:style-name="Default" table:number-columns-repeated="16382"/>
        </table:table-row>
        <table:table-row table:style-name="ro15">
          <table:table-cell table:style-name="ce42" office:value-type="string" calcext:value-type="string">
            <text:p>Family: FLOWER Thunbergia (Rudbeckia hirta)</text:p>
            <text:p>Variety: Black-eyed Susan</text:p>
            <text:p>Seed Source: Ferry-Morse</text:p>
            <text:p>Comments:  Direct sow, pressing into surface about 18 inches apart. Start indoors, 8-10 weeks before last frost. Attracts pollinators.</text:p>
          </table:table-cell>
          <table:table-cell table:style-name="ce42" office:value-type="string" calcext:value-type="string">
            <text:p>2024</text:p>
            <text:p>Warm Season</text:p>
            <text:p>10 Seeds</text:p>
            <text:p>Easy Seed Saver</text:p>
            <text:p>Perennial in warm climates</text:p>
            <text:p>Germinates 10-</text:p>
            <text:p>15 days</text:p>
          </table:table-cell>
          <table:table-cell table:style-name="Default" table:number-columns-repeated="16382"/>
        </table:table-row>
        <table:table-row table:style-name="ro15">
          <table:table-cell office:value-type="string" calcext:value-type="string">
            <text:p>Family: FLOWER  (Rudbeckia hirta)</text:p>
            <text:p>Variety: Black-eyed Susan</text:p>
            <text:p>Grown By: Botanical Interests</text:p>
            <text:p>Comments:  Direct sow, pressing into surface about 18 inches apart. Start indoors, 8-10 weeks before last frost.</text:p>
            <text:p>Attracts pollinators.</text:p>
          </table:table-cell>
          <table:table-cell office:value-type="string" calcext:value-type="string">
            <text:p>2022</text:p>
            <text:p>Warm Season</text:p>
            <text:p>15 Seeds</text:p>
            <text:p>Easy Seed Saver</text:p>
            <text:p>Perennial in warm climates</text:p>
            <text:p>Germinates 10-</text:p>
            <text:p>15 days</text:p>
          </table:table-cell>
          <table:table-cell table:style-name="Default" table:number-columns-repeated="16382"/>
        </table:table-row>
        <table:table-row table:style-name="ro15">
          <table:table-cell table:style-name="ce42" office:value-type="string" calcext:value-type="string">
            <text:p>Family: FLOWER Blue Bonnet (Lupinus perennis)</text:p>
            <text:p>Variety: Sundial Lupine</text:p>
            <text:p>Original Seed Source: Botanical Interests</text:p>
            <text:p>Comments: Scarify before planting. If planting inside, use biodegradable pots to plant outside without disturbing roots. Plant outside, in mild climates, Sept—Oct. Plant 1/8” deep, 4”</text:p>
            <text:p>apart, thin to 12” apart. Butterfly host. Drought tolerant once established.</text:p>
          </table:table-cell>
          <table:table-cell table:style-name="ce42" office:value-type="string" calcext:value-type="string">
            <text:p>2022</text:p>
            <text:p>Blooms Spring Warm Season</text:p>
            <text:p>Various Seeds</text:p>
            <text:p>Easy Seed Saver</text:p>
            <text:p>Perennial Full Sun</text:p>
          </table:table-cell>
          <table:table-cell table:style-name="Default" table:number-columns-repeated="16382"/>
        </table:table-row>
        <table:table-row table:style-name="ro15">
          <table:table-cell office:value-type="string" calcext:value-type="string">
            <text:p>Family: FLOWER Blue Bonnet (Lupinus texensis)</text:p>
            <text:p>Original Seed Source: Botanical Interests</text:p>
            <text:p>Comments: Soak seed in water for 12-24 hours and scarify before planting. Plant outside, in mild climates, Sept—Nov. plant 1-2 weeks before average last frost. Plant 1/8” deep, 4” apart, thin to 12” apart. Butterfly host and attracts bees.</text:p>
            <text:p>Drought tolerant once established. Deer resistant. May self</text:p>
            <text:p>seed .</text:p>
          </table:table-cell>
          <table:table-cell office:value-type="string" calcext:value-type="string">
            <text:p>2022</text:p>
            <text:p>Blooms Spring Warm Season</text:p>
            <text:p>20+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Bluebells (Phacelia companularia)</text:p>
            <text:p>Varity: California Bluebells</text:p>
            <text:p>Original Seed Source: Botanical Interests</text:p>
            <text:p>Comments: Plant outside plant 2-4 weeks before average last frost. Plant 1/16” deep, 6” apart. Attracts</text:p>
            <text:p>bees. Drought tolerant once established. Deer resistant.</text:p>
          </table:table-cell>
          <table:table-cell table:style-name="ce42" office:value-type="string" calcext:value-type="string">
            <text:p>2022</text:p>
            <text:p>Blooms Spring Warm Season</text:p>
            <text:p>40+ Seeds</text:p>
            <text:p>Easy Seed Saver</text:p>
            <text:p>Annual Full Sun to Part</text:p>
            <text:p>Shade</text:p>
          </table:table-cell>
          <table:table-cell table:style-name="Default" table:number-columns-repeated="16382"/>
        </table:table-row>
        <table:table-row table:style-name="ro15">
          <table:table-cell office:value-type="string" calcext:value-type="string">
            <text:p>Family: FLOWER</text:p>
            <text:p>Variety: Bring Home the Butterflies Mix</text:p>
            <text:p>Original Seed Source: Botanical Interests</text:p>
            <text:p>Comments: Scatter seeds 2-4 weeks before average last frost. Rake seeds in to 1/8”-1/4” depth and water gently and keep moist until plants are established.</text:p>
            <text:p>Varieties include Mexican lupine, Mexican sunflower,</text:p>
            <text:p>calendula, pincushion, coneflower and more.</text:p>
          </table:table-cell>
          <table:table-cell office:value-type="string" calcext:value-type="string">
            <text:p>2022</text:p>
            <text:p>Warm Season</text:p>
            <text:p>15 Seeds</text:p>
            <text:p>Advanced Seed Saver</text:p>
          </table:table-cell>
          <table:table-cell table:style-name="Default" table:number-columns-repeated="16382"/>
        </table:table-row>
        <table:table-row table:style-name="ro15">
          <table:table-cell table:style-name="ce42" office:value-type="string" calcext:value-type="string">
            <text:p>Family: FLOWER (Encelia farinosa)</text:p>
            <text:p>Variety: Brittlebush</text:p>
            <text:p>Original Seed Source: Native Seed Company</text:p>
            <text:p>Comments: Sow outside fall or spring. Scarify area to be seeded. Broadcast seed and cover with fine dusting of soil. Drought tolerant. Do not overwater. Seed heads are great for winter interest and birds love them, too.</text:p>
          </table:table-cell>
          <table:table-cell table:style-name="ce42" office:value-type="string" calcext:value-type="string">
            <text:p>2024</text:p>
            <text:p>Blooms February-April</text:p>
            <text:p>20+ Seeds</text:p>
            <text:p>Easy Seed Saver</text:p>
            <text:p>Perennial Full Sun to Part</text:p>
            <text:p>Shade</text:p>
          </table:table-cell>
          <table:table-cell table:style-name="Default" table:number-columns-repeated="16382"/>
        </table:table-row>
        <table:table-row table:style-name="ro15">
          <table:table-cell office:value-type="string" calcext:value-type="string">
            <text:p>Family: FLOWER (Lamiaceae or Labiatae)</text:p>
            <text:p>Variety: Salvia columbariae, CHIA, Ziegler’s Sage</text:p>
            <text:p>Harvested By: Greenlee’s Treasury of Seed</text:p>
            <text:p>Where Grown: Duncan, AZ</text:p>
            <text:p>Original Seed Source: Wild Harvested Comments: Annual/Perennial growing to 2ft high, 1.5 ft wide.  Purple flowers July to September.  Seeds ripen Aug- Sept. Cannot grow in shade; prefers dry or moist soil; drought tolerant.  Seeds eaten raw, cooked or sprouted. High nutritional</text:p>
            <text:p>value: niacin, thiamine, zinc, calcium, manganese.</text:p>
          </table:table-cell>
          <table:table-cell office:value-type="string" calcext:value-type="string">
            <text:p>2017</text:p>
            <text:p>EDIBLE</text:p>
            <text:p>Various Seeds</text:p>
            <text:p>Easy Seed Saver</text:p>
            <text:p>Great for Bees</text:p>
          </table:table-cell>
          <table:table-cell table:style-name="Default" table:number-columns-repeated="16382"/>
        </table:table-row>
        <table:table-row table:style-name="ro15">
          <table:table-cell table:style-name="ce42" office:value-type="string" calcext:value-type="string">
            <text:p>Family: FLOWER (Helianthus annuus)</text:p>
            <text:p>Variety: Common Sunflower</text:p>
            <text:p>Grown By: Native Seed/SEARCH Farm</text:p>
            <text:p>Where Grown: Patagonia, AZ</text:p>
            <text:p>Original Seed Source: www.nativeseeds.org</text:p>
            <text:p>Comments: Wild in the SW; seen along the highway; multi-branched 3-6 foot plants with 2” flowers.  Reseeds</text:p>
            <text:p>itself; can spread.</text:p>
          </table:table-cell>
          <table:table-cell table:style-name="ce42" office:value-type="string" calcext:value-type="string">
            <text:p>2016</text:p>
            <text:p>Warm Season</text:p>
            <text:p>10 Seeds</text:p>
            <text:p>Easy Seed Saver</text:p>
          </table:table-cell>
          <table:table-cell table:style-name="Default" table:number-columns-repeated="16382"/>
        </table:table-row>
        <table:table-row table:style-name="ro15">
          <table:table-cell office:value-type="string" calcext:value-type="string">
            <text:p>Family: FLOWER Calendula (Calendula officinalis)</text:p>
            <text:p>Variety: Oopsy Daisy</text:p>
            <text:p>Seed Source: Botanical Interests</text:p>
            <text:p>Comments: Direct sow in early spring for summer bloom in full sun. Plant late summer for winter bloom. Group a few</text:p>
            <text:p>seeds every 6-8 inches, cover lightly with 1/4 in soil. Keep moist until germinated, about 5-15 days to see sprouts.</text:p>
          </table:table-cell>
          <table:table-cell office:value-type="string" calcext:value-type="string">
            <text:p>2022</text:p>
            <text:p>Edible</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FLOWER (Calendula officinalis)</text:p>
            <text:p>Variety: Calendula, Pot Marigold, Pacific Beauty Blend</text:p>
            <text:p>Original Source: Botanical Interests</text:p>
            <text:p>Comments: Direct sow 2-4 weeks before last frost in full sun. Plant every 12 inches, cover lightly with 1/4 in soil. Keep moist until germinated. Heat and drought tolerant. Deer resistant. Attracts pollinators. Dried petals can be used in baking or</text:p>
          </table:table-cell>
          <table:table-cell table:style-name="ce42" office:value-type="string" calcext:value-type="string">
            <text:p>2022</text:p>
            <text:p>Edible</text:p>
            <text:p>Warm Season</text:p>
            <text:p>20+ Seeds</text:p>
            <text:p>Easy Seed Saver</text:p>
          </table:table-cell>
          <table:table-cell table:style-name="Default" table:number-columns-repeated="16382"/>
        </table:table-row>
        <table:table-row table:style-name="ro15">
          <table:table-cell office:value-type="string" calcext:value-type="string">
            <text:p>Family: FLOWER (Calendula officinalis)</text:p>
            <text:p>Variety: Calendula</text:p>
            <text:p>Grown by: Holly Vennum, Mother Tree Garden, Master</text:p>
            <text:p>Gardener Comments: Direct sow after last frost in full sun. Plant every 6 inches, cover lightly with 1/4 in soil. Keep moist until germinated, about 7-10 days to see sprouts.</text:p>
          </table:table-cell>
          <table:table-cell office:value-type="string" calcext:value-type="string">
            <text:p>2022</text:p>
            <text:p>Edible</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FLOWER Variety: Four O’Clock</text:p>
            <text:p>Original Seed Source: Botanical Interests Comments: An old favorite with brilliant trumpet-shaped, remaining open all night and usually close before noon Scatter seeds 2-4 weeks before average last frost. Rake seeds in to 1/4” depth and water gently and keep moist until plants</text:p>
            <text:p>are 4inches</text:p>
          </table:table-cell>
          <table:table-cell table:style-name="ce42" office:value-type="string" calcext:value-type="string">
            <text:p>2024</text:p>
            <text:p>Warm Season</text:p>
            <text:p>10 + Seeds</text:p>
            <text:p>Advanced Seed Saver</text:p>
          </table:table-cell>
          <table:table-cell table:style-name="Default" table:number-columns-repeated="16382"/>
        </table:table-row>
        <table:table-row table:style-name="ro15">
          <table:table-cell office:value-type="string" calcext:value-type="string">
            <text:p>Family: FLOWER CARNATION (Dianthus caryophyllus)</text:p>
            <text:p>Variety: Chabaud Blend</text:p>
            <text:p>Original Seed Source: Botanical Interests</text:p>
            <text:p>Comments: Start inside 8-10 weeks before last frost. Press seed into soil surface and do not cover. Transplant or direct sow every 12”. Mixed colors. Pollinator. Petals make a colorful garnish to salads, desserts and cold drinks.</text:p>
          </table:table-cell>
          <table:table-cell office:value-type="string" calcext:value-type="string">
            <text:p>2022</text:p>
            <text:p>Edible</text:p>
            <text:p>Warm Season</text:p>
            <text:p>10+ Seeds</text:p>
            <text:p>Easy Seed Saver</text:p>
            <text:p>Perennial Full Sun</text:p>
          </table:table-cell>
          <table:table-cell table:style-name="Default" table:number-columns-repeated="16382"/>
        </table:table-row>
        <table:table-row table:style-name="ro15">
          <table:table-cell table:style-name="ce42" office:value-type="string" calcext:value-type="string">
            <text:p>CCMG Seed Library</text:p>
            <text:p>Family:   FLOAWSERee—dCELLOibSIrAa(rCyelosia argentea</text:p>
            <text:p>var. Plumosa)</text:p>
            <text:p>Variety: Pampas Plume Tall Blend Seed Source: Botanical Interest</text:p>
            <text:p>Comments: Recommend starting inside 6-8 weeks before last frost. Light aids germination so sow shallowly. Keep moist until established. Fairly heat and drought tolerant.</text:p>
          </table:table-cell>
          <table:table-cell table:style-name="ce42" office:value-type="string" calcext:value-type="string">
            <text:p>2022</text:p>
            <text:p>Warm Season Full Sun</text:p>
            <text:p>6-8 Seeds</text:p>
            <text:p>Advanced Seed Saver</text:p>
          </table:table-cell>
          <table:table-cell table:style-name="Default" table:number-columns-repeated="16382"/>
        </table:table-row>
        <table:table-row table:style-name="ro15">
          <table:table-cell office:value-type="string" calcext:value-type="string">
            <text:p>Family: FLOWER Chocolate Flower (Berlandiera lyrata)</text:p>
            <text:p>Original Seed Source: Botanical Interests</text:p>
            <text:p>Comments: Start inside 4-6 weeks before average last frost. Outside, plant 1-2 weeks before average last frost. Light aids germination. Press seeds into soil surface, do not cover. Plant about 16” apart. Attracts beneficial insects. Best in well-</text:p>
            <text:p>drained, average to poor quality, dry soil. Deer resistant.</text:p>
          </table:table-cell>
          <table:table-cell office:value-type="string" calcext:value-type="string">
            <text:p>2020</text:p>
            <text:p>Blooms all summer Warm Season</text:p>
            <text:p>Various Seeds</text:p>
            <text:p>Easy Seed Saver</text:p>
            <text:p>Perennial Full Sun to Part</text:p>
            <text:p>Shade</text:p>
          </table:table-cell>
          <table:table-cell table:style-name="Default" table:number-columns-repeated="16382"/>
        </table:table-row>
        <table:table-row table:style-name="ro15">
          <table:table-cell table:style-name="ce42" office:value-type="string" calcext:value-type="string">
            <text:p>Family: FLOWER Coleus (Plectranthus scutellarioides)</text:p>
            <text:p>Variety: Rainbow Mixed Colors</text:p>
            <text:p>Original Seed Source: Ferry Morse</text:p>
            <text:p>Comments: For early bloom, start indoors or outdoors after last frost. Sprinkle seeds and press lightly into soil. Do not cover with dirt but cover with clear plastic dome and keep soil moist. Germination is slow, about 3 weeks. May be propagated with cuttings to have houseplants to overwinter. Toxic to dogs and cats if eaten.</text:p>
          </table:table-cell>
          <table:table-cell table:style-name="ce42" office:value-type="string" calcext:value-type="string">
            <text:p>2023</text:p>
            <text:p>Blooms Summer and Fall</text:p>
            <text:p>Warm Season</text:p>
            <text:p>20 Seeds</text:p>
            <text:p>Easy Seed Saver</text:p>
            <text:p>Annual Full to Part Shade</text:p>
          </table:table-cell>
          <table:table-cell table:style-name="Default" table:number-columns-repeated="16382"/>
        </table:table-row>
        <table:table-row table:style-name="ro15">
          <table:table-cell office:value-type="string" calcext:value-type="string">
            <text:p>Family: FLOWER Columbine (Aquilegia cultorum)</text:p>
            <text:p>Variety: McKana Giants Blend</text:p>
            <text:p>Original Seed Source: Botanical Interests</text:p>
            <text:p>Comments: Benefits from stratification, a cold moist period before planting. Sow outside 4 to 6 weeks before average last frost or until 8 weeks before first frost. Light aids germination.</text:p>
            <text:p>Press seed lightly into soil surface and keep moist. Space 12” apart. Lasts well as a cut flower.</text:p>
          </table:table-cell>
          <table:table-cell office:value-type="string" calcext:value-type="string">
            <text:p>2022</text:p>
            <text:p>Blooms Spring to early Summer</text:p>
            <text:p>Warm Season</text:p>
            <text:p>Various Seeds</text:p>
            <text:p>Easy Seed Saver</text:p>
            <text:p>Perennial Full Sun to Part Shade</text:p>
          </table:table-cell>
          <table:table-cell table:style-name="Default" table:number-columns-repeated="16382"/>
        </table:table-row>
        <table:table-row table:style-name="ro15">
          <table:table-cell table:style-name="ce42" office:value-type="string" calcext:value-type="string">
            <text:p>Family: FLOWER Columbine (Aquilegia coerulea)</text:p>
            <text:p>Variety: Rocky Mountain Blue</text:p>
            <text:p>Original Seed Source: Botanical Interests</text:p>
            <text:p>Comments: Benefits from stratification, a cold moist period before planting. Sow outside 4 to 6 weeks before average last frost or until 8 weeks before first frost. Light aids germination.</text:p>
            <text:p>Press seed lightly into soil surface and keep moist. Space 12” apart. Attracts hummingbirds. Lasts well as a cut flower.</text:p>
          </table:table-cell>
          <table:table-cell table:style-name="ce42" office:value-type="string" calcext:value-type="string">
            <text:p>2020</text:p>
            <text:p>Blooms Spring to early Summer</text:p>
            <text:p>Warm Season</text:p>
            <text:p>Various Seeds</text:p>
            <text:p>Easy Seed Saver</text:p>
            <text:p>Perennial Full Sun to Part Shade</text:p>
          </table:table-cell>
          <table:table-cell table:style-name="Default" table:number-columns-repeated="16382"/>
        </table:table-row>
        <table:table-row table:style-name="ro15">
          <table:table-cell office:value-type="string" calcext:value-type="string">
            <text:p>Family: FLOWER Coreopsis (Coreopsis lanceolata)</text:p>
            <text:p>Variety: Double Sunburst</text:p>
            <text:p>Original Seed Source: Botanical Interests</text:p>
            <text:p>Comments: Sow outside 1 to 2 weeks before average last frost or until 8 weeks before first frost. Light aids germination. Press seed lightly into soil surface and keep moist. Space 12” apart. Thrives in heat, humidity and poor or dry soils.</text:p>
            <text:p>Pollinator and long lasting cut flower. Drought tolerant once established.</text:p>
          </table:table-cell>
          <table:table-cell office:value-type="string" calcext:value-type="string">
            <text:p>2022</text:p>
            <text:p>Blooms Summer to frost</text:p>
            <text:p>Warm Season</text:p>
            <text:p>Various Seeds</text:p>
            <text:p>Easy Seed Saver</text:p>
            <text:p>Perennial Full Sun</text:p>
          </table:table-cell>
          <table:table-cell table:style-name="Default" table:number-columns-repeated="16382"/>
        </table:table-row>
        <table:table-row table:style-name="ro15">
          <table:table-cell table:style-name="ce42" office:value-type="string" calcext:value-type="string">
            <text:p>Family: FLOWER Cosmos (Cosmos sulphureus)</text:p>
            <text:p>Variety: Bright Lights Mixed Color</text:p>
            <text:p>Original Seed Source: Botanical Interests</text:p>
            <text:p>Comments: Sow outside 1 to 2 weeks after last frost frost. Plant with just a light cover of dirt. Space 12” apart. Attracts pollinators. Lasts well as a cut flower. Drought tolerant. Red,</text:p>
            <text:p>orange and yellow flowers.</text:p>
          </table:table-cell>
          <table:table-cell table:style-name="ce42" office:value-type="string" calcext:value-type="string">
            <text:p>2022</text:p>
            <text:p>Blooms Summer to Frost Warm Season</text:p>
            <text:p>10+ Seeds</text:p>
            <text:p>Easy Seed Saver</text:p>
            <text:p>Annual Full Sun</text:p>
          </table:table-cell>
          <table:table-cell table:style-name="Default" table:number-columns-repeated="16382"/>
        </table:table-row>
        <table:table-row table:style-name="ro15">
          <table:table-cell office:value-type="string" calcext:value-type="string">
            <text:p>Family: FLOWER Cosmos (Cosmos bipinnatus)</text:p>
            <text:p>Variety: Candy Stripe</text:p>
            <text:p>Original Seed Source: Botanical Interests</text:p>
            <text:p>Comments: Sow outside 1 to 2 weeks after last frost frost. Plant with just a light cover of dirt. Space 12” apart. Attracts pollinators. Lasts well as a cut flower. Drought tolerant. White</text:p>
            <text:p>petals with pink edges.</text:p>
          </table:table-cell>
          <table:table-cell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Cosmos (Cosmos sulphureus)</text:p>
            <text:p>Variety: Diablo</text:p>
            <text:p>Original Seed Source: Botanical Interests</text:p>
            <text:p>Comments: Sow outside 1 to 2 weeks after last frost frost. Plant with just a light cover of dirt. Space 12” apart. Attracts pollinators. Lasts well as a cut flower. Drought tolerant. Orange</text:p>
            <text:p>and yellow flowers.</text:p>
          </table:table-cell>
          <table:table-cell table:style-name="ce42"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5">
          <table:table-cell office:value-type="string" calcext:value-type="string">
            <text:p>Family: FLOWER Cosmos (Cosmos bipinnatus)</text:p>
            <text:p>Variety: Double Click Blend</text:p>
            <text:p>Original Seed Source: Botanical Interests</text:p>
            <text:p>Comments: Sow outside 1 to 2 weeks after last frost frost. Plant with just a light cover of dirt. Space 12” apart. Attracts pollinators. Lasts well as a cut flower. Drought tolerant. Double</text:p>
            <text:p>pink, white and red flowers.</text:p>
          </table:table-cell>
          <table:table-cell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Cosmos (Cosmos bipinnatus)</text:p>
            <text:p>Variety: Rubenza</text:p>
            <text:p>Original Seed Source: Botanical Interests</text:p>
            <text:p>Comments: Sow outside 1 to 2 weeks after last frost frost. Plant with just a light cover of dirt. Space 12” apart. Attracts pollinators. Lasts well as a cut flower. Drought tolerant. Bold</text:p>
            <text:p>red flowers.</text:p>
          </table:table-cell>
          <table:table-cell table:style-name="ce42"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5">
          <table:table-cell office:value-type="string" calcext:value-type="string">
            <text:p>Family: FLOWER  Cosmos (Cosmos bipinnatus)</text:p>
            <text:p>Variety: Sensation Blend</text:p>
            <text:p>Original Seed Source: Botanical Interests</text:p>
            <text:p>Comments: Sow outside 1 to 2 weeks after last frost frost. Plant with just a light cover of dirt. Space 12” apart. Attracts pollinators. Lasts well as a cut flower. Drought tolerant. Red, pink and white flowers.</text:p>
          </table:table-cell>
          <table:table-cell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Cosmos (Cosmos bipinnatus)</text:p>
            <text:p>Variety: Sensation Blend</text:p>
            <text:p>Original Seed Source: Botanical Interests</text:p>
            <text:p>Comments: Sow outside 1 to 2 weeks after last frost frost. Plant with just a light cover of dirt. Space 12” apart. Attracts pollinators. Lasts well as a cut flower. Drought tolerant. Red, pink and white flowers.</text:p>
          </table:table-cell>
          <table:table-cell table:style-name="ce42"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5">
          <table:table-cell office:value-type="string" calcext:value-type="string">
            <text:p>Family: FLOWER Cosmos (Cosmos bipinnatus)</text:p>
            <text:p>Variety: Xanthos</text:p>
            <text:p>Original Seed Source: Botanical Interests</text:p>
            <text:p>Comments: Sow outside 1 to 2 weeks after last frost frost. Plant with just a light cover of dirt. Space 12” apart. Attracts pollinators. Lasts well as a cut flower. Drought tolerant. Soft</text:p>
            <text:p>lime yellow with white edges.</text:p>
          </table:table-cell>
          <table:table-cell office:value-type="string" calcext:value-type="string">
            <text:p>2022</text:p>
            <text:p>Blooms Summer to Frost Warm Season</text:p>
            <text:p>10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text:p>
            <text:p>Variety: DIANTHUS CRINITUS</text:p>
            <text:p>Grown By: Gisa Krueger</text:p>
            <text:p>Where Grown: Her garden</text:p>
            <text:p>Original Seed Source: Southern Spain (Andalucia)</text:p>
            <text:p>Comments: Grows well in large pots, may not flower first year.  Once established, very prolific.  Light pink flowers; very</text:p>
            <text:p>fragrant.</text:p>
          </table:table-cell>
          <table:table-cell table:style-name="ce42" office:value-type="string" calcext:value-type="string">
            <text:p>2017</text:p>
            <text:p>Warm Season</text:p>
            <text:p>Various Seeds</text:p>
            <text:p>Easy Seed Saver</text:p>
          </table:table-cell>
          <table:table-cell table:style-name="Default" table:number-columns-repeated="16382"/>
        </table:table-row>
        <table:table-row table:style-name="ro15">
          <table:table-cell office:value-type="string" calcext:value-type="string">
            <text:p>Family: FLOWER Variety: Dahlia</text:p>
            <text:p>Original Seed Source: Botanical Interests Comments: Breathtaking Tall Blend Blooms appear 90 days after sowing. Perenial zone 7-10</text:p>
            <text:p>When to sow: Outside 2 to 4 weeks after last average frost date.</text:p>
            <text:p>Inside (recommended) 8 to 10 weeks before average last frost..</text:p>
          </table:table-cell>
          <table:table-cell office:value-type="string" calcext:value-type="string">
            <text:p>2022</text:p>
            <text:p>Warm Season</text:p>
            <text:p>Various seeds</text:p>
            <text:p>Advanced Seed Saver</text:p>
          </table:table-cell>
          <table:table-cell table:style-name="Default" table:number-columns-repeated="16382"/>
        </table:table-row>
        <table:table-row table:style-name="ro15">
          <table:table-cell table:style-name="ce42" office:value-type="string" calcext:value-type="string">
            <text:p>Family: FLOWER Delphinium (Delphinium grandiflorum)</text:p>
            <text:p>Variety: Butterfly Blend</text:p>
            <text:p>Original Seed Source: Botanical Interests</text:p>
            <text:p>Comments: Sow outside 1 to 2 weeks after last frost frost and in mild climates as late as 2 months before first frost. Plant 1/4” deep. Space 12” apart. Attracts pollinators. Lasts well as a cut flower. Deer resistant. Grows well in containers, small</text:p>
            <text:p>spaces or borders.</text:p>
          </table:table-cell>
          <table:table-cell table:style-name="ce42" office:value-type="string" calcext:value-type="string">
            <text:p>2020</text:p>
            <text:p>Blooms Late Spring to Summer</text:p>
            <text:p>Warm Season</text:p>
            <text:p>Various Seeds</text:p>
            <text:p>Easy Seed Saver</text:p>
            <text:p>Perennial Full Sun to Part</text:p>
            <text:p>Shade</text:p>
          </table:table-cell>
          <table:table-cell table:style-name="Default" table:number-columns-repeated="16382"/>
        </table:table-row>
        <table:table-row table:style-name="ro15">
          <table:table-cell office:value-type="string" calcext:value-type="string">
            <text:p>Family: FLOWER Delphinium (Delphinium elatum)</text:p>
            <text:p>Variety: Pacific Giants Blend</text:p>
            <text:p>Original Seed Source: Botanical Interests</text:p>
            <text:p>Comments: Sow outside 1 to 2 weeks after last frost frost and in mild climates as late as 2 months before first frost.</text:p>
            <text:p>Plant 1/4” deep. Space 12” apart. Attracts pollinators. Lasts well as a cut flower. Deer resistant. Grows 3’ to 6’ tall.</text:p>
            <text:p>Caution: poisonous if ingested!</text:p>
          </table:table-cell>
          <table:table-cell office:value-type="string" calcext:value-type="string">
            <text:p>2022</text:p>
            <text:p>Blooms Spring to early Summer</text:p>
            <text:p>Warm Season</text:p>
            <text:p>15 +Seeds</text:p>
            <text:p>Easy Seed Saver</text:p>
            <text:p>Perennial Full Sun</text:p>
          </table:table-cell>
          <table:table-cell table:style-name="Default" table:number-columns-repeated="16382"/>
        </table:table-row>
        <table:table-row table:style-name="ro15">
          <table:table-cell table:style-name="ce42" office:value-type="string" calcext:value-type="string">
            <text:p>Family: FLOWER (Lupinus sparsiflorus)</text:p>
            <text:p>Variety: Desert Lupine</text:p>
            <text:p>Comments: Native to southwest US &amp; Mexico; upright purple pollinator wildflower. Soak seeds in warm water overnight. Loosen soil to allow for a long taproot. Rake seeds into planting site early fall or freeze and plant early spring. Then cover seeds with about 1/2 inch soil.  Water thoroughly and keep lightly moist until plants are established; once established, give deep water occasionally but are drought resistant and will reseed themselves. Needs well drained soil</text:p>
            <text:p>with little amendments. Thrives in full sun. Adds nitrogen to</text:p>
          </table:table-cell>
          <table:table-cell table:style-name="ce42" office:value-type="string" calcext:value-type="string">
            <text:p>2019</text:p>
            <text:p>NON-EDIBLE</text:p>
            <text:p>10 Seeds</text:p>
            <text:p>Easy Seed Saver</text:p>
          </table:table-cell>
          <table:table-cell table:style-name="Default" table:number-columns-repeated="16382"/>
        </table:table-row>
        <table:table-row table:style-name="ro15">
          <table:table-cell office:value-type="string" calcext:value-type="string">
            <text:p>Family: FLOWER (Baileya multiradiata)</text:p>
            <text:p>Variety: Desert Marigold</text:p>
            <text:p>Original Seed Source: Native Seed Search</text:p>
            <text:p>Comments: Work soil with a hard rake until loose. Work seeds into the top 1/2” in September through mid-February. Grows best as a late cool season.  Time watering to coincide with moist, low pressure but do not overwater Scattering</text:p>
            <text:p>branches or rocks among planting will help seedlings become established</text:p>
          </table:table-cell>
          <table:table-cell office:value-type="string" calcext:value-type="string">
            <text:p>2024</text:p>
            <text:p>Non-edible Cool season</text:p>
            <text:p>20+ Seeds</text:p>
            <text:p>Beginner Seed Saver</text:p>
            <text:p>Great for Pollinators</text:p>
          </table:table-cell>
          <table:table-cell table:style-name="Default" table:number-columns-repeated="16382"/>
        </table:table-row>
        <table:table-row table:style-name="ro15">
          <table:table-cell table:style-name="ce42" office:value-type="string" calcext:value-type="string">
            <text:p>Family: FLOWER (Cassia covessi)</text:p>
            <text:p>Variety: Desert Senna</text:p>
            <text:p>Comments: Native to AZ &amp; Mexico; upright shrubby yellow wildflower. Rake seeds into planting site May-July. Water thoroughly and keep moist until plants are established; once established, give deep water occasionally but are drought resistant and will reseed themselves. Needs well drained soil</text:p>
            <text:p>with little or no amendments. Thrives in full sun.</text:p>
          </table:table-cell>
          <table:table-cell table:style-name="ce42" office:value-type="string" calcext:value-type="string">
            <text:p>2019</text:p>
            <text:p>NON-EDIBLE</text:p>
            <text:p>10 Seeds</text:p>
            <text:p>Easy Seed Saver</text:p>
          </table:table-cell>
          <table:table-cell table:style-name="Default" table:number-columns-repeated="16382"/>
        </table:table-row>
        <table:table-row table:style-name="ro15">
          <table:table-cell office:value-type="string" calcext:value-type="string">
            <text:p>Family: FLOWER Echinacea (Echinacea purpurea)</text:p>
            <text:p>Variety: Purple Coneflower</text:p>
            <text:p>Original Seed Source: Botanical Interests</text:p>
            <text:p>Comments: Sow outside 2 to 4 weeks before last frost or as late as 2 months before first frost. Plant 1/4” deep. Space 18” apart. Attracts pollinators. Lasts well as a cut flower. Drought tolerant. Deer resistant. Seed heads are great for winter interest</text:p>
            <text:p>and birds love them, too.</text:p>
          </table:table-cell>
          <table:table-cell office:value-type="string" calcext:value-type="string">
            <text:p>2022</text:p>
            <text:p>Blooms Summer Warm Season</text:p>
            <text:p>Various Seeds</text:p>
            <text:p>Easy Seed Saver</text:p>
            <text:p>Perennial Full Sun to Part</text:p>
            <text:p>Shade</text:p>
          </table:table-cell>
          <table:table-cell table:style-name="Default" table:number-columns-repeated="16382"/>
        </table:table-row>
        <table:table-row table:style-name="ro15">
          <table:table-cell table:style-name="ce42" office:value-type="string" calcext:value-type="string">
            <text:p>Family: FLOWER Echinacea (Echinacea purpurea)</text:p>
            <text:p>Variety: White Swan</text:p>
            <text:p>Original Seed Source: Botanical Interests</text:p>
            <text:p>Comments: Sow outside 2 to 4 weeks before last frost or as late as 2 months before first frost. Plant 1/4” deep. Space 18” apart. Attracts pollinators. Lasts well as a cut flower. Drought tolerant. Deer resistant. Seed heads are great for winter interest</text:p>
            <text:p>and birds love them, too.</text:p>
          </table:table-cell>
          <table:table-cell table:style-name="ce42" office:value-type="string" calcext:value-type="string">
            <text:p>2022</text:p>
            <text:p>Blooms Summer Warm Season</text:p>
            <text:p>Various Seeds</text:p>
            <text:p>Easy Seed Saver</text:p>
            <text:p>Perennial Full Sun to Part</text:p>
            <text:p>Shade</text:p>
          </table:table-cell>
          <table:table-cell table:style-name="Default" table:number-columns-repeated="16382"/>
        </table:table-row>
        <table:table-row table:style-name="ro15">
          <table:table-cell office:value-type="string" calcext:value-type="string">
            <text:p>Family: FLOWER Variety: Edible Beauties</text:p>
            <text:p>Original Seed Source: Botanical Interests</text:p>
            <text:p>Comments: Approximately 11 varieties including</text:p>
            <text:p>borage, nasturtium, calendula, bachelor’s button, fennel, radish, arugula, marigold, basil, chives and Johnny jump-up. Sow directly 2-6 weeks before last frost. Scatter and rake into planting area about 20 seeds per foot. Enliven salads, herb butters and vinegars.</text:p>
          </table:table-cell>
          <table:table-cell office:value-type="string" calcext:value-type="string">
            <text:p>2020</text:p>
            <text:p>Edible</text:p>
            <text:p>Warm Season</text:p>
            <text:p>Various Seeds</text:p>
            <text:p>Advanced Seed Saver</text:p>
          </table:table-cell>
          <table:table-cell table:style-name="Default" table:number-columns-repeated="16382"/>
        </table:table-row>
        <table:table-row table:style-name="ro15">
          <table:table-cell table:style-name="ce42" office:value-type="string" calcext:value-type="string">
            <text:p>Family: FLOWER (Gaillardia pulchella)</text:p>
            <text:p>Variety: Firewheel</text:p>
            <text:p>Original Seed Source: Native Seed Search</text:p>
            <text:p>Comments: Work soil with a hard rake until loose. Work seeds into the top 1/2” in fall/winter and early spring. Water thoroughly and keep moist for the first few weeks. Once established, water occasionally.</text:p>
          </table:table-cell>
          <table:table-cell table:style-name="ce42" office:value-type="string" calcext:value-type="string">
            <text:p>2019</text:p>
            <text:p>Non-edible</text:p>
            <text:p>Various Seeds</text:p>
            <text:p>Beginner Seed Saver</text:p>
            <text:p>Great for Pollinators</text:p>
          </table:table-cell>
          <table:table-cell table:style-name="Default" table:number-columns-repeated="16382"/>
        </table:table-row>
        <table:table-row table:style-name="ro15">
          <table:table-cell office:value-type="string" calcext:value-type="string">
            <text:p>Family: Flax (Linum perenne)</text:p>
            <text:p>Variety: Blue and Breezy</text:p>
            <text:p>Original Seed Source: Botanical Interests</text:p>
            <text:p>Comments: Press gently into soil, a pinch of seeds every 4-8 inches 4-6 weeks before average last frost or fall for spring germination. Grows well in poor, dry soil. Sky blue flowers attract pollinators and seeds attract</text:p>
            <text:p>wild birds.</text:p>
          </table:table-cell>
          <table:table-cell office:value-type="string" calcext:value-type="string">
            <text:p>2022</text:p>
            <text:p>NON-EDIBLE</text:p>
            <text:p>Warm Season</text:p>
            <text:p>12+ Seeds</text:p>
            <text:p>Intermediate Seed Saver</text:p>
            <text:p>Full sun to part shade</text:p>
          </table:table-cell>
          <table:table-cell table:style-name="Default" table:number-columns-repeated="16382"/>
        </table:table-row>
        <table:table-row table:style-name="ro15">
          <table:table-cell table:style-name="ce42" office:value-type="string" calcext:value-type="string">
            <text:p>Family: Flax (Linaceae grandiflorum)</text:p>
            <text:p>Variety: Scarlet</text:p>
            <text:p>Original Seed Source: Botanical Interests</text:p>
            <text:p>Comments: Press gently into soil, a pinch of seeds every 4-8 inches in full sun. Grows best in poor, dry soil. Germinates in about a month. Scarlet flowers attract</text:p>
            <text:p>pollinators.</text:p>
          </table:table-cell>
          <table:table-cell table:style-name="ce42" office:value-type="string" calcext:value-type="string">
            <text:p>2022</text:p>
            <text:p>NON-EDIBLE</text:p>
            <text:p>Warm Season</text:p>
            <text:p>15+ Seeds</text:p>
            <text:p>Intermediate Seed Saver</text:p>
          </table:table-cell>
          <table:table-cell table:style-name="Default" table:number-columns-repeated="16382"/>
        </table:table-row>
        <table:table-row table:style-name="ro15">
          <table:table-cell office:value-type="string" calcext:value-type="string">
            <text:p>Family: FLOWER Flower Mix (Assorted species)</text:p>
            <text:p>Variety: Bulb Companions</text:p>
            <text:p>Original Seed Source: Botanical Interests</text:p>
            <text:p>Comments: Sow outside 2 to 4 weeks before last frost.</text:p>
            <text:p>Plant 1/16” to 1/4” deep. Scatter about 20 seeds per square foot and rake in. Attracts pollinators.</text:p>
          </table:table-cell>
          <table:table-cell office:value-type="string" calcext:value-type="string">
            <text:p>2020</text:p>
            <text:p>Blooms Spring to Frost</text:p>
            <text:p>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Flower Mix (Assorted species)</text:p>
            <text:p>Variety: California Color</text:p>
            <text:p>Original Seed Source: Botanical Interests</text:p>
            <text:p>Comments: Sow outside 2 to 4 weeks before last frost.</text:p>
            <text:p>Plant 1/16” to 1/4” deep. Scatter and rake in. Attracts pollinators.</text:p>
          </table:table-cell>
          <table:table-cell table:style-name="ce42" office:value-type="string" calcext:value-type="string">
            <text:p>2022</text:p>
            <text:p>Blooms Spring to Frost</text:p>
            <text:p>Warm Season</text:p>
            <text:p>30+ Seeds</text:p>
            <text:p>Easy Seed Saver</text:p>
            <text:p>Annual Full Sun</text:p>
          </table:table-cell>
          <table:table-cell table:style-name="Default" table:number-columns-repeated="16382"/>
        </table:table-row>
        <table:table-row table:style-name="ro15">
          <table:table-cell office:value-type="string" calcext:value-type="string">
            <text:p>Family: FLOWER (Assorted species)</text:p>
            <text:p>Variety: Fairy Meadow Mix Original Seed Source: Botanical Interests</text:p>
            <text:p>Comments: Sow outside 2 to 4 weeks before last frost. Plant 1/16” to 1/4” deep. Scatter about 20 seeds per square foot and rake in. Attracts pollinators. Includes baby blue eyes, candytuft, California bluebells, poppies, pansey, snapdragon and others.</text:p>
          </table:table-cell>
          <table:table-cell office:value-type="string" calcext:value-type="string">
            <text:p>2022</text:p>
            <text:p>Blooms Spring to Frost</text:p>
            <text:p>Warm Season</text:p>
            <text:p>20+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Flower Mix (Assorted species)</text:p>
            <text:p>Variety: Made in the Shade</text:p>
            <text:p>Original Seed Source: Botanical Interests</text:p>
            <text:p>Comments: Sow outside 2 to 4 weeks before last frost.</text:p>
            <text:p>Plant 1/16” to 1/4” deep. Scatter about 20 seeds per square foot and rake in.</text:p>
          </table:table-cell>
          <table:table-cell table:style-name="ce42" office:value-type="string" calcext:value-type="string">
            <text:p>2020</text:p>
            <text:p>Blooms Spring to Frost</text:p>
            <text:p>Warm Season</text:p>
            <text:p>Various Seeds</text:p>
            <text:p>Easy Seed Saver</text:p>
            <text:p>Annual Part Shade</text:p>
          </table:table-cell>
          <table:table-cell table:style-name="Default" table:number-columns-repeated="16382"/>
        </table:table-row>
        <table:table-row table:style-name="ro15">
          <table:table-cell office:value-type="string" calcext:value-type="string">
            <text:p>Family: FLOWER (Assorted species)</text:p>
            <text:p>Variety: Pollinator Garden Flower Mix</text:p>
            <text:p>Original Seed Source: Botanical Interests</text:p>
            <text:p>Comments: Sow outside 2 to 4 weeks before last frost. Plant 1/16” to 1/4” deep. Scatter seeds and rake in.</text:p>
            <text:p>Attracts pollinators.</text:p>
          </table:table-cell>
          <table:table-cell office:value-type="string" calcext:value-type="string">
            <text:p>2022</text:p>
            <text:p>Blooms Spring to Frost</text:p>
            <text:p>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Assorted species)</text:p>
            <text:p>Variety: Save the Bees Flower Mix</text:p>
            <text:p>Original Seed Source: Botanical Interests</text:p>
            <text:p>Comments: Sow outside 2 to 4 weeks before last frost. Plant 1/16” to 1/4” deep. Scatter about 20 seeds per</text:p>
            <text:p>square foot and rake in. Attracts pollinators and beneficial insects. Has some flowers and some herbs.</text:p>
          </table:table-cell>
          <table:table-cell table:style-name="ce42" office:value-type="string" calcext:value-type="string">
            <text:p>2022</text:p>
            <text:p>Blooms Spring to Frost</text:p>
            <text:p>Warm Season</text:p>
            <text:p>Various Seeds</text:p>
            <text:p>Easy Seed Saver</text:p>
            <text:p>Annual Full Sun</text:p>
          </table:table-cell>
          <table:table-cell table:style-name="Default" table:number-columns-repeated="16382"/>
        </table:table-row>
        <table:table-row table:style-name="ro15">
          <table:table-cell office:value-type="string" calcext:value-type="string">
            <text:p>Family: FLOWER Variety: Four O’Clock</text:p>
            <text:p>Original Seed Source: Botanical Interests Comments: An old favorite with brilliant trumpet-shaped, remaining open all night and usually close before noon Scatter seeds 2-4 weeks before average last frost. Rake seeds in to 1/4” depth and water gently and keep moist until plants</text:p>
            <text:p>are 4inches</text:p>
          </table:table-cell>
          <table:table-cell office:value-type="string" calcext:value-type="string">
            <text:p>2024</text:p>
            <text:p>Warm Season</text:p>
            <text:p>10 + Seeds</text:p>
            <text:p>Advanced Seed Saver</text:p>
          </table:table-cell>
          <table:table-cell table:style-name="Default" table:number-columns-repeated="16382"/>
        </table:table-row>
        <table:table-row table:style-name="ro15">
          <table:table-cell table:style-name="ce42" office:value-type="string" calcext:value-type="string">
            <text:p>Family: FLOWER Foxglove (Digitalis purpurea)</text:p>
            <text:p>Variety: Gloxiniiflora Blend</text:p>
            <text:p>Original Seed Source: Botanical Interests</text:p>
            <text:p>Comments: Sow outside 1 to 2 weeks after last frost or as late as 2 months before first frost. Light aids germination, lightly press seeds into surface and do not cover. Space 18” apart. Attracts pollinators. Lasts well as a cut flower. Deer</text:p>
            <text:p>resistant. Grows 3’ to 5’ tall. Caution: poisonous if ingested!</text:p>
          </table:table-cell>
          <table:table-cell table:style-name="ce42" office:value-type="string" calcext:value-type="string">
            <text:p>2022</text:p>
            <text:p>Blooms Spring to Summer Warm Season</text:p>
            <text:p>Various Seeds</text:p>
            <text:p>Easy Seed Saver</text:p>
            <text:p>Biennial Full Sun to Part</text:p>
            <text:p>Shade</text:p>
          </table:table-cell>
          <table:table-cell table:style-name="Default" table:number-columns-repeated="16382"/>
        </table:table-row>
        <table:table-row table:style-name="ro15">
          <table:table-cell office:value-type="string" calcext:value-type="string">
            <text:p>Family: FLOWER (Gaillardia x grandiflora)</text:p>
            <text:p>Variety: Gaillardia Goblin aka Blanket Flower</text:p>
            <text:p>Original Seed Source: Botanical Interests</text:p>
            <text:p>Comments: Plant seeds into the top 1/4” 4-6 weeks before last frost. Water thoroughly and keep moist for the first few weeks. Once established, water occasionally.</text:p>
          </table:table-cell>
          <table:table-cell office:value-type="string" calcext:value-type="string">
            <text:p>2022</text:p>
            <text:p>Non-edible Perennial</text:p>
            <text:p>15 Seeds</text:p>
            <text:p>Beginner Seed Saver</text:p>
            <text:p>Great for Pollinators</text:p>
          </table:table-cell>
          <table:table-cell table:style-name="Default" table:number-columns-repeated="16382"/>
        </table:table-row>
        <table:table-row table:style-name="ro15">
          <table:table-cell table:style-name="ce42" office:value-type="string" calcext:value-type="string">
            <text:p>Family: Gomphrena (Gomphrena haageana)</text:p>
            <text:p>Variety: QIS Fiery Sunrise Blend</text:p>
            <text:p>Original Seed Source:  Botanical Interest</text:p>
            <text:p>Comments: Plant in fine, moist soil, covering lightly with 1/4” soil.  Plant 8” apart in full sun. Blooms all summer, is fairly drought tolerant and attractive to pollinators. Flowerheads  are long lasting whether fresh or dried. Deer resistant.</text:p>
          </table:table-cell>
          <table:table-cell table:style-name="ce42" office:value-type="string" calcext:value-type="string">
            <text:p>2022</text:p>
            <text:p>Warm Season</text:p>
            <text:p>5 Seeds</text:p>
            <text:p>Easy Seed Saver</text:p>
          </table:table-cell>
          <table:table-cell table:style-name="Default" table:number-columns-repeated="16382"/>
        </table:table-row>
        <table:table-row table:style-name="ro15">
          <table:table-cell office:value-type="string" calcext:value-type="string">
            <text:p>Family: FLOWER (Sphaeralcea ambigua)</text:p>
            <text:p>Variety: Globemallow Colors</text:p>
            <text:p>Original Seed Source: Native Seed Search</text:p>
            <text:p>Comments: Work soil with a hard rake until loose. Work seeds into the top 1/2” at anytime throughout the year.</text:p>
            <text:p>Germinates late spring or late summer although may germinate sporadically. Time watering to coincide with moist low pressure fronts. Scattering branches or rocks among planting helps seedlings become established.</text:p>
          </table:table-cell>
          <table:table-cell office:value-type="string" calcext:value-type="string">
            <text:p>2019</text:p>
            <text:p>Non-EDIBLE</text:p>
            <text:p>Various Seeds</text:p>
            <text:p>Beginner Seed Saver</text:p>
            <text:p>Great for Pollinators</text:p>
          </table:table-cell>
          <table:table-cell table:style-name="Default" table:number-columns-repeated="16382"/>
        </table:table-row>
        <table:table-row table:style-name="ro15">
          <table:table-cell table:style-name="ce42" office:value-type="string" calcext:value-type="string">
            <text:p>Family: FLOWER (Alcea rosea)</text:p>
            <text:p>Variety: Hollyhock (Creamy Yellow/Red Center)</text:p>
            <text:p>Harvested By: Linda Lawson</text:p>
            <text:p>Where Grown: Linda’s Backyard, Sierra Vista, AZ</text:p>
            <text:p>Original Seed Source: Ace Hardware</text:p>
            <text:p>Comments: Biennial life cycle; grows 72-84 inches; direct sow; full sun; mid to late season, blooms summer into fall.</text:p>
          </table:table-cell>
          <table:table-cell table:style-name="ce42" office:value-type="string" calcext:value-type="string">
            <text:p>2017</text:p>
            <text:p>Non-EDIBLE</text:p>
            <text:p>Warm Season</text:p>
            <text:p>Various Seeds</text:p>
            <text:p>Easy Seed Saver</text:p>
            <text:p>Great for Pollinators</text:p>
          </table:table-cell>
          <table:table-cell table:style-name="Default" table:number-columns-repeated="16382"/>
        </table:table-row>
        <table:table-row table:style-name="ro15">
          <table:table-cell office:value-type="string" calcext:value-type="string">
            <text:p>Family: FLOWER (Alcea rosea)</text:p>
            <text:p>Variety: Hollyhock (Dark Red)</text:p>
            <text:p>Harvested By: JiSeen of Avalon Gardens Where Grown: Avalon Gardens, Tumacacori, AZ Original Seed Source: Avalon Gardens</text:p>
            <text:p>Comments: Biennial life cycle; grows 72-84 inches; direct sow; full sun; mid to late season, blooms summer into fall.</text:p>
          </table:table-cell>
          <table:table-cell office:value-type="string" calcext:value-type="string">
            <text:p>2017</text:p>
            <text:p>Non-EDIBLE</text:p>
            <text:p>Warm Season</text:p>
            <text:p>Various Seeds</text:p>
            <text:p>Easy Seed Saver</text:p>
            <text:p>Great for Pollinators</text:p>
          </table:table-cell>
          <table:table-cell table:style-name="Default" table:number-columns-repeated="16382"/>
        </table:table-row>
        <table:table-row table:style-name="ro15">
          <table:table-cell table:style-name="ce42" office:value-type="string" calcext:value-type="string">
            <text:p>Family: FLOWER (Alcea rosea)</text:p>
            <text:p>Variety: Hollyhock (ALMOST LAVENDER/PINK KISS)</text:p>
            <text:p>Prolific—Many Blossoms—8.5 ft</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5">
          <table:table-cell office:value-type="string" calcext:value-type="string">
            <text:p>Family: FLOWER (Alcea rosea)</text:p>
            <text:p>Variety: Hollyhock (Mixed colors)</text:p>
            <text:p>Grown By: Mary Berg</text:p>
            <text:p>Comments: Biennial life cycle; grows 72-84 inches; direct sow; full sun; moist, fertile, well drained soil. Plant 1/4 inches deep and 2 feet between plants. Blooms summer into fall.</text:p>
            <text:p>Loves monsoon mass planting, must water if planting earlier; amend soil, keep weeds out; winter: don’t deadhead stems.</text:p>
          </table:table-cell>
          <table:table-cell office:value-type="string" calcext:value-type="string">
            <text:p>2019</text:p>
            <text:p>Non-EDIBLE</text:p>
            <text:p>Various Seeds</text:p>
            <text:p>Advanced Seed Saver</text:p>
            <text:p>Great for Pollinators</text:p>
          </table:table-cell>
          <table:table-cell table:style-name="Default" table:number-columns-repeated="16382"/>
        </table:table-row>
        <table:table-row table:style-name="ro15">
          <table:table-cell table:style-name="ce42" office:value-type="string" calcext:value-type="string">
            <text:p>Family: FLOWER (Alcea rosea)</text:p>
            <text:p>Variety: Hollyhock (Pale Yellow, Sing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5">
          <table:table-cell office:value-type="string" calcext:value-type="string">
            <text:p>Family: FLOWER (Alcea rosea)</text:p>
            <text:p>Variety: Hollyhock (Pink &amp; White, LARGE BLOOM)</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5">
          <table:table-cell table:style-name="ce42" office:value-type="string" calcext:value-type="string">
            <text:p>Family: FLOWER (Alcea rosea)</text:p>
            <text:p>Variety: Hollyhock (Pink)</text:p>
            <text:p>Grown By: Mark Grams</text:p>
            <text:p>Where Grown: Elfrida, AZ</text:p>
            <text:p>Comments: Biennial life cycle; grows 72-84 inches; direct sow 1/4 in deep, 2 ft between plants; full sun; mid to late season, blooms summer into fall.  Loves monsoon mass planting, must water if planting earlier; amend soil, keep weeds</text:p>
            <text:p>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5">
          <table:table-cell office:value-type="string" calcext:value-type="string">
            <text:p>Family: FLOWER (Alcea rosea)</text:p>
            <text:p>Variety: Hollyhock (red &amp; pink)</text:p>
            <text:p>Harvested By: Sierra Vista Community Garden</text:p>
            <text:p>Where Grown: Sierra Vista, AZ</text:p>
            <text:p>Original Seed Source: Wild Harvested</text:p>
            <text:p>Comments: Biennial life cycle; grows 72-84 inches; direct sow; full sun; mid to late season, blooms summer into fall.</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5">
          <table:table-cell table:style-name="ce42" office:value-type="string" calcext:value-type="string">
            <text:p>Family: FLOWER (Alcea rosea)</text:p>
            <text:p>Variety: Hollyhock (White-Yellow Center) Sing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5">
          <table:table-cell office:value-type="string" calcext:value-type="string">
            <text:p>Family: FLOWER (Alcea rosea)</text:p>
            <text:p>Variety: Hollyhock (White Veined Pink)</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5">
          <table:table-cell table:style-name="ce42" office:value-type="string" calcext:value-type="string">
            <text:p>Family: FLOWER (Alcea rosea)</text:p>
            <text:p>Variety: Hollyhock (All Yellow) Semi-doub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5">
          <table:table-cell office:value-type="string" calcext:value-type="string">
            <text:p>Family: FLOWER Heliotrope (Heliotropium arborescens)</text:p>
            <text:p>Variety: Marine</text:p>
            <text:p>Original Seed Source: Botanical Interests</text:p>
            <text:p>Comments: Sow outside 1 to 2 weeks after last frost. Light aids germination, lightly press into surface and do not cover. Space 12” apart. Attracts pollinators. Very fragrant and can be grown in window boxes. In hot summers, plants appreciate afternoon shade. Deer resistant.</text:p>
          </table:table-cell>
          <table:table-cell office:value-type="string" calcext:value-type="string">
            <text:p>2020</text:p>
            <text:p>Blooms Summer  to Frost</text:p>
            <text:p>Warm Season</text:p>
            <text:p>Various Seeds</text:p>
            <text:p>Easy Seed Saver</text:p>
            <text:p>Annual Full Sun to Part</text:p>
            <text:p>Shade</text:p>
          </table:table-cell>
          <table:table-cell table:style-name="Default" table:number-columns-repeated="16382"/>
        </table:table-row>
        <table:table-row table:style-name="ro15">
          <table:table-cell table:style-name="ce42" office:value-type="string" calcext:value-type="string">
            <text:p>Family: FLOWER Hyssop (Agastache foeniculum)</text:p>
            <text:p>Variety: Anise Hyssop</text:p>
            <text:p>Original Seed Source: Botanical Interests</text:p>
            <text:p>Comments: Sow outside 1 to 2 weeks after last frost. Light aids germination, lightly press into surface and do not cover. May also be sown in late fall for spring germination. Space 12” apart. Attracts pollinators</text:p>
            <text:p>especially bees.  Deer resistant. Leaves and flowers can make refreshing, tea. Minty, anise-scented flowers.</text:p>
          </table:table-cell>
          <table:table-cell table:style-name="ce42" office:value-type="string" calcext:value-type="string">
            <text:p>2022</text:p>
            <text:p>Blooms Summer Warm Season Edible</text:p>
            <text:p>20 Seeds</text:p>
            <text:p>Easy Seed Saver</text:p>
            <text:p>Perennial Full Sun to Part</text:p>
            <text:p>Shade</text:p>
          </table:table-cell>
          <table:table-cell table:style-name="Default" table:number-columns-repeated="16382"/>
        </table:table-row>
        <table:table-row table:style-name="ro15">
          <table:table-cell office:value-type="string" calcext:value-type="string">
            <text:p>Family: FLOWER Hyssop (Agastache foeniculum)</text:p>
            <text:p>Variety: Lavender Hyssop</text:p>
            <text:p>Original Seed Source: Botanical Interests</text:p>
            <text:p>Comments: Sow outside 1 to 2 weeks after last frost. Light aids germination, lightly press into surface and do not cover. May also be sown in late fall for spring germination. Space 12” apart. Attracts pollinators.  Deer resistant.</text:p>
            <text:p>Leaves and flowers can make refreshing, fruity tea or added to salads.</text:p>
          </table:table-cell>
          <table:table-cell office:value-type="string" calcext:value-type="string">
            <text:p>2020</text:p>
            <text:p>Blooms Summer Warm Season</text:p>
            <text:p>Various Seeds</text:p>
            <text:p>Easy Seed Saver</text:p>
            <text:p>Perennial Full Sun to Part</text:p>
            <text:p>Shade</text:p>
          </table:table-cell>
          <table:table-cell table:style-name="Default" table:number-columns-repeated="16382"/>
        </table:table-row>
        <table:table-row table:style-name="ro15">
          <table:table-cell table:style-name="ce42" office:value-type="string" calcext:value-type="string">
            <text:p>Family: FLOWER Livingstone Daisy (Cleretum bellidiforme)</text:p>
            <text:p>Variety: Iceplant, Sparkle Blend</text:p>
            <text:p>Original Seed Source: Botanical Interests</text:p>
            <text:p>Comments: Start inside 6-8 weeks before average last frost. Outside, plant 1-2 weeks before last frost. Press into soil surface, 3 seeds every 10”. Light aids germination. Pollinator attractor. Bright flowers with</text:p>
            <text:p>dense, spreading, succulent foliage. Heat &amp; drought tolerant.</text:p>
          </table:table-cell>
          <table:table-cell table:style-name="ce42" office:value-type="string" calcext:value-type="string">
            <text:p>2022</text:p>
            <text:p>Warm Season</text:p>
            <text:p>20+ Seeds</text:p>
            <text:p>Easy Seed Saver</text:p>
            <text:p>Annual Full Sun</text:p>
          </table:table-cell>
          <table:table-cell table:style-name="Default" table:number-columns-repeated="16382"/>
        </table:table-row>
        <table:table-row table:style-name="ro15">
          <table:table-cell office:value-type="string" calcext:value-type="string">
            <text:p>Family: FLOWER Impatiens (Impatiens walleriana hybrid)</text:p>
            <text:p>Variety: Midnight Blend</text:p>
            <text:p>Original Seed Source: Botanical Interests</text:p>
            <text:p>Comments: Sow outside 1 to 2 weeks after last frost. Light aids germination, lightly press into surface and do not cover. Space 12” apart. Deer resistant. Can also be grown as a houseplant.</text:p>
          </table:table-cell>
          <table:table-cell office:value-type="string" calcext:value-type="string">
            <text:p>2020</text:p>
            <text:p>Blooms Spring to Frost Warm Season</text:p>
            <text:p>Various Seeds</text:p>
            <text:p>Easy Seed Saver</text:p>
            <text:p>Annual Part Shade</text:p>
          </table:table-cell>
          <table:table-cell table:style-name="Default" table:number-columns-repeated="16382"/>
        </table:table-row>
        <table:table-row table:style-name="ro15">
          <table:table-cell table:style-name="ce42" office:value-type="string" calcext:value-type="string">
            <text:p>CCMG Seed Library Family: FLOAWSEeRed Library Variety: Lantana—Pink Yellow</text:p>
            <text:p>Seed Source: open</text:p>
            <text:p>Comments: Scatter seeds 2-4 weeks before average last frost. Rake seeds in to 1/8”-1/4” depth and water gently and keep moist until</text:p>
            <text:p>plants are established.</text:p>
          </table:table-cell>
          <table:table-cell table:style-name="ce42" office:value-type="string" calcext:value-type="string">
            <text:p>2023</text:p>
            <text:p>Warm Season</text:p>
            <text:p>7 Seeds</text:p>
            <text:p>Advanced Seed Saver</text:p>
          </table:table-cell>
          <table:table-cell table:style-name="Default" table:number-columns-repeated="16382"/>
        </table:table-row>
        <table:table-row table:style-name="ro15">
          <table:table-cell office:value-type="string" calcext:value-type="string">
            <text:p>CCMG Seed Library</text:p>
            <text:p>Family: FLOWER</text:p>
            <text:p>Varietyl:CLantanMC    Ga—SPienekdYeLlloibwrary</text:p>
            <text:p>Seed Source: oApenSeed Library</text:p>
            <text:p>Comments: Scatter seeds 2-4 weeks before average last frost. Rake seeds in to 1/8”-1/4” depth and water gently and keep moist until</text:p>
            <text:p>plants are established.</text:p>
          </table:table-cell>
          <table:table-cell office:value-type="string" calcext:value-type="string">
            <text:p>2023</text:p>
            <text:p>Warm Season</text:p>
            <text:p>7 Seeds</text:p>
            <text:p>Advanced Seed Saver</text:p>
          </table:table-cell>
          <table:table-cell table:style-name="Default" table:number-columns-repeated="16382"/>
        </table:table-row>
        <table:table-row table:style-name="ro15">
          <table:table-cell table:style-name="ce42" office:value-type="string" calcext:value-type="string">
            <text:p>Family: FLOWER Larkspur (Consolida regalis)</text:p>
            <text:p>Variety: Galilee Blend</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table:style-name="ce42"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5">
          <table:table-cell office:value-type="string" calcext:value-type="string">
            <text:p>Family: FLOWER Larkspur (Consolida regalis)</text:p>
            <text:p>Variety: Imperial Blend</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office:value-type="string" calcext:value-type="string">
            <text:p>2020</text:p>
            <text:p>Blooms Spring to Summer 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Larkspur (Consolida regalis)</text:p>
            <text:p>Variety: Shades of Blue</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table:style-name="ce42"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5">
          <table:table-cell office:value-type="string" calcext:value-type="string">
            <text:p>Family: FLOWER Lavender (Consolida regalis)</text:p>
            <text:p>Variety: Munstead</text:p>
            <text:p>Original Seed Source: Botanical Interests</text:p>
            <text:p>Comments: 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 days)  Space 18”-24” apart. Deer resistant.</text:p>
          </table:table-cell>
          <table:table-cell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Lavender (Consolida regalis)</text:p>
            <text:p>Variety: True</text:p>
            <text:p>Original Seed Source: Botanical Interests</text:p>
            <text:p>Comments: Plant inside 10-12 weeks before last frost and transplant after last frost. Sow outside 4 to 6 weeks before last frost or in fall before first frost. Press gently into surface of soil. Seeds germinate better after</text:p>
            <text:p>stratification, (Wrap seeds in damp paper towel in airtight container and store in refrigerator for about 90</text:p>
          </table:table-cell>
          <table:table-cell table:style-name="ce42"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5">
          <table:table-cell office:value-type="string" calcext:value-type="string">
            <text:p>Family: FLOWER Lobelia (Lobelia erinus)</text:p>
            <text:p>Variety: Crystal Palace</text:p>
            <text:p>Original Seed Source: Botanical Interests</text:p>
            <text:p>Comments: Sow outside 1 to 2 weeks after last frost and in late summer for winter color. Light aids germination, press lightly into surface. Space 4”to 6” apart. Attracts pollinators. Deer resistant. Deep blue flowers over bronze tipped foliage.</text:p>
          </table:table-cell>
          <table:table-cell office:value-type="string" calcext:value-type="string">
            <text:p>2022</text:p>
            <text:p>Blooms Spring to Frost</text:p>
            <text:p>Warm Season</text:p>
            <text:p>Various Seeds</text:p>
            <text:p>Easy Seed Saver</text:p>
            <text:p>Annual Full Sun to Part Shade</text:p>
          </table:table-cell>
          <table:table-cell table:style-name="Default" table:number-columns-repeated="16382"/>
        </table:table-row>
        <table:table-row table:style-name="ro15">
          <table:table-cell table:style-name="ce42" office:value-type="string" calcext:value-type="string">
            <text:p>Family: FLOWER Lobelia Trailing (Lobelia erinus)</text:p>
            <text:p>Variety: Cascade of Color</text:p>
            <text:p>Original Seed Source: Botanical Interests</text:p>
            <text:p>Comments: Sow outside 1 to 2 weeks after last frost frost and in mild climates sow in late summer for winter color. Light aids germination, do not cover seed with soil and press lightly into surface. Space 4”to 6” apart. Attracts pollinators.</text:p>
          </table:table-cell>
          <table:table-cell table:style-name="ce42" office:value-type="string" calcext:value-type="string">
            <text:p>2022</text:p>
            <text:p>Blooms Spring to Frost</text:p>
            <text:p>Warm Season</text:p>
            <text:p>15+ Seeds</text:p>
            <text:p>Easy Seed Saver</text:p>
            <text:p>Annual Full Sun to Part Shade</text:p>
          </table:table-cell>
          <table:table-cell table:style-name="Default" table:number-columns-repeated="16382"/>
        </table:table-row>
        <table:table-row table:style-name="ro15">
          <table:table-cell office:value-type="string" calcext:value-type="string">
            <text:p>Family: FLOWER Love-In-A-Mist (Nigella damascena)</text:p>
            <text:p>Variety: Miss Jekyll Blend</text:p>
            <text:p>Original Seed Source: Botanical Interests</text:p>
            <text:p>Comments: Sow outside 2 to 4 weeks before last frost. Plant by gently pressing into surface and very lightly cover.  Space 8” apart. Drought tolerant. Generally self sows to come back year after year.</text:p>
          </table:table-cell>
          <table:table-cell office:value-type="string" calcext:value-type="string">
            <text:p>2020</text:p>
            <text:p>Blooms Spring</text:p>
            <text:p>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Lupine (Lupinus nanus)</text:p>
            <text:p>Variety: Pixie Delight</text:p>
            <text:p>Original Seed Source: Botanical Interests</text:p>
            <text:p>Comments: Sow outside in late fall for blooms the following spring. Plant 1/8” deep. Space 10” apart. Attracts pollinators. Blooms are shades of pink, blue, purple, white and</text:p>
            <text:p>some are bicolored. Tolerates poor, dry soil.</text:p>
          </table:table-cell>
          <table:table-cell table:style-name="ce42" office:value-type="string" calcext:value-type="string">
            <text:p>2020</text:p>
            <text:p>Blooms Spring to Summer Warm Season</text:p>
            <text:p>Various Seeds</text:p>
            <text:p>Easy Seed Saver</text:p>
            <text:p>Annual Full Sun to Part Shade</text:p>
          </table:table-cell>
          <table:table-cell table:style-name="Default" table:number-columns-repeated="16382"/>
        </table:table-row>
        <table:table-row table:style-name="ro15">
          <table:table-cell office:value-type="string" calcext:value-type="string">
            <text:p>Family: FLOWER (Tagetes erecta)</text:p>
            <text:p>Variety: Marigold—Cracker Jack Mix</text:p>
            <text:p>Original Seed Source:  American Seed</text:p>
            <text:p>Comments: Start indoors 3-4 weeks before setting out after frost using fine, moist soil, covering lightly.  Plant one foot apart in full sun.  Thrives in summer’s heat.</text:p>
            <text:p>Giant African type with big double blooms in shades of lemon yellow to deep orange.  Plants are profuse to 30”</text:p>
            <text:p>tall.</text:p>
          </table:table-cell>
          <table:table-cell office:value-type="string" calcext:value-type="string">
            <text:p>2021</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FLOWER (Tagetes)</text:p>
            <text:p>Variety: Marigold—Cupid Mix</text:p>
            <text:p>Original Seed Source:  Baker Creek Heirloom Seeds — www.rareseeds.com</text:p>
            <text:p>Comments: Most adorable little African marigold for bedding (seldom exceeding 14 inches) smothered in deep golden, soft yellow, and tangerine orange blooms.  Tightly packed, heavily curled petals.  Start indoors 3-4 weeks before setting out after frost using fine, moist soil, covering lightly.</text:p>
            <text:p>Plant one foot apart in full sun.</text:p>
          </table:table-cell>
          <table:table-cell table:style-name="ce42" office:value-type="string" calcext:value-type="string">
            <text:p>2018</text:p>
            <text:p>Warm Season</text:p>
            <text:p>10+ Seeds</text:p>
            <text:p>Easy Seed Saver</text:p>
          </table:table-cell>
          <table:table-cell table:style-name="Default" table:number-columns-repeated="16382"/>
        </table:table-row>
        <table:table-row table:style-name="ro15">
          <table:table-cell office:value-type="string" calcext:value-type="string">
            <text:p>Family: FLOWER (Tagetes)</text:p>
            <text:p>Variety: Marigold—French Cancan</text:p>
            <text:p>Comments: Compact plants with sunny yellow flowers.  Plant in fine, moist soil, covering lightly with 1/4” soil.  Plant 6” apart in full sun. Fairly drought tolerant once established. Deer and rabbit resistant.</text:p>
          </table:table-cell>
          <table:table-cell office:value-type="string" calcext:value-type="string">
            <text:p>2022</text:p>
            <text:p>Warm Season</text:p>
            <text:p>15 Seeds</text:p>
            <text:p>Easy Seed Saver</text:p>
          </table:table-cell>
          <table:table-cell table:style-name="Default" table:number-columns-repeated="16382"/>
        </table:table-row>
        <table:table-row table:style-name="ro15">
          <table:table-cell table:style-name="ce42" office:value-type="string" calcext:value-type="string">
            <text:p>Family: FLOWER (Tagetes)</text:p>
            <text:p>Variety: Marigold—French Double Dwarf</text:p>
            <text:p>Original Seed Source:  Ferry-Morse</text:p>
            <text:p>Comments: Compact plants with double blooms in brilliant colors.  Plant in fine, moist soil, covering lightly with 1/4” soil.  Plant 8” apart in full sun.</text:p>
            <text:p>Thrives in summer’s heat. Also great in containers.</text:p>
          </table:table-cell>
          <table:table-cell table:style-name="ce42" office:value-type="string" calcext:value-type="string">
            <text:p>2022</text:p>
            <text:p>Warm Season</text:p>
            <text:p>25 Seeds</text:p>
            <text:p>Easy Seed Saver</text:p>
          </table:table-cell>
          <table:table-cell table:style-name="Default" table:number-columns-repeated="16382"/>
        </table:table-row>
        <table:table-row table:style-name="ro15">
          <table:table-cell office:value-type="string" calcext:value-type="string">
            <text:p>Family: FLOWER Marigold (Tagetes patula)</text:p>
            <text:p>Variety: French Favorite Blend</text:p>
            <text:p>Original Seed Source:  Botanical Interest</text:p>
            <text:p>Comments: Compact lacy plant with bright mix of yellow, gold, red and bicolor flowers.  Plant in fine, moist soil, covering lightly with 1/4” soil.  Plant 6” apart in full sun. Fairly</text:p>
            <text:p>drought tolerant once established. Deer and rabbit resistant.</text:p>
          </table:table-cell>
          <table:table-cell office:value-type="string" calcext:value-type="string">
            <text:p>2022</text:p>
            <text:p>Warm Season</text:p>
            <text:p>15-25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Tagetes)</text:p>
            <text:p>Variety: Marigold—French Lemon Drop</text:p>
            <text:p>Original Seed Source:  Botanical Interest Comments: Compact plants with sunny yellow flowers. Plant in fine, moist soil, covering lightly with 1/4” soil.  Plant 6” apart in full sun. Fairly drought tolerant once established.</text:p>
            <text:p>Deer and rabbit resistant.</text:p>
          </table:table-cell>
          <table:table-cell table:style-name="ce42" office:value-type="string" calcext:value-type="string">
            <text:p>2022</text:p>
            <text:p>Warm Season</text:p>
            <text:p>15-25 Seeds</text:p>
            <text:p>Easy Seed Saver</text:p>
          </table:table-cell>
          <table:table-cell table:style-name="Default" table:number-columns-repeated="16382"/>
        </table:table-row>
        <table:table-row table:style-name="ro15">
          <table:table-cell office:value-type="string" calcext:value-type="string">
            <text:p>Family: FLOWER Marigold (Tagetes patula)</text:p>
            <text:p>Variety: French Naughty Marietta</text:p>
            <text:p>Original Seed Source: Botanical Interests</text:p>
            <text:p>Comments: Compact plants with bright colored flowers.  Plant in fine, moist soil, covering lightly with 1/4” soil.  Plant 6” apart in full sun. Low maintenance and fairly drought tolerant once established. Deer and rabbit resistant.</text:p>
          </table:table-cell>
          <table:table-cell office:value-type="string" calcext:value-type="string">
            <text:p>2022</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FLOWER Marigold (Tagetes patula)</text:p>
            <text:p>Variety: French Red Metamorph</text:p>
            <text:p>Original Seed Source:  Botanical Interests</text:p>
            <text:p>Comments: Compact plants with single blooms that as the weather gets warmer, the petals morph from burgundy to striped with yellow.  Plant 1-2 weeks after last frost in fine, moist soil, covering lightly with 1/4” soil.  Plant 6”-8” apart in</text:p>
            <text:p>full sun.  Attracts beneficial insects.</text:p>
          </table:table-cell>
          <table:table-cell table:style-name="ce42" office:value-type="string" calcext:value-type="string">
            <text:p>2022</text:p>
            <text:p>Warm Season</text:p>
            <text:p>8 Seeds</text:p>
            <text:p>Easy Seed Saver</text:p>
            <text:p>Germinates 5-14 days</text:p>
          </table:table-cell>
          <table:table-cell table:style-name="Default" table:number-columns-repeated="16382"/>
        </table:table-row>
        <table:table-row table:style-name="ro15">
          <table:table-cell office:value-type="string" calcext:value-type="string">
            <text:p>Family: FLOWER (Tagetes erecta)</text:p>
            <text:p>Variety: Marigold—Kilimanjaro White</text:p>
            <text:p>Original Seed Source: Botanical Interests Comments: 18” plants with vanilla-white blossoms. They have a lovely sweet scent, different from other marigolds.</text:p>
            <text:p>Plant in fine, moist soil, covering lightly with 1/4” soil.  Plant 2-3 seeds 9-12” apart in full sun.  Thrives in summer’s heat.</text:p>
            <text:p>Also great in containers. Deer and rabbit resistant.</text:p>
          </table:table-cell>
          <table:table-cell office:value-type="string" calcext:value-type="string">
            <text:p>2022</text:p>
            <text:p>Warm Season</text:p>
            <text:p>8 Seeds</text:p>
            <text:p>Easy Seed Saver</text:p>
          </table:table-cell>
          <table:table-cell table:style-name="Default" table:number-columns-repeated="16382"/>
        </table:table-row>
        <table:table-row table:style-name="ro15">
          <table:table-cell table:style-name="ce42" office:value-type="string" calcext:value-type="string">
            <text:p>Family: FLOWER (Tagetes)</text:p>
            <text:p>Variety: Marigold, Petite Orange</text:p>
            <text:p>Seed Source: American Seed</text:p>
            <text:p>Comments: Tightly packed, heavily curled petals. Start indoors 3-4 weeks before setting out after frost using fine, moist soil, covering lightly.  Plant one foot apart in full sun. 6-8 inches tall. Small bright orange flowers.</text:p>
          </table:table-cell>
          <table:table-cell table:style-name="ce42" office:value-type="string" calcext:value-type="string">
            <text:p>2021</text:p>
            <text:p>Warm Season</text:p>
            <text:p>10+ Seeds</text:p>
            <text:p>Easy Seed Saver</text:p>
          </table:table-cell>
          <table:table-cell table:style-name="Default" table:number-columns-repeated="16382"/>
        </table:table-row>
        <table:table-row table:style-name="ro15">
          <table:table-cell office:value-type="string" calcext:value-type="string">
            <text:p>Family: FLOWER (Baileyaiata multira)</text:p>
            <text:p>Variety: Marigold</text:p>
            <text:p>Seed Source: Native Seed Company</text:p>
            <text:p>Comments: Tightly packed, heavily curled petals. Start indoors 3-4 weeks before setting out after frost using fine, moist soil, covering lightly.  Plant one foot apart in full sun.</text:p>
          </table:table-cell>
          <table:table-cell office:value-type="string" calcext:value-type="string">
            <text:p>2023</text:p>
            <text:p>Warm Season</text:p>
            <text:p>Various Seeds</text:p>
            <text:p>Easy Seed Saver</text:p>
          </table:table-cell>
          <table:table-cell table:style-name="Default" table:number-columns-repeated="16382"/>
        </table:table-row>
        <table:table-row table:style-name="ro15">
          <table:table-cell table:style-name="ce42" office:value-type="string" calcext:value-type="string">
            <text:p>Family: FLOWER Milkweed (Asclepias tuberosa)</text:p>
            <text:p>Variety: Milkweed, Common Butterfly Flower</text:p>
            <text:p>Original Seed Source: Botanical Interests</text:p>
            <text:p>Comments: Sow outside 2 to 4 weeks before average last frost date. Plant 1/4” deep. Space 12” to 16” apart. Drought tolerant when established. Attracts butterflies and habitat for monarch butterfly and their caterpillars.</text:p>
            <text:p>Deer resistant. Drought tolerant once established. Sap is toxic; avoid skin/eye contact. Do not eat.</text:p>
          </table:table-cell>
          <table:table-cell table:style-name="ce42" office:value-type="string" calcext:value-type="string">
            <text:p>2022</text:p>
            <text:p>Blooms Summer Warm Season</text:p>
            <text:p>5 Seeds</text:p>
            <text:p>Easy Seed Saver</text:p>
            <text:p>Perennial</text:p>
            <text:p>Full Sun</text:p>
          </table:table-cell>
          <table:table-cell table:style-name="Default" table:number-columns-repeated="16382"/>
        </table:table-row>
        <table:table-row table:style-name="ro15">
          <table:table-cell office:value-type="string" calcext:value-type="string">
            <text:p>Family: FLOWER Milkweed (Asclepias fascicularis)</text:p>
            <text:p>Variety: Milkweed, Narrowleaf Butterfly Flower</text:p>
            <text:p>Original Seed Source: Botanical Interests Comments: Sow outside 2 to 4 weeks before average last frost date or fall for spring germination. Plant 1/4” deep. Space 12” to 16” apart. Drought tolerant when established. Attracts beneficial insects, butterflies and habitat for monarch butterfly</text:p>
            <text:p>and their caterpillars. Deer resistant. Drought tolerant once established. Sap is toxic; avoid skin/eye contact. Do not eat.</text:p>
          </table:table-cell>
          <table:table-cell office:value-type="string" calcext:value-type="string">
            <text:p>2022</text:p>
            <text:p>Blooms Summer Warm Season</text:p>
            <text:p>5 Seeds</text:p>
            <text:p>Easy Seed Saver</text:p>
            <text:p>Perennial</text:p>
            <text:p>Full Sun</text:p>
          </table:table-cell>
          <table:table-cell table:style-name="Default" table:number-columns-repeated="16382"/>
        </table:table-row>
        <table:table-row table:style-name="ro15">
          <table:table-cell table:style-name="ce42" office:value-type="string" calcext:value-type="string">
            <text:p>Family: FLOWER Milkweed (Asclepias speciosa)</text:p>
            <text:p>Variety: Showy Milkweed Butterfly Flower</text:p>
            <text:p>Original Seed Source: Botanical Interests</text:p>
            <text:p>Comments: Sow outside 2 to 4 weeks before average last frost date. Plant 1/4” deep. Space 12” to 16” apart. Drought tolerant when established. Attracts butterflies. Deer resistant. Sap is toxic; avoid skin/eye contact. Do not eat.</text:p>
          </table:table-cell>
          <table:table-cell table:style-name="ce42" office:value-type="string" calcext:value-type="string">
            <text:p>2022</text:p>
            <text:p>Blooms Summer Warm Season</text:p>
            <text:p>10 Seeds</text:p>
            <text:p>Easy Seed Saver</text:p>
            <text:p>Perennial</text:p>
            <text:p>Full Sun</text:p>
          </table:table-cell>
          <table:table-cell table:style-name="Default" table:number-columns-repeated="16382"/>
        </table:table-row>
        <table:table-row table:style-name="ro15">
          <table:table-cell office:value-type="string" calcext:value-type="string">
            <text:p>Family: FLOWER Milkweed (Asclepias tuberosa)</text:p>
            <text:p>Variety: Milkweed, Butterfly Flower</text:p>
            <text:p>Original Seed Source: Botanical Interests Comments: Sow outside 2 to 4 weeks before average last frost date. Plant 1/4” deep. Space 12” to 16” apart. Drought tolerant when established. Attracts butterflies and habitat for monarch butterfly and their caterpillars. Deer resistant. Drought</text:p>
            <text:p>tolerant once established. Sap is toxic; avoid skin/eye contact. Do not eat.  Vivid red orange flowers.</text:p>
          </table:table-cell>
          <table:table-cell office:value-type="string" calcext:value-type="string">
            <text:p>2022</text:p>
            <text:p>Blooms Summer Warm Season</text:p>
            <text:p>8 Seeds</text:p>
            <text:p>Easy Seed Saver</text:p>
            <text:p>Perennial</text:p>
            <text:p>Full Sun</text:p>
          </table:table-cell>
          <table:table-cell table:style-name="Default" table:number-columns-repeated="16382"/>
        </table:table-row>
        <table:table-row table:style-name="ro15">
          <table:table-cell table:style-name="ce42" office:value-type="string" calcext:value-type="string">
            <text:p>Family: FLOWER  Nasturtium (Tropaeolum majus)</text:p>
            <text:p>Variety: Alaska Variegated</text:p>
            <text:p>Original Seed Source: Botanical Interests</text:p>
            <text:p>Comments: Soak seed in water for 12 to 24 hours before sowing. Sow outside 1 to 2 weeks after average last frost date. Plant 1/2” to 1” deep. Darkness aids germination. Space 8” to 12” apart. Deters garden pests while attracting pollinators. Deer and rabbit resistant.</text:p>
            <text:p>Blossoms and leaves can also be eaten.</text:p>
          </table:table-cell>
          <table:table-cell table:style-name="ce42" office:value-type="string" calcext:value-type="string">
            <text:p>2024</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5">
          <table:table-cell office:value-type="string" calcext:value-type="string">
            <text:p>Family: FLOWER Nasturtium (Tropaeolum majus)</text:p>
            <text:p>Variety: Cherry Rose Jewel</text:p>
            <text:p>Original Seed Source: Botanical Interests</text:p>
            <text:p>Comments: Soak seed in water for 12 to 24 hours before sowing. Sow outside 1 to 2 weeks after average last frost date. Plant 1/2” to 1” deep. Space 8” to 12” apart. Deters garden pests while attracting pollinators. Deer and rabbit resistant.</text:p>
            <text:p>Blossoms have a peppery taste and leaves can also</text:p>
          </table:table-cell>
          <table:table-cell office:value-type="string" calcext:value-type="string">
            <text:p>2022</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5">
          <table:table-cell table:style-name="ce42" office:value-type="string" calcext:value-type="string">
            <text:p>Family: FLOWER  Nasturtium (Tropaeolum majus)</text:p>
            <text:p>Variety: Jewel Blend</text:p>
            <text:p>Original Seed Source: Botanical Interests</text:p>
            <text:p>Comments: Soak seed in water for 12 to 24 hours before sowing. Sow outside 1 to 2 weeks after average last frost date. Plant 1/2” to 1” deep. Darkness aids germination. Space 8” to 12” apart. Deters garden pests while attracting pollinators. Deer and rabbit resistant.</text:p>
            <text:p>Blossoms and leaves can also be eaten.</text:p>
          </table:table-cell>
          <table:table-cell table:style-name="ce42" office:value-type="string" calcext:value-type="string">
            <text:p>2024</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5">
          <table:table-cell office:value-type="string" calcext:value-type="string">
            <text:p>Family: FLOWER Nasturtium (Tropaeolum majus)</text:p>
            <text:p>Variety: Mahogany</text:p>
            <text:p>Original Seed Source: Botanical Interests</text:p>
            <text:p>Comments: Soak seed in water for 12 to 24 hours before sowing. Sow outside 1 to 2 weeks after average last frost date. Plant 1/2” to 1” deep. Space 8” to 12” apart. Deters garden pests while attracting pollinators. Deer and rabbit resistant.</text:p>
            <text:p>Blossoms have a peppery taste and leaves can also be eaten.</text:p>
          </table:table-cell>
          <table:table-cell office:value-type="string" calcext:value-type="string">
            <text:p>2022</text:p>
            <text:p>Edible</text:p>
            <text:p>Blooms Late Spring to Frost</text:p>
            <text:p>3 Seeds</text:p>
            <text:p>Easy Seed Saver</text:p>
            <text:p>Annual</text:p>
            <text:p>Full Sun to Part Shade</text:p>
          </table:table-cell>
          <table:table-cell table:style-name="Default" table:number-columns-repeated="16382"/>
        </table:table-row>
        <table:table-row table:style-name="ro15">
          <table:table-cell table:style-name="ce42" office:value-type="string" calcext:value-type="string">
            <text:p>Family: FLOWER  Nasturtium (Tropaeolum majus)</text:p>
            <text:p>Variety: Tall Single Mixed Colors</text:p>
            <text:p>Original Seed Source: Botanical Interests</text:p>
            <text:p>Comments: Soak seed in water for 12 to 24 hours before sowing. Sow outside 1 to 2 weeks after average last frost date. Plant 1/2” to 1” deep. Darkness aids germination. Space 8” to 12” apart. Can grow up to 5”. Deters garden pests while attracting pollinators. Deer and rabbit resistant. Blossoms and leaves can also be</text:p>
            <text:p>eaten.</text:p>
          </table:table-cell>
          <table:table-cell table:style-name="ce42" office:value-type="string" calcext:value-type="string">
            <text:p>2022</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5">
          <table:table-cell office:value-type="string" calcext:value-type="string">
            <text:p>Family: FLOWER Nicotiana (Nicotiana sylvestris)</text:p>
            <text:p>Variety: Indian Peace Pipe</text:p>
            <text:p>Original Seed Source: Botanical Interests</text:p>
            <text:p>Comments: Sow outside 1 to 2 weeks after average last frost date. Seeds are tiny. Press lightly into surface and water very gently or mist to not disturb seeds. Space 24” apart.</text:p>
            <text:p>Attracts pollinators. Deer resistant. Grows 4’ to 6’ tall.</text:p>
          </table:table-cell>
          <table:table-cell office:value-type="string" calcext:value-type="string">
            <text:p>2020</text:p>
            <text:p>Blooms Summer to Frost</text:p>
            <text:p>Warm Season</text:p>
            <text:p>Various Seeds</text:p>
            <text:p>Easy Seed Saver</text:p>
            <text:p>Perennial</text:p>
            <text:p>Full Sun to Part Shade</text:p>
          </table:table-cell>
          <table:table-cell table:style-name="Default" table:number-columns-repeated="16382"/>
        </table:table-row>
        <table:table-row table:style-name="ro15">
          <table:table-cell table:style-name="ce42" office:value-type="string" calcext:value-type="string">
            <text:p>Family: FLOWER (Penstemon palmeri)</text:p>
            <text:p>Variety: Palmer’s Penstemon</text:p>
            <text:p>Comments: Loosen soil with a rake or spade and work the seeds into the top 1/2 inch. Needs well drained soil with little or no amendments. Thrives in full sun. Do not overwater. One of 250 species; native to AZ &amp; Mexico, typically above 3600’. Light pink bloom that can reach 3-6’. Pollinator. Will reseed</text:p>
            <text:p>themselves.</text:p>
          </table:table-cell>
          <table:table-cell table:style-name="ce42" office:value-type="string" calcext:value-type="string">
            <text:p>2019</text:p>
            <text:p>NON-EDIBLE</text:p>
            <text:p>Various Seeds</text:p>
            <text:p>Easy Seed Saver</text:p>
            <text:p>Plant late fall to early spring</text:p>
          </table:table-cell>
          <table:table-cell table:style-name="Default" table:number-columns-repeated="16382"/>
        </table:table-row>
        <table:table-row table:style-name="ro15">
          <table:table-cell office:value-type="string" calcext:value-type="string">
            <text:p>Family: FLOWER (Penstemon parryi)</text:p>
            <text:p>Variety: Parry’s Penstemon</text:p>
            <text:p>Comments: One of 250 species; native to AZ &amp; Mexico; reddish/pink bloom; many flower stalks; self-sowing in Zones 10, 12, 13.  Hummingbirds love it! Loosen soil with a rake or spade and work the seeds into the top 1/2 inch. Needs well drained soil with little or no amendments. Thrives in full sun.</text:p>
            <text:p>Do not overwater.</text:p>
          </table:table-cell>
          <table:table-cell office:value-type="string" calcext:value-type="string">
            <text:p>2019</text:p>
            <text:p>NON-EDIBLE</text:p>
            <text:p>Various Seeds</text:p>
            <text:p>Easy Seed Saver</text:p>
            <text:p>Plant late fall to early spring</text:p>
          </table:table-cell>
          <table:table-cell table:style-name="Default" table:number-columns-repeated="16382"/>
        </table:table-row>
        <table:table-row table:style-name="ro15">
          <table:table-cell table:style-name="ce42" office:value-type="string" calcext:value-type="string">
            <text:p>Family: FLOWER (Penstemon strictus)</text:p>
            <text:p>Variety: Penstemon Firecracker</text:p>
            <text:p>Originals Source: Native Seed Search</text:p>
            <text:p>Comments: One of 250 species; native to AZ &amp; Mexico; bright red bloom; many flower stalks; self- sowing in Zones 10, 12, 13.  Hummingbirds love it! Loosen soil with a rake or spade and work the seeds into</text:p>
            <text:p>the top 1/2 inch. Needs well drained soil with little or no amendments. Thrives in full sun. Do not overwater.</text:p>
          </table:table-cell>
          <table:table-cell table:style-name="ce42" office:value-type="string" calcext:value-type="string">
            <text:p>2023</text:p>
            <text:p>NON-EDIBLE</text:p>
            <text:p>15+ Seeds</text:p>
            <text:p>Easy Seed Saver</text:p>
            <text:p>Plant late fall to early spring</text:p>
          </table:table-cell>
          <table:table-cell table:style-name="Default" table:number-columns-repeated="16382"/>
        </table:table-row>
        <table:table-row table:style-name="ro15">
          <table:table-cell office:value-type="string" calcext:value-type="string">
            <text:p>Family: FLOWER (Penstemon strictus)</text:p>
            <text:p>Variety: Rocky Mountain Blue</text:p>
            <text:p>Originals Source: Botanical Interests</text:p>
            <text:p>Comments: One of 250 species; native to AZ &amp; Mexico; blue/violet bloom; many flower stalks; self- sowing in Zones 10, 12, 13.  Hummingbirds love it! Loosen soil with a rake or spade and work the seeds into</text:p>
            <text:p>the top 1/2 inch. Needs well drained soil with little or no amendments. Thrives in full sun. Do not overwater.</text:p>
          </table:table-cell>
          <table:table-cell office:value-type="string" calcext:value-type="string">
            <text:p>2022</text:p>
            <text:p>NON-EDIBLE</text:p>
            <text:p>15+ Seeds</text:p>
            <text:p>Easy Seed Saver</text:p>
            <text:p>Plant late fall to early spring</text:p>
          </table:table-cell>
          <table:table-cell table:style-name="Default" table:number-columns-repeated="16382"/>
        </table:table-row>
        <table:table-row table:style-name="ro15">
          <table:table-cell table:style-name="ce42" office:value-type="string" calcext:value-type="string">
            <text:p>Family: FLOWER Pansy (Viola tricolor var. hortensis)</text:p>
            <text:p>Variety: Swiss Giants Mixed Colors</text:p>
            <text:p>Original Seed Source: Botanical Interests</text:p>
            <text:p>Comments: Sow outside late fall to early winter. Plant 1/4” deep. Space 6” apart. Large velvety blooms.</text:p>
            <text:p>Attracts pollinators.</text:p>
          </table:table-cell>
          <table:table-cell table:style-name="ce42" office:value-type="string" calcext:value-type="string">
            <text:p>2024</text:p>
            <text:p>Blooms Early Spring</text:p>
            <text:p>Cool Season</text:p>
            <text:p>5+ Seeds</text:p>
            <text:p>Easy Seed Saver</text:p>
            <text:p>Annual Full Sun to Part Shade</text:p>
          </table:table-cell>
          <table:table-cell table:style-name="Default" table:number-columns-repeated="16382"/>
        </table:table-row>
        <table:table-row table:style-name="ro15">
          <table:table-cell office:value-type="string" calcext:value-type="string">
            <text:p>Family: FLOWER Pansy (Viola tricolor var. hortensis)</text:p>
            <text:p>Variety: Single mixed colors</text:p>
            <text:p>Original Seed Source: Botanical Interests</text:p>
            <text:p>Comments: Sow outside late fall to early winter. Plant 1/4” deep. Space 6” apart. Large velvety blooms.</text:p>
            <text:p>Attracts pollinators.</text:p>
          </table:table-cell>
          <table:table-cell office:value-type="string" calcext:value-type="string">
            <text:p>2022</text:p>
            <text:p>Blooms Early Spring</text:p>
            <text:p>Cool Season</text:p>
            <text:p>15+ Seeds</text:p>
            <text:p>Easy Seed Saver</text:p>
            <text:p>Annual Full Sun to Part Shade</text:p>
          </table:table-cell>
          <table:table-cell table:style-name="Default" table:number-columns-repeated="16382"/>
        </table:table-row>
        <table:table-row table:style-name="ro15">
          <table:table-cell table:style-name="ce42" office:value-type="string" calcext:value-type="string">
            <text:p>Family: FLOWER  Poppy (Papaver Somniferum)</text:p>
            <text:p>Variety: Black Swan</text:p>
            <text:p>Original Seed Source: Botanical Interests</text:p>
            <text:p>Comments: Sow outside 4 to 6 weeks before average last frost date or early to mid-fall for bloom the following spring. Scatter and rake in lightly, thin to 4” to 6”. Attracts pollinators.</text:p>
            <text:p>Deer resistant. Drought and heat tolerant.</text:p>
          </table:table-cell>
          <table:table-cell table:style-name="ce42" office:value-type="string" calcext:value-type="string">
            <text:p>2022</text:p>
            <text:p>Blooms Spring to Frost</text:p>
            <text:p>Warm Season</text:p>
            <text:p>15-20 Seeds</text:p>
            <text:p>Easy Seed Saver</text:p>
            <text:p>Perennial</text:p>
            <text:p>Full Sun</text:p>
          </table:table-cell>
          <table:table-cell table:style-name="Default" table:number-columns-repeated="16382"/>
        </table:table-row>
        <table:table-row table:style-name="ro15">
          <table:table-cell office:value-type="string" calcext:value-type="string">
            <text:p>Family: FLOWER  Poppy Bread Seed (Papaver somniferum)</text:p>
            <text:p>Variety:  Hungarian Blue</text:p>
            <text:p>Original Seed Source: Botanical Interests</text:p>
            <text:p>Comments: Sow outside 4 to 6 weeks before average last frost date. Scatter and rake in lightly, thin to 4” to 6”. Fluttery lavendar flowers. Seed pods are interesting in dried flower arrangements and use seeds for baking. Attracts pollinators.</text:p>
            <text:p>Deer resistant. Drought tolerant.</text:p>
          </table:table-cell>
          <table:table-cell office:value-type="string" calcext:value-type="string">
            <text:p>2022</text:p>
            <text:p>Blooms Spring to Frost</text:p>
            <text:p>Warm Season</text:p>
            <text:p>50 Seeds</text:p>
            <text:p>Easy Seed Saver</text:p>
            <text:p>Annual</text:p>
            <text:p>Full Sun</text:p>
          </table:table-cell>
          <table:table-cell table:style-name="Default" table:number-columns-repeated="16382"/>
        </table:table-row>
        <table:table-row table:style-name="ro15">
          <table:table-cell table:style-name="ce42" office:value-type="string" calcext:value-type="string">
            <text:p>Family: FLOWER  Poppy Bread Seed (Papaver somniferum)</text:p>
            <text:p>Variety: Peony Double Blend</text:p>
            <text:p>Original Seed Source: Botanical Interests</text:p>
            <text:p>Comments: Sow outside 4 to 6 weeks before average last frost date. Scatter and rake in lightly, thin to 4” to 6”. Fully double 3”-5”, colorful flowers. Seed pods are interesting in dried flower arrangements. Attracts pollinators. Deer resistant.</text:p>
            <text:p>Drought tolerant.</text:p>
          </table:table-cell>
          <table:table-cell table:style-name="ce42" office:value-type="string" calcext:value-type="string">
            <text:p>2022</text:p>
            <text:p>Blooms Spring to Frost</text:p>
            <text:p>Warm Season</text:p>
            <text:p>50 Seeds</text:p>
            <text:p>Easy Seed Saver</text:p>
            <text:p>Perennial</text:p>
            <text:p>Full Sun</text:p>
          </table:table-cell>
          <table:table-cell table:style-name="Default" table:number-columns-repeated="16382"/>
        </table:table-row>
        <table:table-row table:style-name="ro15">
          <table:table-cell office:value-type="string" calcext:value-type="string">
            <text:p>Family: FLOWER  Poppy Oriental (Papaver orientale)</text:p>
            <text:p>Variety: Brilliant</text:p>
            <text:p>Original Seed Source: Botanical Interests</text:p>
            <text:p>Comments: Sow outside 4 to 6 weeks before average last frost date or early to mid-fall for bloom the following spring. Scatter and rake in lightly, thin to 4” to 6”. Attracts pollinators.</text:p>
            <text:p>Deer resistant. Drought and heat tolerant.</text:p>
          </table:table-cell>
          <table:table-cell office:value-type="string" calcext:value-type="string">
            <text:p>2022</text:p>
            <text:p>Blooms Spring to Frost</text:p>
            <text:p>Warm Season</text:p>
            <text:p>20 Seeds</text:p>
            <text:p>Easy Seed Saver</text:p>
            <text:p>Perennial</text:p>
            <text:p>Full Sun</text:p>
          </table:table-cell>
          <table:table-cell table:style-name="Default" table:number-columns-repeated="16382"/>
        </table:table-row>
        <table:table-row table:style-name="ro15">
          <table:table-cell table:style-name="ce42" office:value-type="string" calcext:value-type="string">
            <text:p>Family: FLOWER  Poppy California (Eschscholzia californica)</text:p>
            <text:p>Variety: Mission Bells</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42" office:value-type="string" calcext:value-type="string">
            <text:p>2020</text:p>
            <text:p>Blooms Spring to Frost</text:p>
            <text:p>Warm Season</text:p>
            <text:p>Various Seeds</text:p>
            <text:p>Easy Seed Saver</text:p>
            <text:p>Perennial</text:p>
            <text:p>Full Sun</text:p>
          </table:table-cell>
          <table:table-cell table:style-name="Default" table:number-columns-repeated="16382"/>
        </table:table-row>
        <table:table-row table:style-name="ro15">
          <table:table-cell office:value-type="string" calcext:value-type="string">
            <text:p>Family: FLOWER  Poppy California (Eschscholzia californica)</text:p>
            <text:p>Variety: Mikado</text:p>
            <text:p>Original Seed Source: Botanical Interests</text:p>
            <text:p>Comments: Sow outside 4 to 6 weeks before average last frost date. Scatter and rake in lightly, thin to 4” to 6”. Attracts</text:p>
            <text:p>pollinators. Deer resistant. Drought and heat tolerant.</text:p>
          </table:table-cell>
          <table:table-cell office:value-type="string" calcext:value-type="string">
            <text:p>2022</text:p>
            <text:p>Blooms Spring to Frost</text:p>
            <text:p>Warm Season</text:p>
            <text:p>Various Seeds</text:p>
            <text:p>Easy Seed Saver</text:p>
            <text:p>Perennial</text:p>
            <text:p>Full Sun</text:p>
          </table:table-cell>
          <table:table-cell table:style-name="Default" table:number-columns-repeated="16382"/>
        </table:table-row>
        <table:table-row table:style-name="ro15">
          <table:table-cell table:style-name="ce42" office:value-type="string" calcext:value-type="string">
            <text:p>Family: FLOWER  Poppy California (Eschscholzia californica)</text:p>
            <text:p>Variety: Spring Melody Blend</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42" office:value-type="string" calcext:value-type="string">
            <text:p>2022</text:p>
            <text:p>Blooms Spring to Frost</text:p>
            <text:p>Warm Season</text:p>
            <text:p>30+ Seeds</text:p>
            <text:p>Easy Seed Saver</text:p>
            <text:p>Perennial</text:p>
            <text:p>Full Sun</text:p>
          </table:table-cell>
          <table:table-cell table:style-name="Default" table:number-columns-repeated="16382"/>
        </table:table-row>
        <table:table-row table:style-name="ro15">
          <table:table-cell office:value-type="string" calcext:value-type="string">
            <text:p>Family: FLOWER  Poppy Corn (Papaver rhoeas)</text:p>
            <text:p>Variety: Amazing Grey</text:p>
            <text:p>Original Seed Source: Botanical Interests</text:p>
            <text:p>Comments: Sow outside 4 to 6 weeks before average last frost date. Scatter and rake in lightly, thin to 4” to 6”. Attracts</text:p>
            <text:p>pollinators. Deer resistant. Drought and heat tolerant.</text:p>
          </table:table-cell>
          <table:table-cell office:value-type="string" calcext:value-type="string">
            <text:p>2022</text:p>
            <text:p>Blooms Spring to Frost</text:p>
            <text:p>Warm Season</text:p>
            <text:p>10+ Seeds</text:p>
            <text:p>Easy Seed Saver</text:p>
            <text:p>Perennial</text:p>
            <text:p>Full Sun</text:p>
          </table:table-cell>
          <table:table-cell table:style-name="Default" table:number-columns-repeated="16382"/>
        </table:table-row>
        <table:table-row table:style-name="ro15">
          <table:table-cell table:style-name="ce42" office:value-type="string" calcext:value-type="string">
            <text:p>Family: FLOWER  Poppy Corn (Papaver rhoeas)</text:p>
            <text:p>Variety: American Legion</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42" office:value-type="string" calcext:value-type="string">
            <text:p>2022</text:p>
            <text:p>Blooms Spring to Frost</text:p>
            <text:p>Warm Season</text:p>
            <text:p>50 Seeds</text:p>
            <text:p>Easy Seed Saver</text:p>
            <text:p>Perennial</text:p>
            <text:p>Full Sun</text:p>
          </table:table-cell>
          <table:table-cell table:style-name="Default" table:number-columns-repeated="16382"/>
        </table:table-row>
        <table:table-row table:style-name="ro15">
          <table:table-cell office:value-type="string" calcext:value-type="string">
            <text:p>Family: FLOWER  Poppy Corn (Papaver rhoeas)</text:p>
            <text:p>Variety: Mother of Pearl</text:p>
            <text:p>Original Seed Source: Botanical Interests</text:p>
            <text:p>Comments: Sow outside 4 to 6 weeks before average last frost date. Scatter and rake in lightly, thin to 6” to 8”. Attracts pollinators. Deer resistant. Drought and heat tolerant.</text:p>
          </table:table-cell>
          <table:table-cell office:value-type="string" calcext:value-type="string">
            <text:p>2024</text:p>
            <text:p>Blooms Spring to Frost</text:p>
            <text:p>Warm Season</text:p>
            <text:p>20 Seeds</text:p>
            <text:p>Easy Seed Saver</text:p>
            <text:p>Perennial</text:p>
            <text:p>Full Sun</text:p>
          </table:table-cell>
          <table:table-cell table:style-name="Default" table:number-columns-repeated="16382"/>
        </table:table-row>
        <table:table-row table:style-name="ro15">
          <table:table-cell table:style-name="ce42" office:value-type="string" calcext:value-type="string">
            <text:p>Family: FLOWER  Poppy Iceland (Papaver nudicaule)</text:p>
            <text:p>Variety: Nudicaule Blend</text:p>
            <text:p>Original Seed Source: Botanical Interests</text:p>
            <text:p>Comments: Sow outside 4 to 6 weeks before average last frost date or early to mid-fall for bloom the following spring. Scatter and rake in lightly, thin to 4” to 6”. Attracts pollinators. Deer resistant. Drought and heat</text:p>
            <text:p>tolerant.</text:p>
          </table:table-cell>
          <table:table-cell table:style-name="ce42" office:value-type="string" calcext:value-type="string">
            <text:p>2022</text:p>
            <text:p>Blooms Spring to Frost</text:p>
            <text:p>Warm Season</text:p>
            <text:p>30+ Seeds</text:p>
            <text:p>Easy Seed Saver</text:p>
            <text:p>Perennial</text:p>
            <text:p>Full Sun</text:p>
          </table:table-cell>
          <table:table-cell table:style-name="Default" table:number-columns-repeated="16382"/>
        </table:table-row>
        <table:table-row table:style-name="ro15">
          <table:table-cell office:value-type="string" calcext:value-type="string">
            <text:p>Family: FLOWER  Poppy (Papaver orientale)</text:p>
            <text:p>Variety: Red Poppy</text:p>
            <text:p>Original Seed Source: American Meadows</text:p>
            <text:p>Comments: Sow outside 4 to 6 weeks before average last frost date or early to mid-fall for bloom the following spring. Scatter and rake in lightly, thin to 4” to 6”. Attracts pollinators.</text:p>
            <text:p>Deer resistant. Drought and heat tolerant.</text:p>
          </table:table-cell>
          <table:table-cell office:value-type="string" calcext:value-type="string">
            <text:p>2022</text:p>
            <text:p>Blooms Spring to Frost</text:p>
            <text:p>Warm Season</text:p>
            <text:p>10 Seeds</text:p>
            <text:p>Easy Seed Saver</text:p>
            <text:p>Perennial</text:p>
            <text:p>Full Sun</text:p>
          </table:table-cell>
          <table:table-cell table:style-name="Default" table:number-columns-repeated="16382"/>
        </table:table-row>
        <table:table-row table:style-name="ro15">
          <table:table-cell table:style-name="ce42" office:value-type="string" calcext:value-type="string">
            <text:p>Family: FLOWER Portulaca (Portulaca grandflora)</text:p>
            <text:p>Variety: Moss Rose Double Blend</text:p>
            <text:p>Original Seed Source: Botanical Interests</text:p>
            <text:p>Comments: Start inside 6-8 weeks before average last frost. Outside, plant 1-2 weeks before last frost. Press into soil surface, 3 seeds every 2”. Light aids germination. Pollinator attractor. Bright flowers with</text:p>
            <text:p>dense, spreading, succulent foliage. Heat &amp; drought tolerant.</text:p>
          </table:table-cell>
          <table:table-cell table:style-name="ce42" office:value-type="string" calcext:value-type="string">
            <text:p>2022</text:p>
            <text:p>Warm Season</text:p>
            <text:p>10+ Seeds</text:p>
            <text:p>Easy Seed Saver</text:p>
            <text:p>Annual Full Sun</text:p>
          </table:table-cell>
          <table:table-cell table:style-name="Default" table:number-columns-repeated="16382"/>
        </table:table-row>
        <table:table-row table:style-name="ro15">
          <table:table-cell office:value-type="string" calcext:value-type="string">
            <text:p>Family: FLOWER (Yellow Ratibida columnaris)</text:p>
            <text:p>Variety: Prairie Coneflower</text:p>
            <text:p>Original Seed Source: Native Seed Company</text:p>
            <text:p>Comments: Sow outside fall or spring. Scarify area to be seeded. Broadcast seed and cover with fine dusting of soil. Drought tolerant. Do not overwater.</text:p>
          </table:table-cell>
          <table:table-cell office:value-type="string" calcext:value-type="string">
            <text:p>2023</text:p>
            <text:p>Blooms May-October Warm Season</text:p>
            <text:p>20+ Seeds</text:p>
            <text:p>Easy Seed Saver</text:p>
            <text:p>Perennial Full Sun to Part</text:p>
            <text:p>Shade</text:p>
          </table:table-cell>
          <table:table-cell table:style-name="Default" table:number-columns-repeated="16382"/>
        </table:table-row>
        <table:table-row table:style-name="ro15">
          <table:table-cell table:style-name="ce42" office:value-type="string" calcext:value-type="string">
            <text:p>Family: FLOWER (Salvia splendens)</text:p>
            <text:p>Variety: Salvia Scarlet Sage</text:p>
            <text:p>Original Seed Source: Baker Creek Heirloom Seeds</text:p>
            <text:p>www.rareseeds.com</text:p>
            <text:p>Comments: Perennial, usually grown as an annual, branched plant to 2 ft tall, green-gray foliage, 4” flower spikes covered with rich scarlet tubular flowers.  Sow in place in early spring in very well draining soil, barely covering seeds OR start indoors and transplant at time of last frost. Adding charcoal to the planting medium may improve germination.  Full sun; prefers sandy soil.  Seeds may be collected from mature flower</text:p>
            <text:p>heads.  Self-seeds freely if content.</text:p>
          </table:table-cell>
          <table:table-cell table:style-name="ce42" office:value-type="string" calcext:value-type="string">
            <text:p>2018</text:p>
            <text:p>NON-EDIBLE</text:p>
            <text:p>Various Seeds</text:p>
            <text:p>Easy Seed Saver</text:p>
          </table:table-cell>
          <table:table-cell table:style-name="Default" table:number-columns-repeated="16382"/>
        </table:table-row>
        <table:table-row table:style-name="ro15">
          <table:table-cell office:value-type="string" calcext:value-type="string">
            <text:p>Family: FLOWER</text:p>
            <text:p>Variety: San Pedro Daisy (Lasianthaca podocephala)</text:p>
            <text:p>Original Seed Source: Jim Koweek</text:p>
            <text:p>Where Grown: Sonoita, AZ</text:p>
            <text:p>Comments: Perennial found on Arizona hillsides. Rough feeling leaves with small yellow flowers.</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5">
          <table:table-cell table:style-name="ce42" office:value-type="string" calcext:value-type="string">
            <text:p>Family: FLOWER (Antirrhinum)</text:p>
            <text:p>Variety: Snapdragon Tall Deluxe</text:p>
            <text:p>Original Seed Source:  Baker Creek Heirloom Seeds — www.rareseeds.com</text:p>
            <text:p>Comments: 30-36” flower spikes in brilliant pink, red, yellow, lavender, and rose.  Perennial usually grown as annual.  Sow in place, early spring or start indoors setting out after last frost (transplant gently). Require full sun, rich soil, moderate moisture. Cutting back after blooming may cause another flush of flowers.  Self-seeds freely, may over-winter in our desert.  Start indoors 8 weeks before last frost and on</text:p>
            <text:p>the surface of the soil, keep moist.  Germination: 10 to 20 days</text:p>
          </table:table-cell>
          <table:table-cell table:style-name="ce42" office:value-type="string" calcext:value-type="string">
            <text:p>2018</text:p>
            <text:p>Warm Season</text:p>
            <text:p>20+ Seeds</text:p>
            <text:p>Easy Seed Saver</text:p>
          </table:table-cell>
          <table:table-cell table:style-name="Default" table:number-columns-repeated="16382"/>
        </table:table-row>
        <table:table-row table:style-name="ro15">
          <table:table-cell office:value-type="string" calcext:value-type="string">
            <text:p>Family: FLOWER</text:p>
            <text:p>Variety: Sulphur Cosmos ORANGE</text:p>
            <text:p>Grown By: Mary Dever</text:p>
            <text:p>Where Grown: Hereford, AZ</text:p>
            <text:p>Original Seed Source: wild sown in her yard</text:p>
            <text:p>Comments: Annual, Bright Orange, blooms summer/fall, reaches 30-40 inches (or up to 7ft), sun/partial shade, direct</text:p>
            <text:p>sow</text:p>
          </table:table-cell>
          <table:table-cell office:value-type="string" calcext:value-type="string">
            <text:p>2016</text:p>
            <text:p>Warm Season</text:p>
            <text:p>Various Seeds</text:p>
            <text:p>Easy Seed Saver</text:p>
          </table:table-cell>
          <table:table-cell table:style-name="Default" table:number-columns-repeated="16382"/>
        </table:table-row>
        <table:table-row table:style-name="ro15">
          <table:table-cell table:style-name="ce42" office:value-type="string" calcext:value-type="string">
            <text:p>Family: FLOWER</text:p>
            <text:p>Variety: Sunflower—Ann (Helianthus annua)</text:p>
            <text:p>Original Seed Source: Jim Koweek</text:p>
            <text:p>Where Grown: Sonoita, AZ</text:p>
            <text:p>Comments: Shorter and smaller than most. Attracts wrens and finches.  Seen along side roads in Arizona.  Plant after danger of frost; water well.</text:p>
          </table:table-cell>
          <table:table-cell table:style-name="ce42" office:value-type="string" calcext:value-type="string">
            <text:p>2018</text:p>
            <text:p>Warm Season</text:p>
            <text:p>Various Seeds</text:p>
            <text:p>Easy Seed Saver</text:p>
          </table:table-cell>
          <table:table-cell table:style-name="Default" table:number-columns-repeated="16382"/>
        </table:table-row>
        <table:table-row table:style-name="ro15">
          <table:table-cell office:value-type="string" calcext:value-type="string">
            <text:p>Family: FLOWER (Helianthus annuus)</text:p>
            <text:p>Variety: Sunflower—Conservation Farm Mix</text:p>
            <text:p>Grown By: Native Seed/SEARCH</text:p>
            <text:p>Where Grown: Patagonia, AZ</text:p>
            <text:p>Comments: Open pollinated mix of Native Seed/SEARCH varieties at the Conservation Farm.  Heads can reach up to</text:p>
            <text:p>12 inches in diameter and the plants up to 8 feet tall.  Includes single flower heads and others that are branched with multiple</text:p>
            <text:p>smaller heads.  Grow for wonderful, edible seeds!</text:p>
          </table:table-cell>
          <table:table-cell office:value-type="string" calcext:value-type="string">
            <text:p>2016</text:p>
            <text:p>Warm Season</text:p>
            <text:p>Various Seeds</text:p>
            <text:p>Easy Seed Saver</text:p>
          </table:table-cell>
          <table:table-cell table:style-name="Default" table:number-columns-repeated="16382"/>
        </table:table-row>
        <table:table-row table:style-name="ro15">
          <table:table-cell table:style-name="ce42" office:value-type="string" calcext:value-type="string">
            <text:p>Family: FLOWER (Helianthus annuus)</text:p>
            <text:p>Variety: Sunflower Evening Sun Mixed Colors Original Source: Ferry-Morse</text:p>
            <text:p>Comments: Beautiful array of colors which may include red, bronze and crimson.  Direct sow in full sun (sunflowers do not transplant well) after last frost, 1 inch deep, 18-24 inches apart. Germination takes 14-21 days. Great for cut flowers.</text:p>
          </table:table-cell>
          <table:table-cell table:style-name="ce42" office:value-type="string" calcext:value-type="string">
            <text:p>2022</text:p>
            <text:p>Warm Season</text:p>
            <text:p>15+ Seeds</text:p>
            <text:p>Easy Seed Saver</text:p>
          </table:table-cell>
          <table:table-cell table:style-name="Default" table:number-columns-repeated="16382"/>
        </table:table-row>
        <table:table-row table:style-name="ro15">
          <table:table-cell office:value-type="string" calcext:value-type="string">
            <text:p>Family: FLOWER (Helianthus uniflorus Giganteus)</text:p>
            <text:p>Variety: Sunflower—Giant White-Seeded</text:p>
            <text:p>Original Seed Source:  Baker Creek Heirloom Seeds — www.rareseeds.com</text:p>
            <text:p>Comments: Classic giant variety to 12 feet tall!  Produces large, yellow heads and big delicious white seeds for roasting. Direct sow in desired position, as sunflowers do not transplant well.  Allow 12-18 inches or more between plants.  Sow in full</text:p>
            <text:p>sun 2-3 weeks BEFORE last frost of spring; tolerate heat and drought well.</text:p>
          </table:table-cell>
          <table:table-cell office:value-type="string" calcext:value-type="string">
            <text:p>2018</text:p>
            <text:p>Warm Season</text:p>
            <text:p>5 Seeds</text:p>
            <text:p>Easy Seed Saver</text:p>
          </table:table-cell>
          <table:table-cell table:style-name="Default" table:number-columns-repeated="16382"/>
        </table:table-row>
        <table:table-row table:style-name="ro15">
          <table:table-cell table:style-name="ce42" office:value-type="string" calcext:value-type="string">
            <text:p>Family: FLOWER (Helianthus annuus)</text:p>
            <text:p>Variety: Sunflower—Giant Hybrid</text:p>
            <text:p>Original Source: Ferry-Morse</text:p>
            <text:p>Comments: Large blooms with large seeds for roasting. Plants can grow up p to 14’-16’ tall.  Direct sow (sunflowers do not transplant well) after last frost, 1 inch deep, thin to 18”-24”</text:p>
            <text:p>inches apart. Because of the size, needs lots of water.</text:p>
          </table:table-cell>
          <table:table-cell table:style-name="ce42" office:value-type="string" calcext:value-type="string">
            <text:p>2022</text:p>
            <text:p>Warm Season</text:p>
            <text:p>8 Seeds</text:p>
            <text:p>Hybrid Do not save</text:p>
            <text:p>seeds</text:p>
            <text:p>Germination 14-21 days</text:p>
          </table:table-cell>
          <table:table-cell table:style-name="Default" table:number-columns-repeated="16382"/>
        </table:table-row>
        <table:table-row table:style-name="ro15">
          <table:table-cell office:value-type="string" calcext:value-type="string">
            <text:p>Family: FLOWER</text:p>
            <text:p>Variety: Sunflower—Hope Black Dye RARE &amp; IN LOW SUPPLY</text:p>
            <text:p>Grown By: Native Seed/SEARCH</text:p>
            <text:p>Where Grown: Patagonia, AZ</text:p>
            <text:p>Comments: Called “tceqa” by the Hopi, the blue/black hull traditionally used for wool and basket dye as well as eye medicine.  Direct sow 1/2 inch deep 24 inches apart. Do not</text:p>
            <text:p>overwater.  Please grow these out specifically for some seed saving (do not grow any other sunflower at the same time.)</text:p>
          </table:table-cell>
          <table:table-cell office:value-type="string" calcext:value-type="string">
            <text:p>2016</text:p>
            <text:p>Warm Season</text:p>
            <text:p>5 Seeds</text:p>
            <text:p>Easy Seed Saver</text:p>
          </table:table-cell>
          <table:table-cell table:style-name="Default" table:number-columns-repeated="16382"/>
        </table:table-row>
        <table:table-row table:style-name="ro15">
          <table:table-cell table:style-name="ce42" office:value-type="string" calcext:value-type="string">
            <text:p>Family: FLOWER (Helianthus annuus)</text:p>
            <text:p>Variety: Sunflower—Lemon Queen</text:p>
            <text:p>Grown By: Jennifer Barrett (Cochise County Master Gardener)</text:p>
            <text:p>Comments: Beautiful lemon-yellow blooms with chocolate centers.  Tall plants with multiple flower heads per plant.  Direct sow (sunflowers do not transplant well) after last frost, 1/2 inch deep,   4-5</text:p>
            <text:p>inches apart. Germination takes 8-10 days.</text:p>
          </table:table-cell>
          <table:table-cell table:style-name="ce42" office:value-type="string" calcext:value-type="string">
            <text:p>2019</text:p>
            <text:p>Warm Season</text:p>
            <text:p>20+ Seeds</text:p>
            <text:p>Easy Seed Saver</text:p>
          </table:table-cell>
          <table:table-cell table:style-name="Default" table:number-columns-repeated="16382"/>
        </table:table-row>
        <table:table-row table:style-name="ro15">
          <table:table-cell office:value-type="string" calcext:value-type="string">
            <text:p>Family: FLOWER (Helianthus annuus)</text:p>
            <text:p>Variety: Sunflower—Mammoth (Organic) Original Source: Ferry-Morse Comments: Large blooms with large seeds for roasting. Plants can grow up p to 7’-12’ tall.  Direct sow (sunflowers do not transplant well) after last frost, 1 inch deep, thin to 18”-24”</text:p>
            <text:p>inches apart. Because of the size, needs lots of water.</text:p>
          </table:table-cell>
          <table:table-cell office:value-type="string" calcext:value-type="string">
            <text:p>Warm Season 10-11 Seeds Easy Seed Saver Germination 14-21 Days</text:p>
          </table:table-cell>
          <table:table-cell table:style-name="Default" table:number-columns-repeated="16382"/>
        </table:table-row>
        <table:table-row table:style-name="ro15">
          <table:table-cell table:style-name="ce42" office:value-type="string" calcext:value-type="string">
            <text:p>Family: FLOWER (Helianthus annuus)</text:p>
            <text:p>Variety: Sunflower—Mammoth Original Source: Ferry-Morse</text:p>
            <text:p>Comments: Large blooms with large seeds for roasting. Plants can grow up p to 7’-12’ tall.  Direct sow (sunflowers do not transplant well) after last frost, 1 inch deep, thin to 18”-24” inches apart.</text:p>
            <text:p>Because of the size, needs lots of water.</text:p>
          </table:table-cell>
          <table:table-cell table:style-name="ce42" office:value-type="string" calcext:value-type="string">
            <text:p>2022</text:p>
            <text:p>Warm Season</text:p>
            <text:p>10+ Seeds</text:p>
            <text:p>Easy Seed Saver</text:p>
            <text:p>Germination 14-21 days</text:p>
          </table:table-cell>
          <table:table-cell table:style-name="Default" table:number-columns-repeated="16382"/>
        </table:table-row>
        <table:table-row table:style-name="ro15">
          <table:table-cell office:value-type="string" calcext:value-type="string">
            <text:p>Family: FLOWER (Helianthus annuus)</text:p>
            <text:p>Variety: Sunflower Mixed Colors</text:p>
            <text:p>Original Source: Ferry-Morse</text:p>
            <text:p>Comments: Beautiful array of colors which may include yellow, white, brown, bronze and crimson.  Direct sow in full sun (sunflowers do not transplant well) after last frost, 1 inch deep, 18-24 inches apart. Germination takes 14-21 days. Great</text:p>
            <text:p>for cut flowers.</text:p>
          </table:table-cell>
          <table:table-cell office:value-type="string" calcext:value-type="string">
            <text:p>2022</text:p>
            <text:p>Warm Season 5 Seeds</text:p>
            <text:p>Easy</text:p>
            <text:p>Seed Saver</text:p>
          </table:table-cell>
          <table:table-cell table:style-name="Default" table:number-columns-repeated="16382"/>
        </table:table-row>
        <table:table-row table:style-name="ro15">
          <table:table-cell table:style-name="ce42" office:value-type="string" calcext:value-type="string">
            <text:p>Family: FLOWER (Helianthus annus—hybrid)</text:p>
            <text:p>Variety: Sunflower—Rouge Royale</text:p>
            <text:p>Original Seed Source: Botanical Interests</text:p>
            <text:p>Comments: Plant after danger of frost 1-2 weeks after last frost. Sensitive to root disturbance so sow directly into soil, 1/4”-1/2” deep 18”-24” apart.</text:p>
            <text:p>Rich deep red makes dramatic accent to beds and as cut-flower.</text:p>
          </table:table-cell>
          <table:table-cell table:style-name="ce42" office:value-type="string" calcext:value-type="string">
            <text:p>2022</text:p>
            <text:p>Warm Season</text:p>
            <text:p>3 Seeds</text:p>
            <text:p>Hybrid</text:p>
          </table:table-cell>
          <table:table-cell table:style-name="Default" table:number-columns-repeated="16382"/>
        </table:table-row>
        <table:table-row table:style-name="ro15">
          <table:table-cell office:value-type="string" calcext:value-type="string">
            <text:p>Family: FLOWER Sunflower(Helianthus annus)</text:p>
            <text:p>Variety: Skyscraper</text:p>
            <text:p>Original Seed Source: Ferry-Morse</text:p>
            <text:p>Comments: Plant after danger of frost 1-2 weeks after last frost. Sensitive to root disturbance so sow directly into soil, 1/4”-1/2” deep 18”-24” apart.</text:p>
            <text:p>Grows up to 10-12’ with flowers 14” or better. Edible jumbo seeds.</text:p>
          </table:table-cell>
          <table:table-cell office:value-type="string" calcext:value-type="string">
            <text:p>2022</text:p>
            <text:p>Warm Season</text:p>
            <text:p>Edible</text:p>
            <text:p>10 Seeds</text:p>
            <text:p>Easy Seed Saver</text:p>
            <text:p>Annual</text:p>
            <text:p>Full Sun</text:p>
          </table:table-cell>
          <table:table-cell table:style-name="Default" table:number-columns-repeated="16382"/>
        </table:table-row>
        <table:table-row table:style-name="ro15">
          <table:table-cell table:style-name="ce42" office:value-type="string" calcext:value-type="string">
            <text:p>Family: FLOWER (Helianthus debilis)</text:p>
            <text:p>Variety: Sunflower Vanilla Ice Original Source: Botanical Interests</text:p>
            <text:p>Comments: Beautiful creamy light yellow.  Direct sow in full sun (sunflowers do not transplant well) after last frost, 1/4-1/2 inch deep, 18-24 inches apart. Germination takes 10-15 days. Great for moonlight gardens or cut flowers.</text:p>
          </table:table-cell>
          <table:table-cell table:style-name="ce42" office:value-type="string" calcext:value-type="string">
            <text:p>2022</text:p>
            <text:p>Warm Season</text:p>
            <text:p>10+ Seeds</text:p>
            <text:p>Easy Seed Saver</text:p>
          </table:table-cell>
          <table:table-cell table:style-name="Default" table:number-columns-repeated="16382"/>
        </table:table-row>
        <table:table-row table:style-name="ro15">
          <table:table-cell office:value-type="string" calcext:value-type="string">
            <text:p>Family: FLOWER Sunflower(Helianthus annus)</text:p>
            <text:p>Variety: Velvet Queen</text:p>
            <text:p>Original Seed Source: Ferry-Morse</text:p>
            <text:p>Comments: Plant after danger of frost 1-2 weeks after last frost. Sensitive to root disturbance so sow directly into soil, 1/4”-1/2” deep 18”-24” apart.</text:p>
            <text:p>Rich deep red makes dramatic accent to beds and as cut-flower.</text:p>
          </table:table-cell>
          <table:table-cell office:value-type="string" calcext:value-type="string">
            <text:p>2022</text:p>
            <text:p>Warm Season</text:p>
            <text:p>5 Seeds</text:p>
            <text:p>Easy Seed Saver</text:p>
            <text:p>Annual</text:p>
            <text:p>Full Sun</text:p>
          </table:table-cell>
          <table:table-cell table:style-name="Default" table:number-columns-repeated="16382"/>
        </table:table-row>
        <table:table-row table:style-name="ro15">
          <table:table-cell table:style-name="ce42" office:value-type="string" calcext:value-type="string">
            <text:p>Family: FLOWER</text:p>
            <text:p>Variety: Supine Bean (Macroptillium supinum)</text:p>
            <text:p>Original Seed Source: Jim Koweek</text:p>
            <text:p>Where Grown: Sonoita, AZ</text:p>
            <text:p>Comments: Flowers above and below ground. The flowers below ground usually carry seed. Lovely orange flower.</text:p>
          </table:table-cell>
          <table:table-cell table:style-name="ce42" office:value-type="string" calcext:value-type="string">
            <text:p>2018</text:p>
            <text:p>Warm Season</text:p>
            <text:p>Various Seeds</text:p>
            <text:p>Easy Seed Saver</text:p>
          </table:table-cell>
          <table:table-cell table:style-name="Default" table:number-columns-repeated="16382"/>
        </table:table-row>
        <table:table-row table:style-name="ro15">
          <table:table-cell office:value-type="string" calcext:value-type="string">
            <text:p>Family: FLOWER Salvia (Salvia farinacea)</text:p>
            <text:p>Variety: Blue Victory</text:p>
            <text:p>Original Seed Source: Botanical Interests</text:p>
            <text:p>Comments: Sow outside 1 to 2 weeks after last average frost. Light aids germination. Press seeds into soil surface. Space 12” apart. Attracts pollinators. Deer resistant. Fairly drought tolerant once established. Makes excellent cut or dried</text:p>
            <text:p>flower.</text:p>
          </table:table-cell>
          <table:table-cell office:value-type="string" calcext:value-type="string">
            <text:p>2022</text:p>
            <text:p>Blooms Summer to Frost</text:p>
            <text:p>Warm Season</text:p>
            <text:p>10-12 Seeds</text:p>
            <text:p>Easy Seed Saver</text:p>
            <text:p>Perennial Full Sun to Part Shade</text:p>
          </table:table-cell>
          <table:table-cell table:style-name="Default" table:number-columns-repeated="16382"/>
        </table:table-row>
        <table:table-row table:style-name="ro15">
          <table:table-cell table:style-name="ce42" office:value-type="string" calcext:value-type="string">
            <text:p>Family: FLOWER Scabiosa Pincushion (Sixalix atropurpurea)</text:p>
            <text:p>Variety: Mixed Colors</text:p>
            <text:p>Grown By: Winnie Struse</text:p>
            <text:p>Comments: Plant in fine, moist soil, covering lightly with 1/8” soil.  Plant 12” apart in full sun to part shade.  Blooms all summer, is fairly drought tolerant and attractive to pollinators. Deer resistant.</text:p>
          </table:table-cell>
          <table:table-cell table:style-name="ce42" office:value-type="string" calcext:value-type="string">
            <text:p>2020</text:p>
            <text:p>Warm Season</text:p>
            <text:p>5+ Seeds</text:p>
            <text:p>Easy Seed Saver</text:p>
          </table:table-cell>
          <table:table-cell table:style-name="Default" table:number-columns-repeated="16382"/>
        </table:table-row>
        <table:table-row table:style-name="ro15">
          <table:table-cell office:value-type="string" calcext:value-type="string">
            <text:p>Family: FLOWER Scabiosa Pincushion (Sixalix atropurpurea)</text:p>
            <text:p>Variety: Black Knight</text:p>
            <text:p>Original Seed Source:  Botanical Interest</text:p>
            <text:p>Comments: Plant in fine, moist soil, covering lightly with 1/8” soil.  Plant 12” apart in full sun to part shade.  Blooms all summer, is fairly drought tolerant and attractive to pollinators.</text:p>
            <text:p>Deer resistant.</text:p>
          </table:table-cell>
          <table:table-cell office:value-type="string" calcext:value-type="string">
            <text:p>2022</text:p>
            <text:p>Warm Season</text:p>
            <text:p>5+ Seeds</text:p>
            <text:p>Easy Seed Saver</text:p>
          </table:table-cell>
          <table:table-cell table:style-name="Default" table:number-columns-repeated="16382"/>
        </table:table-row>
        <table:table-row table:style-name="ro15">
          <table:table-cell table:style-name="ce42" office:value-type="string" calcext:value-type="string">
            <text:p>Family: FLOWER Shasta Daisy (Leucanthemum superbum)</text:p>
            <text:p>Variety: Alaska</text:p>
            <text:p>Original Seed Source: American Seed</text:p>
            <text:p>Comments: Direct sow outside, plant 1-2 weeks after last frost. Seed depth 1/8”, with 2-3” apart and thin to about 12 inches apart. Pollinator attractor. Fairly drought tolerant</text:p>
          </table:table-cell>
          <table:table-cell table:style-name="ce42" office:value-type="string" calcext:value-type="string">
            <text:p>2023</text:p>
            <text:p>Warm Season but cold hardy</text:p>
            <text:p>10-15 Seeds</text:p>
            <text:p>Easy Seed Saver</text:p>
            <text:p>Annual Full Sun</text:p>
          </table:table-cell>
          <table:table-cell table:style-name="Default" table:number-columns-repeated="16382"/>
        </table:table-row>
        <table:table-row table:style-name="ro15">
          <table:table-cell office:value-type="string" calcext:value-type="string">
            <text:p>Family: FLOWER Snapdragon (Antirrhinum majus)</text:p>
            <text:p>Variety: Black Prince</text:p>
            <text:p>Original Seed Source: Botanical Interests</text:p>
            <text:p>Comments: Sow outside late summer to early fall. Light aids germination. Press seeds into soil surface. Space 6” apart. Attracts pollinators. Deer resistant.</text:p>
          </table:table-cell>
          <table:table-cell office:value-type="string" calcext:value-type="string">
            <text:p>2020</text:p>
            <text:p>Blooms Best in</text:p>
            <text:p>Cool Season</text:p>
            <text:p>Various Seeds</text:p>
            <text:p>Easy Seed Saver</text:p>
            <text:p>Perennial Full Sun to Part Shade</text:p>
          </table:table-cell>
          <table:table-cell table:style-name="Default" table:number-columns-repeated="16382"/>
        </table:table-row>
        <table:table-row table:style-name="ro15">
          <table:table-cell table:style-name="ce42" office:value-type="string" calcext:value-type="string">
            <text:p>Family: FLOWER Snapdragon (Antirrhinum majus)</text:p>
            <text:p>Variety: Magic Carpet Blend</text:p>
            <text:p>Original Seed Source: Botanical Interests</text:p>
            <text:p>Comments: Sow outside late summer to early fall. Light aids germination. Press seeds into soil surface. Space 6” apart. Attracts pollinators. Deer resistant.</text:p>
          </table:table-cell>
          <table:table-cell table:style-name="ce42" office:value-type="string" calcext:value-type="string">
            <text:p>2020</text:p>
            <text:p>Blooms Best in</text:p>
            <text:p>Cool Season</text:p>
            <text:p>Various Seeds</text:p>
            <text:p>Easy Seed Saver</text:p>
            <text:p>Perennial Full Sun to Part Shade</text:p>
          </table:table-cell>
          <table:table-cell table:style-name="Default" table:number-columns-repeated="16382"/>
        </table:table-row>
        <table:table-row table:style-name="ro15">
          <table:table-cell office:value-type="string" calcext:value-type="string">
            <text:p>Family: FLOWER Snapdragon (Antirrhinum majus)</text:p>
            <text:p>Variety: Night and Day</text:p>
            <text:p>Original Seed Source: Botanical Interests</text:p>
            <text:p>Comments: Sow outside late summer to early fall. Light aids germination. Press seeds into soil surface. Space 6” apart. Attracts pollinators. Deer resistant.</text:p>
          </table:table-cell>
          <table:table-cell office:value-type="string" calcext:value-type="string">
            <text:p>2022</text:p>
            <text:p>Blooms Best in</text:p>
            <text:p>Cool Season</text:p>
            <text:p>Various Seeds</text:p>
            <text:p>Easy Seed Saver</text:p>
            <text:p>Perennial Full Sun to Part Shade</text:p>
          </table:table-cell>
          <table:table-cell table:style-name="Default" table:number-columns-repeated="16382"/>
        </table:table-row>
        <table:table-row table:style-name="ro15">
          <table:table-cell table:style-name="ce42" office:value-type="string" calcext:value-type="string">
            <text:p>Family: FLOWER (Sonoran Desert Revegetation) Variety: Creosote, Triangle Bursage, Enclla Farinosa, Desert Marigold, Cassia Covesil, Desert Globe Mallow, Needle Grama Comments: Plant anytime but optimum Spring or Fall. Scarify area to be seeded. Evenly broadcast seed over area. With backside of rake cover seed with a fine dusting of soil. Water with a light spray until saturated. Keep moist until germination is established. Water periodically until seedlings are established.</text:p>
          </table:table-cell>
          <table:table-cell table:style-name="ce42" office:value-type="string" calcext:value-type="string">
            <text:p>2019</text:p>
            <text:p>All Seasons</text:p>
            <text:p>Various Seeds</text:p>
            <text:p>Easy Seed Saver</text:p>
          </table:table-cell>
          <table:table-cell table:style-name="Default" table:number-columns-repeated="16382"/>
        </table:table-row>
        <table:table-row table:style-name="ro15">
          <table:table-cell office:value-type="string" calcext:value-type="string">
            <text:p>Family: FLOWER Statice (cotton candy blend)</text:p>
            <text:p>Variety: Blend</text:p>
            <text:p>Grown by: Winnie Struse</text:p>
            <text:p>Comments: Press into surface of soil: do not cover seeds with soil as light aids germination. Start inside  8-10 weeks before average last frost or 8-10 weeks before planting outside in fall or winter for early spring bloom. For</text:p>
            <text:p>Continuous bloom, sow every 2-3 weeks. Attracts</text:p>
          </table:table-cell>
          <table:table-cell office:value-type="string" calcext:value-type="string">
            <text:p>2022</text:p>
            <text:p>Blooms  Spring and Fall</text:p>
            <text:p>Cool Season 30 Seeds</text:p>
            <text:p>Easy</text:p>
            <text:p>Seed Saver</text:p>
            <text:p>Perennial Full Sun</text:p>
          </table:table-cell>
          <table:table-cell table:style-name="Default" table:number-columns-repeated="16382"/>
        </table:table-row>
        <table:table-row table:style-name="ro15">
          <table:table-cell table:style-name="ce42" office:value-type="string" calcext:value-type="string">
            <text:p>Family: FLOWER Stock (Matthiola incana)</text:p>
            <text:p>Variety: Column Blend</text:p>
            <text:p>Grown by: Winnie Struse</text:p>
            <text:p>Comments: Press into surface of soil: do not cover seeds with soil as light aids germination. Start inside  8-10 weeks before average last frost or 8-10 weeks before planting outside in fall or winter for early spring bloom. For Continuous bloom,</text:p>
            <text:p>sow every 2-3 weeks. Attracts pollinators. Deer resistant.</text:p>
          </table:table-cell>
          <table:table-cell table:style-name="ce42" office:value-type="string" calcext:value-type="string">
            <text:p>2022</text:p>
            <text:p>Blooms  Spring and Fall</text:p>
            <text:p>Cool Season 20 Seeds</text:p>
            <text:p>Easy</text:p>
            <text:p>Seed Saver</text:p>
            <text:p>Perennial Full Sun</text:p>
          </table:table-cell>
          <table:table-cell table:style-name="Default" table:number-columns-repeated="16382"/>
        </table:table-row>
        <table:table-row table:style-name="ro15">
          <table:table-cell office:value-type="string" calcext:value-type="string">
            <text:p>Family: FLOWER (Helianthus annus)</text:p>
            <text:p>Variety: Sunflower—Fort Apache</text:p>
            <text:p>Original Seed Source:  Native Seed Search Comments: Produces medium to large, yellow heads and seeds for roasting or eaten raw. Direct sow in desired position, as sunflowers do not transplant well.  Split or remove hard seed</text:p>
            <text:p>hulls. Plant 1” deep with 12-18 inches or more between plants. Sow in full sun in spring; tolerate heat and drought well.</text:p>
          </table:table-cell>
          <table:table-cell office:value-type="string" calcext:value-type="string">
            <text:p>2018</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FLOWER Sunflower (Tithonia)</text:p>
            <text:p>Variety: Mexican Sunflower Seed Source: Angeles Emory, Master Gardener</text:p>
            <text:p>Comments: Sow in full sun in early spring. Direct sow no more than 1/8-1/4” deep (seeds need light to germinate). Sunflowers do not transplant well. Water gently, keep moist but not waterlogged until plants start growing. Deadhead flowers to keep continuous blooming.</text:p>
          </table:table-cell>
          <table:table-cell table:style-name="ce42" office:value-type="string" calcext:value-type="string">
            <text:p>2023</text:p>
            <text:p>Warm Season</text:p>
            <text:p>10 Seeds</text:p>
            <text:p>Easy Seed Saver</text:p>
          </table:table-cell>
          <table:table-cell table:style-name="Default" table:number-columns-repeated="16382"/>
        </table:table-row>
        <table:table-row table:style-name="ro15">
          <table:table-cell office:value-type="string" calcext:value-type="string">
            <text:p>Family: FLOWER Sweet Pea (Lathyrus odoratus)</text:p>
            <text:p>Variety: Beaujolais</text:p>
            <text:p>Original Seed Source: Botanical Interests</text:p>
            <text:p>Comments: Sow outside late fall to early winter. Soak seed in water for 12 to 24 hours or scarify before planting. Plant 1” deep. Space 6” apart. Attracts</text:p>
            <text:p>pollinators. Deer resistant. 7’ to 8’ vines.</text:p>
          </table:table-cell>
          <table:table-cell office:value-type="string" calcext:value-type="string">
            <text:p>2020</text:p>
            <text:p>Blooms  Spring and Summer Warm Season</text:p>
            <text:p>Various Seeds</text:p>
            <text:p>Easy Seed Saver</text:p>
            <text:p>Annual Full Sun to Part Shade</text:p>
          </table:table-cell>
          <table:table-cell table:style-name="Default" table:number-columns-repeated="16382"/>
        </table:table-row>
        <table:table-row table:style-name="ro15">
          <table:table-cell table:style-name="ce42" office:value-type="string" calcext:value-type="string">
            <text:p>Family: FLOWER Sweet Pea (Lathyrus odoratus)</text:p>
            <text:p>Variety: Bouquet Blend</text:p>
            <text:p>Original Seed Source: Botanical Interests</text:p>
            <text:p>Comments: Sow outside late fall to early winter. Soak seed in water for 12 to 24 hours or scarify before planting. Plant 1” deep. Space 6” apart. Attracts</text:p>
            <text:p>pollinators. Deer resistant. 7’ to 8’ vines.</text:p>
          </table:table-cell>
          <table:table-cell table:style-name="ce42" office:value-type="string" calcext:value-type="string">
            <text:p>2022</text:p>
            <text:p>Blooms  Spring and Summer Cool Season</text:p>
            <text:p>6 Seeds</text:p>
            <text:p>Easy Seed Saver</text:p>
            <text:p>Annual Full Sun to Part Shade</text:p>
          </table:table-cell>
          <table:table-cell table:style-name="Default" table:number-columns-repeated="16382"/>
        </table:table-row>
        <table:table-row table:style-name="ro15">
          <table:table-cell office:value-type="string" calcext:value-type="string">
            <text:p>Family: FLOWER Sweet Pea (Lathyrus odoratus)</text:p>
            <text:p>Variety: Early Multiflora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office:value-type="string" calcext:value-type="string">
            <text:p>2020</text:p>
            <text:p>Blooms  Spring and Summer Cool Season</text:p>
            <text:p>Various Seeds</text:p>
            <text:p>Easy Seed Saver</text:p>
            <text:p>Annual Full Sun to Part Shade</text:p>
          </table:table-cell>
          <table:table-cell table:style-name="Default" table:number-columns-repeated="16382"/>
        </table:table-row>
        <table:table-row table:style-name="ro15">
          <table:table-cell table:style-name="ce42" office:value-type="string" calcext:value-type="string">
            <text:p>Family: FLOWER Sweet Pea (Lathyrus odoratus)</text:p>
            <text:p>Variety: Elegance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table:style-name="ce42" office:value-type="string" calcext:value-type="string">
            <text:p>2022</text:p>
            <text:p>Blooms  Spring and Summer Cool Season</text:p>
            <text:p>15+ Seeds</text:p>
            <text:p>Easy Seed Saver</text:p>
            <text:p>Annual Full Sun to Part Shade</text:p>
          </table:table-cell>
          <table:table-cell table:style-name="Default" table:number-columns-repeated="16382"/>
        </table:table-row>
        <table:table-row table:style-name="ro15">
          <table:table-cell office:value-type="string" calcext:value-type="string">
            <text:p>Family: FLOWER Sweet Pea (Lathyrus odoratus)</text:p>
            <text:p>Variety: Little Sweetheart (Dwarf Bush)</text:p>
            <text:p>Original Seed Source: Botanical Interests</text:p>
            <text:p>Comments: Sow outside late fall to early winter. Soak seed in water for 12 to 24 hours or scarify before planting. Plant 1” deep. Space 6” apart. Attracts pollinators. Deer resistant. Great for hanging baskets,</text:p>
            <text:p>window boxes or other containers.</text:p>
          </table:table-cell>
          <table:table-cell office:value-type="string" calcext:value-type="string">
            <text:p>2022</text:p>
            <text:p>Blooms  Spring and Summer Cool Season</text:p>
            <text:p>10 Seeds</text:p>
            <text:p>Easy Seed Saver</text:p>
            <text:p>Annual Full Sun to Part Shade</text:p>
          </table:table-cell>
          <table:table-cell table:style-name="Default" table:number-columns-repeated="16382"/>
        </table:table-row>
        <table:table-row table:style-name="ro15">
          <table:table-cell table:style-name="ce42" office:value-type="string" calcext:value-type="string">
            <text:p>Family: FLOWER Sweet Pea (Lathyrus odoratus)</text:p>
            <text:p>Variety: My Navy</text:p>
            <text:p>Original Seed Source: Botanical Interests</text:p>
            <text:p>Comments: Sow outside late fall to early winter. Soak seed in water for 12 to 24 hours or scarify before planting. Plant 1” deep. Space 6” apart.</text:p>
            <text:p>Attracts pollinators. Deer resistant. 5’ to 6’ vines.</text:p>
          </table:table-cell>
          <table:table-cell table:style-name="ce42" office:value-type="string" calcext:value-type="string">
            <text:p>2024</text:p>
            <text:p>Blooms  Spring and Summer Cool Season</text:p>
            <text:p>5+ Seeds</text:p>
            <text:p>Easy Seed Saver</text:p>
            <text:p>Annual Full Sun to Part Shade</text:p>
          </table:table-cell>
          <table:table-cell table:style-name="Default" table:number-columns-repeated="16382"/>
        </table:table-row>
        <table:table-row table:style-name="ro15">
          <table:table-cell office:value-type="string" calcext:value-type="string">
            <text:p>Family: FLOWER Sweet Pea (Lathyrus odoratus)</text:p>
            <text:p>Variety: Old Spice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office:value-type="string" calcext:value-type="string">
            <text:p>2022</text:p>
            <text:p>Blooms  Spring and Summer Cool Season</text:p>
            <text:p>15+ Seeds</text:p>
            <text:p>Easy Seed Saver</text:p>
            <text:p>Annual Full Sun to Part Shade</text:p>
          </table:table-cell>
          <table:table-cell table:style-name="Default" table:number-columns-repeated="16382"/>
        </table:table-row>
        <table:table-row table:style-name="ro15">
          <table:table-cell table:style-name="ce42" office:value-type="string" calcext:value-type="string">
            <text:p>Family: FLOWER Sweet William (Dianthus barbatus)</text:p>
            <text:p>Variety: Double Blend</text:p>
            <text:p>Original Seed Source:  Botanical Interests</text:p>
            <text:p>Comments: Plant directly outside after last frost. Sow 1/4” deep 12-18” apart. Will bloom best in second year. 12-20” tall so will be good as a border behind shorter</text:p>
            <text:p>flowers. Long lasting cut flower.</text:p>
          </table:table-cell>
          <table:table-cell table:style-name="ce42" office:value-type="string" calcext:value-type="string">
            <text:p>2022</text:p>
            <text:p>Warm Season</text:p>
            <text:p>50+ Seeds</text:p>
            <text:p>Easy Seed Saver</text:p>
            <text:p>Perennial</text:p>
          </table:table-cell>
          <table:table-cell table:style-name="Default" table:number-columns-repeated="16382"/>
        </table:table-row>
        <table:table-row table:style-name="ro15">
          <table:table-cell office:value-type="string" calcext:value-type="string">
            <text:p>Family: FLOWER Sweet William (Dianthus barbatus)</text:p>
            <text:p>Variety: Tall Double Mixed Colors</text:p>
            <text:p>Original Seed Source:  Ferry Morse</text:p>
            <text:p>Comments: Plant directly outside after last frost. Sow 1/4” deep 12-18” apart. Will bloom best in second year. 18” tall so will be good as a border behind shorter flowers. Long lasting cut flower.</text:p>
          </table:table-cell>
          <table:table-cell office:value-type="string" calcext:value-type="string">
            <text:p>2022</text:p>
            <text:p>Warm Season</text:p>
            <text:p>20+ Seeds</text:p>
            <text:p>Easy Seed Saver</text:p>
            <text:p>Perennial</text:p>
          </table:table-cell>
          <table:table-cell table:style-name="Default" table:number-columns-repeated="16382"/>
        </table:table-row>
        <table:table-row table:style-name="ro15">
          <table:table-cell table:style-name="ce42" office:value-type="string" calcext:value-type="string">
            <text:p>Family: FLOWER Verbena (Verbena bonariensis)</text:p>
            <text:p>Variety: Brazilian Vervain</text:p>
            <text:p>Original Seed Source: Botanical Interests</text:p>
            <text:p>Comments: Sow outside 2 to 4 weeks before last frost. Stratification (storing in a damp paper towel in refrigerator for 2-4 weeks) hastens germination. Barely cover with dirt. Space 18” to 24” apart. Drought</text:p>
            <text:p>tolerant. Deer resistant. 3’ to 4’ tall.</text:p>
          </table:table-cell>
          <table:table-cell table:style-name="ce42" office:value-type="string" calcext:value-type="string">
            <text:p>2020</text:p>
            <text:p>Blooms Summer to Frost</text:p>
            <text:p>Warm Season</text:p>
            <text:p>Various Seeds</text:p>
            <text:p>Easy Seed Saver</text:p>
            <text:p>Perennial Full Sun to Part Shade</text:p>
          </table:table-cell>
          <table:table-cell table:style-name="Default" table:number-columns-repeated="16382"/>
        </table:table-row>
        <table:table-row table:style-name="ro15">
          <table:table-cell office:value-type="string" calcext:value-type="string">
            <text:p>Family: FLOWER Wisteria (Wisteria frutescens)</text:p>
            <text:p>Variety: American</text:p>
            <text:p>Grown By: Holly Haupt (Master Gardener)</text:p>
            <text:p>Where Grown: Sierra Vista, AZ</text:p>
            <text:p>Comments: Soak seeds overnight in warm water before planting 1” in well draining soil in pots. Plant outside after soil is 65 F and plants have 2 sets of leaves and are 4-5” tall. Plant where they have at least 6 hrs of sun and</text:p>
            <text:p>next to a fence or wall. May take several years to bloom.</text:p>
          </table:table-cell>
          <table:table-cell office:value-type="string" calcext:value-type="string">
            <text:p>2022</text:p>
            <text:p>Warm Season</text:p>
            <text:p>Various Seeds</text:p>
            <text:p>Difficult Seed Saver</text:p>
            <text:p>Germination may take up to 2 months</text:p>
          </table:table-cell>
          <table:table-cell table:style-name="Default" table:number-columns-repeated="16382"/>
        </table:table-row>
        <table:table-row table:style-name="ro15">
          <table:table-cell table:style-name="ce42" office:value-type="string" calcext:value-type="string">
            <text:p>Family: FLOWER Yarrow (Achillea millefolium)</text:p>
            <text:p>Variety: Colorado Blend</text:p>
            <text:p>Original Seed Source: Botanical Interests</text:p>
            <text:p>Comments: Sow outside 2 to 4 weeks after last frost. Light aids germination. Press gently into soil surface. Space 18” to 24” apart. Can grow in nearly any well drained soil. Drought tolerant. Attracts beneficial insects. Deer resistant. 3’ to 4’ tall. Make wonderful cut</text:p>
            <text:p>flowers.</text:p>
          </table:table-cell>
          <table:table-cell table:style-name="ce42" office:value-type="string" calcext:value-type="string">
            <text:p>2022</text:p>
            <text:p>Blooms Summer to Frost</text:p>
            <text:p>Warm Season</text:p>
            <text:p>Various Seeds</text:p>
            <text:p>Easy Seed Saver</text:p>
            <text:p>Perennial Full Sun</text:p>
          </table:table-cell>
          <table:table-cell table:style-name="Default" table:number-columns-repeated="16382"/>
        </table:table-row>
        <table:table-row table:style-name="ro15">
          <table:table-cell office:value-type="string" calcext:value-type="string">
            <text:p>Family: FLOWER Zinnia (Zinnia elegans)</text:p>
            <text:p>Variety: Cut and Come Again Original Seed Source:  Botanical Interests</text:p>
            <text:p>Comments: Vibrant colors that the more you cut, the more they bloom. Great in the garden to attract pollinators! Direct sow 1-2 weeks after last frost. Plant 1/4” deep, (just cover lightly with a light cover of soil) and 12” apart in full sun. This annual can reseed in our high desert climate!</text:p>
          </table:table-cell>
          <table:table-cell office:value-type="string" calcext:value-type="string">
            <text:p>2022</text:p>
            <text:p>Warm Season</text:p>
            <text:p>20+ Seeds</text:p>
            <text:p>Easy Seed Saver</text:p>
          </table:table-cell>
          <table:table-cell table:style-name="Default" table:number-columns-repeated="16382"/>
        </table:table-row>
        <table:table-row table:style-name="ro15">
          <table:table-cell table:style-name="ce42" office:value-type="string" calcext:value-type="string">
            <text:p>Family: FLOWER Zinnia (Zinnia elegans)</text:p>
            <text:p>Variety: Thumbelina Mixed Colors</text:p>
            <text:p>Original Seed Source:  Ferry Morse</text:p>
            <text:p>Comments: Plant after last frost, 1/4” deep, 12” apart. Cute tiny flowers in colors of white, yellow, orange, pink and scarlet.  Plants grow 6-8 inches tall.  Lovely to look at.  Lovely in bouquets.  Great in the garden to attract pollinators!  This  annual can reseed in our high</text:p>
            <text:p>desert climate!</text:p>
          </table:table-cell>
          <table:table-cell table:style-name="ce42" office:value-type="string" calcext:value-type="string">
            <text:p>2022</text:p>
            <text:p>Warm Season</text:p>
            <text:p>10</text:p>
            <text:p>+ Seeds</text:p>
            <text:p>Easy Seed Saver</text:p>
          </table:table-cell>
          <table:table-cell table:style-name="Default" table:number-columns-repeated="16382"/>
        </table:table-row>
        <table:table-row table:style-name="ro15">
          <table:table-cell office:value-type="string" calcext:value-type="string">
            <text:p>Family: FLOWER ZINNIA (Zinnia elegans)</text:p>
            <text:p>Variety: Lilliput</text:p>
            <text:p>Original Seed Source:  Botanical Interests</text:p>
            <text:p>Comments: Sow outside 1/4” deep, 9”-12” apart 1-2 weeks after last frost. Colors of white, yellow, pink, scarlet, purple, orange, and more.  Plants grow 18 inches tall.  Lovely to look at.  Lovely in bouquets.  Great in the garden to attract pollinators!  This  annual can reseed in our high desert climate!</text:p>
            <text:p>Deer resistant.</text:p>
          </table:table-cell>
          <table:table-cell office:value-type="string" calcext:value-type="string">
            <text:p>2022</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FLOWER (Zinnia elegans)</text:p>
            <text:p>Variety: Zinnia, Northern Lights Blend</text:p>
            <text:p>Original Seed Source: Botanical Interests</text:p>
            <text:p>Comments: Sow outside 1/4” deep, 9”-12” apart 1-2 weeks after last frost. Colors of pink, purple and burgandy.  Great in the garden to attract</text:p>
            <text:p>pollinators! Deer resistant.Will self-propagate from its own seed.</text:p>
          </table:table-cell>
          <table:table-cell table:style-name="ce42" office:value-type="string" calcext:value-type="string">
            <text:p>2022</text:p>
            <text:p>Warm Season</text:p>
            <text:p>10-15 Seeds</text:p>
            <text:p>Easy Seed Saver</text:p>
          </table:table-cell>
          <table:table-cell table:style-name="Default" table:number-columns-repeated="16382"/>
        </table:table-row>
        <table:table-row table:style-name="ro15">
          <table:table-cell office:value-type="string" calcext:value-type="string">
            <text:p>Family: FLOWER</text:p>
            <text:p>Variety: Zinnia, Red (Zinnia peruviana)</text:p>
            <text:p>Original Seed Source: Jim Koweek</text:p>
            <text:p>Where Grown: Sonoita, AZ</text:p>
            <text:p>Comments: Lovely red annual.  Will self- propagate from its own seed.  Butterflies love this flower!</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5">
          <table:table-cell table:style-name="ce42" office:value-type="string" calcext:value-type="string">
            <text:p>Family: FLOWER ZINNIA (Zinnia elegans)</text:p>
            <text:p>Variety: Thumbelina</text:p>
            <text:p>Original Seed Source:  Botanical Interests</text:p>
            <text:p>Comments: Sow outside 1/4” deep, 9”-12” apart 1-2 weeks after last frost. Colors of a wide range. Short plants and small blossoms. Great in the garden to attract</text:p>
            <text:p>pollinators!  This  annual can reseed in our high desert climate! Deer resistant.</text:p>
          </table:table-cell>
          <table:table-cell table:style-name="ce42" office:value-type="string" calcext:value-type="string">
            <text:p>2021</text:p>
            <text:p>Warm Season</text:p>
            <text:p>10+ Seeds</text:p>
            <text:p>Easy Seed Saver</text:p>
          </table:table-cell>
          <table:table-cell table:style-name="Default" table:number-columns-repeated="16382"/>
        </table:table-row>
        <table:table-row table:style-name="ro15">
          <table:table-cell office:value-type="string" calcext:value-type="string">
            <text:p>Family: FLOWER Zinnia (Zinnia elegans)</text:p>
            <text:p>Variety: Giant Double Enchantress</text:p>
            <text:p>Original Seed Source: Ferry Morse</text:p>
            <text:p>Comments: Sow outside 2 to 4 weeks after last frost. Plant 1/4” deep. Space 8” apart. Heat loving. Attracts</text:p>
            <text:p>pollinators. Deer resistant. Make wonderful cut flowers.</text:p>
          </table:table-cell>
          <table:table-cell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Zinnia (Zinnia elegans)</text:p>
            <text:p>Variety: Giant Double Violet Queen</text:p>
            <text:p>Original Seed Source: Ferry Morse</text:p>
            <text:p>Comments: Sow outside 2 to 4 weeks after last frost. Plant 1/4” deep. Space 8” apart. Heat loving. Attracts pollinators. Deer resistant. Large blossoms in a rich,</text:p>
            <text:p>purple hue on strong, tall plants.</text:p>
          </table:table-cell>
          <table:table-cell table:style-name="ce42"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5">
          <table:table-cell office:value-type="string" calcext:value-type="string">
            <text:p>Family: FLOWER Zinnia (Zinnia elegans)</text:p>
            <text:p>Variety: Giant Double Scarlet Flame</text:p>
            <text:p>Original Seed Source: Ferry Morse</text:p>
            <text:p>Comments: Sow outside 2 to 4 weeks after last frost. Plant 1/4” deep. Space 8” apart. Heat loving. Attracts pollinators. Deer resistant. Large blossoms in a rich, purple hue on strong, tall</text:p>
            <text:p>plants.</text:p>
          </table:table-cell>
          <table:table-cell office:value-type="string" calcext:value-type="string">
            <text:p>2024</text:p>
            <text:p>Blooms Summer to Frost</text:p>
            <text:p>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Zinnia (Zinnia elegans)</text:p>
            <text:p>Variety: Giants of California Mixed Colors</text:p>
            <text:p>Original Seed Source: Ferry Morse</text:p>
            <text:p>Comments: Sow outside 2 to 4 weeks after last frost. Plant 1/4” deep. Space 8” apart. Heat loving. Attracts pollinators. Deer resistant. Make wonderful cut flowers</text:p>
            <text:p>with a wide range of bright shades of color.</text:p>
          </table:table-cell>
          <table:table-cell table:style-name="ce42"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5">
          <table:table-cell office:value-type="string" calcext:value-type="string">
            <text:p>Family: FLOWER Zinnia (Zinnia elegans)</text:p>
            <text:p>Variety: Peppermint Stick</text:p>
            <text:p>Original Seed Source: Botanical Interests</text:p>
            <text:p>Comments: Sow outside 2 to 4 weeks after last frost. Plant 1/4” deep. Space 8” apart. Heat loving. Attracts</text:p>
            <text:p>pollinators. Deer resistant. Make wonderful cut flowers.</text:p>
          </table:table-cell>
          <table:table-cell office:value-type="string" calcext:value-type="string">
            <text:p>2020</text:p>
            <text:p>Blooms Summer to Frost</text:p>
            <text:p>Warm Season</text:p>
            <text:p>Various Seeds</text:p>
            <text:p>Easy Seed Saver</text:p>
            <text:p>Annual Full Sun</text:p>
          </table:table-cell>
          <table:table-cell table:style-name="Default" table:number-columns-repeated="16382"/>
        </table:table-row>
        <table:table-row table:style-name="ro15">
          <table:table-cell table:style-name="ce42" office:value-type="string" calcext:value-type="string">
            <text:p>Family: FLOWER Zinnia (Zinnia haageana)</text:p>
            <text:p>Variety: Persian Carpet</text:p>
            <text:p>Original Seed Source: Botanical Interests</text:p>
            <text:p>Comments: Sow outside 2 to 4 weeks after last frost. Plant 1/4” deep. Space 8” apart. Heat loving and drought tolerant. Attracts pollinators. Deer resistant. Make</text:p>
            <text:p>wonderful cut flowers.</text:p>
          </table:table-cell>
          <table:table-cell table:style-name="ce42"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5">
          <table:table-cell office:value-type="string" calcext:value-type="string">
            <text:p>Family: HERB/FLOWER(Calendula officinalis)</text:p>
            <text:p>Variety: Marigold (Calendula)Pacific Beauty Mix</text:p>
            <text:p>Comments: Plant 1/4” deep about 6-12” apart in fall. Petals of the flower may be eaten raw in salads or cooked as a seasoning for other dishes.</text:p>
          </table:table-cell>
          <table:table-cell office:value-type="string" calcext:value-type="string">
            <text:p>2020</text:p>
            <text:p>Edible</text:p>
            <text:p>Cool Season</text:p>
            <text:p>10+ Seeds</text:p>
            <text:p>Easy Seed Saver</text:p>
          </table:table-cell>
          <table:table-cell table:style-name="Default" table:number-columns-repeated="16382"/>
        </table:table-row>
        <table:table-row table:style-name="ro15">
          <table:table-cell table:style-name="ce42" office:value-type="string" calcext:value-type="string">
            <text:p>CCMG Seed Library Family: FLOAWSEeRed Library Variety: Lantana—Pink Yellow</text:p>
            <text:p>Seed Source: open</text:p>
            <text:p>Comments: Scatter seeds 2-4 weeks before average last frost. Rake seeds in to 1/8”-1/4” depth and water gently and keep moist until</text:p>
            <text:p>plants are established.</text:p>
          </table:table-cell>
          <table:table-cell table:style-name="ce42" office:value-type="string" calcext:value-type="string">
            <text:p>2023</text:p>
            <text:p>Warm Season</text:p>
            <text:p>7 Seeds</text:p>
            <text:p>Advanced Seed Saver</text:p>
          </table:table-cell>
          <table:table-cell table:style-name="Default" table:number-columns-repeated="16382"/>
        </table:table-row>
        <table:table-row table:style-name="ro15">
          <table:table-cell office:value-type="string" calcext:value-type="string">
            <text:p>Family: FLOWER Cleome Spider Flower</text:p>
            <text:p>Variety: Fountain Blend</text:p>
            <text:p>Original Seed Source: Botanical Interests</text:p>
            <text:p>Comments: Sow outside 1 to 2 weeks after last average frost. Light aids germination. Press seeds into soil surface. Space 12” apart. Attracts pollinators. Deer resistant. Fairly drought tolerant once established. Makes excellent cut or dried</text:p>
            <text:p>flower.</text:p>
          </table:table-cell>
          <table:table-cell office:value-type="string" calcext:value-type="string">
            <text:p>2022</text:p>
            <text:p>Blooms Summer to Frost</text:p>
            <text:p>Warm Season</text:p>
            <text:p>20 Seeds</text:p>
            <text:p>Easy Seed Saver</text:p>
            <text:p>Perennial Full Sun to Part Shade</text:p>
          </table:table-cell>
          <table:table-cell table:style-name="Default" table:number-columns-repeated="16382"/>
        </table:table-row>
        <table:table-row table:style-name="ro15">
          <table:table-cell table:style-name="ce42" office:value-type="string" calcext:value-type="string">
            <text:p>Family:  GOURD (Lagenaria siceraria)</text:p>
            <text:p>Variety: O’odham Dipper</text:p>
            <text:p>Grown by:  Andy Ward</text:p>
            <text:p>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table:style-name="ce42" office:value-type="string" calcext:value-type="string">
            <text:p>2018</text:p>
            <text:p>NON-EDIBLE</text:p>
            <text:p>Warm Season</text:p>
            <text:p>4+ Seeds</text:p>
            <text:p>Easy Seed Saver</text:p>
            <text:p>Germination: 3-10 days</text:p>
            <text:p>@ 85 degrees</text:p>
          </table:table-cell>
          <table:table-cell table:style-name="Default" table:number-columns-repeated="16382"/>
        </table:table-row>
        <table:table-row table:style-name="ro15">
          <table:table-cell office:value-type="string" calcext:value-type="string">
            <text:p>Family:  GOURD (Lagenaria siceraria)</text:p>
            <text:p>Variety: Birdhouse Bottle Gourd, Heirloom</text:p>
            <text:p>Grown by:  Holly Vennum, Master Gardener</text:p>
            <text:p>Where grown:  Sierra Vista, AZ</text:p>
            <text:p>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office:value-type="string" calcext:value-type="string">
            <text:p>2021</text:p>
            <text:p>NON-EDIBLE</text:p>
            <text:p>Warm Season</text:p>
            <text:p>5 Seeds</text:p>
            <text:p>Easy Seed Saver</text:p>
            <text:p>Germination: 3-10 days</text:p>
            <text:p>@ 85 degrees</text:p>
          </table:table-cell>
          <table:table-cell table:style-name="Default" table:number-columns-repeated="16382"/>
        </table:table-row>
        <table:table-row table:style-name="ro15">
          <table:table-cell table:style-name="ce42" office:value-type="string" calcext:value-type="string">
            <text:p>Family:  GOURD (Lagenaria siceraria)</text:p>
            <text:p>Variety: Birdhouse Bottle Gourd</text:p>
            <text:p>Original Seed Source: Botanical Interests Comments: Start indoors or direct sow after frost. Slow to germinate; scarify or soak overnight.  Plant 1” deep in hills 6 feet apart. Full sun; 125 days, up to 12 inches long. Trellis on fence, arbor, or up a tree.  Giant, pear-shaped; perfect for martins and finches.  Harvest when tan in color; dry in a warm, dark place.</text:p>
            <text:p>Soil Temp Range: 70– 85 Optimum: 85°</text:p>
          </table:table-cell>
          <table:table-cell table:style-name="ce42" office:value-type="string" calcext:value-type="string">
            <text:p>2022</text:p>
            <text:p>NON-EDIBLE</text:p>
            <text:p>Warm Season</text:p>
            <text:p>3+ Seeds</text:p>
            <text:p>Easy Seed Saver</text:p>
            <text:p>Germination: 3-10 days</text:p>
            <text:p>@ 85 degrees</text:p>
          </table:table-cell>
          <table:table-cell table:style-name="Default" table:number-columns-repeated="16382"/>
        </table:table-row>
        <table:table-row table:style-name="ro15">
          <table:table-cell office:value-type="string" calcext:value-type="string">
            <text:p>Family:  GOURD (Lagenaria siceraria)</text:p>
            <text:p>Variety: LARGE GOURD</text:p>
            <text:p>Grown by:  Native Seed/SEARCH</text:p>
            <text:p>Where grown:  Tucson, AZ</text:p>
            <text:p>Original Seed Source: Native Seed/SEARCH 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office:value-type="string" calcext:value-type="string">
            <text:p>2016</text:p>
            <text:p>NON-EDIBLE</text:p>
            <text:p>Warm Season</text:p>
            <text:p>4+ Seeds</text:p>
            <text:p>Easy Seed Saver</text:p>
            <text:p>Germination: 3-10 days</text:p>
            <text:p>@ 85 degrees</text:p>
          </table:table-cell>
          <table:table-cell table:style-name="Default" table:number-columns-repeated="16382"/>
        </table:table-row>
        <table:table-row table:style-name="ro15">
          <table:table-cell table:style-name="ce42" office:value-type="string" calcext:value-type="string">
            <text:p>Family:  GOURD (Lagenaria siceraria)</text:p>
            <text:p>Variety: Xiaohulu (hourglass shaped gourd)</text:p>
            <text:p>Original Seed Source: Baker Creek Heirloom Seeds</text:p>
            <text:p>Rareseeds.com Comments: Start indoors or direct sow after frost. Slow to germinate; scarify or soak overnight.  Plant 1” deep in hills 6 feet apart. Full sun; 125 days, 8 inches long. Trellis on fence, arbor, or up a tree.  Favored for crafting (painting/decorating).</text:p>
            <text:p>Soil Temp Range: 70– 85 Optimum: 85°</text:p>
          </table:table-cell>
          <table:table-cell table:style-name="ce42" office:value-type="string" calcext:value-type="string">
            <text:p>2018</text:p>
            <text:p>NON-EDIBLE</text:p>
            <text:p>Warm Season</text:p>
            <text:p>4 Seeds</text:p>
            <text:p>Easy Seed Saver</text:p>
            <text:p>Germination: 3-10 days</text:p>
            <text:p>@ 85 degrees</text:p>
          </table:table-cell>
          <table:table-cell table:style-name="Default" table:number-columns-repeated="16382"/>
        </table:table-row>
        <table:table-row table:style-name="ro15">
          <table:table-cell office:value-type="string" calcext:value-type="string">
            <text:p>Family:  GOURD (Lagenaria siceraria)</text:p>
            <text:p>Variety: Corsican</text:p>
            <text:p>Seed Source:  Botanical Interest</text:p>
            <text:p>Comments: Start indoors or direct sow after frost. Slow to germinate; scarify or soak overnight.  Plant 1” deep in hills 6 feet apart. Full sun; 140 days. Trellis on fence, arbor, or up a tree.  Favored for crafting. Carve, cut or drill like wood.</text:p>
            <text:p>Soil Temp Range: 70– 85 Optimum: 85°</text:p>
          </table:table-cell>
          <table:table-cell office:value-type="string" calcext:value-type="string">
            <text:p>2022</text:p>
            <text:p>NON-EDIBLE</text:p>
            <text:p>Warm Season</text:p>
            <text:p>3+ Seeds</text:p>
            <text:p>Easy Seed Saver</text:p>
            <text:p>Germination: 5-10 days</text:p>
            <text:p>@ 85 degrees</text:p>
          </table:table-cell>
          <table:table-cell table:style-name="Default" table:number-columns-repeated="16382"/>
        </table:table-row>
        <table:table-row table:style-name="ro15">
          <table:table-cell table:style-name="ce42" office:value-type="string" calcext:value-type="string">
            <text:p>Family:  GOURD LUFFA (Luffa aegytiaca)</text:p>
            <text:p>Variety: Luffa</text:p>
            <text:p>Grown By: BJ Searcy, Master Gardener</text:p>
            <text:p>Comments: Direct sow or start indoors; seeds may take 10- 20 days to germinate; long climbing vine needs lots of room and it is recommended to grow on a fence or trellis. Plant in direct sunight 1” deep on hills of well drained dirt with 4 plants each. Water daily if possible. Small young fruit can be eaten as a summer squash. Fruits can be up to 24 inches long and should mature on plant until dry then peel to reveal sponge.</text:p>
          </table:table-cell>
          <table:table-cell table:style-name="ce42" office:value-type="string" calcext:value-type="string">
            <text:p>2022</text:p>
            <text:p>EDIBLE</text:p>
            <text:p>Warm Season</text:p>
            <text:p>7 Seeds</text:p>
            <text:p>Easy Seed Saver</text:p>
            <text:p>Germination Slow</text:p>
            <text:p>10-20</text:p>
            <text:p>days</text:p>
          </table:table-cell>
          <table:table-cell table:style-name="Default" table:number-columns-repeated="16382"/>
        </table:table-row>
        <table:table-row table:style-name="ro15">
          <table:table-cell office:value-type="string" calcext:value-type="string">
            <text:p>Family:  GOURD LUFFA (Curcubita cylindrica)</text:p>
            <text:p>Variety: Wild Luffa (Sponge)</text:p>
            <text:p>Grown By: BJ Searcy, Master Gardener</text:p>
            <text:p>Comments: Direct sow or start indoors; scarify and presoak seeds 24 hours before planting; may take</text:p>
            <text:p>several weeks to germinate; long climbing vine needs lots of room. Fruits should mature on plant until dry then peel to reveal sponge and seeds. Small sponges are ideal for</text:p>
            <text:p>small jobs.</text:p>
          </table:table-cell>
          <table:table-cell office:value-type="string" calcext:value-type="string">
            <text:p>2022</text:p>
            <text:p>Non-EDIBLE</text:p>
            <text:p>Warm Season</text:p>
            <text:p>10 Seeds</text:p>
            <text:p>Beginner Seed Saver</text:p>
          </table:table-cell>
          <table:table-cell table:style-name="Default" table:number-columns-repeated="16382"/>
        </table:table-row>
        <table:table-row table:style-name="ro15">
          <table:table-cell table:style-name="ce42" office:value-type="string" calcext:value-type="string">
            <text:p>Family: GRASS</text:p>
            <text:p>Variety: Santa Rita Grama Grass (Boutelour eludens)</text:p>
            <text:p>Original Seed Source: Jim Koweek</text:p>
            <text:p>Where Grown: Sonoita, AZ</text:p>
            <text:p>Comments: This grass is one of a variety of grama grasses.  It is both heat and drought tolerant.</text:p>
          </table:table-cell>
          <table:table-cell table:style-name="ce42" office:value-type="string" calcext:value-type="string">
            <text:p>2018</text:p>
            <text:p>Warm Season</text:p>
            <text:p>Various Seeds</text:p>
            <text:p>Easy Seed Saver</text:p>
          </table:table-cell>
          <table:table-cell table:style-name="Default" table:number-columns-repeated="16382"/>
        </table:table-row>
        <table:table-row table:style-name="ro15">
          <table:table-cell office:value-type="string" calcext:value-type="string">
            <text:p>Family: GRASS</text:p>
            <text:p>Variety: Wooly Bunchgrass (Elionunus barbiculmis)</text:p>
            <text:p>Original Seed Source: Jim Koweek</text:p>
            <text:p>Where Grown: Sonoita, AZ</text:p>
            <text:p>Comments: Soft-looking, yellowish/green grass that grows well on rocky slopes.  Lemon yellow pollen.</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5">
          <table:table-cell table:style-name="ce42" office:value-type="string" calcext:value-type="string">
            <text:p>Family: ONION (Allium )</text:p>
            <text:p>Variety: green</text:p>
            <text:p>Seed Source: organic /master Gardener</text:p>
            <text:p>Comments: Start indoors, 1/2” deep, 4-6 weeks before transplant; plant outdoors 6” apart, full sun; uncover most of bulb to form. 110 days; biennial seed stalk.</text:p>
          </table:table-cell>
          <table:table-cell table:style-name="ce42" office:value-type="string" calcext:value-type="string">
            <text:p>2022</text:p>
            <text:p>EDIBLE</text:p>
            <text:p>Cool Season</text:p>
            <text:p>various Seeds</text:p>
            <text:p>Advanced Seed Saver</text:p>
            <text:p>Germination: 4-5 days</text:p>
          </table:table-cell>
          <table:table-cell table:style-name="Default" table:number-columns-repeated="16382"/>
        </table:table-row>
        <table:table-row table:style-name="ro15">
          <table:table-cell office:value-type="string" calcext:value-type="string">
            <text:p>Family: GREENS (Eruca vescaria subsp. sativa)</text:p>
            <text:p>Variety: Arugula, Baby (Rocket)</text:p>
            <text:p>Original Seed Source: Botanical Interests</text:p>
            <text:p>Comments: Plant 1/4” deep in a shallow container in cool season. Does not require thinning.</text:p>
            <text:p>Harvest individual leaves or cut bunches to add to salads or use in stir fry.</text:p>
          </table:table-cell>
          <table:table-cell office:value-type="string" calcext:value-type="string">
            <text:p>2022</text:p>
            <text:p>EDIBLE</text:p>
            <text:p>Cool Season</text:p>
            <text:p>15-18 Seeds</text:p>
            <text:p>Intermediate Seed Saver</text:p>
          </table:table-cell>
          <table:table-cell table:style-name="Default" table:number-columns-repeated="16382"/>
        </table:table-row>
        <table:table-row table:style-name="ro15">
          <table:table-cell table:style-name="ce42" office:value-type="string" calcext:value-type="string">
            <text:p>Family: GREENS Endive (Chichorium endivia)</text:p>
            <text:p>Variety: Olesh Tres Fine</text:p>
            <text:p>Original Seed Source: Botanical Interest</text:p>
            <text:p>Comments: Plant 1/8” deep about 3 seeds every 6 inches 8-10 weeks before average first frost. Thin to one every 6”. Harvest individual leaves or cut bunches to add to salads.</text:p>
          </table:table-cell>
          <table:table-cell table:style-name="ce42" office:value-type="string" calcext:value-type="string">
            <text:p>2022</text:p>
            <text:p>EDIBLE</text:p>
            <text:p>Cool Season</text:p>
            <text:p>7 Seeds</text:p>
            <text:p>Intermediate Seed Saver</text:p>
          </table:table-cell>
          <table:table-cell table:style-name="Default" table:number-columns-repeated="16382"/>
        </table:table-row>
        <table:table-row table:style-name="ro15">
          <table:table-cell office:value-type="string" calcext:value-type="string">
            <text:p>Family: GREENS Purslane (Portulacaceae verdolga)</text:p>
            <text:p>Variety: Green Purslane</text:p>
            <text:p>Comments: Annual succulent. Direct sow 1/4” deep in warm, moist soil; thin to 4-6” apart. When picking, leave 2” of stem so plant will regrow.  Add to salads. High source of vitamins, calcium &amp; iron.</text:p>
          </table:table-cell>
          <table:table-cell office:value-type="string" calcext:value-type="string">
            <text:p>2020</text:p>
            <text:p>EDIBLE</text:p>
            <text:p>Warm Season</text:p>
            <text:p>Various Seeds</text:p>
            <text:p>Advanced Seed Saver</text:p>
            <text:p>Germination:</text:p>
            <text:p>Warm moist soil</text:p>
          </table:table-cell>
          <table:table-cell table:style-name="Default" table:number-columns-repeated="16382"/>
        </table:table-row>
        <table:table-row table:style-name="ro15">
          <table:table-cell table:style-name="ce42" office:value-type="string" calcext:value-type="string">
            <text:p>Family: GREENS (Plantago coronopus)</text:p>
            <text:p>Variety: MINUTINA</text:p>
            <text:p>Original Seed Source: Johnny’s Seed</text:p>
            <text:p>Comments: Plant 1/4” deep about 4-5 seeds per inch in flats or plug trays. Thin to 2-3 plants. When roots fill cell, gently transplant to 6” apart or let grow thickly if plants are to be clipped when young. Add to winter salads.</text:p>
          </table:table-cell>
          <table:table-cell table:style-name="ce42"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5">
          <table:table-cell office:value-type="string" calcext:value-type="string">
            <text:p>Family: GREENS (Brassica rapa)</text:p>
            <text:p>Variety: Japanese MIZUNA</text:p>
            <text:p>Original Seed Source: Johnny’s Seed</text:p>
            <text:p>Comments: Plant 1/4” deep about 15 seeds per foot in cool season. Does not require thinning. Harvest individual leaves or cut bunches to add to salads or use in stir fry.</text:p>
          </table:table-cell>
          <table:table-cell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5">
          <table:table-cell table:style-name="ce42" office:value-type="string" calcext:value-type="string">
            <text:p>Family: GREENS (Valerianella locusta)</text:p>
            <text:p>Variety: Mache, Corn Salad</text:p>
            <text:p>Original Seed Source: Botanical Interests</text:p>
            <text:p>Comments: Direct sow 1/4” deep about 3 seeds every 4”.Thin to 1 every 4”. Delightful eaten alone as a salad, mixed with other greens or cooked like spinach. Tolerant of heat without bitterness and cold/freeze tolerant.</text:p>
          </table:table-cell>
          <table:table-cell table:style-name="ce42" office:value-type="string" calcext:value-type="string">
            <text:p>2022</text:p>
            <text:p>EDIBLE</text:p>
            <text:p>Cool Season</text:p>
            <text:p>25 Seeds</text:p>
            <text:p>Intermediate Seed Saver</text:p>
            <text:p>Mature 60 days</text:p>
          </table:table-cell>
          <table:table-cell table:style-name="Default" table:number-columns-repeated="16382"/>
        </table:table-row>
        <table:table-row table:style-name="ro15">
          <table:table-cell office:value-type="string" calcext:value-type="string">
            <text:p>Family: Greens, Mixed</text:p>
            <text:p>Variety: Mixed Winter Leafy Greens</text:p>
            <text:p>Comments:  Sow indoors 3-4 weeks before last frost. Sow in flats barely covering seeds. Shade on very sunny days to keep soil cool. Germinates well in low temps but dormant above 75 degrees. Harvest leaves from outer edge so plants</text:p>
            <text:p>continues to grow from center. May contain lettuces, mustard, kohlrabi, and other winter greens.</text:p>
          </table:table-cell>
          <table:table-cell office:value-type="string" calcext:value-type="string">
            <text:p>2017</text:p>
            <text:p>EDIBLE</text:p>
            <text:p>Cool Season</text:p>
            <text:p>100+ Seeds</text:p>
            <text:p>Intermediate Seed Saver</text:p>
          </table:table-cell>
          <table:table-cell table:style-name="Default" table:number-columns-repeated="16382"/>
        </table:table-row>
        <table:table-row table:style-name="ro15">
          <table:table-cell table:style-name="ce42" office:value-type="string" calcext:value-type="string">
            <text:p>Family: GREENS (Basella rubra)</text:p>
            <text:p>Variety: Red Malabar Spinach</text:p>
            <text:p>Grown By: Native Seed/SEARCH Farm</text:p>
            <text:p>Where Grown: Patagonia, AZ</text:p>
            <text:p>Original Seed Source: www.nativeseeds.org Comments: Not a true spinach. Spinach-like leaves on this beautiful vining plant like hot weather. Dark red stems; dark green leaves. Direct sow or start indoors.</text:p>
            <text:p>Best germination at soil temp of 80 degrees. High in vitamins A, C, iron, and calcium.</text:p>
          </table:table-cell>
          <table:table-cell table:style-name="ce42" office:value-type="string" calcext:value-type="string">
            <text:p>2017</text:p>
            <text:p>EDIBLE</text:p>
            <text:p>Warm Season</text:p>
            <text:p>10 Seeds</text:p>
            <text:p>Advanced Seed Saver</text:p>
            <text:p>Germination:</text:p>
            <text:p>Best at 80 degrees</text:p>
          </table:table-cell>
          <table:table-cell table:style-name="Default" table:number-columns-repeated="16382"/>
        </table:table-row>
        <table:table-row table:style-name="ro15">
          <table:table-cell office:value-type="string" calcext:value-type="string">
            <text:p>Family: GREENS (Salad Blend)</text:p>
            <text:p>Variety: Siamese Dragon Stir-Fry Mix</text:p>
            <text:p>Original Seed Source: Baker Creek Heirloom Seeds  -  www.rareseeds.com</text:p>
            <text:p>Comments: All the best Asian greens for stir-frying and steaming.  Rich flavor is incredible when lightly cooked and seasoned with garlic and Thai peppers.  Grow as spring/fall crop.  Sow in place no more than 1/4” deep in moist, well- drained soil. Full morning sun/afternoon shade.  Allow a few inches between plants, thinning as they grow.  Leaves, flowers</text:p>
            <text:p>and stems are all edible.</text:p>
          </table:table-cell>
          <table:table-cell office:value-type="string" calcext:value-type="string">
            <text:p>2018</text:p>
            <text:p>EDIBLE</text:p>
            <text:p>Cool Season</text:p>
            <text:p>50+ Seeds</text:p>
            <text:p>Intermediate Seed Saver</text:p>
          </table:table-cell>
          <table:table-cell table:style-name="Default" table:number-columns-repeated="16382"/>
        </table:table-row>
        <table:table-row table:style-name="ro15">
          <table:table-cell table:style-name="ce42" office:value-type="string" calcext:value-type="string">
            <text:p>Family: GREENS (Brassica ssp &amp; Eruca sativa)</text:p>
            <text:p>Variety: Stir-Fry Mix</text:p>
            <text:p>Grown By: Native Seed/SEARCH Farm</text:p>
            <text:p>Where Grown: Patagonia, AZ</text:p>
            <text:p>Original Seed Source: www.nativeseeds.org Comments: Plant 1/4” deep in cool season; thin to 1” apart or 6”apart if you want mature leaves. Harvest individual leaves or cut to 1” above ground. Plant will regrow several times.</text:p>
          </table:table-cell>
          <table:table-cell table:style-name="ce42" office:value-type="string" calcext:value-type="string">
            <text:p>2016</text:p>
            <text:p>EDIBLE</text:p>
            <text:p>Cool Season</text:p>
            <text:p>50 Seeds</text:p>
            <text:p>Intermediate Seed Saver</text:p>
          </table:table-cell>
          <table:table-cell table:style-name="Default" table:number-columns-repeated="16382"/>
        </table:table-row>
        <table:table-row table:style-name="ro15">
          <table:table-cell office:value-type="string" calcext:value-type="string">
            <text:p>Family: GREENS—Wheatgrass (Triticum aestivuum)</text:p>
            <text:p>Variety: Liquid Sunshine</text:p>
            <text:p>Original Seed Source: Botanical Interests</text:p>
            <text:p>Comments: To hasten germination, soak seed in water for 12-24 hours. Sow in shallow trays or flats filled 1”-2” deep with fine, seed-starting mix. Broadcast seed thickly, about 1/4” apart. Press seeds firmly into soil mix and cover about 1/8” with sowing mix. Move containers as need for best light exposure. Matures 10-15 days. Greens can be juiced for</text:p>
            <text:p>essential vitamins and mineral.</text:p>
          </table:table-cell>
          <table:table-cell office:value-type="string" calcext:value-type="string">
            <text:p>2020</text:p>
            <text:p>EDIBLE</text:p>
            <text:p>All Season</text:p>
            <text:p>25+ Seeds</text:p>
            <text:p>Advanced Seed Saver</text:p>
          </table:table-cell>
          <table:table-cell table:style-name="Default" table:number-columns-repeated="16382"/>
        </table:table-row>
        <table:table-row table:style-name="ro15">
          <table:table-cell table:style-name="ce42" office:value-type="string" calcext:value-type="string">
            <text:p>Family: HERB (Ocimum basilicum “Thai”)</text:p>
            <text:p>Variety: Basil, Thai</text:p>
            <text:p>Grown by:  Deborah Avery-Hargrove (CCMGA Master Gardener) Original Seed Source: www.rareseeds.com Comments: Distinctive pungent basil used in Asian dishes; 10-24”; indoor  4-6 weeks before planting out or direct sow when temp does not drop below 65 degrees; full sun; rich well drained soil; use fresh or dried; infuse with vinegar or oil, teas, pair with meat, or use as micro</text:p>
            <text:p>green.</text:p>
          </table:table-cell>
          <table:table-cell table:style-name="ce42"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5">
          <table:table-cell office:value-type="string" calcext:value-type="string">
            <text:p>Family: HERB (Ocimum basilicum “Genovese”)</text:p>
            <text:p>Variety: Basil, Genovese</text:p>
            <text:p>Original Seed Source: Johnny’s Seeds</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5">
          <table:table-cell table:style-name="ce42" office:value-type="string" calcext:value-type="string">
            <text:p>Family: HERB (Ocimum basilicum “Genovese”)</text:p>
            <text:p>Variety: Basil, Genovese</text:p>
            <text:p>Grown by:  Paula Manning, Sierra Vista AZ</text:p>
            <text:p>Original Seed Source: Her garden</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table:style-name="ce42"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5">
          <table:table-cell office:value-type="string" calcext:value-type="string">
            <text:p>Family: HERB (Ocimum spp)</text:p>
            <text:p>Variety: Basil, Italian Large Leaf</text:p>
            <text:p>Original Seed Source: Johnny’s Seeds</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5">
          <table:table-cell table:style-name="ce42" office:value-type="string" calcext:value-type="string">
            <text:p>Family: HERB (Ocimum basilicum O x africanum)</text:p>
            <text:p>Variety: Basil, Viva la Dolce Vita Blend</text:p>
            <text:p>Original Seed Source: Botanical Interests</text:p>
            <text:p>Comments: Basil mix of Genovese, large leaf, Dark Opal, lime, lemon and cinnamon. Recommend plant indoors  4-6 weeks before planting out or direct sow when temp does not drop below 65 degrees, full sun,</text:p>
            <text:p>rich well drained soil. Plant 1/4” deep with 12” spacing.</text:p>
          </table:table-cell>
          <table:table-cell table:style-name="ce42" office:value-type="string" calcext:value-type="string">
            <text:p>2022</text:p>
            <text:p>EDIBLE</text:p>
            <text:p>Warm Season</text:p>
            <text:p>20 Seeds</text:p>
            <text:p>Intermediate Seed Saver</text:p>
            <text:p>Annual Full Sun</text:p>
            <text:p>to Part Shade</text:p>
          </table:table-cell>
          <table:table-cell table:style-name="Default" table:number-columns-repeated="16382"/>
        </table:table-row>
        <table:table-row table:style-name="ro15">
          <table:table-cell office:value-type="string" calcext:value-type="string">
            <text:p>Family: HERB (Borage officinalis)</text:p>
            <text:p>Variety: BORAGE</text:p>
            <text:p>Original Seed Source: Botanical Interests</text:p>
            <text:p>Comments: Direct sow early spring to mid-summer; sow NO DEEPER than 1/2 inch; prefers full sun and fairly rich, well drained soil. Plant with tomatoes to deter bugs. Cucumber-flavored fresh leaves add to salads, cooked, or made into a cooling drink. Beautiful blue flowers.  Also used medicinally.</text:p>
          </table:table-cell>
          <table:table-cell office:value-type="string" calcext:value-type="string">
            <text:p>2022</text:p>
            <text:p>EDIBLE</text:p>
            <text:p>Warm Season</text:p>
            <text:p>10 Seeds</text:p>
            <text:p>Advanced Seed Saver</text:p>
            <text:p>Annual Full Sun</text:p>
            <text:p>to Part Shade</text:p>
          </table:table-cell>
          <table:table-cell table:style-name="Default" table:number-columns-repeated="16382"/>
        </table:table-row>
        <table:table-row table:style-name="ro15">
          <table:table-cell table:style-name="ce42" office:value-type="string" calcext:value-type="string">
            <text:p>Family: HERB (Coriandrum stivum)</text:p>
            <text:p>Variety: Cilantro</text:p>
            <text:p>Comments: Plant fall thru early spring in low desert, spring thru summer in cooler climates. Sow 1/4-1” deep directly into well draining, rich soil.</text:p>
            <text:p>Leaves are called cilantro; seeds are called coriander. Germination 7-14 days.</text:p>
          </table:table-cell>
          <table:table-cell table:style-name="ce42" office:value-type="string" calcext:value-type="string">
            <text:p>2022</text:p>
            <text:p>EDIBLE</text:p>
            <text:p>Warm Season</text:p>
            <text:p>10+ Seeds</text:p>
            <text:p>Intermediate Seed Saver</text:p>
          </table:table-cell>
          <table:table-cell table:style-name="Default" table:number-columns-repeated="16382"/>
        </table:table-row>
        <table:table-row table:style-name="ro15">
          <table:table-cell office:value-type="string" calcext:value-type="string">
            <text:p>Family: HERB Fennel (Foeniculum vulgare var azoricum)</text:p>
            <text:p>Variety: Finocchino Original Source: Botanical Interests</text:p>
            <text:p>Comments: Start indoors 1/4” deep; darkness aids germination. Transplant  4” apart; prefers well-drained, rich soil.  Excellent additive to salads, fish, sauces (add seeds to spaghetti sauce!).  Bulb can be eaten as a vegetable. Foliage and seeds can be used as herb.</text:p>
          </table:table-cell>
          <table:table-cell office:value-type="string" calcext:value-type="string">
            <text:p>2022</text:p>
            <text:p>EDIBLE</text:p>
            <text:p>Cool Season</text:p>
            <text:p>12-16 Seeds</text:p>
            <text:p>Intermediate Seed Saver</text:p>
            <text:p>Germination: 10-15 days</text:p>
            <text:p>Light sun/partial</text:p>
            <text:p>shade</text:p>
          </table:table-cell>
          <table:table-cell table:style-name="Default" table:number-columns-repeated="16382"/>
        </table:table-row>
        <table:table-row table:style-name="ro15">
          <table:table-cell table:style-name="ce42" office:value-type="string" calcext:value-type="string">
            <text:p>Family: HERB Fennel (Foeniculum vulgare var azoricum)</text:p>
            <text:p>Variety: Perfection Original Source: Botanical Interests</text:p>
            <text:p>Comments: Start indoors 1/4” deep; darkness aids germination. Transplant  4” apart; prefers well-drained, rich soil.  Excellent additive to salads, fish, sauces (add seeds to spaghetti sauce!).  Larger bulb can be eaten as a vegetable. Foliage and seeds can be used as herb.</text:p>
          </table:table-cell>
          <table:table-cell table:style-name="ce42" office:value-type="string" calcext:value-type="string">
            <text:p>2022</text:p>
            <text:p>EDIBLE</text:p>
            <text:p>Cool Season</text:p>
            <text:p>10 Seeds</text:p>
            <text:p>Intermediate Seed Saver</text:p>
            <text:p>Germination: 10-15 days</text:p>
            <text:p>Light sun/partial</text:p>
            <text:p>shade</text:p>
          </table:table-cell>
          <table:table-cell table:style-name="Default" table:number-columns-repeated="16382"/>
        </table:table-row>
        <table:table-row table:style-name="ro15">
          <table:table-cell office:value-type="string" calcext:value-type="string">
            <text:p>Family: HERB (Foeniculum vulgare)</text:p>
            <text:p>Variety: Fennel, Florence</text:p>
            <text:p>Comments: Called “finocchio” in Italian, excellent additive to salads, fish, sauces (add seeds to spaghetti sauce!).  Start indoors 1/4” deep; transplant  4” apart; prefers well-drained, rich soil.  Light sun/partial shade,</text:p>
            <text:p>Tender perennial, 36°- 60°</text:p>
          </table:table-cell>
          <table:table-cell office:value-type="string" calcext:value-type="string">
            <text:p>2020</text:p>
            <text:p>EDIBLE</text:p>
            <text:p>Warm Season</text:p>
            <text:p>10+ Seeds</text:p>
            <text:p>Intermediate Seed Saver</text:p>
            <text:p>Germination: 10-15 days</text:p>
          </table:table-cell>
          <table:table-cell table:style-name="Default" table:number-columns-repeated="16382"/>
        </table:table-row>
        <table:table-row table:style-name="ro15">
          <table:table-cell table:style-name="ce42" office:value-type="string" calcext:value-type="string">
            <text:p>Family:     HERB (Allium tuberosum)</text:p>
            <text:p>Variety: Chives, Garlic</text:p>
            <text:p>Original Seed Source: Botanical Interests</text:p>
            <text:p>Comments: Also called Chinese chives, delicate garlic flavor; wonderful flavor in many recipes.  Perennial, 12-18”, full sun or partial shade. Press lightly into soil surface, direct sow or start indoors 4-6 weeks before last frost, keep moist to germinate. Plant foliage and flowers are edible. Heat and drought tolerant.</text:p>
          </table:table-cell>
          <table:table-cell table:style-name="ce42" office:value-type="string" calcext:value-type="string">
            <text:p>2022</text:p>
            <text:p>EDIBLE</text:p>
            <text:p>Warm Season</text:p>
            <text:p>15-20 Seeds</text:p>
            <text:p>Intermediate Seed Saver</text:p>
            <text:p>Germination: 7-14 days</text:p>
          </table:table-cell>
          <table:table-cell table:style-name="Default" table:number-columns-repeated="16382"/>
        </table:table-row>
        <table:table-row table:style-name="ro15">
          <table:table-cell office:value-type="string" calcext:value-type="string">
            <text:p>Family:     HERB (Allium sativum)</text:p>
            <text:p>Variety: Garlic, Common Hardneck</text:p>
            <text:p>Seed Source: BJ Searcy, CCMGA Master Gardener</text:p>
            <text:p>Comments: Plant the bulbils close together in the fall to grow into small single-clove garlic bulbs the first year. Use the individual cloves or the top greens as needed. Leave the remainder in the soil to grow into multi-cloved garlic heads in subsequent years. The bulbils are tiny cloves of garlic and also edible.</text:p>
          </table:table-cell>
          <table:table-cell office:value-type="string" calcext:value-type="string">
            <text:p>2025</text:p>
            <text:p>EDIBLE</text:p>
            <text:p>Cool Season</text:p>
            <text:p>25 Seeds</text:p>
            <text:p>Intermediate Seed Save</text:p>
          </table:table-cell>
          <table:table-cell table:style-name="Default" table:number-columns-repeated="16382"/>
        </table:table-row>
        <table:table-row table:style-name="ro15">
          <table:table-cell table:style-name="ce42" office:value-type="string" calcext:value-type="string">
            <text:p>Family: HERB (Satureja hortensis)</text:p>
            <text:p>Variety: SAVORY, SUMMER</text:p>
            <text:p>Comments: Sow direct 1-2 seeds per inch after last frost. Do not cover as light is required for germination. Keep soil moist until well established. Thin to stand about 8” apart in rows 18” apart. Use fresh or dried.</text:p>
          </table:table-cell>
          <table:table-cell table:style-name="ce42"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5">
          <table:table-cell office:value-type="string" calcext:value-type="string">
            <text:p>Family: HERB (Perilla frutescens)</text:p>
            <text:p>Variety: Shiso/Perilla, green &amp; red (Japanese basil)</text:p>
            <text:p>Original Seed Source: Botanical Interests Comments: A taste described as a combination of cinnamon, mint and clove with overtones of cumin. Start indoors 4-6 weeks before average last frost. Store seeds in refrigerator before planting. Soak seeds in water 12- 24 hours prior to planting, press seeds into soil, do not cover. Excellent for growing in containers. Heat and</text:p>
            <text:p>drought tolerant. Deer resistant.</text:p>
          </table:table-cell>
          <table:table-cell office:value-type="string" calcext:value-type="string">
            <text:p>2024</text:p>
            <text:p>EDIBLE</text:p>
            <text:p>Warm Season</text:p>
            <text:p>25-30 Seeds</text:p>
            <text:p>Intermediate Seed Saver</text:p>
            <text:p>Annual</text:p>
          </table:table-cell>
          <table:table-cell table:style-name="Default" table:number-columns-repeated="16382"/>
        </table:table-row>
        <table:table-row table:style-name="ro15">
          <table:table-cell table:style-name="ce42" office:value-type="string" calcext:value-type="string">
            <text:p>Family: HERB (Stevia rebaudiana)</text:p>
            <text:p>Variety: STEVIA Candy</text:p>
            <text:p>Original Seed Source: Botanical Interests</text:p>
            <text:p>Comments: Naturally low and slow germination of 7-21 days. Start indoors 8-10 weeks before last frost. Optimal soil temp 70°-75°. Sow 1/8” deep or barely cover. Leaves are sweetest just before flowering in late summer.</text:p>
          </table:table-cell>
          <table:table-cell table:style-name="ce42" office:value-type="string" calcext:value-type="string">
            <text:p>2024</text:p>
            <text:p>EDIBLE</text:p>
            <text:p>Warm Season</text:p>
            <text:p>3 Seeds</text:p>
            <text:p>Advanced Seed Saver</text:p>
          </table:table-cell>
          <table:table-cell table:style-name="Default" table:number-columns-repeated="16382"/>
        </table:table-row>
        <table:table-row table:style-name="ro15">
          <table:table-cell office:value-type="string" calcext:value-type="string">
            <text:p>Family: HERB, BASIL (Ocimum basilicum)</text:p>
            <text:p>Variety: Cardinal</text:p>
            <text:p>Original Seed Source: Botanical Interests</text:p>
            <text:p>Comments: Start indoors 4-6 weeks before transplanting outdoors. Sow 1/4” deep in seed starting mix. Transplant outdoors 1-2 weeks after last frost about 12” apart. Richly colored blooms and robust flavor.</text:p>
          </table:table-cell>
          <table:table-cell office:value-type="string" calcext:value-type="string">
            <text:p>2024</text:p>
            <text:p>EDIBLE</text:p>
            <text:p>Warm Season</text:p>
            <text:p>5 Seeds</text:p>
            <text:p>Intermediate Seed Saver</text:p>
            <text:p>Annual Full Sun</text:p>
            <text:p>to Part Shade</text:p>
          </table:table-cell>
          <table:table-cell table:style-name="Default" table:number-columns-repeated="16382"/>
        </table:table-row>
        <table:table-row table:style-name="ro15">
          <table:table-cell table:style-name="ce42" office:value-type="string" calcext:value-type="string">
            <text:p>Family: HERB (Ocimum spp.)</text:p>
            <text:p>Variety: Basil, Custom Blend</text:p>
            <text:p>Original Seed Source: Botanical Interests</text:p>
            <text:p>Comments: Start indoors 4-6 weeks before transplanting outdoors. Sow 1/4” deep in seed starting mix. Transplant outdoors 1-2 weeks after last frost about 12” apart. Up to 6 different flavors</text:p>
          </table:table-cell>
          <table:table-cell table:style-name="ce42" office:value-type="string" calcext:value-type="string">
            <text:p>2020</text:p>
            <text:p>EDIBLE</text:p>
            <text:p>Warm Season</text:p>
            <text:p>25+ Seeds</text:p>
            <text:p>Intermediate Seed Saver</text:p>
            <text:p>Annual Full Sun</text:p>
            <text:p>to Part Shade</text:p>
          </table:table-cell>
          <table:table-cell table:style-name="Default" table:number-columns-repeated="16382"/>
        </table:table-row>
        <table:table-row table:style-name="ro15">
          <table:table-cell office:value-type="string" calcext:value-type="string">
            <text:p>Family: HERB (Ocimum basilicum)</text:p>
            <text:p>Variety: Basil, Dark Opal</text:p>
            <text:p>Original Seed Source: Ferry-Morse</text:p>
            <text:p>Comments: Start indoors 4-6 weeks before transplanting outdoors. Sow 1/4” deep in seed starting mix. Transplant outdoors 1-2 weeks after last frost about 12” apart. Mild sweet taste. Purple color contrasts in food. Good companion plant with tomato.</text:p>
          </table:table-cell>
          <table:table-cell office:value-type="string" calcext:value-type="string">
            <text:p>2022</text:p>
            <text:p>EDIBLE</text:p>
            <text:p>Warm Season</text:p>
            <text:p>10+ Seeds</text:p>
            <text:p>Intermediate Seed Saver</text:p>
            <text:p>Annual Full Sun</text:p>
            <text:p>to Part Shade</text:p>
          </table:table-cell>
          <table:table-cell table:style-name="Default" table:number-columns-repeated="16382"/>
        </table:table-row>
        <table:table-row table:style-name="ro15">
          <table:table-cell table:style-name="ce42" office:value-type="string" calcext:value-type="string">
            <text:p>Family: HERB (Ocimum basilicum)</text:p>
            <text:p>Variety: Basil, Everleaf Emerald Towers</text:p>
            <text:p>Original Seed Source: Botanical Interests</text:p>
            <text:p>Comments: Start indoors 4-6 weeks before transplanting outdoors. Sow 1/4” deep in seed starting mix. Transplant outdoors 1-2 weeks after last frost about 12” apart.</text:p>
          </table:table-cell>
          <table:table-cell table:style-name="ce42" office:value-type="string" calcext:value-type="string">
            <text:p>2022</text:p>
            <text:p>EDIBLE</text:p>
            <text:p>Warm Season</text:p>
            <text:p>5 Seeds</text:p>
            <text:p>Intermediate Seed Saver</text:p>
            <text:p>Annual Full Sun</text:p>
            <text:p>to Part Shade</text:p>
          </table:table-cell>
          <table:table-cell table:style-name="Default" table:number-columns-repeated="16382"/>
        </table:table-row>
        <table:table-row table:style-name="ro15">
          <table:table-cell office:value-type="string" calcext:value-type="string">
            <text:p>Family: HERB (Ocimum basilicum)</text:p>
            <text:p>Variety: Basil, Genovese</text:p>
            <text:p>Original Seed Source: Ferry-Morse</text:p>
            <text:p>Comments: Start indoors 4-6 weeks before transplanting outdoors. Sow 1/4” deep in seed starting mix. Transplant outdoors 1-2 weeks after last frost about 12” apart.</text:p>
          </table:table-cell>
          <table:table-cell office:value-type="string" calcext:value-type="string">
            <text:p>2022</text:p>
            <text:p>EDIBLE</text:p>
            <text:p>Warm Season</text:p>
            <text:p>10-20 Seeds</text:p>
            <text:p>Intermediate Seed Saver</text:p>
            <text:p>Annual Full Sun</text:p>
            <text:p>to Part Shade</text:p>
          </table:table-cell>
          <table:table-cell table:style-name="Default" table:number-columns-repeated="16382"/>
        </table:table-row>
        <table:table-row table:style-name="ro15">
          <table:table-cell table:style-name="ce42" office:value-type="string" calcext:value-type="string">
            <text:p>Family: HERB (Ocimum basilicum)</text:p>
            <text:p>Variety: Basil, Lettuce Leaf</text:p>
            <text:p>Original Seed Source: Botanical Interests</text:p>
            <text:p>Comments: Start indoors 4-6 weeks before transplanting outdoors. Sow 1/4” deep in seed starting mix. Transplant outdoors 1-2 weeks after last frost about 12” apart. Very large leaves that can be used as lettuce alternative on sandwiches. Slow bolt.</text:p>
          </table:table-cell>
          <table:table-cell table:style-name="ce42" office:value-type="string" calcext:value-type="string">
            <text:p>2022</text:p>
            <text:p>EDIBLE</text:p>
            <text:p>Warm Season</text:p>
            <text:p>20+ Seeds</text:p>
            <text:p>Intermediate Seed Saver</text:p>
            <text:p>Annual Full Sun</text:p>
            <text:p>to Part Shade</text:p>
          </table:table-cell>
          <table:table-cell table:style-name="Default" table:number-columns-repeated="16382"/>
        </table:table-row>
        <table:table-row table:style-name="ro15">
          <table:table-cell office:value-type="string" calcext:value-type="string">
            <text:p>Family: HERB (Ocimum africanum)</text:p>
            <text:p>Variety: Basil, Lemon</text:p>
            <text:p>Original Seed Source: Start Smart</text:p>
            <text:p>Comments: Start indoors 4-6 weeks before transplanting outdoors. Sow 1/4” deep in seed starting mix. Transplant outdoors 1-2 weeks after last frost about 12” apart.</text:p>
          </table:table-cell>
          <table:table-cell office:value-type="string" calcext:value-type="string">
            <text:p>2022</text:p>
            <text:p>EDIBLE</text:p>
            <text:p>Warm Season</text:p>
            <text:p>5+ Seeds</text:p>
            <text:p>Intermediate Seed Saver</text:p>
            <text:p>Annual Full Sun</text:p>
            <text:p>to Part Shade</text:p>
          </table:table-cell>
          <table:table-cell table:style-name="Default" table:number-columns-repeated="16382"/>
        </table:table-row>
        <table:table-row table:style-name="ro15">
          <table:table-cell table:style-name="ce42" office:value-type="string" calcext:value-type="string">
            <text:p>Family: HERB (Ocimum basilicum)</text:p>
            <text:p>Variety: Basil, Purple Petra</text:p>
            <text:p>Original Seed Source: Botanical Interests</text:p>
            <text:p>Comments: Start indoors 4-6 weeks before transplanting outdoors. Sow 1/4” deep in seed starting mix. Transplant outdoors 1-2 weeks after last frost about 12” apart. Mild sweet taste. Purple color contrasts in food. Good companion plant with tomato.</text:p>
          </table:table-cell>
          <table:table-cell table:style-name="ce42" office:value-type="string" calcext:value-type="string">
            <text:p>2020</text:p>
            <text:p>EDIBLE</text:p>
            <text:p>Warm Season</text:p>
            <text:p>25+ Seeds</text:p>
            <text:p>Intermediate Seed Saver</text:p>
            <text:p>Annual Full Sun</text:p>
            <text:p>to Part Shade</text:p>
          </table:table-cell>
          <table:table-cell table:style-name="Default" table:number-columns-repeated="16382"/>
        </table:table-row>
        <table:table-row table:style-name="ro15">
          <table:table-cell office:value-type="string" calcext:value-type="string">
            <text:p>Family: HERB Basil (Ocimum basilicum)</text:p>
            <text:p>Variety: Six Basil Blend</text:p>
            <text:p>Original Seed Source: Botanical Interests</text:p>
            <text:p>Comments: Start indoors 4-6 weeks before transplanting outdoors. Sow 1/4” deep in seed starting mix. Transplant outdoors 1-2 weeks after last frost about 12” apart. Up to 6 different flavors including Genovese, large leaf, dark opal, lime, lemon and cinnamon.</text:p>
          </table:table-cell>
          <table:table-cell office:value-type="string" calcext:value-type="string">
            <text:p>2022</text:p>
            <text:p>EDIBLE</text:p>
            <text:p>Warm Season</text:p>
            <text:p>25+ Seeds</text:p>
            <text:p>Intermediate Seed Saver</text:p>
            <text:p>Annual Full Sun</text:p>
            <text:p>to Part Shade</text:p>
          </table:table-cell>
          <table:table-cell table:style-name="Default" table:number-columns-repeated="16382"/>
        </table:table-row>
        <table:table-row table:style-name="ro15">
          <table:table-cell table:style-name="ce42" office:value-type="string" calcext:value-type="string">
            <text:p>Family: HERB (Ocimum basilicum)</text:p>
            <text:p>Variety: Basil, Sweet</text:p>
            <text:p>Original Seed Source: Ferry-Morse</text:p>
            <text:p>Comments: Start indoors 4-6 weeks before transplanting outdoors. Sow 1/4” deep in seed starting mix. Transplant outdoors 1-2 weeks after last frost about 12” apart.</text:p>
          </table:table-cell>
          <table:table-cell table:style-name="ce42" office:value-type="string" calcext:value-type="string">
            <text:p>2022</text:p>
            <text:p>EDIBLE</text:p>
            <text:p>Warm Season</text:p>
            <text:p>10-20 Seeds</text:p>
            <text:p>Intermediate Seed Saver</text:p>
            <text:p>Annual Full Sun</text:p>
            <text:p>to Part Shade</text:p>
          </table:table-cell>
          <table:table-cell table:style-name="Default" table:number-columns-repeated="16382"/>
        </table:table-row>
        <table:table-row table:style-name="ro15">
          <table:table-cell office:value-type="string" calcext:value-type="string">
            <text:p>Family: HERB (Ocimum sp)</text:p>
            <text:p>Variety: Basil, Tulsi</text:p>
            <text:p>Original Seed Source: Botanical Interests</text:p>
            <text:p>Comments: Start indoors 4-6 weeks before transplanting outdoors. Sow 1/4” deep in seed starting mix. Transplant outdoors 1-2 weeks after last frost about 12” apart. Also known as Kapoor. Frost tolerant. Said to</text:p>
            <text:p>combat stress. Makes a healthful tea. Grow in container for continuous supply year round.</text:p>
          </table:table-cell>
          <table:table-cell office:value-type="string" calcext:value-type="string">
            <text:p>2021</text:p>
            <text:p>EDIBLE</text:p>
            <text:p>Warm Season</text:p>
            <text:p>20 Seeds</text:p>
            <text:p>Intermediate Seed Saver</text:p>
            <text:p>Annual Full Sun</text:p>
            <text:p>to Part Shade</text:p>
          </table:table-cell>
          <table:table-cell table:style-name="Default" table:number-columns-repeated="16382"/>
        </table:table-row>
        <table:table-row table:style-name="ro15">
          <table:table-cell table:style-name="ce42" office:value-type="string" calcext:value-type="string">
            <text:p>Family: HERB (Coriandrum stivum)</text:p>
            <text:p>Variety: Calypso Cilantro</text:p>
            <text:p>Grown By: Native Seed/SEARCH Farm</text:p>
            <text:p>Where Grown: Patagonia, AZ</text:p>
            <text:p>Original Seed Source: www.nativeseeds.org Comments: Plant fall thru early spring in low desert, spring thru summer in cooler climates. Most herbs happy in poor soil and easy to grow. Calypso is slowest bolt of all cilantro.</text:p>
          </table:table-cell>
          <table:table-cell table:style-name="ce42" office:value-type="string" calcext:value-type="string">
            <text:p>2016</text:p>
            <text:p>EDIBLE</text:p>
            <text:p>Warm Season</text:p>
            <text:p>15-20 Seeds</text:p>
            <text:p>Intermediate Seed Saver</text:p>
          </table:table-cell>
          <table:table-cell table:style-name="Default" table:number-columns-repeated="16382"/>
        </table:table-row>
        <table:table-row table:style-name="ro15">
          <table:table-cell office:value-type="string" calcext:value-type="string">
            <text:p>Family: HERB (Nepeta cataria)</text:p>
            <text:p>Variety: Catnip Original Seed Source: Ferry Morse</text:p>
            <text:p>Comments: Plant outdoors 2-4 weeks before last frost 1/8”-1/4” deep about 12” apart. Calming tea is pleasant. Dried leaves in toys will entertain felines for hours.</text:p>
          </table:table-cell>
          <table:table-cell office:value-type="string" calcext:value-type="string">
            <text:p>2024</text:p>
            <text:p>EDIBLE</text:p>
            <text:p>Warm Season</text:p>
            <text:p>15+ Seeds</text:p>
            <text:p>Intermediate Seed Saver</text:p>
            <text:p>Perennial Full Sun</text:p>
            <text:p>to Part Shade</text:p>
          </table:table-cell>
          <table:table-cell table:style-name="Default" table:number-columns-repeated="16382"/>
        </table:table-row>
        <table:table-row table:style-name="ro15">
          <table:table-cell table:style-name="ce42" office:value-type="string" calcext:value-type="string">
            <text:p>Family: HERB (Allium schoenoprasum)</text:p>
            <text:p>Variety: Chives, Common</text:p>
            <text:p>Comments: Direct sow or start indoors 6-8 weeks before last frost, several seeds 1/4 in deep in moist soil. Transplant 4-8” apart. Drought and heat tolerant. Foliage and flowers edible. Delicate onion flavor; wonderful</text:p>
            <text:p>flavor in many recipes.</text:p>
          </table:table-cell>
          <table:table-cell table:style-name="ce42" office:value-type="string" calcext:value-type="string">
            <text:p>2022</text:p>
            <text:p>EDIBLE</text:p>
            <text:p>All Season</text:p>
            <text:p>8-10 Seeds</text:p>
            <text:p>Intermediate Seed Saver</text:p>
            <text:p>Germination: 15-21 days Perennial Full Sun</text:p>
          </table:table-cell>
          <table:table-cell table:style-name="Default" table:number-columns-repeated="16382"/>
        </table:table-row>
        <table:table-row table:style-name="ro15">
          <table:table-cell office:value-type="string" calcext:value-type="string">
            <text:p>Family: HERB (Allium tuberosum)</text:p>
            <text:p>Variety: Chives, Garlic</text:p>
            <text:p>Original Seed Source: Ferry Morse</text:p>
            <text:p>Comments: Perennial, 12-18”, full sun or partial shade. Direct sow or start indoors 6-8 weeks before last frost, press gently in surface of moist soil. Transplant 4- 8” apart. Drought and heat tolerant. Foliage and flowers edible. Delicate garlic flavor; wonderful flavor in many</text:p>
            <text:p>recipes.</text:p>
          </table:table-cell>
          <table:table-cell office:value-type="string" calcext:value-type="string">
            <text:p>2024</text:p>
            <text:p>EDIBLE</text:p>
            <text:p>Warm Season</text:p>
            <text:p>10+ Seeds</text:p>
            <text:p>Intermediate Seed Saver</text:p>
            <text:p>Germination: 7-14 days</text:p>
          </table:table-cell>
          <table:table-cell table:style-name="Default" table:number-columns-repeated="16382"/>
        </table:table-row>
        <table:table-row table:style-name="ro15">
          <table:table-cell table:style-name="ce42" office:value-type="string" calcext:value-type="string">
            <text:p>Family: HERB (Coriandrum stivum)</text:p>
            <text:p>Variety: Cilantro</text:p>
            <text:p>Original Seed Source: Baker Creek Heirloom</text:p>
            <text:p>Comments: Plant 1/4-1/2” deep with 4-8” spacing between plants. Harvest when plants are 6-8 inches tall.</text:p>
          </table:table-cell>
          <table:table-cell table:style-name="ce42" office:value-type="string" calcext:value-type="string">
            <text:p>2022</text:p>
            <text:p>EDIBLE</text:p>
            <text:p>Cool Season</text:p>
            <text:p>12+ Seeds</text:p>
            <text:p>Intermediate Seed Saver</text:p>
            <text:p>Annual</text:p>
          </table:table-cell>
          <table:table-cell table:style-name="Default" table:number-columns-repeated="16382"/>
        </table:table-row>
        <table:table-row table:style-name="ro15">
          <table:table-cell office:value-type="string" calcext:value-type="string">
            <text:p>Family: HERB (Carum carvi)</text:p>
            <text:p>Variety: Caraway</text:p>
            <text:p>Original Seed Source: Baker Creek Heirloom Seeds</text:p>
            <text:p>Comments: Large fragrant heads and abundant seeds</text:p>
            <text:p>Direct sow cover with 1/4 inch soil Germinates in 10 to 20 days</text:p>
          </table:table-cell>
          <table:table-cell office:value-type="string" calcext:value-type="string">
            <text:p>2022</text:p>
            <text:p>EDIBLE</text:p>
            <text:p>Warm Season</text:p>
            <text:p>12+ Seeds</text:p>
            <text:p>Intermediate Seed Saver</text:p>
            <text:p>Annual</text:p>
          </table:table-cell>
          <table:table-cell table:style-name="Default" table:number-columns-repeated="16382"/>
        </table:table-row>
        <table:table-row table:style-name="ro15">
          <table:table-cell table:style-name="ce42" office:value-type="string" calcext:value-type="string">
            <text:p>Family: HERB (Anethum graveolens)</text:p>
            <text:p>Variety: Dill, Fernleaf</text:p>
            <text:p>Original Seed Source: Ferry-Morse</text:p>
            <text:p>Comments: Finely cut foliage. Use fresh or dried. Sow when ground is warm, 1/4” deep, 9” apart. Plants reach 18-24”</text:p>
            <text:p>tall. Also easy to grow in containers.</text:p>
          </table:table-cell>
          <table:table-cell table:style-name="ce42" office:value-type="string" calcext:value-type="string">
            <text:p>2023</text:p>
            <text:p>EDIBLE</text:p>
            <text:p>Warm Season</text:p>
            <text:p>5+ Seeds</text:p>
            <text:p>Easy Seed Saver</text:p>
            <text:p>Germination 7-14 days</text:p>
          </table:table-cell>
          <table:table-cell table:style-name="Default" table:number-columns-repeated="16382"/>
        </table:table-row>
        <table:table-row table:style-name="ro15">
          <table:table-cell office:value-type="string" calcext:value-type="string">
            <text:p>Family: HERB (Anethum graveolens)</text:p>
            <text:p>Variety: Dill, Bouquet</text:p>
            <text:p>Original Seed Source: Botanical Interests</text:p>
            <text:p>Comments: Large fragrant heads and abundant seeds.  Great for pickling and fresh use.  Direct sow by pressing into soil; thin to 8-12” apart; full sun; shelter from wind; will readily volunteer each year by dropping seeds.</text:p>
          </table:table-cell>
          <table:table-cell office:value-type="string" calcext:value-type="string">
            <text:p>2021</text:p>
            <text:p>EDIBLE</text:p>
            <text:p>Warm Season</text:p>
            <text:p>30+ Seeds</text:p>
            <text:p>Easy Seed Saver</text:p>
            <text:p>Germination 20-25 days</text:p>
          </table:table-cell>
          <table:table-cell table:style-name="Default" table:number-columns-repeated="16382"/>
        </table:table-row>
        <table:table-row table:style-name="ro15">
          <table:table-cell table:style-name="ce42" office:value-type="string" calcext:value-type="string">
            <text:p>Family: HERB (Anethum graveolens)</text:p>
            <text:p>Variety: Dill, Long Island Mammoth</text:p>
            <text:p>Original Seed Source: Seeds of Change</text:p>
            <text:p>Comments: Large fragrant heads and abundant seeds. Great for pickling and fresh use.  Direct sow 1/2” deep; thin to 4” apart; full sun; shelter from wind; will readily volunteer</text:p>
            <text:p>each year by dropping seeds.</text:p>
          </table:table-cell>
          <table:table-cell table:style-name="ce42" office:value-type="string" calcext:value-type="string">
            <text:p>2023</text:p>
            <text:p>EDIBLE</text:p>
            <text:p>Warm Season</text:p>
            <text:p>10+ Seeds</text:p>
            <text:p>Easy Seed Saver</text:p>
            <text:p>Germination 20-25 days Harvest</text:p>
            <text:p>40 days</text:p>
          </table:table-cell>
          <table:table-cell table:style-name="Default" table:number-columns-repeated="16382"/>
        </table:table-row>
        <table:table-row table:style-name="ro15">
          <table:table-cell office:value-type="string" calcext:value-type="string">
            <text:p>Family: HERB (Anethum graveolens)</text:p>
            <text:p>Variety: Dill</text:p>
            <text:p>Comments: Large fragrant heads and abundant seeds.  Great for pickling and fresh use.  Direct sow by pressing into soil; thin to 8-12” apart; full sun; shelter from wind; will readily volunteer each year by dropping seeds.</text:p>
          </table:table-cell>
          <table:table-cell office:value-type="string" calcext:value-type="string">
            <text:p>2022</text:p>
            <text:p>EDIBLE</text:p>
            <text:p>Warm Season</text:p>
            <text:p>20+ Seeds</text:p>
            <text:p>Easy Seed Saver</text:p>
            <text:p>Germination 20-25 days</text:p>
          </table:table-cell>
          <table:table-cell table:style-name="Default" table:number-columns-repeated="16382"/>
        </table:table-row>
        <table:table-row table:style-name="ro15">
          <table:table-cell table:style-name="ce42" office:value-type="string" calcext:value-type="string">
            <text:p>Family: HERB (Melissa officinalis)</text:p>
            <text:p>Variety: Lemon Balm</text:p>
            <text:p>Original Seed Source: Botanical Interests</text:p>
            <text:p>Comments: Plant outside1-2 weeks after last frost. Plant inside 6-8 weeks before last frost. Gently press into surface of soil, light aids germination.</text:p>
            <text:p>Drought tolerant. Flowers attract bees. Deer resistant.</text:p>
          </table:table-cell>
          <table:table-cell table:style-name="ce42" office:value-type="string" calcext:value-type="string">
            <text:p>2022</text:p>
            <text:p>EDIBLE</text:p>
            <text:p>Warm Season</text:p>
            <text:p>8+ Seeds</text:p>
            <text:p>Intermediate Seed Saver</text:p>
            <text:p>Perennial</text:p>
          </table:table-cell>
          <table:table-cell table:style-name="Default" table:number-columns-repeated="16382"/>
        </table:table-row>
        <table:table-row table:style-name="ro15">
          <table:table-cell office:value-type="string" calcext:value-type="string">
            <text:p>Family: HERB (Origanum majorana)</text:p>
            <text:p>Variety: Marjoram</text:p>
            <text:p>Original Seed Source: Botanical Interests</text:p>
            <text:p>Comments: Plant indoors 6-8 weeks before last frost by lightly pressing into top of soil. Light aids germination. Transplant outdoors 2-4 weeks after last frost or direct sow anytime up until 2 months before first</text:p>
            <text:p>fall frost. Space about 20” apart. Sweeter, milder taste than oregano. Drought tolerant. Deer resistant.</text:p>
          </table:table-cell>
          <table:table-cell office:value-type="string" calcext:value-type="string">
            <text:p>2023</text:p>
            <text:p>EDIBLE</text:p>
            <text:p>Warm Season</text:p>
            <text:p>20+ Seeds</text:p>
            <text:p>Intermediate Seed Saver</text:p>
            <text:p>Annual Full Sun</text:p>
          </table:table-cell>
          <table:table-cell table:style-name="Default" table:number-columns-repeated="16382"/>
        </table:table-row>
        <table:table-row table:style-name="ro15">
          <table:table-cell table:style-name="ce42" office:value-type="string" calcext:value-type="string">
            <text:p>Family: HERB (Mentha spicata)</text:p>
            <text:p>Variety: Mint, Spearmint</text:p>
            <text:p>Original Seed Source: Burpee</text:p>
            <text:p>Comments: Plant outside1-2 weeks after last frost. Plant inside 8-10 weeks before last frost. Gently press into surface of soil, light aids germination.</text:p>
            <text:p>Keep moist. Plant in containers outside after last frost.</text:p>
          </table:table-cell>
          <table:table-cell table:style-name="ce42" office:value-type="string" calcext:value-type="string">
            <text:p>2018</text:p>
            <text:p>EDIBLE</text:p>
            <text:p>Warm Season</text:p>
            <text:p>10 Seeds</text:p>
            <text:p>Intermediate Seed Saver</text:p>
            <text:p>Perennial</text:p>
            <text:p>Germinate 7-14</text:p>
          </table:table-cell>
          <table:table-cell table:style-name="Default" table:number-columns-repeated="16382"/>
        </table:table-row>
        <table:table-row table:style-name="ro15">
          <table:table-cell office:value-type="string" calcext:value-type="string">
            <text:p>Family: HERB (Mentha sp)</text:p>
            <text:p>Variety: Mint, Peppermint</text:p>
            <text:p>Original Seed Source: Ferry-Morse</text:p>
            <text:p>Comments: Plant outside 1-2 weeks after last frost. Plant inside 6-8 weeks before last frost. Gently press into surface of soil, light aids germination. Keep moist. Flowers attract bees. Deer resistant.</text:p>
          </table:table-cell>
          <table:table-cell office:value-type="string" calcext:value-type="string">
            <text:p>2024</text:p>
            <text:p>EDIBLE</text:p>
            <text:p>Warm Season</text:p>
            <text:p>30 Seeds</text:p>
            <text:p>Intermediate Seed Saver</text:p>
            <text:p>Perennial</text:p>
          </table:table-cell>
          <table:table-cell table:style-name="Default" table:number-columns-repeated="16382"/>
        </table:table-row>
        <table:table-row table:style-name="ro15">
          <table:table-cell table:style-name="ce42" office:value-type="string" calcext:value-type="string">
            <text:p>Family: HERB (Mentha sp)</text:p>
            <text:p>Variety: Mint, Common</text:p>
            <text:p>Original Seed Source: Botanical Interests</text:p>
            <text:p>Comments: Plant outside1-2 weeks after last frost. Plant inside 6-8 weeks before last frost. Gently press into surface of soil, light aids germination.</text:p>
            <text:p>Keep moist. Flowers attract bees. Deer resistant.</text:p>
          </table:table-cell>
          <table:table-cell table:style-name="ce42" office:value-type="string" calcext:value-type="string">
            <text:p>2022</text:p>
            <text:p>EDIBLE</text:p>
            <text:p>Warm Season</text:p>
            <text:p>12+ Seeds</text:p>
            <text:p>Intermediate Seed Saver</text:p>
            <text:p>Perennial</text:p>
          </table:table-cell>
          <table:table-cell table:style-name="Default" table:number-columns-repeated="16382"/>
        </table:table-row>
        <table:table-row table:style-name="ro15">
          <table:table-cell office:value-type="string" calcext:value-type="string">
            <text:p>Family: HERB (Origanum vulgare)</text:p>
            <text:p>Variety: Oregano, Common</text:p>
            <text:p>Original Seed Source: Botanical Interests</text:p>
            <text:p>Comments: Plant indoors 6-8 weeks before last frost 1/8”-1/4” deep. Transplant outdoors 2-4 weeks after last frost or direct sow anytime up until 2 months before first</text:p>
            <text:p>fall frost. Space about 20” apart. Drought tolerant. Deer resistant.</text:p>
          </table:table-cell>
          <table:table-cell office:value-type="string" calcext:value-type="string">
            <text:p>2024</text:p>
            <text:p>EDIBLE</text:p>
            <text:p>Warm Season</text:p>
            <text:p>20+ Seeds</text:p>
            <text:p>Intermediate Seed Saver</text:p>
            <text:p>Perennial Full Sun</text:p>
          </table:table-cell>
          <table:table-cell table:style-name="Default" table:number-columns-repeated="16382"/>
        </table:table-row>
        <table:table-row table:style-name="ro15">
          <table:table-cell table:style-name="ce42" office:value-type="string" calcext:value-type="string">
            <text:p>Family: HERB (Origanum vulgare)</text:p>
            <text:p>Variety: Oregano, True Greek</text:p>
            <text:p>Original Seed Source: Botanical Interests</text:p>
            <text:p>Comments: Plant indoors 6-8 weeks before last frost. Light aids germination; press seed into soil surface.</text:p>
            <text:p>Transplant outdoors 2-4 weeks after last frost. Space about 12”-18” apart. Drought and heat tolerant. Deer resistant.</text:p>
          </table:table-cell>
          <table:table-cell table:style-name="ce42" office:value-type="string" calcext:value-type="string">
            <text:p>2022</text:p>
            <text:p>EDIBLE</text:p>
            <text:p>Warm Season</text:p>
            <text:p>Various Seeds</text:p>
            <text:p>Intermediate Seed Saver</text:p>
            <text:p>Perennial Full Sun</text:p>
          </table:table-cell>
          <table:table-cell table:style-name="Default" table:number-columns-repeated="16382"/>
        </table:table-row>
        <table:table-row table:style-name="ro15">
          <table:table-cell office:value-type="string" calcext:value-type="string">
            <text:p>Family: HERB (Origanum vulgare hirtum)</text:p>
            <text:p>Variety: Oregano, Italian</text:p>
            <text:p>Comments: Sow on surface of soil as seeds require light to germinate. Start indoors or direct sow. Most herbs are happy in poor soil and easy to grow.</text:p>
          </table:table-cell>
          <table:table-cell office:value-type="string" calcext:value-type="string">
            <text:p>2017</text:p>
            <text:p>EDIBLE</text:p>
            <text:p>Warm Season</text:p>
            <text:p>15-20 Seeds</text:p>
            <text:p>Intermediate Seed Saver</text:p>
          </table:table-cell>
          <table:table-cell table:style-name="Default" table:number-columns-repeated="16382"/>
        </table:table-row>
        <table:table-row table:style-name="ro15">
          <table:table-cell table:style-name="ce42" office:value-type="string" calcext:value-type="string">
            <text:p>Family: HERB (Origanum vulgare hirtum)</text:p>
            <text:p>Variety: Oregano</text:p>
            <text:p>Comments: Plant fall thru early spring in low desert; spring thru fall cooler climates. Most herbs happy in poor soil and easy to grow. Members of same species will cross.</text:p>
          </table:table-cell>
          <table:table-cell table:style-name="ce42" office:value-type="string" calcext:value-type="string">
            <text:p>2017</text:p>
            <text:p>EDIBLE</text:p>
            <text:p>Warm Season</text:p>
            <text:p>15-20 Seeds</text:p>
            <text:p>Intermediate Seed Saver</text:p>
          </table:table-cell>
          <table:table-cell table:style-name="Default" table:number-columns-repeated="16382"/>
        </table:table-row>
        <table:table-row table:style-name="ro15">
          <table:table-cell office:value-type="string" calcext:value-type="string">
            <text:p>Family: HERB (Petroselinium crispum)</text:p>
            <text:p>Variety: Parsley, Moss Curled</text:p>
            <text:p>Original Seed Source: Botanical Interests</text:p>
            <text:p>Comments: To aid germination, soak seeds in water for 12-24 hours before sowing. Plant outdoors 6-8 weeks before last frost 1/4” deep. Space about</text:p>
            <text:p>8”-16” apart.</text:p>
          </table:table-cell>
          <table:table-cell office:value-type="string" calcext:value-type="string">
            <text:p>2022</text:p>
            <text:p>EDIBLE</text:p>
            <text:p>Warm Season</text:p>
            <text:p>10+ Seeds</text:p>
            <text:p>Intermediate Seed Saver</text:p>
            <text:p>Biennial Full Sun</text:p>
            <text:p>to Part Shade</text:p>
          </table:table-cell>
          <table:table-cell table:style-name="Default" table:number-columns-repeated="16382"/>
        </table:table-row>
        <table:table-row table:style-name="ro15">
          <table:table-cell table:style-name="ce42" office:value-type="string" calcext:value-type="string">
            <text:p>Family: HERB—PARSLEY (Petroselinum crispum)</text:p>
            <text:p>Variety: Common</text:p>
            <text:p>Comments: Soak seeds overnight before sowing. Direct sow in garden 4-6 weeks before last frost or start indoors 6-8 weeks before last frost. Plant 1/4 in deep, 8 in apart. Grow</text:p>
            <text:p>indoors for use year round.</text:p>
          </table:table-cell>
          <table:table-cell table:style-name="ce42" office:value-type="string" calcext:value-type="string">
            <text:p>2020</text:p>
            <text:p>EDIBLE</text:p>
            <text:p>All Season</text:p>
            <text:p>20+ Seeds</text:p>
            <text:p>Advanced Seed Saver</text:p>
            <text:p>Germination: 14-28 days</text:p>
          </table:table-cell>
          <table:table-cell table:style-name="Default" table:number-columns-repeated="16382"/>
        </table:table-row>
        <table:table-row table:style-name="ro15">
          <table:table-cell office:value-type="string" calcext:value-type="string">
            <text:p>Family: HERB—PARSLEY (Petroselinum crispum)</text:p>
            <text:p>Variety: Flat Leaf</text:p>
            <text:p>Comments: Soak seeds overnight before sowing. Direct sow in garden 4-6 weeks before last frost or start indoors 6-8 weeks before last frost. Plant 1/4 in deep, 8 in apart. Grow</text:p>
            <text:p>indoors for use year round.</text:p>
          </table:table-cell>
          <table:table-cell office:value-type="string" calcext:value-type="string">
            <text:p>2020</text:p>
            <text:p>EDIBLE</text:p>
            <text:p>All Season</text:p>
            <text:p>10+ Seeds</text:p>
            <text:p>Advanced Seed Saver</text:p>
            <text:p>Germination: 14-28 days</text:p>
          </table:table-cell>
          <table:table-cell table:style-name="Default" table:number-columns-repeated="16382"/>
        </table:table-row>
        <table:table-row table:style-name="ro15">
          <table:table-cell table:style-name="ce42" office:value-type="string" calcext:value-type="string">
            <text:p>Family: HERB—PARSLEY COMBO</text:p>
            <text:p>(Petroselinum crispum latifolium)</text:p>
            <text:p>Variety: Italian Flat Leaf and Curly Leaf</text:p>
            <text:p>Grown by:  Deborah Avery-Hargrove</text:p>
            <text:p>Original Seed Source: from organic purchased plant</text:p>
            <text:p>Comments: Direct sow in garden or start indoors.  Height to 15 inches.  For seed saving, this is a biennial plant producing seeds the second year in ground.</text:p>
            <text:p>Soil Temp Range: 45°-75° Optimum: 90°</text:p>
          </table:table-cell>
          <table:table-cell table:style-name="ce42" office:value-type="string" calcext:value-type="string">
            <text:p>2017</text:p>
            <text:p>EDIBLE</text:p>
            <text:p>All Season</text:p>
            <text:p>15+ Seeds</text:p>
            <text:p>Advanced Seed Saver</text:p>
            <text:p>Germination: 10-12 days</text:p>
            <text:p>@ 85 degrees</text:p>
          </table:table-cell>
          <table:table-cell table:style-name="Default" table:number-columns-repeated="16382"/>
        </table:table-row>
        <table:table-row table:style-name="ro15">
          <table:table-cell office:value-type="string" calcext:value-type="string">
            <text:p>Family: HERB—PARSLEY</text:p>
            <text:p>(Petroselinum crispum latifolium)</text:p>
            <text:p>Variety: Italian Flat Leaf Giant</text:p>
            <text:p>Comments: Direct sow in garden or start indoors 1/4-1/2” deep. Very high yielding, ht 18-20”.</text:p>
            <text:p>Soil Temp Range: 45°-75° Optimum: 90°</text:p>
          </table:table-cell>
          <table:table-cell office:value-type="string" calcext:value-type="string">
            <text:p>2017</text:p>
            <text:p>EDIBLE</text:p>
            <text:p>All Season</text:p>
            <text:p>50+ Seeds</text:p>
            <text:p>Advanced Seed Saver</text:p>
            <text:p>Germination: 14-30 days</text:p>
            <text:p>@ 65-70 degrees</text:p>
          </table:table-cell>
          <table:table-cell table:style-name="Default" table:number-columns-repeated="16382"/>
        </table:table-row>
        <table:table-row table:style-name="ro15">
          <table:table-cell table:style-name="ce42" office:value-type="string" calcext:value-type="string">
            <text:p>Family:     HERB—PARSLEY(Petroselinum crispum latifolium)</text:p>
            <text:p>Variety: Italian Flat Leaf Original Seed Source:  Ferry-Morse</text:p>
            <text:p>Comments: Soak seeds overnight in warm water. Plant indoors 6 weeks before planting outdoors. Plant 1/4” deep. Direct sow in garden or transplant 10” apart.  Height to 15 inches.  For seed saving, this is a biennial plant producing seeds the second year in ground.</text:p>
          </table:table-cell>
          <table:table-cell table:style-name="ce42" office:value-type="string" calcext:value-type="string">
            <text:p>2022</text:p>
            <text:p>EDIBLE</text:p>
            <text:p>All Season</text:p>
            <text:p>10 Seeds</text:p>
            <text:p>Advanced Seed Saver</text:p>
            <text:p>Germination: 21-28 days</text:p>
          </table:table-cell>
          <table:table-cell table:style-name="Default" table:number-columns-repeated="16382"/>
        </table:table-row>
        <table:table-row table:style-name="ro15">
          <table:table-cell office:value-type="string" calcext:value-type="string">
            <text:p>Family: HERB (Rosmarinus officinalis)</text:p>
            <text:p>Variety: Rosemary</text:p>
            <text:p>Original Source: Ferry-Morse</text:p>
            <text:p>Comments: Start seed indoors in a sunny location 10-12 weeks before transplanting outdoors or sow directly in well drained soil. Plant by pressing seed into surface and space 12 in apart. Pick leaves as needed. May be used fresh or dried. Fairly drought tolerant and deer resistant.</text:p>
          </table:table-cell>
          <table:table-cell office:value-type="string" calcext:value-type="string">
            <text:p>2024</text:p>
            <text:p>EDIBLE</text:p>
            <text:p>All Season</text:p>
            <text:p>15 Seeds</text:p>
            <text:p>Intermediate Seed Saver</text:p>
            <text:p>Perennial 15-30 days to</text:p>
            <text:p>germinate</text:p>
          </table:table-cell>
          <table:table-cell table:style-name="Default" table:number-columns-repeated="16382"/>
        </table:table-row>
        <table:table-row table:style-name="ro15">
          <table:table-cell table:style-name="ce42" office:value-type="string" calcext:value-type="string">
            <text:p>Family: HERB (Satureja hortensis)</text:p>
            <text:p>Variety: Savory, Summer</text:p>
            <text:p>Original Seed Source: Botanical Interests</text:p>
            <text:p>Comments: Plant indoors 8-10 weeks before last frost pressing lightly into soil surface. Transplant outdoors 1- 2 weeks after last frost. Space about 6”-12” apart.</text:p>
            <text:p>Attracts bees and beneficial insects. Grows well in containers. Deer resistant.</text:p>
          </table:table-cell>
          <table:table-cell table:style-name="ce42" office:value-type="string" calcext:value-type="string">
            <text:p>2022</text:p>
            <text:p>EDIBLE</text:p>
            <text:p>Warm Season</text:p>
            <text:p>20+ Seeds</text:p>
            <text:p>Intermediate Seed Saver</text:p>
            <text:p>Annual Full Sun</text:p>
          </table:table-cell>
          <table:table-cell table:style-name="Default" table:number-columns-repeated="16382"/>
        </table:table-row>
        <table:table-row table:style-name="ro15">
          <table:table-cell office:value-type="string" calcext:value-type="string">
            <text:p>Family: HERB (Satureja montana)</text:p>
            <text:p>Variety: Savory, Winter</text:p>
            <text:p>Original Seed Source: Botanical Interests</text:p>
            <text:p>Comments: Plant indoors 8-10 weeks before last frost 1/8”-1/4” deep. Transplant outdoors 1-2 weeks after last frost. Space about 8”-12” apart. Drought tolerant.</text:p>
            <text:p>Attracts bees and beneficial insects. Grows well in poor soils. Deer resistant.</text:p>
          </table:table-cell>
          <table:table-cell office:value-type="string" calcext:value-type="string">
            <text:p>2022</text:p>
            <text:p>EDIBLE</text:p>
            <text:p>Warm Season</text:p>
            <text:p>Various Seeds</text:p>
            <text:p>Intermediate Seed Saver</text:p>
            <text:p>Perennial Full Sun</text:p>
          </table:table-cell>
          <table:table-cell table:style-name="Default" table:number-columns-repeated="16382"/>
        </table:table-row>
        <table:table-row table:style-name="ro15">
          <table:table-cell table:style-name="ce42" office:value-type="string" calcext:value-type="string">
            <text:p>Family: HERB (Salvia officinalis)</text:p>
            <text:p>Variety: Sage, Broadleaf</text:p>
            <text:p>Original Seed Source: Ferry-Morse</text:p>
            <text:p>Comments: Start seed indoors in a sunny location 6 weeks before transplanting outdoors or sow directly in well drained soil. Plant 1/4 in deep and space 12 in apart. Pick leaves as needed. May be used fresh or dried.</text:p>
          </table:table-cell>
          <table:table-cell table:style-name="ce42" office:value-type="string" calcext:value-type="string">
            <text:p>2024</text:p>
            <text:p>EDIBLE</text:p>
            <text:p>Warm Season</text:p>
            <text:p>6 Seeds</text:p>
            <text:p>Intermediate Seed Saver</text:p>
            <text:p>Perennial 10-20 days to</text:p>
            <text:p>germinate</text:p>
          </table:table-cell>
          <table:table-cell table:style-name="Default" table:number-columns-repeated="16382"/>
        </table:table-row>
        <table:table-row table:style-name="ro15">
          <table:table-cell office:value-type="string" calcext:value-type="string">
            <text:p>Family: HERB (Artemesia dracunculoides)</text:p>
            <text:p>Variety: Tarragon - Mexican</text:p>
            <text:p>Seed Source: Botanical Interests</text:p>
            <text:p>Comments: 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 Harvest in the morning.</text:p>
          </table:table-cell>
          <table:table-cell office:value-type="string" calcext:value-type="string">
            <text:p>2024</text:p>
            <text:p>EDIBLE</text:p>
            <text:p>Warm Season</text:p>
            <text:p>8+ Seeds</text:p>
            <text:p>Intermediate Seed Saver</text:p>
          </table:table-cell>
          <table:table-cell table:style-name="Default" table:number-columns-repeated="16382"/>
        </table:table-row>
        <table:table-row table:style-name="ro15">
          <table:table-cell table:style-name="ce42" office:value-type="string" calcext:value-type="string">
            <text:p>Family: HERB (Artemesia dracunculoides)</text:p>
            <text:p>Variety: Tarragon - Organic</text:p>
            <text:p>Seed Source: Ferry-Morse</text:p>
            <text:p>Comments: 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text:p>
            <text:p>Harvest in the morning for best flavor.</text:p>
          </table:table-cell>
          <table:table-cell table:style-name="ce42" office:value-type="string" calcext:value-type="string">
            <text:p>2024</text:p>
            <text:p>EDIBLE</text:p>
            <text:p>Warm Season</text:p>
            <text:p>Various Seeds</text:p>
            <text:p>Intermediate Seed Saver</text:p>
          </table:table-cell>
          <table:table-cell table:style-name="Default" table:number-columns-repeated="16382"/>
        </table:table-row>
        <table:table-row table:style-name="ro15">
          <table:table-cell office:value-type="string" calcext:value-type="string">
            <text:p>Family: HERB (Thymus vulgaris)</text:p>
            <text:p>Variety: Thyme, English</text:p>
            <text:p>Original Seed Source: Botanical Interests</text:p>
            <text:p>Comments: Plant indoors 6-8 weeks before last frost 1/8” deep. Transplant outdoors 1-2 weeks after last frost about 8”-16” apart. Drought tolerant. Attracts bees. Deer resistant.</text:p>
          </table:table-cell>
          <table:table-cell office:value-type="string" calcext:value-type="string">
            <text:p>2020</text:p>
            <text:p>EDIBLE</text:p>
            <text:p>Warm Season</text:p>
            <text:p>Various Seeds</text:p>
            <text:p>Intermediate Seed Saver</text:p>
            <text:p>Perennial Full Sun</text:p>
            <text:p>to Part Shade</text:p>
          </table:table-cell>
          <table:table-cell table:style-name="Default" table:number-columns-repeated="16382"/>
        </table:table-row>
        <table:table-row table:style-name="ro15">
          <table:table-cell table:style-name="ce42" office:value-type="string" calcext:value-type="string">
            <text:p>Family: HERB (Thymus vulgaris)</text:p>
            <text:p>Variety: Thyme –Organic</text:p>
            <text:p>Original Seed Source: Ferry Morse</text:p>
            <text:p>Comments: Plant early spring indoors, barely covering.  Light aids in germination. Keep soil moist. Plant outdoors when plants are well established. Harvest in the morning for best flavor.</text:p>
          </table:table-cell>
          <table:table-cell table:style-name="ce42" office:value-type="string" calcext:value-type="string">
            <text:p>2024</text:p>
            <text:p>EDIBLE</text:p>
            <text:p>All season Perennial</text:p>
            <text:p>Various Seeds</text:p>
            <text:p>Intermediate Seed Saver</text:p>
          </table:table-cell>
          <table:table-cell table:style-name="Default" table:number-columns-repeated="16382"/>
        </table:table-row>
        <table:table-row table:style-name="ro15">
          <table:table-cell office:value-type="string" calcext:value-type="string">
            <text:p>Family: HERB (Origanum vulgare hirtum)</text:p>
            <text:p>Variety: True Greek Oregano</text:p>
            <text:p>Grown By: Native Seed/SEARCH Farm</text:p>
            <text:p>Where Grown: Patagonia, AZ</text:p>
            <text:p>Original Seed Source: www.nativeseeds.org Comments: Plant fall thru early spring in low desert; spring thru fall cooler climates. Most herbs happy in poor soil and easy to grow. Members of same species will cross.</text:p>
          </table:table-cell>
          <table:table-cell office:value-type="string" calcext:value-type="string">
            <text:p>2016</text:p>
            <text:p>EDIBLE</text:p>
            <text:p>Warm Season</text:p>
            <text:p>15-20 Seeds</text:p>
            <text:p>Intermediate Seed Saver</text:p>
          </table:table-cell>
          <table:table-cell table:style-name="Default" table:number-columns-repeated="16382"/>
        </table:table-row>
        <table:table-row table:style-name="ro15">
          <table:table-cell table:style-name="ce42" office:value-type="string" calcext:value-type="string">
            <text:p>Family: HERB (Salvia tiliiforlia)</text:p>
            <text:p>Variety: Tarahumara Chia</text:p>
            <text:p>Original Seed Source: Native Seed Search</text:p>
            <text:p>Comments: Plant outdoors with the summer rains 1/4” deep. Harvest dried seed stalks and hang upside down for complete drying. Crush to remove seeds and winnow off chaff.</text:p>
          </table:table-cell>
          <table:table-cell table:style-name="ce42" office:value-type="string" calcext:value-type="string">
            <text:p>2020</text:p>
            <text:p>EDIBLE</text:p>
            <text:p>Warm Season</text:p>
            <text:p>Various Seeds</text:p>
            <text:p>Intermediate Seed Saver</text:p>
            <text:p>Annual Full Sun</text:p>
          </table:table-cell>
          <table:table-cell table:style-name="Default" table:number-columns-repeated="16382"/>
        </table:table-row>
        <table:table-row table:style-name="ro15">
          <table:table-cell office:value-type="string" calcext:value-type="string">
            <text:p>Family: HERB Chamomile (Matricaria recutita)</text:p>
            <text:p>Variety: German Original Seed Source: Botanical Interests</text:p>
            <text:p>Comments: Sow inside 6-8 weeks before last frost. Tamp a small pinch of seeds lightly onto the soil as seeds require light to germinate. Mist lightly. Transplant when seedlings have 4 true leaves, giving plants 8” spacing. Flowers can be used fresh in tea, in salads or dried for floral arrangements. Deer resistant.</text:p>
          </table:table-cell>
          <table:table-cell office:value-type="string" calcext:value-type="string">
            <text:p>2022</text:p>
            <text:p>EDIBLE</text:p>
            <text:p>Warm Season</text:p>
            <text:p>Various Seeds</text:p>
            <text:p>Easy Seed Saver</text:p>
            <text:p>Annual</text:p>
          </table:table-cell>
          <table:table-cell table:style-name="Default" table:number-columns-repeated="16382"/>
        </table:table-row>
        <table:table-row table:style-name="ro15">
          <table:table-cell table:style-name="ce42" office:value-type="string" calcext:value-type="string">
            <text:p>Family: HERB Chervil (Anthriscus cerefolium)</text:p>
            <text:p>Variety: Chervil Original Seed Source: Botanical Interests</text:p>
            <text:p>Comments: Sow outside 6-8 weeks before last frost. Tamp a small pinch of seeds lightly onto the soil as seeds require light to germinate. Mist lightly. Also called French Parsley and essential herb for French cooking.</text:p>
            <text:p>Fresh leaves mix in salads or sprinkled on meat and fish.</text:p>
          </table:table-cell>
          <table:table-cell table:style-name="ce42" office:value-type="string" calcext:value-type="string">
            <text:p>2021</text:p>
            <text:p>EDIBLE</text:p>
            <text:p>Cool Season</text:p>
            <text:p>10-15 Seeds</text:p>
            <text:p>Easy Seed Saver</text:p>
            <text:p>Annual Full Sun to Part Shade</text:p>
          </table:table-cell>
          <table:table-cell table:style-name="Default" table:number-columns-repeated="16382"/>
        </table:table-row>
        <table:table-row table:style-name="ro15">
          <table:table-cell office:value-type="string" calcext:value-type="string">
            <text:p>Family: HERB (Melissa officinalis)</text:p>
            <text:p>Variety: Lemon Balm</text:p>
            <text:p>Original Seed Source: Terrior Seeds</text:p>
            <text:p>Comments: Sow in flats 6-8 weeks before last frost. Tamp seeds lightly onto the soil as seeds require light to germinate. Mist lightly. Transplant when seedlings have 4 true leaves,</text:p>
            <text:p>giving plants 12” spacing. Individual leaves may be picked as soon as plants become established. Best when used fresh.</text:p>
          </table:table-cell>
          <table:table-cell office:value-type="string" calcext:value-type="string">
            <text:p>2022</text:p>
            <text:p>EDIBLE</text:p>
            <text:p>Warm Season</text:p>
            <text:p>10+ Seeds</text:p>
            <text:p>Easy Seed Saver</text:p>
            <text:p>Perennial</text:p>
          </table:table-cell>
          <table:table-cell table:style-name="Default" table:number-columns-repeated="16382"/>
        </table:table-row>
        <table:table-row table:style-name="ro15">
          <table:table-cell table:style-name="ce42" office:value-type="string" calcext:value-type="string">
            <text:p>Family: KOHLRABI (Brassica oleracea var. gongylodes)</text:p>
            <text:p>Variety: Purple &amp; White Vienna Blend</text:p>
            <text:p>Original Source: Botanical Interests</text:p>
            <text:p>Comments: Cool season, full sun, start indoors at 1/4 inch depth, transplant to 4-6 inches apart.</text:p>
            <text:p>Harvest when size reaches 4 inches; 50-69 days. Contains 140% of the recommended daily allowance of vitamin C.</text:p>
          </table:table-cell>
          <table:table-cell table:style-name="ce42" office:value-type="string" calcext:value-type="string">
            <text:p>2018</text:p>
            <text:p>EDIBLE</text:p>
            <text:p>Cool Season</text:p>
            <text:p>30+ Seeds</text:p>
            <text:p>Advanced Seed Saver</text:p>
          </table:table-cell>
          <table:table-cell table:style-name="Default" table:number-columns-repeated="16382"/>
        </table:table-row>
        <table:table-row table:style-name="ro15">
          <table:table-cell office:value-type="string" calcext:value-type="string">
            <text:p>Family: KOHLRABI (Brassica oleracea var. gongylodes)</text:p>
            <text:p>Variety: Early White Vienna</text:p>
            <text:p>Original Source: Ferry Morse Organic</text:p>
            <text:p>Comments: Cool season, full sun, start indoors at 1/4 inch depth, transplant to 4-6 inches apart.</text:p>
            <text:p>Harvest when size reaches 4 inches; 50-69 days. Contains 140% of the recommended daily allowance of vitamin C.</text:p>
          </table:table-cell>
          <table:table-cell office:value-type="string" calcext:value-type="string">
            <text:p>2024</text:p>
            <text:p>EDIBLE</text:p>
            <text:p>Cool Season</text:p>
            <text:p>12 Seeds</text:p>
            <text:p>Advanced Seed Saver</text:p>
          </table:table-cell>
          <table:table-cell table:style-name="Default" table:number-columns-repeated="16382"/>
        </table:table-row>
        <table:table-row table:style-name="ro15">
          <table:table-cell table:style-name="ce42" office:value-type="string" calcext:value-type="string">
            <text:p>Family: KALE (Brassica oleracea var. alboglabra)</text:p>
            <text:p>Variety: Chinese, Kailaan, White Flowered</text:p>
            <text:p>Original Seed Source: Botanical Interests</text:p>
            <text:p>Comments: Spring or fall plant; sow directly into soil at 1/2” depth; thin to 8-10” apart; rows 18” apart. Will cross pollinate. Can be substituted for broccoli in recipes. High in calcium, iron, and vitamins A &amp; C.</text:p>
          </table:table-cell>
          <table:table-cell table:style-name="ce42" office:value-type="string" calcext:value-type="string">
            <text:p>2018</text:p>
            <text:p>EDIBLE</text:p>
            <text:p>All Season</text:p>
            <text:p>10 Seeds</text:p>
            <text:p>Intermediate Seed Saver</text:p>
          </table:table-cell>
          <table:table-cell table:style-name="Default" table:number-columns-repeated="16382"/>
        </table:table-row>
        <table:table-row table:style-name="ro15">
          <table:table-cell office:value-type="string" calcext:value-type="string">
            <text:p>Family: KALE (Brassica oleracea)</text:p>
            <text:p>Variety: Dwarf Blue Curled</text:p>
            <text:p>Original Seed Source: Botanical Interests</text:p>
            <text:p>Comments: Spring or fall plant; sow directly into soil at 1/4” depth; thin to 6-12” apart; rows 18” apart. Will cross pollinate. Save seeds from dried flowers.</text:p>
          </table:table-cell>
          <table:table-cell office:value-type="string" calcext:value-type="string">
            <text:p>2019</text:p>
            <text:p>EDIBLE</text:p>
            <text:p>Cool Season</text:p>
            <text:p>15+ Seeds</text:p>
            <text:p>Intermediate Seed Saver</text:p>
          </table:table-cell>
          <table:table-cell table:style-name="Default" table:number-columns-repeated="16382"/>
        </table:table-row>
        <table:table-row table:style-name="ro15">
          <table:table-cell table:style-name="ce42" office:value-type="string" calcext:value-type="string">
            <text:p>Family: KALE (Brassica oleracea)</text:p>
            <text:p>Variety: Dwarf Siberian</text:p>
            <text:p>Original Seed Source: www.nativeseeds.org Comments: Spring or fall plant; sow directly into soil at 1/4” depth; thin to 6-12” apart; rows 18” apart. Will cross pollinate. Save seeds from dried flowers.  Seeds are mature when black and pods begin to dry. Careful:  dry pods shatter easily.</text:p>
          </table:table-cell>
          <table:table-cell table:style-name="ce42" office:value-type="string" calcext:value-type="string">
            <text:p>2016</text:p>
            <text:p>EDIBLE</text:p>
            <text:p>All Season</text:p>
            <text:p>25-30 Seeds</text:p>
            <text:p>Intermediate Seed Saver</text:p>
          </table:table-cell>
          <table:table-cell table:style-name="Default" table:number-columns-repeated="16382"/>
        </table:table-row>
        <table:table-row table:style-name="ro15">
          <table:table-cell office:value-type="string" calcext:value-type="string">
            <text:p>Family: KOHLRABI (Brassica oleracea)</text:p>
            <text:p>Variety: Purple Vienna—Heirloom</text:p>
            <text:p>Original Seed Source: Botanical Interests</text:p>
            <text:p>Comments: Cool season, full sun, start indoors or direct in ground at 1/4 inch depth, 4-6 inches apart. Harvest when size reaches 4 inches; 60 days.</text:p>
          </table:table-cell>
          <table:table-cell office:value-type="string" calcext:value-type="string">
            <text:p>2022</text:p>
            <text:p>EDIBLE</text:p>
            <text:p>Cool Season</text:p>
            <text:p>20 Seeds</text:p>
            <text:p>Advanced Seed Saver</text:p>
          </table:table-cell>
          <table:table-cell table:style-name="Default" table:number-columns-repeated="16382"/>
        </table:table-row>
        <table:table-row table:style-name="ro15">
          <table:table-cell table:style-name="ce42" office:value-type="string" calcext:value-type="string">
            <text:p>Family: KALE (Brassica oleracea)</text:p>
            <text:p>Variety: Red Russian</text:p>
            <text:p>Original Source: Johnny’s Selected Seeds</text:p>
            <text:p>Comments: Spring or fall plant; sow 3-4 seeds at 1/2” depth; 12” apart; rows 18” apart. Thin to one plant per group. Harvest outside leaves in about 2 months. Very cold hardy.</text:p>
          </table:table-cell>
          <table:table-cell table:style-name="ce42" office:value-type="string" calcext:value-type="string">
            <text:p>2015</text:p>
            <text:p>EDIBLE</text:p>
            <text:p>All Season</text:p>
            <text:p>10-15 Seeds</text:p>
            <text:p>Intermediate Seed Saver</text:p>
          </table:table-cell>
          <table:table-cell table:style-name="Default" table:number-columns-repeated="16382"/>
        </table:table-row>
        <table:table-row table:style-name="ro15">
          <table:table-cell office:value-type="string" calcext:value-type="string">
            <text:p>Family: KALE (Brassica oleracea)</text:p>
            <text:p>Variety: Scarlet</text:p>
            <text:p>Original Seed Source: Johnny’s Seeds</text:p>
            <text:p>Comments: Spring or fall plant; sow 3-4 seeds at 1/2” depth; 12” apart; rows 18” apart. Thin to one plant per group. Harvest outside leaves in about 2 months. Very cold hardy.</text:p>
          </table:table-cell>
          <table:table-cell office:value-type="string" calcext:value-type="string">
            <text:p>2018</text:p>
            <text:p>EDIBLE</text:p>
            <text:p>All Season</text:p>
            <text:p>25-30 Seeds</text:p>
            <text:p>Intermediate Seed Saver</text:p>
          </table:table-cell>
          <table:table-cell table:style-name="Default" table:number-columns-repeated="16382"/>
        </table:table-row>
        <table:table-row table:style-name="ro15">
          <table:table-cell table:style-name="ce42" office:value-type="string" calcext:value-type="string">
            <text:p>Family: KALE (Brassica napus pabularia)</text:p>
            <text:p>Variety: Siberian</text:p>
            <text:p>Original Seed Source: Johnny’s Selected Seeds</text:p>
            <text:p>Comments: Spring or fall plant; sow directly into soil at 1/4” depth; thin to 6-12” apart; rows 18” apart. Will cross pollinate.</text:p>
          </table:table-cell>
          <table:table-cell table:style-name="ce42" office:value-type="string" calcext:value-type="string">
            <text:p>2015</text:p>
            <text:p>EDIBLE</text:p>
            <text:p>All Season</text:p>
            <text:p>10-15 Seeds</text:p>
            <text:p>Intermediate Seed Saver</text:p>
          </table:table-cell>
          <table:table-cell table:style-name="Default" table:number-columns-repeated="16382"/>
        </table:table-row>
        <table:table-row table:style-name="ro15">
          <table:table-cell office:value-type="string" calcext:value-type="string">
            <text:p>Family: KALE (Brassica oleracea)</text:p>
            <text:p>Variety: Starbor (Hybrid)</text:p>
            <text:p>Original Seed Source: Johnny’s Seeds</text:p>
            <text:p>Comments: Spring or fall plant; sow 3-4 seeds at 1/2” depth; 12” apart; rows 18” apart. Thin to one plant per group. Harvest outside leaves in about 2 months. Very cold hardy.</text:p>
          </table:table-cell>
          <table:table-cell office:value-type="string" calcext:value-type="string">
            <text:p>2018</text:p>
            <text:p>EDIBLE</text:p>
            <text:p>All Season</text:p>
            <text:p>25-30 Seeds</text:p>
            <text:p>DO NOT SAVE SEED</text:p>
            <text:p>HYBRID</text:p>
          </table:table-cell>
          <table:table-cell table:style-name="Default" table:number-columns-repeated="16382"/>
        </table:table-row>
        <table:table-row table:style-name="ro15">
          <table:table-cell table:style-name="ce42" office:value-type="string" calcext:value-type="string">
            <text:p>Family: KALE  Italian Lacinato(Brassica oleracea)</text:p>
            <text:p>Variety: Nero Toscano</text:p>
            <text:p>Original Seed Source: Botanical Interests</text:p>
            <text:p>Comments: Spring or fall plant; sow 3-4 seeds at 1/2” depth; 12” apart; rows 18” apart. Thin to one plant per group. Harvest outside leaves in about 2 months. Very cold hardy.</text:p>
          </table:table-cell>
          <table:table-cell table:style-name="ce42" office:value-type="string" calcext:value-type="string">
            <text:p>2019</text:p>
            <text:p>EDIBLE</text:p>
            <text:p>All Season</text:p>
            <text:p>15-20 Seeds</text:p>
            <text:p>Intermediate Seed Saver</text:p>
          </table:table-cell>
          <table:table-cell table:style-name="Default" table:number-columns-repeated="16382"/>
        </table:table-row>
        <table:table-row table:style-name="ro15">
          <table:table-cell office:value-type="string" calcext:value-type="string">
            <text:p>Family: LEEK (Allium porrum)</text:p>
            <text:p>Variety: BANDIT</text:p>
            <text:p>Original Seed Source: Johnny’s Seeds</text:p>
            <text:p>Comments: Predominant choice for home gardeners; close relative to onion and garlic; used in soups and stews, salads.  Sow indoors, 1/8-1/4” deep; transplant to</text:p>
            <text:p>6” apart; full sun; 8-10” long, 90-120 days.</text:p>
          </table:table-cell>
          <table:table-cell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5">
          <table:table-cell table:style-name="ce42" office:value-type="string" calcext:value-type="string">
            <text:p>Family: LEEK (Allium porrum)</text:p>
            <text:p>Variety: KING RICHARD</text:p>
            <text:p>Original Seed Source: Johnny’s Seeds</text:p>
            <text:p>Comments: Predominant choice for home gardeners; close relative to onion and garlic; used in soups and stews, salads.  Sow indoors, 1/8-1/4” deep; transplant to 6” apart; full sun; 8-10” long, 20-30 days after</text:p>
            <text:p>transplant.</text:p>
          </table:table-cell>
          <table:table-cell table:style-name="ce42"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5">
          <table:table-cell office:value-type="string" calcext:value-type="string">
            <text:p>Family: LEEK (Allium ampeloprasum)</text:p>
            <text:p>Variety: Lancelot</text:p>
            <text:p>Grown by:  Deborah Avery-Hargrove (CCMGA Master Gardener)</text:p>
            <text:p>Original Seed Source: From live plants purchased from</text:p>
            <text:p>www.dixondalefarms.com</text:p>
            <text:p>Comments: Predominant choice for home gardeners; close relative to onion and garlic; used in soups and stews, salads.  Sow indoors, 1/8-1/4” deep; transplant to</text:p>
            <text:p>6” apart; full sun; 8-10” long, 90-120 days.</text:p>
          </table:table-cell>
          <table:table-cell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5">
          <table:table-cell table:style-name="ce42" office:value-type="string" calcext:value-type="string">
            <text:p>Family: LETTUCE (Latuca sativa)</text:p>
            <text:p>Variety: BIBB</text:p>
            <text:p>Original Seed Source: Ferry-Morse</text:p>
            <text:p>Comments:  Head is small and loose butterhead variety. Buttery taste. Direct sow as early as soil can be madfe fine and loose. Plant seeds every 2” covering with 1/4” soil. Thin to 12” apart. Shade on very sunny days to keep soil cool. Germinates well in low temps but dormant above 75 degrees. Harvest</text:p>
            <text:p>entire head at maturity or about 57 days.</text:p>
          </table:table-cell>
          <table:table-cell table:style-name="ce42" office:value-type="string" calcext:value-type="string">
            <text:p>2023</text:p>
            <text:p>EDIBLE</text:p>
            <text:p>Cool Season</text:p>
            <text:p>15-20 Seeds</text:p>
            <text:p>Intermediate Seed Saver</text:p>
            <text:p>Germination 7-10 days</text:p>
          </table:table-cell>
          <table:table-cell table:style-name="Default" table:number-columns-repeated="16382"/>
        </table:table-row>
        <table:table-row table:style-name="ro15">
          <table:table-cell office:value-type="string" calcext:value-type="string">
            <text:p>Family: LETTUCE (Latuca sativa)</text:p>
            <text:p>Variety: BUTTERHEAD</text:p>
            <text:p>Original Seed Source: Johnny’s Seed</text:p>
            <text:p>Comments:  Head is large and dense. Buttery taste. Sow indoors 3-4 weeks before last frost. Sow in flats barely covering seeds. Shade on very sunny days to keep soil cool. Germinates well in low temps but dormant above 75 degrees. Harvest leaves from outer edge so plant continues to grow from</text:p>
            <text:p>center.</text:p>
          </table:table-cell>
          <table:table-cell office:value-type="string" calcext:value-type="string">
            <text:p>2017</text:p>
            <text:p>EDIBLE</text:p>
            <text:p>Cool Season</text:p>
            <text:p>100+ Seeds</text:p>
            <text:p>Intermediate Seed Saver</text:p>
          </table:table-cell>
          <table:table-cell table:style-name="Default" table:number-columns-repeated="16382"/>
        </table:table-row>
        <table:table-row table:style-name="ro15">
          <table:table-cell table:style-name="ce42" office:value-type="string" calcext:value-type="string">
            <text:p>Family: LETTUCE (Latuca sativa)</text:p>
            <text:p>Variety: Black Seeded Simpson</text:p>
            <text:p>Original Seed Source: Johnny’s Seeds Comments: Full sized frilly leaves That can be picked in just over a month. Light aids germination. Press into surface 3 seeds every 10”, thinning to one plant. Sow outdoors 2-4 weeks before last frost or fall and winter for cool weather harvest. Dormant above 80 degrees.</text:p>
            <text:p>Harvest leaves from outer edge so plant continues to</text:p>
            <text:p>grow from center.</text:p>
          </table:table-cell>
          <table:table-cell table:style-name="ce42" office:value-type="string" calcext:value-type="string">
            <text:p>2022</text:p>
            <text:p>EDIBLE</text:p>
            <text:p>Cool Season</text:p>
            <text:p>30 Seeds</text:p>
            <text:p>Intermediate Seed Saver</text:p>
          </table:table-cell>
          <table:table-cell table:style-name="Default" table:number-columns-repeated="16382"/>
        </table:table-row>
        <table:table-row table:style-name="ro15">
          <table:table-cell office:value-type="string" calcext:value-type="string">
            <text:p>Family: LETTUCE (Latuca sativa)</text:p>
            <text:p>Variety: Cimmaron Romaine</text:p>
            <text:p>Grown By: Native Seed/SEARCH Farm</text:p>
            <text:p>Where Grown: Patagonia, AZ</text:p>
            <text:p>Original Seed Source: www.nativeseeds.org Comments: Broad, flat leaves range from dark red to bronze. Water at base to avoid rot. Stagger planting 10 days; thin to 8” for full heads. Harvest leaves from outer</text:p>
            <text:p>edge so plant 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table:style-name="ce42" office:value-type="string" calcext:value-type="string">
            <text:p>Family: LETTUCE –Crisphead(Latuca sativa)</text:p>
            <text:p>Variety: Great Lakes 118</text:p>
            <text:p>Original Seed Source: Botanical Interests</text:p>
            <text:p>Comments: Also known as Iceberg. Heat tolerant and bolt resistant. Sow in fall and winter for cool season harvest. Light aids germination so press seeds gently</text:p>
            <text:p>into surface of soil. Plant 3 seeds every 8 inches and thin when plants are about 1/2”.</text:p>
          </table:table-cell>
          <table:table-cell table:style-name="ce42" office:value-type="string" calcext:value-type="string">
            <text:p>2022</text:p>
            <text:p>EDIBLE</text:p>
            <text:p>Cool Season</text:p>
            <text:p>50+ Seeds</text:p>
            <text:p>Intermediate Seed Saver</text:p>
            <text:p>Maturity 68-82 days</text:p>
          </table:table-cell>
          <table:table-cell table:style-name="Default" table:number-columns-repeated="16382"/>
        </table:table-row>
        <table:table-row table:style-name="ro15">
          <table:table-cell office:value-type="string" calcext:value-type="string">
            <text:p>Family: LETTUCE (Latuca sativa)</text:p>
            <text:p>Variety: FAIRLY BUTTERHEAD</text:p>
            <text:p>Comments: Greenhouse variety with smaller frame. Buttery taste.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table:style-name="ce42" office:value-type="string" calcext:value-type="string">
            <text:p>Family: LETTUCE (Locusta valerianella)</text:p>
            <text:p>Variety: Corn Salad Valentin</text:p>
            <text:p>Original Seed Source: seeds donated by Elisabeth Brackelsberg, Hereford AZ</text:p>
            <text:p>Comments: This seeds originated in Germany.  Shiny dark green, spooned lamb’s lettuce type.  Plant in cool season; may winter over in our desert environment.</text:p>
            <text:p>Very tasty and healthy gourmet salad.</text:p>
          </table:table-cell>
          <table:table-cell table:style-name="ce42" office:value-type="string" calcext:value-type="string">
            <text:p>2017</text:p>
            <text:p>EDIBLE</text:p>
            <text:p>Cool Season</text:p>
            <text:p>50+ Seeds</text:p>
            <text:p>Advanced Seed Saver</text:p>
          </table:table-cell>
          <table:table-cell table:style-name="Default" table:number-columns-repeated="16382"/>
        </table:table-row>
        <table:table-row table:style-name="ro15">
          <table:table-cell office:value-type="string" calcext:value-type="string">
            <text:p>Family: LETTUCE (Lactuca sativa)</text:p>
            <text:p>Variety: Gourmet Blend 5 kinds of Lechuga</text:p>
            <text:p>Original Seed Source: Tower Gardens</text:p>
            <text:p>Comments: Includes: Prizeleaf, Royal Oak Leaf, Salad Bowl, Red Salad Bown, Ashley.  Plant seeds 1/8” below soil surface. Rows should be 12-18” apart.</text:p>
            <text:p>Harvest: 45 days</text:p>
          </table:table-cell>
          <table:table-cell office:value-type="string" calcext:value-type="string">
            <text:p>2016</text:p>
            <text:p>EDIBLE</text:p>
            <text:p>All Season</text:p>
            <text:p>10-20 Seeds</text:p>
            <text:p>Advanced Seed Saver</text:p>
            <text:p>Germination: 3-4 days</text:p>
          </table:table-cell>
          <table:table-cell table:style-name="Default" table:number-columns-repeated="16382"/>
        </table:table-row>
        <table:table-row table:style-name="ro15">
          <table:table-cell table:style-name="ce42" office:value-type="string" calcext:value-type="string">
            <text:p>Family: LETTUCE (Latuca sativa)</text:p>
            <text:p>Variety: Grand Rapids Leaf</text:p>
            <text:p>Original Seed Source: American Seed</text:p>
            <text:p>Comments: Light green large leaves with frilled margins. Disease resistant. Germinate well in low temps but dormant above 75 degrees. Plant seeds 1/4 in deep, 1 in apart and thin to 6-8 in. Keep soil moderately moist, Harvest leaves from outer edge so plant continues to</text:p>
            <text:p>grow from center.</text:p>
          </table:table-cell>
          <table:table-cell table:style-name="ce42" office:value-type="string" calcext:value-type="string">
            <text:p>2022</text:p>
            <text:p>EDIBLE</text:p>
            <text:p>Cool Season</text:p>
            <text:p>20 Seeds</text:p>
            <text:p>Intermediate Seed Saver</text:p>
          </table:table-cell>
          <table:table-cell table:style-name="Default" table:number-columns-repeated="16382"/>
        </table:table-row>
        <table:table-row table:style-name="ro15">
          <table:table-cell office:value-type="string" calcext:value-type="string">
            <text:p>Family: LETTUCE (Latuca sativa)</text:p>
            <text:p>Variety: Green Forest (Romaine)</text:p>
            <text:p>Original Seed Source: Johnny’s Seeds Comments: Plant indoors in flats, barely covering with vermiculite. Keep the soil temp below 75 degrees. Stagger planting 10 days; thin to 8” for full heads.</text:p>
            <text:p>Harvest leaves from outer edge so plant continues to grow from center. Early, tall, bright green romaine; origin Israel (heat tolerant) but   does well in cool temps. Water at base to avoid rot.</text:p>
          </table:table-cell>
          <table:table-cell office:value-type="string" calcext:value-type="string">
            <text:p>2017</text:p>
            <text:p>EDIBLE</text:p>
            <text:p>All Season</text:p>
            <text:p>25-30 Seeds</text:p>
            <text:p>Intermediate Seed Saver</text:p>
          </table:table-cell>
          <table:table-cell table:style-name="Default" table:number-columns-repeated="16382"/>
        </table:table-row>
        <table:table-row table:style-name="ro15">
          <table:table-cell table:style-name="ce42" office:value-type="string" calcext:value-type="string">
            <text:p>Family: LETTUCE (Lactuca sativa)</text:p>
            <text:p>Variety: Romaine, Heirloom Speckled “Freckles”</text:p>
            <text:p>Grown by:  Mary Lou Spurgeon Comments: Romaine style with brown to redish “freckles”, sow outside in early spring; may be fall planted.  Plant seeds 1/8” below soil surface. Rows should be 12-18” apart. Harvest by removing outside leaves; plant will continue to grow.  25-55</text:p>
            <text:p>days, all-around favorite.</text:p>
            <text:p>Soil Temp Range: 35°-85° Optimum: 75°</text:p>
          </table:table-cell>
          <table:table-cell table:style-name="ce42" office:value-type="string" calcext:value-type="string">
            <text:p>2019</text:p>
            <text:p>EDIBLE</text:p>
            <text:p>All Season</text:p>
            <text:p>20-25 Seeds</text:p>
            <text:p>Easy Seed Saver</text:p>
            <text:p>Germination: 3-4 days</text:p>
          </table:table-cell>
          <table:table-cell table:style-name="Default" table:number-columns-repeated="16382"/>
        </table:table-row>
        <table:table-row table:style-name="ro15">
          <table:table-cell office:value-type="string" calcext:value-type="string">
            <text:p>Family: LETTUCE (Latuca sativa)</text:p>
            <text:p>Variety: Romaine Jericho</text:p>
            <text:p>Original Seed Source: High Mowing Comments: Large, bright green romaine; origin Israel (heat tolerant) but does well in cool temps.</text:p>
            <text:p>Water at base to avoid rot. Stagger planting 10</text:p>
            <text:p>days; thin to 8” for full heads. Harvest leaves from outer</text:p>
            <text:p>edge so plant 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table:style-name="ce42" office:value-type="string" calcext:value-type="string">
            <text:p>Family: LETTUCE Mesclun (Lactuca sativa)</text:p>
            <text:p>Variety: Gourmet Baby Greens</text:p>
            <text:p>Original Seed Source: Botanical Interests</text:p>
            <text:p>Comments: Plant seeds 1/8” below soil surface, broadcast over an area instead of a row. Sow in fall for winter harvest or 2-4 weeks before last frost in spring. Harvest anytime from baby greens to full size. Contains</text:p>
            <text:p>buttercrunch, black seeded Simpson, green salad bowl, Lola Rossa, red oak leaf and rouge d’Hiver.</text:p>
          </table:table-cell>
          <table:table-cell table:style-name="ce42" office:value-type="string" calcext:value-type="string">
            <text:p>2021</text:p>
            <text:p>EDIBLE</text:p>
            <text:p>Cool Season</text:p>
            <text:p>Various Seeds</text:p>
            <text:p>Advanced Seed Saver</text:p>
            <text:p>Germination: 5-14 days</text:p>
          </table:table-cell>
          <table:table-cell table:style-name="Default" table:number-columns-repeated="16382"/>
        </table:table-row>
        <table:table-row table:style-name="ro15">
          <table:table-cell office:value-type="string" calcext:value-type="string">
            <text:p>Family: LETTUCE (Lactuca sativa)</text:p>
            <text:p>Variety: Parris Island Cos - Romaine, Organic</text:p>
            <text:p>Original Seed Source:  Ferry-Morse</text:p>
            <text:p>Comments: Romaine style, sow outside in early spring; may be fall planted.  Plant seeds 1/8” below soil surface. Rows should be 12-18” apart. Harvest by removing outside leaves;</text:p>
            <text:p>plant will continue to grow.</text:p>
          </table:table-cell>
          <table:table-cell office:value-type="string" calcext:value-type="string">
            <text:p>2024</text:p>
            <text:p>EDIBLE</text:p>
            <text:p>Cool Season</text:p>
            <text:p>15 Seeds</text:p>
            <text:p>Advanced Seed Saver</text:p>
            <text:p>Germination: 3-4 days</text:p>
          </table:table-cell>
          <table:table-cell table:style-name="Default" table:number-columns-repeated="16382"/>
        </table:table-row>
        <table:table-row table:style-name="ro15">
          <table:table-cell table:style-name="ce42" office:value-type="string" calcext:value-type="string">
            <text:p>Family: LETTUCE (Latuca sativa)</text:p>
            <text:p>Variety: Red Sails</text:p>
            <text:p>Comments: Attractive, ruffled fringed leaves of deep burgundy red over green. Sow indoors 3-4 weeks before last frost. Germinate well in low temps but dormant above 75 degrees. Harvest leaves from outer edge so</text:p>
            <text:p>plant continues to grow from center.</text:p>
          </table:table-cell>
          <table:table-cell table:style-name="ce42"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office:value-type="string" calcext:value-type="string">
            <text:p>Family: LETTUCE (Lactuca sativa)</text:p>
            <text:p>Variety: Rocky Top Salad Mix</text:p>
            <text:p>Original Seed Source: Baker Creek Heirloom Seeds</text:p>
            <text:p>www.rareseeds.com</text:p>
            <text:p>Comments: Old World crop; requires cool temps; plants may benefit from a few hours of afternoon shade.  Sow seed on soil surface and rake in lightly (barely cover).  Do no allow seed bed to get dry.  Enjoy thinnings in an early salad.  Rows should be 12-18” apart. Harvest: 45 days</text:p>
            <text:p>Soil Temp Range: 35°-85° Optimum: 75°</text:p>
          </table:table-cell>
          <table:table-cell office:value-type="string" calcext:value-type="string">
            <text:p>2018</text:p>
            <text:p>EDIBLE</text:p>
            <text:p>All Season</text:p>
            <text:p>Various Seeds</text:p>
            <text:p>Advanced Seed Saver</text:p>
            <text:p>Germination: 3-4 days</text:p>
            <text:p>@ 75 degrees</text:p>
          </table:table-cell>
          <table:table-cell table:style-name="Default" table:number-columns-repeated="16382"/>
        </table:table-row>
        <table:table-row table:style-name="ro15">
          <table:table-cell table:style-name="ce42" office:value-type="string" calcext:value-type="string">
            <text:p>Family: LETTUCE (Lactuca sativa)</text:p>
            <text:p>Variety: Salad Bowl - Green</text:p>
            <text:p>Grown by:  Deborah Avery-Hargrove</text:p>
            <text:p>Original Seed Source: Botanical Interests</text:p>
            <text:p>Comments: Leaf style, sow outside in early spring; may be fall planted.  Plant seeds 1/8” below soil surface. Rows should be 12-18” apart. Harvest by removing outside leaves;</text:p>
            <text:p>plant will continue to grow.  Tender, frilly leaves, light green.</text:p>
            <text:p>Soil Temp Range: 35°-85° Optimum: 75°</text:p>
          </table:table-cell>
          <table:table-cell table:style-name="ce42" office:value-type="string" calcext:value-type="string">
            <text:p>2017</text:p>
            <text:p>EDIBLE</text:p>
            <text:p>All Season</text:p>
            <text:p>50+ Seeds</text:p>
            <text:p>Easy Seed Saver</text:p>
            <text:p>Germination: 3-4 days</text:p>
            <text:p>@ 75 degrees</text:p>
          </table:table-cell>
          <table:table-cell table:style-name="Default" table:number-columns-repeated="16382"/>
        </table:table-row>
        <table:table-row table:style-name="ro15">
          <table:table-cell office:value-type="string" calcext:value-type="string">
            <text:p>Family: LETTUCE (Latuca sativa)</text:p>
            <text:p>Variety: SALANOVA GREEN BUTTER</text:p>
            <text:p>Comments: Dense rosette heads. Delicate buttery taste. Sow indoors 3-4 weeks before last frost.</text:p>
            <text:p>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table:style-name="ce42" office:value-type="string" calcext:value-type="string">
            <text:p>Family: LETTUCE (Latuca sativa)</text:p>
            <text:p>Variety: Salanova Green Incised</text:p>
            <text:p>Original Seed Source: Johnny’s Seeds</text:p>
            <text:p>Comments: Deeply incised, double green leaves with heavily frilled margins. Mildew resistant. Sow indoors</text:p>
            <text:p>3-4 weeks before last frost. Germinate well in low temps but dormant above 75 degrees. Harvest leaves from</text:p>
            <text:p>outer edge so plant continues to grow from center.</text:p>
          </table:table-cell>
          <table:table-cell table:style-name="ce42"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office:value-type="string" calcext:value-type="string">
            <text:p>Family: LETTUCE (Latuca sativa)</text:p>
            <text:p>Variety: Salanova Green Oakleaf</text:p>
            <text:p>Original Seed Source: Johnny’s Seeds</text:p>
            <text:p>Comments: Fine lobed saladbowl type oakleaf. Mildew resistant.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table:style-name="ce42" office:value-type="string" calcext:value-type="string">
            <text:p>Family: LETTUCE (Latuca sativa)</text:p>
            <text:p>Variety: SALANOVA GREEN SWEET CRISP</text:p>
            <text:p>Comments: Sweet almost romaine flavor. Medium dark green with defined 3-D shape. Sow indoors 3-4 weeks before last frost. Germinate well in low temps but dormant above 75 degrees. Harvest leaves from outer</text:p>
            <text:p>edge so plant continues to grow from center.</text:p>
          </table:table-cell>
          <table:table-cell table:style-name="ce42"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office:value-type="string" calcext:value-type="string">
            <text:p>Family: LETTUCE (Latuca sativa)</text:p>
            <text:p>Variety: Salanova Red Butter</text:p>
            <text:p>Original Seed Source: Johnny’s Seeds</text:p>
            <text:p>Comments: Triple red heads have attractive red to green transition. Delicate buttery flavor. Mildew resistant.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table:style-name="ce42" office:value-type="string" calcext:value-type="string">
            <text:p>Family: LETTUCE (Latuca sativa)</text:p>
            <text:p>Variety: Salanova Red Incised</text:p>
            <text:p>Original Seed Source: Johnny’s Seeds</text:p>
            <text:p>Comments: Deeply incised, double red leaves with heavily frilled margins. Mildew resistant. Sow indoors</text:p>
            <text:p>3-4 weeks before last frost. Germinate well in low temps but dormant above 75 degrees. Harvest leaves from</text:p>
            <text:p>outer edge so plant continues to grow from center.</text:p>
          </table:table-cell>
          <table:table-cell table:style-name="ce42"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office:value-type="string" calcext:value-type="string">
            <text:p>Family: LETTUCE (Latuca sativa)</text:p>
            <text:p>Variety: Salanova Red Oakleaf</text:p>
            <text:p>Original Seed Source: Johnny’s Seeds</text:p>
            <text:p>Comments: Dense heads with deep shiny red. Mildew resistant. Sow indoors 3-4 weeks before last frost.</text:p>
            <text:p>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5">
          <table:table-cell table:style-name="ce42" office:value-type="string" calcext:value-type="string">
            <text:p>Family: LETTUCE (Latuca sativa)</text:p>
            <text:p>Variety: STARFIGHTER</text:p>
            <text:p>Original Seed Source: Rijk Zwaan</text:p>
            <text:p>Comments: Green leaf with blistered leaves (savoyed) with nice regular shape. Water at base to avoid rot. Plant 1/8” deep. Thin to 8” for full heads. Harvest leaves from</text:p>
            <text:p>outer edge so plant continues to grow from center.</text:p>
          </table:table-cell>
          <table:table-cell table:style-name="ce42"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5">
          <table:table-cell office:value-type="string" calcext:value-type="string">
            <text:p>Family: LETTUCE Mini-Romaine(Latuca sativa)</text:p>
            <text:p>Variety: Truchas</text:p>
            <text:p>Original Seed Source: Botanical Interests</text:p>
            <text:p>Comments: This deep red, small and compact romaine is easy to grow. Disease resistant. Does well in cool temps. Water at base to avoid rot. Stagger planting 10 days; thin to 8” for full heads. Harvest leaves from outer</text:p>
            <text:p>edge so plant continues to grow from center.</text:p>
          </table:table-cell>
          <table:table-cell office:value-type="string" calcext:value-type="string">
            <text:p>2024</text:p>
            <text:p>EDIBLE</text:p>
            <text:p>Cool Season</text:p>
            <text:p>6 Seeds</text:p>
            <text:p>Intermediate Seed Saver</text:p>
          </table:table-cell>
          <table:table-cell table:style-name="Default" table:number-columns-repeated="16382"/>
        </table:table-row>
        <table:table-row table:style-name="ro15">
          <table:table-cell table:style-name="ce42" office:value-type="string" calcext:value-type="string">
            <text:p>Family: MELON (Cucumis melo)</text:p>
            <text:p>Variety: Bill Cook’s ROUND VALLEY MELON</text:p>
            <text:p>Grown by:  Bill Cook</text:p>
            <text:p>Where Grown:  Duncan, AZ</text:p>
            <text:p>Original Seed Source: History tells us this seed was discovered in a settler’s ruin near Springerville, AZ, in the area called Round Valley, hence the name.</text:p>
            <text:p>Comments: Plant 3-5 seeds in basin 1” deep 5 feet apart, sprawling vine. In low desert plant in dappled shade in mid-</text:p>
            <text:p>July.   This seed is under test at 4,500 feet with early July planting.  Yellow rind, SWEET orange flesh; up to 5 pounds.</text:p>
          </table:table-cell>
          <table:table-cell table:style-name="ce42"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5">
          <table:table-cell office:value-type="string" calcext:value-type="string">
            <text:p>Family: MELON (Cucumis melo)</text:p>
            <text:p>Variety: Bill Cook’s Mystery Melon Grown By: Bill Cook, Master Gardener, Duncan, AZ</text:p>
            <text:p>Comments: Plant 3-5 seeds in basin 1” deep 5 feet apart, sprawling vine. Full sun. Some netting on the exterior but isn’t a cantaloupe. Taste is somewhere between a nice sweet honeydew and a cantaloupe.</text:p>
          </table:table-cell>
          <table:table-cell office:value-type="string" calcext:value-type="string">
            <text:p>2023</text:p>
            <text:p>EDIBLE</text:p>
            <text:p>Warm Season</text:p>
            <text:p>5+ Seeds</text:p>
            <text:p>Easy Seed Saver</text:p>
            <text:p>Germination: 3-4 days</text:p>
          </table:table-cell>
          <table:table-cell table:style-name="Default" table:number-columns-repeated="16382"/>
        </table:table-row>
        <table:table-row table:style-name="ro15">
          <table:table-cell table:style-name="ce42" office:value-type="string" calcext:value-type="string">
            <text:p>Family: MELON Cantalope (Cucumis melo)</text:p>
            <text:p>Variety: Sierra Gold</text:p>
            <text:p>Original Seed Source: Ferry-Morse</text:p>
            <text:p>Comments: Plant 1-2 weeks after last frost. Make mounds 4’-6’ apart. Sow 2-3 seeds in top of mound 1/4” deep. Thin to one plant per mound. Full sun, 90 days.</text:p>
          </table:table-cell>
          <table:table-cell table:style-name="ce42" office:value-type="string" calcext:value-type="string">
            <text:p>2023</text:p>
            <text:p>EDIBLE</text:p>
            <text:p>Warm Season</text:p>
            <text:p>9 Seeds</text:p>
            <text:p>Easy Seed Saver</text:p>
            <text:p>Germination: 5-10 days</text:p>
          </table:table-cell>
          <table:table-cell table:style-name="Default" table:number-columns-repeated="16382"/>
        </table:table-row>
        <table:table-row table:style-name="ro15">
          <table:table-cell office:value-type="string" calcext:value-type="string">
            <text:p>Family: MELON (Cucumis melo)</text:p>
            <text:p>Variety: Charentais Cantaloupe</text:p>
            <text:p>Original Seed Source: Botanical Interests</text:p>
            <text:p>Comments: Plant 1-2 weeks after last frost. Make mounds 4’-6’ apart. Sow 2-3 seeds in top of mound 1/4” deep. Thin to one plant per mound. Full sun, 90 days.</text:p>
          </table:table-cell>
          <table:table-cell office:value-type="string" calcext:value-type="string">
            <text:p>2022</text:p>
            <text:p>EDIBLE</text:p>
            <text:p>Warm Season</text:p>
            <text:p>6 Seeds</text:p>
            <text:p>Easy Seed Saver</text:p>
            <text:p>Germination: 5-10 days</text:p>
          </table:table-cell>
          <table:table-cell table:style-name="Default" table:number-columns-repeated="16382"/>
        </table:table-row>
        <table:table-row table:style-name="ro15">
          <table:table-cell table:style-name="ce42" office:value-type="string" calcext:value-type="string">
            <text:p>Family: MELON (Cucumis melo)</text:p>
            <text:p>Variety: Ha Ogen (aka Israel Melon meaning “Anchor”)</text:p>
            <text:p>Grown by:  Baker Creek Heirloom Seeds www.rareseeds.com</text:p>
            <text:p>Comments: Early, flavorful green flesh melon, 3-4 pound fruit, very fragrant.  Direct Sow 3-5 seeds in basin 1” deep, 12” apart with basins 5 feet apart, sprawling vine.  Or plant in rows, 1” deep, 12” apart, with rows 5 feet apart.  Full sun, 75-80 days.</text:p>
            <text:p>Soil Temp Range: 60°-100° Optimum: 90°</text:p>
          </table:table-cell>
          <table:table-cell table:style-name="ce42" office:value-type="string" calcext:value-type="string">
            <text:p>2018</text:p>
            <text:p>EDIBLE</text:p>
            <text:p>Warm Season</text:p>
            <text:p>5 Seeds</text:p>
            <text:p>Easy Seed Saver</text:p>
            <text:p>Germination: 3-4 days</text:p>
            <text:p>@ 90 degrees</text:p>
          </table:table-cell>
          <table:table-cell table:style-name="Default" table:number-columns-repeated="16382"/>
        </table:table-row>
        <table:table-row table:style-name="ro15">
          <table:table-cell office:value-type="string" calcext:value-type="string">
            <text:p>Family: MELON (Cucumis melo)</text:p>
            <text:p>Variety: Hales Best Jumbo Cantaloupe</text:p>
            <text:p>Original Seed Source: American Seed</text:p>
            <text:p>Comments: Plant 3-5 seeds in basin 1” deep 5 feet apart, sprawling vine. Full sun, 90 days, up to 5 pounds.</text:p>
          </table:table-cell>
          <table:table-cell office:value-type="string" calcext:value-type="string">
            <text:p>2022</text:p>
            <text:p>EDIBLE</text:p>
            <text:p>Warm Season</text:p>
            <text:p>6+ Seeds</text:p>
            <text:p>Easy Seed Saver</text:p>
            <text:p>Germination: 3-4 days</text:p>
          </table:table-cell>
          <table:table-cell table:style-name="Default" table:number-columns-repeated="16382"/>
        </table:table-row>
        <table:table-row table:style-name="ro15">
          <table:table-cell table:style-name="ce42" office:value-type="string" calcext:value-type="string">
            <text:p>Family: MELON (Cucumis melo)</text:p>
            <text:p>Variety: Honey Rock Cantaloupe—Heirloom</text:p>
            <text:p>Grown by:  Avalon Gardens, Tumacacori, AZ</text:p>
            <text:p>Comments: Direct Sow 3-5 seeds in basin 1” deep 3 feet apart, sprawling vine. Full sun, 75-90 days, up to 7 pounds.</text:p>
            <text:p>Soil Temp Range: 60°-100° Optimum: 90°</text:p>
          </table:table-cell>
          <table:table-cell table:style-name="ce42"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5">
          <table:table-cell office:value-type="string" calcext:value-type="string">
            <text:p>Family: MELON (Cucumis metuliferus)</text:p>
            <text:p>Variety: Kiwano, African Jelly Melon</text:p>
            <text:p>Grown By: Tammy Burcar</text:p>
            <text:p>Where Grown: Loma Linda, AZ</text:p>
            <text:p>Original Seed Source: Portal Seed Library Comments: Also called African horned cucumber/melon. Fruit has horn-like spines.  Ripe fruit has orange skin and lime</text:p>
            <text:p>green, jelly-like flesh, refreshingly fruity taste.  Likes hottest location; lots of room; fiddles around at first then goes berserk!</text:p>
            <text:p>Soil Temp Range: 60°-100° Optimum: 90°</text:p>
          </table:table-cell>
          <table:table-cell office:value-type="string" calcext:value-type="string">
            <text:p>2016</text:p>
            <text:p>EDIBLE</text:p>
            <text:p>Hot Season</text:p>
            <text:p>10+ Seeds</text:p>
            <text:p>Easy Seed Saver</text:p>
            <text:p>Germination: 3-4 days</text:p>
            <text:p>@ 90 degrees</text:p>
          </table:table-cell>
          <table:table-cell table:style-name="Default" table:number-columns-repeated="16382"/>
        </table:table-row>
        <table:table-row table:style-name="ro15">
          <table:table-cell table:style-name="ce42" office:value-type="string" calcext:value-type="string">
            <text:p>Family: MELON (Cucumis melo)</text:p>
            <text:p>Variety: Melon Mexicano</text:p>
            <text:p>Grown By: Native Seed/SEARCH Farm</text:p>
            <text:p>Where Grown: Patagonia, AZ</text:p>
            <text:p>Original Seed Source: www.nativeseeds.org</text:p>
            <text:p>Comments: Early introduction by Spaniards to SW; fruits are orange, green, or white; skin is smooth, ribbed or netted. Plant 3-5 seeds in basin 1/2” deep 24” apart, sprawling vine.</text:p>
            <text:p>Soil Temp Range: 60°-100° Optimum: 90°</text:p>
          </table:table-cell>
          <table:table-cell table:style-name="ce42"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5">
          <table:table-cell office:value-type="string" calcext:value-type="string">
            <text:p>Family: MELON (Cucumis melo)</text:p>
            <text:p>Variety: Minnesota Midget Cantaloupe</text:p>
            <text:p>Original Seed Source: Botanical Interests</text:p>
            <text:p>Comments: Plant 1-2 weeks after last frost. Make mounds 2’-3’ apart. Sow 3-5 seeds in top of mound 1/4” deep. Thin to one plant per mound. Full sun, 60-70 days.  Small sweet fruit.</text:p>
          </table:table-cell>
          <table:table-cell office:value-type="string" calcext:value-type="string">
            <text:p>2021</text:p>
            <text:p>EDIBLE</text:p>
            <text:p>Warm Season</text:p>
            <text:p>8 Seeds</text:p>
            <text:p>Easy Seed Saver</text:p>
            <text:p>Germination: 5-10 days</text:p>
          </table:table-cell>
          <table:table-cell table:style-name="Default" table:number-columns-repeated="16382"/>
        </table:table-row>
        <table:table-row table:style-name="ro15">
          <table:table-cell table:style-name="ce42" office:value-type="string" calcext:value-type="string">
            <text:p>Family: Melon - Muskmelon (Cucumis melo var. flexousus)</text:p>
            <text:p>Variety: Armenian Long</text:p>
            <text:p>Comments: Closely related to the cucumber that tastes and looks somewhat like a pale cucumber. Plant 1/2” deep in hills 12-24”  apart. Fruit can grow up to 24 inches long but is best if harvested at about 12 inches.</text:p>
          </table:table-cell>
          <table:table-cell table:style-name="ce42" office:value-type="string" calcext:value-type="string">
            <text:p>2020</text:p>
            <text:p>EDIBLE</text:p>
            <text:p>Warm Season</text:p>
            <text:p>10 Seeds</text:p>
            <text:p>Intermediate Seed Saver</text:p>
            <text:p>Germination: 4 to 6 days</text:p>
          </table:table-cell>
          <table:table-cell table:style-name="Default" table:number-columns-repeated="16382"/>
        </table:table-row>
        <table:table-row table:style-name="ro15">
          <table:table-cell office:value-type="string" calcext:value-type="string">
            <text:p>Family: MELON (Cucumis melo)</text:p>
            <text:p>Variety: Origami Cantaloupe</text:p>
            <text:p>Grown By:  Mary Jackson</text:p>
            <text:p>Original Seed Source: Legend Farms</text:p>
            <text:p>Comments: Plant 3-5 seeds in basin 1” deep 5 feet apart, sprawling vine. Full sun, 90 days.  Thin rind, aromatic, small seed cavity, strong grower, #1 requested melon from Legend Farms.</text:p>
            <text:p>Soil Temp Range: 60°-100° Optimum: 90°</text:p>
          </table:table-cell>
          <table:table-cell office:value-type="string" calcext:value-type="string">
            <text:p>2017</text:p>
            <text:p>EDIBLE</text:p>
            <text:p>Warm Season</text:p>
            <text:p>10 Seeds</text:p>
            <text:p>Easy Seed Saver</text:p>
            <text:p>Germination: 3-4 days</text:p>
            <text:p>@ 90 degrees</text:p>
          </table:table-cell>
          <table:table-cell table:style-name="Default" table:number-columns-repeated="16382"/>
        </table:table-row>
        <table:table-row table:style-name="ro15">
          <table:table-cell table:style-name="ce42" office:value-type="string" calcext:value-type="string">
            <text:p>Family:   Microgreens Basil (Ocimum basilicum)</text:p>
            <text:p>Variety: Ciao Bella Basil Blend</text:p>
            <text:p>Original Seed Source: Botanical Interests</text:p>
            <text:p>Comments: Sow in shallow trays or flats filled 1”-2” deep with fine, seed-starting mix. Broadcast seed thickly, about 1/4”-1/2” apart. Press seeds firmly into soil mix and barely cover with sowing mix. Move</text:p>
            <text:p>containers as need for best light exposure. Harvest about 16-25 days after sowing.</text:p>
          </table:table-cell>
          <table:table-cell table:style-name="ce42" office:value-type="string" calcext:value-type="string">
            <text:p>2022</text:p>
            <text:p>EDIBLE</text:p>
            <text:p>All Season</text:p>
            <text:p>20 Seeds</text:p>
            <text:p>Intermediate Seed Saver</text:p>
            <text:p>Germination: 5-10 days</text:p>
            <text:p>Soil Temp:</text:p>
            <text:p>65-75 degrees</text:p>
          </table:table-cell>
          <table:table-cell table:style-name="Default" table:number-columns-repeated="16382"/>
        </table:table-row>
        <table:table-row table:style-name="ro15">
          <table:table-cell office:value-type="string" calcext:value-type="string">
            <text:p>Family:   Microgreens Beet (Beta vulgaris)</text:p>
            <text:p>Variety: Early Wonder</text:p>
            <text:p>Original Seed Source: Botanical Interests</text:p>
            <text:p>Comments: Sow in shallow trays or flats filled 1”-2” deep with fine, seed-starting mix. Broadcast seed  thickly, about 1/2” apart. Press seeds firmly into soil mix and cover about 1/2” with sowing mix. Move containers</text:p>
            <text:p>as need for best light exposure. Harvest about 15-25 days after sowing.</text:p>
          </table:table-cell>
          <table:table-cell office:value-type="string" calcext:value-type="string">
            <text:p>2022</text:p>
            <text:p>EDIBLE</text:p>
            <text:p>All Season</text:p>
            <text:p>50 Seeds</text:p>
            <text:p>Intermediate Seed Saver</text:p>
            <text:p>Germination: 5-8 days</text:p>
            <text:p>Soil Temp:</text:p>
            <text:p>65-75 degrees</text:p>
          </table:table-cell>
          <table:table-cell table:style-name="Default" table:number-columns-repeated="16382"/>
        </table:table-row>
        <table:table-row table:style-name="ro15">
          <table:table-cell table:style-name="ce42" office:value-type="string" calcext:value-type="string">
            <text:p>Family: Microgreen CHARD (Beta vulgaris)</text:p>
            <text:p>Variety: Rainbow Blend Original Seed Source: Johnny’s Seed Comments: Sow in shallow trays or flats. Broadcast seed thickly, about 1/8”-1/4” apartPress seeds firmly into soil mix and cover lightly with sowing mix, vermiculite or dome.</text:p>
            <text:p>Soil Temp:  Range:  60-75 degrees Optimum: 75 degrees</text:p>
          </table:table-cell>
          <table:table-cell table:style-name="ce42" office:value-type="string" calcext:value-type="string">
            <text:p>2017</text:p>
            <text:p>EDIBLE</text:p>
            <text:p>All Season</text:p>
            <text:p>100+ Seeds</text:p>
            <text:p>Intermediate Seed Saver</text:p>
            <text:p>Germination:</text:p>
            <text:p>4-5 days @ 75 degrees, Then reduced to 60 degrees</text:p>
          </table:table-cell>
          <table:table-cell table:style-name="Default" table:number-columns-repeated="16382"/>
        </table:table-row>
        <table:table-row table:style-name="ro15">
          <table:table-cell office:value-type="string" calcext:value-type="string">
            <text:p>Family: Microgreens Chicory (Cichorium endivia, C. intybus)</text:p>
            <text:p>Variety: Italian Amaro Blend</text:p>
            <text:p>Original Seed Source: Botanical Interests</text:p>
            <text:p>Comments: Sow in shallow trays or flats filled 1”-2” deep with fine, seed-starting mix. Broadcast seed  thickly, about 1/2” apart. Press seeds firmly into soil mix and cover about 1/2” with sowing mix. Move containers</text:p>
            <text:p>as need for best light exposure. Harvest about 15-25 days after sowing.</text:p>
          </table:table-cell>
          <table:table-cell office:value-type="string" calcext:value-type="string">
            <text:p>2020</text:p>
            <text:p>EDIBLE</text:p>
            <text:p>All Season</text:p>
            <text:p>50-100 Seeds</text:p>
            <text:p>Intermediate Seed Saver</text:p>
            <text:p>Germination: 7-10 days</text:p>
            <text:p>Soil Temp:</text:p>
            <text:p>65-75 degrees</text:p>
          </table:table-cell>
          <table:table-cell table:style-name="Default" table:number-columns-repeated="16382"/>
        </table:table-row>
        <table:table-row table:style-name="ro15">
          <table:table-cell table:style-name="ce42" office:value-type="string" calcext:value-type="string">
            <text:p>Family: Microgreens  (Halian Amaro Blends)</text:p>
            <text:p>Variety: Amaro Blend</text:p>
            <text:p>Original Seed Source: Botanical Interests</text:p>
            <text:p>Comments: Sow in shallow trays or flats filled 1”-2” deep with fine, seed-starting mix. Broadcast</text:p>
            <text:p>seed thickly, about 1/2” apart. Press seeds firmly into soil mix and cover about 1/8” with sowing mix.</text:p>
            <text:p>Move containers as need for best light exposure. Harvest about 10-15 days after sowing.</text:p>
          </table:table-cell>
          <table:table-cell table:style-name="ce42" office:value-type="string" calcext:value-type="string">
            <text:p>2022</text:p>
            <text:p>EDIBLE</text:p>
            <text:p>All Season</text:p>
            <text:p>Various Seeds</text:p>
            <text:p>Intermediate Seed Saver</text:p>
            <text:p>Germination: 3-4 days</text:p>
          </table:table-cell>
          <table:table-cell table:style-name="Default" table:number-columns-repeated="16382"/>
        </table:table-row>
        <table:table-row table:style-name="ro15">
          <table:table-cell office:value-type="string" calcext:value-type="string">
            <text:p>Family: Microgreen HERB, MINT  (Menthe piperta)</text:p>
            <text:p>Variety: Peppermint</text:p>
            <text:p>Original Seed Source: Sunnizona Family Farms</text:p>
            <text:p>Comments: Sow in shallow trays or flats. Broadcast seed thickly, about 1/8”-1/4” apart. Press seeds firmly</text:p>
            <text:p>into soil but do not cover except with clear dome as seed need light to germinate.</text:p>
          </table:table-cell>
          <table:table-cell office:value-type="string" calcext:value-type="string">
            <text:p>2017</text:p>
            <text:p>EDIBLE</text:p>
            <text:p>All Season</text:p>
            <text:p>100+ Seeds</text:p>
            <text:p>Advanced Seed Saver</text:p>
          </table:table-cell>
          <table:table-cell table:style-name="Default" table:number-columns-repeated="16382"/>
        </table:table-row>
        <table:table-row table:style-name="ro15">
          <table:table-cell table:style-name="ce42" office:value-type="string" calcext:value-type="string">
            <text:p>Family: Microgreen (Brassica, assorted species)</text:p>
            <text:p>Variety: Mellow Blend Original Seed Source: Botanical Interests</text:p>
            <text:p>Comments: Sow in shallow trays or flats with 1”-2” of fine seed starting mix. Broadcast seed thickly, about 1/8”-1/4” apart. Press seeds firmly into soil mix and cover lightly with sowing mix, vermiculite or dome.</text:p>
          </table:table-cell>
          <table:table-cell table:style-name="ce42" office:value-type="string" calcext:value-type="string">
            <text:p>2022</text:p>
            <text:p>EDIBLE</text:p>
            <text:p>All Season</text:p>
            <text:p>Various Seeds</text:p>
            <text:p>Intermediate Seed Saver</text:p>
          </table:table-cell>
          <table:table-cell table:style-name="Default" table:number-columns-repeated="16382"/>
        </table:table-row>
        <table:table-row table:style-name="ro15">
          <table:table-cell office:value-type="string" calcext:value-type="string">
            <text:p>Family: Microgreens Sunflower (Helianthus annuus)</text:p>
            <text:p>Original Seed Source: Botanical Interests</text:p>
            <text:p>Comments: Sow in shallow trays or flats filled 1”-2” deep with fine, seed-starting mix. Broadcast seed thickly, about 1/2”-1” apart. Press seeds firmly into soil mix and cover about 1/8”-1/4” with sowing mix. Move</text:p>
            <text:p>containers as need for best light exposure. Harvest about 10-20 days after sowing.</text:p>
          </table:table-cell>
          <table:table-cell office:value-type="string" calcext:value-type="string">
            <text:p>2022</text:p>
            <text:p>EDIBLE</text:p>
            <text:p>All Season</text:p>
            <text:p>25-50 Seeds</text:p>
            <text:p>Intermediate Seed Saver</text:p>
            <text:p>Germination: 5-12 days</text:p>
            <text:p>Soil Temp:</text:p>
            <text:p>65-75 degrees</text:p>
          </table:table-cell>
          <table:table-cell table:style-name="Default" table:number-columns-repeated="16382"/>
        </table:table-row>
        <table:table-row table:style-name="ro15">
          <table:table-cell table:style-name="ce42" office:value-type="string" calcext:value-type="string">
            <text:p>Family: Microgreens  (Brassica assorted species)</text:p>
            <text:p>Variety: Unami Asian Blend</text:p>
            <text:p>Original Seed Source: Botanical Interests</text:p>
            <text:p>Comments: Sow in shallow trays or flats filled 1”-2” deep with fine, seed-starting mix. Broadcast seed  thickly, about 1/2” apart. Press seeds firmly into soil mix and cover about 1/8” with sowing mix. Move containers</text:p>
            <text:p>as need for best light exposure. Harvest about 10-15 days after sowing.</text:p>
          </table:table-cell>
          <table:table-cell table:style-name="ce42" office:value-type="string" calcext:value-type="string">
            <text:p>2022</text:p>
            <text:p>EDIBLE</text:p>
            <text:p>All Season</text:p>
            <text:p>Various Seeds</text:p>
            <text:p>Intermediate Seed Saver</text:p>
            <text:p>Germination: 3-4 days</text:p>
          </table:table-cell>
          <table:table-cell table:style-name="Default" table:number-columns-repeated="16382"/>
        </table:table-row>
        <table:table-row table:style-name="ro15">
          <table:table-cell office:value-type="string" calcext:value-type="string">
            <text:p>Family: MUSTARD (Brassica juncea)</text:p>
            <text:p>Variety: Florida Broadleaf</text:p>
            <text:p>Original Source: Botanical Interests</text:p>
            <text:p>Comments: Direct sow 1/4” depth. Thin to 18” apart. Leaves can grow very large but are best harvested when young and tender.</text:p>
          </table:table-cell>
          <table:table-cell office:value-type="string" calcext:value-type="string">
            <text:p>2024</text:p>
            <text:p>EDIBLE</text:p>
            <text:p>Cool</text:p>
            <text:p>10+ Seeds</text:p>
            <text:p>Advanced Seed Saver</text:p>
            <text:p>Germination: 5-10 days</text:p>
          </table:table-cell>
          <table:table-cell table:style-name="Default" table:number-columns-repeated="16382"/>
        </table:table-row>
        <table:table-row table:style-name="ro15">
          <table:table-cell table:style-name="ce42" office:value-type="string" calcext:value-type="string">
            <text:p>Family: Mustard (Brassica rapa)</text:p>
            <text:p>Variety: MIZUNA</text:p>
            <text:p>Original Seed Source: Botanical Interests</text:p>
            <text:p>Comments: Plant 1/4” deep about 15 seeds per foot in cool season. Does not require thinning. Harvest individual leaves or cut bunches to add to salads or use in stir fry.</text:p>
          </table:table-cell>
          <table:table-cell table:style-name="ce42" office:value-type="string" calcext:value-type="string">
            <text:p>2022</text:p>
            <text:p>EDIBLE</text:p>
            <text:p>Cool Season</text:p>
            <text:p>20 Seeds</text:p>
            <text:p>Intermediate Seed Saver</text:p>
          </table:table-cell>
          <table:table-cell table:style-name="Default" table:number-columns-repeated="16382"/>
        </table:table-row>
        <table:table-row table:style-name="ro15">
          <table:table-cell office:value-type="string" calcext:value-type="string">
            <text:p>Family: MUSTARD (Brassica juncea)</text:p>
            <text:p>Variety: Red Giant</text:p>
            <text:p>Original Seed Source: Botanical Interests</text:p>
            <text:p>Comments: Direct sow 1/4” depth. Thin to 18” apart. Leaves can grow very large but are best harvested when young and tender.</text:p>
          </table:table-cell>
          <table:table-cell office:value-type="string" calcext:value-type="string">
            <text:p>2024</text:p>
            <text:p>EDIBLE</text:p>
            <text:p>Cool</text:p>
            <text:p>15-20 Seeds</text:p>
            <text:p>Advanced Seed Saver</text:p>
            <text:p>Germination: 3-4 days</text:p>
          </table:table-cell>
          <table:table-cell table:style-name="Default" table:number-columns-repeated="16382"/>
        </table:table-row>
        <table:table-row table:style-name="ro15">
          <table:table-cell table:style-name="ce42" office:value-type="string" calcext:value-type="string">
            <text:p>Family: MUSTARD (Brassica juncea)</text:p>
            <text:p>Variety: Tatsoi—Heirloom</text:p>
            <text:p>Grown by:  Native Seed/SEARCH</text:p>
            <text:p>Original Seed Source: www.nativeseeds.org Comments: Also called Spoon Mustard; small dark green spoon-shaped leaves best eaten raw in a mixed salad.  Grow as you would lettuce.  Direct sow; full sun, broadcast or rake in at</text:p>
            <text:p>1/4” depth. Thin to 6” apart. 40-60 days. Will cross with other mustards.</text:p>
            <text:p>Soil Temp Range: 35°-85° Optimum: 75°</text:p>
          </table:table-cell>
          <table:table-cell table:style-name="ce42" office:value-type="string" calcext:value-type="string">
            <text:p>2017</text:p>
            <text:p>EDIBLE</text:p>
            <text:p>Cool</text:p>
            <text:p>20+ Seeds</text:p>
            <text:p>Advanced Seed Saver</text:p>
            <text:p>Germination: 3-4 days</text:p>
            <text:p>@ 75 degrees</text:p>
          </table:table-cell>
          <table:table-cell table:style-name="Default" table:number-columns-repeated="16382"/>
        </table:table-row>
        <table:table-row table:style-name="ro15">
          <table:table-cell office:value-type="string" calcext:value-type="string">
            <text:p>Family:  OKRA (Abelmoschus esculentus)</text:p>
            <text:p>Comments: Beautiful plants grow 7-8 ft tall; pods are long and slim. Soak seeds 24 hrs to improve germination. Direct sow 1” deep 2 weeks after last frost or start indoors in containers 2-4 weeks before setting</text:p>
            <text:p>out.  One plant per square foot.  Harvest daily in hot weather.</text:p>
          </table:table-cell>
          <table:table-cell office:value-type="string" calcext:value-type="string">
            <text:p>2019</text:p>
            <text:p>EDIBLE</text:p>
            <text:p>Warm Season</text:p>
            <text:p>10+ Seeds</text:p>
            <text:p>Easy Seed Saver</text:p>
            <text:p>Germination: 6 days</text:p>
          </table:table-cell>
          <table:table-cell table:style-name="Default" table:number-columns-repeated="16382"/>
        </table:table-row>
        <table:table-row table:style-name="ro15">
          <table:table-cell table:style-name="ce42" office:value-type="string" calcext:value-type="string">
            <text:p>Family:  OKRA (Abelmoschus esculentus)</text:p>
            <text:p>Variety:  Clemson Spineless</text:p>
            <text:p>Original Source: Ferry-Morse</text:p>
            <text:p>Comments: Soak 24 hrs before planting, direct sow or start indoors 3/4” deep and 18” apart.</text:p>
            <text:p>Harvest pods 2-4” long daily, as they grow quickly past stage of prime eating.</text:p>
          </table:table-cell>
          <table:table-cell table:style-name="ce42" office:value-type="string" calcext:value-type="string">
            <text:p>2023</text:p>
            <text:p>EDIBLE</text:p>
            <text:p>Warm Season</text:p>
            <text:p>10 Seeds</text:p>
            <text:p>Easy Seed Saver</text:p>
          </table:table-cell>
          <table:table-cell table:style-name="Default" table:number-columns-repeated="16382"/>
        </table:table-row>
        <table:table-row table:style-name="ro15">
          <table:table-cell office:value-type="string" calcext:value-type="string">
            <text:p>Family:  OKRA (Abelmoschus esculentus)</text:p>
            <text:p>Variety:  Emerald</text:p>
            <text:p>Original Seed Source: Ferry Morse</text:p>
            <text:p>Comments: Soak 24 hrs before planting, direct sow or start indoors. Plant 3/4” deep about 3 feet apart. Harvest pods 2-4” long daily, as they grow quickly past stage of prime eating.</text:p>
          </table:table-cell>
          <table:table-cell office:value-type="string" calcext:value-type="string">
            <text:p>2023</text:p>
            <text:p>EDIBLE</text:p>
            <text:p>Warm Season</text:p>
            <text:p>10</text:p>
            <text:p>Seeds</text:p>
            <text:p>Easy Seed Saver</text:p>
          </table:table-cell>
          <table:table-cell table:style-name="Default" table:number-columns-repeated="16382"/>
        </table:table-row>
        <table:table-row table:style-name="ro15">
          <table:table-cell table:style-name="ce42" office:value-type="string" calcext:value-type="string">
            <text:p>Family:  OKRA (Abelmoschus esculentus)</text:p>
            <text:p>Variety:  Jambalaya</text:p>
            <text:p>Original Seed Source: Renee’s Garden</text:p>
            <text:p>Comments: Soak 24 hrs before planting, direct sow or start indoors. Plant 3/4” deep about 3 feet apart. Harvest pods 2-4” long daily, as they grow quickly past stage of prime eating.</text:p>
          </table:table-cell>
          <table:table-cell table:style-name="ce42" office:value-type="string" calcext:value-type="string">
            <text:p>2023</text:p>
            <text:p>EDIBLE</text:p>
            <text:p>Warm Season</text:p>
            <text:p>5 Seeds</text:p>
            <text:p>Easy Seed Saver</text:p>
          </table:table-cell>
          <table:table-cell table:style-name="Default" table:number-columns-repeated="16382"/>
        </table:table-row>
        <table:table-row table:style-name="ro15">
          <table:table-cell office:value-type="string" calcext:value-type="string">
            <text:p>Family:  OKRA (Abelmoschus esculentus)</text:p>
            <text:p>Variety: Red Burgundy</text:p>
            <text:p>Original Source: Botanical Interests</text:p>
            <text:p>Comments: Beautiful plants grow 7-8 ft tall; pods are long and slim. Soak seeds 24 hrs to improve germination. Direct sow 1” deep 2 weeks after last frost or start indoors in containers 2-4 weeks before setting</text:p>
            <text:p>out.  One plant per square foot.  Harvest daily in hot weather.</text:p>
          </table:table-cell>
          <table:table-cell office:value-type="string" calcext:value-type="string">
            <text:p>2023</text:p>
            <text:p>EDIBLE</text:p>
            <text:p>Warm Season</text:p>
            <text:p>10+ Seeds</text:p>
            <text:p>Easy Seed Saver</text:p>
            <text:p>Germination: 6 days</text:p>
          </table:table-cell>
          <table:table-cell table:style-name="Default" table:number-columns-repeated="16382"/>
        </table:table-row>
        <table:table-row table:style-name="ro15">
          <table:table-cell table:style-name="ce42" office:value-type="string" calcext:value-type="string">
            <text:p>Family:  OKRA (Abelmoschus esculentus)</text:p>
            <text:p>Variety:  Star of David Grown By: Winnie Struse</text:p>
            <text:p>Comments: Israeli variety, short, very thick delicious pods, twice as fat around as most okra. Soak 24 hrs before planting, direct sow or start indoors. Harvest pods daily, as they grow</text:p>
            <text:p>quickly past stage of prime eating.</text:p>
          </table:table-cell>
          <table:table-cell table:style-name="ce42" office:value-type="string" calcext:value-type="string">
            <text:p>2021</text:p>
            <text:p>EDIBLE</text:p>
            <text:p>Warm Season</text:p>
            <text:p>20+ Seeds</text:p>
            <text:p>Easy Seed Saver</text:p>
            <text:p>Germination:</text:p>
          </table:table-cell>
          <table:table-cell table:style-name="Default" table:number-columns-repeated="16382"/>
        </table:table-row>
        <table:table-row table:style-name="ro15">
          <table:table-cell office:value-type="string" calcext:value-type="string">
            <text:p>Family: ONION (Allium cepa)</text:p>
            <text:p>Variety: Red Amposta</text:p>
            <text:p>Original Seed Source: Botanical Interests</text:p>
            <text:p>Comments: Start indoors 10-12 weeks before last frost, 1/4” deep in moist soil. Transplant outdoors 4-6 weeks before</text:p>
            <text:p>last frost, 6” apart, full sun. 115 days to harvest.</text:p>
          </table:table-cell>
          <table:table-cell office:value-type="string" calcext:value-type="string">
            <text:p>2024</text:p>
            <text:p>EDIBLE</text:p>
            <text:p>Warm Season</text:p>
            <text:p>10+ Seeds</text:p>
            <text:p>Advanced Seed Saver</text:p>
            <text:p>Germination: 7-15 days</text:p>
          </table:table-cell>
          <table:table-cell table:style-name="Default" table:number-columns-repeated="16382"/>
        </table:table-row>
        <table:table-row table:style-name="ro15">
          <table:table-cell table:style-name="ce42" office:value-type="string" calcext:value-type="string">
            <text:p>Family: ONION (Allium cepa)</text:p>
            <text:p>Variety: White Lisbon Bunching</text:p>
            <text:p>Original Seed Source: Ferry Morse</text:p>
            <text:p>Comments: Start indoors 10-12 weeks before last frost, 1/4” deep in moist soil. Transplant outdoors 4-6 weeks before last frost, 6” apart, 2 inches deep, full sun. 60-110 days to</text:p>
            <text:p>harvest.</text:p>
          </table:table-cell>
          <table:table-cell table:style-name="ce42" office:value-type="string" calcext:value-type="string">
            <text:p>2023</text:p>
            <text:p>EDIBLE</text:p>
            <text:p>Warm Season</text:p>
            <text:p>8 +</text:p>
            <text:p>Seeds</text:p>
            <text:p>Advanced Seed Saver</text:p>
            <text:p>Germination: 7-15 days</text:p>
          </table:table-cell>
          <table:table-cell table:style-name="Default" table:number-columns-repeated="16382"/>
        </table:table-row>
        <table:table-row table:style-name="ro15">
          <table:table-cell office:value-type="string" calcext:value-type="string">
            <text:p>Family: ONION Italian(Allium cepa)</text:p>
            <text:p>Variety: Yellow Granex PRR (Sweet Onion)</text:p>
            <text:p>Original Seed Source: Botanical Interests</text:p>
            <text:p>Comments: Start indoors 10-12 weeks before first frost, 1/4” deep in moist soil. Transplant outdoors 4-6 weeks before first frost, 4-6” apart, full sun. 110-160 days to harvest.</text:p>
          </table:table-cell>
          <table:table-cell office:value-type="string" calcext:value-type="string">
            <text:p>2024</text:p>
            <text:p>EDIBLE</text:p>
            <text:p>Cool Season</text:p>
            <text:p>10-15 Seeds</text:p>
            <text:p>HYBRID</text:p>
            <text:p>Do not save seeds</text:p>
            <text:p>Germination: 7-15 days</text:p>
          </table:table-cell>
          <table:table-cell table:style-name="Default" table:number-columns-repeated="16382"/>
        </table:table-row>
        <table:table-row table:style-name="ro15">
          <table:table-cell table:style-name="ce42" office:value-type="string" calcext:value-type="string">
            <text:p>Family: ONION (Allium cepa)</text:p>
            <text:p>Variety: Yellow Sweet Spanish</text:p>
            <text:p>Seed Source: Ferry Morse</text:p>
            <text:p>Comments: Start indoors, 1/2” deep, 4-6 weeks before transplant; plant outdoors 6” apart, full sun; uncover most of bulb to form. 110 days; biennial seed stalk.</text:p>
          </table:table-cell>
          <table:table-cell table:style-name="ce42" office:value-type="string" calcext:value-type="string">
            <text:p>2024</text:p>
            <text:p>EDIBLE</text:p>
            <text:p>Cool Season</text:p>
            <text:p>25 Seeds</text:p>
            <text:p>Advanced Seed Saver</text:p>
            <text:p>Germination: 4-5 days</text:p>
          </table:table-cell>
          <table:table-cell table:style-name="Default" table:number-columns-repeated="16382"/>
        </table:table-row>
        <table:table-row table:style-name="ro15">
          <table:table-cell office:value-type="string" calcext:value-type="string">
            <text:p>Family: ONION Italian(Allium cepa)</text:p>
            <text:p>Variety: Yellow of Parma</text:p>
            <text:p>Original Seed Source: Botanical Interests</text:p>
            <text:p>Comments: Start indoors 10-12 weeks before last frost, 1/4” deep in moist soil. Transplant outdoors 4-6 weeks before</text:p>
            <text:p>last frost, 6” apart, full sun. 110 days to harvest.</text:p>
          </table:table-cell>
          <table:table-cell office:value-type="string" calcext:value-type="string">
            <text:p>2021</text:p>
            <text:p>EDIBLE</text:p>
            <text:p>Warm Season</text:p>
            <text:p>12+ Seeds</text:p>
            <text:p>Advanced Seed Saver</text:p>
            <text:p>Germination: 7-15 days</text:p>
          </table:table-cell>
          <table:table-cell table:style-name="Default" table:number-columns-repeated="16382"/>
        </table:table-row>
        <table:table-row table:style-name="ro15">
          <table:table-cell table:style-name="ce42" office:value-type="string" calcext:value-type="string">
            <text:p>Family: PARSNIP (Pastinaca sativa)</text:p>
            <text:p>Variety: Turga</text:p>
            <text:p>Original Seed Source: Botanical Interests</text:p>
            <text:p>Comments: Sow late spring or early summer, about 4 months before first fall frost and wait until after first frost to harvest. For spring harvest, sow in fall. Plant seeds 1/2” deep 3” apart. Matures 100-110 days. To hasten</text:p>
            <text:p>germination, soak seeds 12-24 hours before planting.</text:p>
          </table:table-cell>
          <table:table-cell table:style-name="ce42" office:value-type="string" calcext:value-type="string">
            <text:p>2021</text:p>
            <text:p>EDIBLE</text:p>
            <text:p>Cool Season</text:p>
            <text:p>8+ Seeds</text:p>
            <text:p>Advanced Seed Saver</text:p>
            <text:p>Germination: 10 to 15 days</text:p>
          </table:table-cell>
          <table:table-cell table:style-name="Default" table:number-columns-repeated="16382"/>
        </table:table-row>
        <table:table-row table:style-name="ro15">
          <table:table-cell office:value-type="string" calcext:value-type="string">
            <text:p>Family: PEA (Pisum sativum)</text:p>
            <text:p>Variety: Alaska (Shell Pea)</text:p>
            <text:p>Original Seed Source: americanseedco.com Comments: Direct sow outdoors; young plants can tolerate a light frost.  Plant 1” deep, 2” apart, trellis. Keep weed free. Pick when seeds have enlarged in pod; hold vines when picking to prevent damage to vine.  Early harvest; cold resistant; 55-60 days</text:p>
            <text:p>Soil Temp Range: 40°-85° Optimum: 75°</text:p>
          </table:table-cell>
          <table:table-cell office:value-type="string" calcext:value-type="string">
            <text:p>2016</text:p>
            <text:p>EDIBLE</text:p>
            <text:p>Cool Season</text:p>
            <text:p>10 Seeds</text:p>
            <text:p>Easy Seed Saver</text:p>
            <text:p>Germination: 6-7 days</text:p>
            <text:p>@ 75 degrees</text:p>
          </table:table-cell>
          <table:table-cell table:style-name="Default" table:number-columns-repeated="16382"/>
        </table:table-row>
        <table:table-row table:style-name="ro15">
          <table:table-cell table:style-name="ce42" office:value-type="string" calcext:value-type="string">
            <text:p>Family: PEA (Pisum stivum)</text:p>
            <text:p>Variety: Cumpas Green</text:p>
            <text:p>Grown By: Native Seed/SEARCH Farm</text:p>
            <text:p>Where Grown: Patagonia, AZ</text:p>
            <text:p>Original Seed Source: www.nativeseeds.org Comments: Introduced by Spanish; seed is eaten green or dried for soups or cooked beans.  Plant 1/2” deep, 6” apart and trellis.</text:p>
            <text:p>Soil Temp: Range: 40—85 degrees Opt. 85</text:p>
          </table:table-cell>
          <table:table-cell table:style-name="ce42" office:value-type="string" calcext:value-type="string">
            <text:p>2016</text:p>
            <text:p>EDIBLE</text:p>
            <text:p>Cool Season</text:p>
            <text:p>10 Seeds</text:p>
            <text:p>Easy Seed Saver</text:p>
            <text:p>5-6 days</text:p>
            <text:p>@ 85 degrees</text:p>
          </table:table-cell>
          <table:table-cell table:style-name="Default" table:number-columns-repeated="16382"/>
        </table:table-row>
        <table:table-row table:style-name="ro15">
          <table:table-cell office:value-type="string" calcext:value-type="string">
            <text:p>Family: PEA (Pisum sativum)</text:p>
            <text:p>Variety: Iona (Shelling Petite) - Short Pole (28”)</text:p>
            <text:p>Original Seed Source: Botanical Interests</text:p>
            <text:p>Comments: Direct sow outdoors; young plants can tolerate a light frost.  Plant 1” deep, 4-6” apart. Sweet, dependable, small pods, 68 days.  Easy to grow; freeze well.</text:p>
          </table:table-cell>
          <table:table-cell office:value-type="string" calcext:value-type="string">
            <text:p>2024</text:p>
            <text:p>EDIBLE</text:p>
            <text:p>Cool Season</text:p>
            <text:p>Various Seeds</text:p>
            <text:p>Easy Seed Saver</text:p>
            <text:p>Germination: 7-10 days</text:p>
          </table:table-cell>
          <table:table-cell table:style-name="Default" table:number-columns-repeated="16382"/>
        </table:table-row>
        <table:table-row table:style-name="ro15">
          <table:table-cell table:style-name="ce42" office:value-type="string" calcext:value-type="string">
            <text:p>Family: PEA (Pisum sativum)</text:p>
            <text:p>Variety: Lincoln (Shell Pea)</text:p>
            <text:p>Original Seed Source: www.survivalseeds4patriots.com Seed Vault Comments: Direct sow outdoors; young plants can tolerate a light frost.  Plant 1” deep, 2” apart, trellis. Keep weed free. Pick when seeds have enlarged in pod; hold vines when picking to prevent damage to vine.  4-5” pods, 67 days</text:p>
            <text:p>Soil Temp Range: 40°-85° Optimum: 75°</text:p>
          </table:table-cell>
          <table:table-cell table:style-name="ce42" office:value-type="string" calcext:value-type="string">
            <text:p>2014</text:p>
            <text:p>EDIBLE</text:p>
            <text:p>Cool Season</text:p>
            <text:p>10 Seeds</text:p>
            <text:p>Easy Seed Saver</text:p>
            <text:p>Germination: 6-7 days</text:p>
            <text:p>@ 75 degrees</text:p>
          </table:table-cell>
          <table:table-cell table:style-name="Default" table:number-columns-repeated="16382"/>
        </table:table-row>
        <table:table-row table:style-name="ro15">
          <table:table-cell office:value-type="string" calcext:value-type="string">
            <text:p>Family: PEA (Pisum sativum)</text:p>
            <text:p>Variety: Little Marvel (Shell Pea) - Bush Type</text:p>
            <text:p>Original Seed Source: Lilly Miller Seeds Comments: Direct sow outdoors; young plants can tolerate a light frost.  Plant 1” deep, 4-6” apart. Keep weed free.  Pick when seeds have enlarged in pod; hold vines when</text:p>
            <text:p>picking to prevent damage to vine. Sweet, dependable, dwarf vines (14”); 3” pods, 63 days.  Easy to grow; freeze well.</text:p>
            <text:p>Soil Temp Range: 40°-85° Optimum: 75°</text:p>
          </table:table-cell>
          <table:table-cell office:value-type="string" calcext:value-type="string">
            <text:p>2016</text:p>
            <text:p>EDIBLE</text:p>
            <text:p>Cool Season</text:p>
            <text:p>8+ Seeds</text:p>
            <text:p>Easy Seed Saver</text:p>
            <text:p>Germination: 7-10 days</text:p>
            <text:p>@ 75 degrees</text:p>
          </table:table-cell>
          <table:table-cell table:style-name="Default" table:number-columns-repeated="16382"/>
        </table:table-row>
        <table:table-row table:style-name="ro15">
          <table:table-cell table:style-name="ce42" office:value-type="string" calcext:value-type="string">
            <text:p>Family: PEA (Pisum sativum)</text:p>
            <text:p>Variety: Oregon Sugar Pod II(Snow Pea) Bush</text:p>
            <text:p>Original Seed Source: Botanical Interests</text:p>
            <text:p>Comments: Direct sow outdoors; young plants can tolerate a light frost and harder frosts with frost cover.</text:p>
            <text:p>Plant 1/2”-1” deep, 4”-6” apart in full sun. Keep weed free.  Early harvest; cold resistant; 65 days; 4”-5” pods.</text:p>
          </table:table-cell>
          <table:table-cell table:style-name="ce42" office:value-type="string" calcext:value-type="string">
            <text:p>2023</text:p>
            <text:p>EDIBLE</text:p>
            <text:p>Cool Season</text:p>
            <text:p>8+ Seeds</text:p>
            <text:p>Easy Seed Saver</text:p>
            <text:p>Germination: 6-7 days</text:p>
          </table:table-cell>
          <table:table-cell table:style-name="Default" table:number-columns-repeated="16382"/>
        </table:table-row>
        <table:table-row table:style-name="ro15">
          <table:table-cell office:value-type="string" calcext:value-type="string">
            <text:p>Family: PEA (Pisum sativum)</text:p>
            <text:p>Variety: Progress #9(Shelling Pea)</text:p>
            <text:p>Original Seed Source: Botanical Interests</text:p>
            <text:p>Comments: Direct sow outdoors; young plants can tolerate a light frost.  Plant 1” deep, 2” apart, plants are about 18” so do not need trellis. Pick when seeds have enlarged in pod; hold vines when picking to prevent damage to vine.  5” pods, 58 days.</text:p>
          </table:table-cell>
          <table:table-cell office:value-type="string" calcext:value-type="string">
            <text:p>2022</text:p>
            <text:p>EDIBLE</text:p>
            <text:p>Cool Season</text:p>
            <text:p>6+ Seeds</text:p>
            <text:p>Easy Seed Saver</text:p>
            <text:p>Germination: 5-10 days</text:p>
          </table:table-cell>
          <table:table-cell table:style-name="Default" table:number-columns-repeated="16382"/>
        </table:table-row>
        <table:table-row table:style-name="ro15">
          <table:table-cell table:style-name="ce42" office:value-type="string" calcext:value-type="string">
            <text:p>Family: PEA (Pisum sativum)</text:p>
            <text:p>Variety: Shell Pea</text:p>
            <text:p>Comments: Direct sow outdoors; young plants can tolerate a light frost. Will tolerate harder frosts with frost cover.  Plant 1” deep, 2” apart, trellis. Keep weed free.  Pick when seeds have enlarged in pod; hold vines when</text:p>
            <text:p>picking to prevent damage to vine.  4-5” pods, 67 days</text:p>
          </table:table-cell>
          <table:table-cell table:style-name="ce42" office:value-type="string" calcext:value-type="string">
            <text:p>2022</text:p>
            <text:p>EDIBLE</text:p>
            <text:p>Cool Season</text:p>
            <text:p>10 Seeds</text:p>
            <text:p>Easy Seed Saver</text:p>
            <text:p>Germination: 6-7 days</text:p>
          </table:table-cell>
          <table:table-cell table:style-name="Default" table:number-columns-repeated="16382"/>
        </table:table-row>
        <table:table-row table:style-name="ro15">
          <table:table-cell office:value-type="string" calcext:value-type="string">
            <text:p>Family: PEA (Pisum sativum)</text:p>
            <text:p>Variety: Cascadia Sugar Snap (Pole)</text:p>
            <text:p>Original Seed Source: Lilly Miller Seeds</text:p>
            <text:p>Comments: Direct sow outdoors; young plants can tolerate a light frost.  Plant 1” deep, 6” apart in full sun. Keep weed free.  Early harvest; cold resistant; 65 days; 3” pods.  Consume raw soon after harvest or use in stir-fry.  Very sweet.</text:p>
            <text:p>Soil Temp Range: 40°-85° Optimum: 75°</text:p>
          </table:table-cell>
          <table:table-cell office:value-type="string" calcext:value-type="string">
            <text:p>2016</text:p>
            <text:p>EDIBLE</text:p>
            <text:p>Cool Season</text:p>
            <text:p>10 Seeds</text:p>
            <text:p>Easy Seed Saver</text:p>
            <text:p>Germination: 6-7 days</text:p>
            <text:p>@ 75 degrees</text:p>
          </table:table-cell>
          <table:table-cell table:style-name="Default" table:number-columns-repeated="16382"/>
        </table:table-row>
        <table:table-row table:style-name="ro15">
          <table:table-cell table:style-name="ce42" office:value-type="string" calcext:value-type="string">
            <text:p>Family: PEA (Pisum sativum)</text:p>
            <text:p>Variety: Sugar Snap</text:p>
            <text:p>Original Seed Source: Burpee</text:p>
            <text:p>Comments: Direct sow outdoors; young plants can tolerate a light frost.  Plant 1” deep, 6” apart in full sun. Keep weed</text:p>
            <text:p>free.  Early harvest; cold resistant; 65 days; 3” pods.  Consume raw soon after harvest or use in stir-fry.  Very sweet.</text:p>
          </table:table-cell>
          <table:table-cell table:style-name="ce42" office:value-type="string" calcext:value-type="string">
            <text:p>2021</text:p>
            <text:p>EDIBLE</text:p>
            <text:p>Cool Season</text:p>
            <text:p>10 Seeds</text:p>
            <text:p>Easy Seed Saver</text:p>
            <text:p>Germination: 7-14 days</text:p>
          </table:table-cell>
          <table:table-cell table:style-name="Default" table:number-columns-repeated="16382"/>
        </table:table-row>
        <table:table-row table:style-name="ro15">
          <table:table-cell office:value-type="string" calcext:value-type="string">
            <text:p>Family: PEA (Pisum sativum)</text:p>
            <text:p>Variety: Wando(Shelling Pea)</text:p>
            <text:p>Original Seed Source: Botanical Interests Comments: Direct sow outdoors; young plants can tolerate a light frost.  Plant 1” deep, 2” apart, plants are about 24-30” so recommend using a trellis. Pick when seeds have enlarged in pod; hold vines when picking to prevent damage to vine.  5” pods, 68 days.</text:p>
            <text:p>Soil Temp Range: 40°-80° Optimum: 60°</text:p>
          </table:table-cell>
          <table:table-cell office:value-type="string" calcext:value-type="string">
            <text:p>2022</text:p>
            <text:p>EDIBLE</text:p>
            <text:p>Cool Season</text:p>
            <text:p>20 Seeds</text:p>
            <text:p>Easy Seed Saver</text:p>
            <text:p>Germination: 5-10 days</text:p>
          </table:table-cell>
          <table:table-cell table:style-name="Default" table:number-columns-repeated="16382"/>
        </table:table-row>
        <table:table-row table:style-name="ro15">
          <table:table-cell table:style-name="ce42" office:value-type="string" calcext:value-type="string">
            <text:p>Family: PEANUT (Arachis hypogaea)</text:p>
            <text:p>Variety: Fastigiata Pin Striped</text:p>
            <text:p>Original Seed Source: Baker Creek Heirloom Seeds</text:p>
            <text:p>www.rareseeds.com</text:p>
            <text:p>Comments: Pin striped peanuts typically found in Ecuador. Easy to grow, require long season—120 days or more.  Plant in or out of shell.  Seeds are tender. Need fertile soil. Plant 1.5” deep, 6-8” apart in rows 2 ft apart after soil reaches 65 degrees. Keep free of weeds, but do not mulch! Dig peanuts when</text:p>
            <text:p>foliage begins to yellow.</text:p>
          </table:table-cell>
          <table:table-cell table:style-name="ce42" office:value-type="string" calcext:value-type="string">
            <text:p>2018</text:p>
            <text:p>EDIBLE</text:p>
            <text:p>Warm Season</text:p>
            <text:p>10 Seeds</text:p>
            <text:p>Easy Seed Saver</text:p>
            <text:p>Germination: 5-10 days</text:p>
            <text:p>@ 75 degrees</text:p>
          </table:table-cell>
          <table:table-cell table:style-name="Default" table:number-columns-repeated="16382"/>
        </table:table-row>
        <table:table-row table:style-name="ro15">
          <table:table-cell office:value-type="string" calcext:value-type="string">
            <text:p>Family: PEANUT (Arachis hypogaea)</text:p>
            <text:p>Variety: Tennessee Red</text:p>
            <text:p>Original Seed Source: Baker Creek Heirloom Seeds</text:p>
            <text:p>www.rareseeds.com</text:p>
            <text:p>Comments: Valencia Type, red skinned. Easy to grow, require long season—110 days or more.  Plant in or out of shell.  Seeds are tender. Need fertile soil. Plant 1.5” deep, 6-8” apart in rows 2 ft apart after soil reaches 65 degrees. Keep free of weeds, but do not mulch! Dig peanuts when foliage begins</text:p>
            <text:p>to yellow.  This variety superior for roasting or boiling.</text:p>
          </table:table-cell>
          <table:table-cell office:value-type="string" calcext:value-type="string">
            <text:p>2018</text:p>
            <text:p>EDIBLE</text:p>
            <text:p>Warm Season</text:p>
            <text:p>10 Seeds</text:p>
            <text:p>Easy Seed Saver</text:p>
            <text:p>Germination: 5-10 days</text:p>
            <text:p>@ 75 degrees</text:p>
          </table:table-cell>
          <table:table-cell table:style-name="Default" table:number-columns-repeated="16382"/>
        </table:table-row>
        <table:table-row table:style-name="ro15">
          <table:table-cell table:style-name="ce42" office:value-type="string" calcext:value-type="string">
            <text:p>Family: PEPPER, SWEET (Capsicum annuum)</text:p>
            <text:p>Variety: Arroz Con Pollo (origin: Cuba)</text:p>
            <text:p>Original Seed Source: Baker Creek Heirloom Seeds</text:p>
            <text:p>Rareseeds.com Comments: Caribbean “seasoning pepper” - remove the seeds for no heat; harvest orange or red.  Start indoors barely</text:p>
            <text:p>covering seeds in loose soil 8-10 weeks before last frost.  Very Slow to germinate; need warmth and moisture; plant 12-16” apart in full sun.  Save seeds from fully ripe, slightly shriveled</text:p>
            <text:p>fruit. Can cross pollinate.</text:p>
            <text:p>Soil Temp Range: 60°-95° Optimum: 85°</text:p>
          </table:table-cell>
          <table:table-cell table:style-name="ce42"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Pepper Chili Anaheim(Capsicum annuum)</text:p>
            <text:p>Variety: NuMex Joe E Parker</text:p>
            <text:p>Original Seed Source: Botanical Interests</text:p>
            <text:p>Comments: Start inside 1/4” deep in loose soil 8- 10 weeks before last frost.  Slow to germinate; need warmth; plant 12-16” apart in full sun. Size to 6”; 70 to 80 days.  Save seeds from fully ripe, slightly shriveled fruit. Can cross pollinate.</text:p>
          </table:table-cell>
          <table:table-cell office:value-type="string" calcext:value-type="string">
            <text:p>2024</text:p>
            <text:p>EDIBLE</text:p>
            <text:p>Warm Season</text:p>
            <text:p>5 Seeds</text:p>
            <text:p>Easy Seed Saver</text:p>
            <text:p>Germination: 10-25 days</text:p>
          </table:table-cell>
          <table:table-cell table:style-name="Default" table:number-columns-repeated="16382"/>
        </table:table-row>
        <table:table-row table:style-name="ro15">
          <table:table-cell table:style-name="ce42" office:value-type="string" calcext:value-type="string">
            <text:p>Family: PEPPER CHILE (Capsicum chinense)</text:p>
            <text:p>Variety: Biquinho Red &amp; Yellow Blend Original Seed Source: Botanical Interests</text:p>
            <text:p>Comments: Start inside 1/4” deep in loose soil 8- 10 weeks before last frost. Transplant outside 2-4 weeks after last frost 12-16” apart in full sun.</text:p>
            <text:p>Peppers turn either yellow or red with unique shape. Tangy &amp; sweet followed with a touch of heat</text:p>
          </table:table-cell>
          <table:table-cell table:style-name="ce42" office:value-type="string" calcext:value-type="string">
            <text:p>2021</text:p>
            <text:p>EDIBLE</text:p>
            <text:p>Warm Season</text:p>
            <text:p>5 Seeds</text:p>
            <text:p>Easy Seed Saver</text:p>
            <text:p>Germination: 10-25 days</text:p>
          </table:table-cell>
          <table:table-cell table:style-name="Default" table:number-columns-repeated="16382"/>
        </table:table-row>
        <table:table-row table:style-name="ro15">
          <table:table-cell office:value-type="string" calcext:value-type="string">
            <text:p>Family: PEPPER CHILE (Capsicum annuum)</text:p>
            <text:p>Variety: Cayenne Blend (hot)</text:p>
            <text:p>Original Seed Source: Botanical Interests</text:p>
            <text:p>Comments: Start inside 1/4” deep in loose soil 8-10 weeks before last frost. Transplant outside 2-4 weeks after last frost 12-16” apart in full sun. Green 4-6” peppers that turn either</text:p>
            <text:p>yellow or red; 68 days.  Save seeds from fully ripe, slightly shriveled fruit.</text:p>
          </table:table-cell>
          <table:table-cell office:value-type="string" calcext:value-type="string">
            <text:p>2021</text:p>
            <text:p>EDIBLE</text:p>
            <text:p>Warm Season</text:p>
            <text:p>10-15 Seeds</text:p>
            <text:p>Easy Seed Saver</text:p>
            <text:p>Germination: 10-25 days</text:p>
          </table:table-cell>
          <table:table-cell table:style-name="Default" table:number-columns-repeated="16382"/>
        </table:table-row>
        <table:table-row table:style-name="ro15">
          <table:table-cell table:style-name="ce42" office:value-type="string" calcext:value-type="string">
            <text:p>Family: PEPPER CHILE (Capsicum annuum)</text:p>
            <text:p>Variety: Cayenne \ (hot) Original Seed Source: Botanical Interests</text:p>
            <text:p>Comments: Start inside 1/4” deep in loose soil 8- 10 weeks before last frost. Transplant outside 2-4 weeks after last frost 12-16” apart in full sun.</text:p>
            <text:p>Green 4-6” peppers that turn either yellow or red; 68 days.  Save seeds from fully ripe, slightly shriveled fruit.</text:p>
          </table:table-cell>
          <table:table-cell table:style-name="ce42" office:value-type="string" calcext:value-type="string">
            <text:p>2021</text:p>
            <text:p>EDIBLE</text:p>
            <text:p>Warm Season</text:p>
            <text:p>Seeds</text:p>
            <text:p>Easy Seed Saver</text:p>
            <text:p>Germination: 10-25 days</text:p>
          </table:table-cell>
          <table:table-cell table:style-name="Default" table:number-columns-repeated="16382"/>
        </table:table-row>
        <table:table-row table:style-name="ro15">
          <table:table-cell office:value-type="string" calcext:value-type="string">
            <text:p>Family: PEPPER CHILE Chilaca(Capsicum annuum)</text:p>
            <text:p>Variety: Pasilla Bajio (smoky, mildly spicy)</text:p>
            <text:p>Original Seed Source: Botanical Interests</text:p>
            <text:p>Comments: Start inside 1/4” deep in loose soil 8-10 weeks before last frost.  Slow to germinate; need warmth. Transplant 24”-36”” apart in full sun. Size to 2”; 80 to 90 days.   Can  cross pollinate. Dried is important ingredient in mole sauce and</text:p>
            <text:p>adobo.</text:p>
          </table:table-cell>
          <table:table-cell office:value-type="string" calcext:value-type="string">
            <text:p>2024</text:p>
            <text:p>EDIBLE</text:p>
            <text:p>Warm Season</text:p>
            <text:p>6 Seeds</text:p>
            <text:p>Easy Seed Saver</text:p>
            <text:p>Germination: 10-25 days</text:p>
          </table:table-cell>
          <table:table-cell table:style-name="Default" table:number-columns-repeated="16382"/>
        </table:table-row>
        <table:table-row table:style-name="ro15">
          <table:table-cell table:style-name="ce42" office:value-type="string" calcext:value-type="string">
            <text:p>Family: PEPPER CHILE (Capsicum annuum)</text:p>
            <text:p>Variety: Early Jalapeno  (Hot 2,500-5,000 SHU)</text:p>
            <text:p>Original Seed Source: Botanical Interests</text:p>
            <text:p>Comments: Prolific, shiny, dark green hot pepper. Produces all season.  Start inside 1/4” deep in loose soil 8-10 weeks before last frost.  Slow to germinate; need warmth. Save seeds from fully ripe, slightly shriveled fruit. Can cross</text:p>
            <text:p>pollinate.</text:p>
          </table:table-cell>
          <table:table-cell table:style-name="ce42"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5">
          <table:table-cell office:value-type="string" calcext:value-type="string">
            <text:p>Family: PEPPER CHILE (Capsicum chinense)</text:p>
            <text:p>Variety: Habanero (Very Hot 100,000-350,000 SHU)</text:p>
            <text:p>Original Seed Source: Ferry Morse</text:p>
            <text:p>Comments: Start inside 1/4” deep in loose soil 8- 10 weeks before last frost.  Slow to germinate; need warmth; plant 18”-24” apart in full sun.  Ripe when yellow to orange. Save seeds from fully ripe, slightly shriveled fruit. Can cross pollinate.</text:p>
          </table:table-cell>
          <table:table-cell office:value-type="string" calcext:value-type="string">
            <text:p>2023</text:p>
            <text:p>EDIBLE</text:p>
            <text:p>Warm Season</text:p>
            <text:p>4+ Seeds</text:p>
            <text:p>Easy Seed Saver</text:p>
            <text:p>Germination: 10-25 days</text:p>
          </table:table-cell>
          <table:table-cell table:style-name="Default" table:number-columns-repeated="16382"/>
        </table:table-row>
        <table:table-row table:style-name="ro15">
          <table:table-cell table:style-name="ce42" office:value-type="string" calcext:value-type="string">
            <text:p>Family: Pepper, CHILE (Capsicum annuum)</text:p>
            <text:p>Variety: Isleta (mild to medium)</text:p>
            <text:p>Original Seed Source: Native Seed Search</text:p>
            <text:p>Comments: Start inside 1/4” deep in loose soil 8- 10 weeks before last frost.  Slow to germinate; need warmth; plant 12-16” apart in full sun/partial in shade low desert. Save seeds from fully ripe, slightly shriveled fruit. Can cross pollinate.</text:p>
          </table:table-cell>
          <table:table-cell table:style-name="ce42" office:value-type="string" calcext:value-type="string">
            <text:p>2019</text:p>
            <text:p>EDIBLE</text:p>
            <text:p>Warm Season</text:p>
            <text:p>4 Seeds</text:p>
            <text:p>Easy Seed Saver</text:p>
            <text:p>Germination: 8-10 days</text:p>
          </table:table-cell>
          <table:table-cell table:style-name="Default" table:number-columns-repeated="16382"/>
        </table:table-row>
        <table:table-row table:style-name="ro15">
          <table:table-cell office:value-type="string" calcext:value-type="string">
            <text:p>Family: PEPPER CHILE (Capsicum annuum)</text:p>
            <text:p>Variety: Jalapeno  Early Original Seed Source  Burpee</text:p>
            <text:p>Comments: Prolific hot pepper bold flavor.  Produces all season.  Start inside 1/4” deep in loose soil 8-10 weeks before last frost.  Slow to germinate; need warmth. Can cross</text:p>
            <text:p>pollinate.2,500-5,000 scoville. Medium hot</text:p>
          </table:table-cell>
          <table:table-cell office:value-type="string" calcext:value-type="string">
            <text:p>2024</text:p>
            <text:p>EDIBLE</text:p>
            <text:p>Warm Season</text:p>
            <text:p>Various seeds</text:p>
            <text:p>Easy Seed Saver</text:p>
            <text:p>Germination: 10-25 days</text:p>
          </table:table-cell>
          <table:table-cell table:style-name="Default" table:number-columns-repeated="16382"/>
        </table:table-row>
        <table:table-row table:style-name="ro15">
          <table:table-cell table:style-name="ce42" office:value-type="string" calcext:value-type="string">
            <text:p>Family: PEPPER CHILE (Capsicum annuum)</text:p>
            <text:p>Variety: Jalapeno NuMex Lemon Spice</text:p>
            <text:p>Original Seed Source: Botanical Interests</text:p>
            <text:p>Comments: Prolific, sunny, yellow hot pepper with a slight citrus flavor.  Produces all season.  Start inside 1/4” deep in loose soil 8-10 weeks before last frost.  Slow to germinate; need warmth. Save seeds from fully ripe, slightly shriveled</text:p>
            <text:p>fruit. Can cross pollinate.</text:p>
          </table:table-cell>
          <table:table-cell table:style-name="ce42"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5">
          <table:table-cell office:value-type="string" calcext:value-type="string">
            <text:p>Family: PEPPER CHILE (Capsicum annuum)</text:p>
            <text:p>Variety: Jalafuego   (HOT-Very Hot)</text:p>
            <text:p>Original Seed Source: Botanical Interests</text:p>
            <text:p>Comments: Prolific, shiny, extra large, hot pepper. Produces all season.  Start inside 1/4” deep in loose soil 8-10 weeks before last frost.  Transplant outside 2-4 weeks after last frost. Slow to germinate; need warmth.</text:p>
            <text:p>Hotter, larger and more productive than other jalapenos.</text:p>
          </table:table-cell>
          <table:table-cell office:value-type="string" calcext:value-type="string">
            <text:p>2023</text:p>
            <text:p>EDIBLE</text:p>
            <text:p>Warm Season</text:p>
            <text:p>5 Seeds</text:p>
            <text:p>Hybrid Do Not Save</text:p>
            <text:p>Seeds</text:p>
            <text:p>Germination: 10-25 days</text:p>
          </table:table-cell>
          <table:table-cell table:style-name="Default" table:number-columns-repeated="16382"/>
        </table:table-row>
        <table:table-row table:style-name="ro15">
          <table:table-cell table:style-name="ce42" office:value-type="string" calcext:value-type="string">
            <text:p>Family: Pepper, CHILE (Capsicum annuum)</text:p>
            <text:p>Variety: Poblano (when fresh), Ancho (when when dried)  (Medium Hot)</text:p>
            <text:p>Grown By: Mary Jackson, Master Gardener</text:p>
            <text:p>Comments: Start inside 1/4” deep in loose soil 8-10 weeks before last frost.  Slow to germinate; need warmth; plant 12-16” apart in full sun/partial in shade low desert. Save  seeds from fully ripe, slightly shriveled fruit.</text:p>
          </table:table-cell>
          <table:table-cell table:style-name="ce42" office:value-type="string" calcext:value-type="string">
            <text:p>2018</text:p>
            <text:p>EDIBLE</text:p>
            <text:p>Warm Season</text:p>
            <text:p>5 Seeds</text:p>
            <text:p>Easy Seed Saver</text:p>
            <text:p>Germination: 8-10 days</text:p>
          </table:table-cell>
          <table:table-cell table:style-name="Default" table:number-columns-repeated="16382"/>
        </table:table-row>
        <table:table-row table:style-name="ro15">
          <table:table-cell office:value-type="string" calcext:value-type="string">
            <text:p>Family:   Pepper Chili (Capsicum annuum)</text:p>
            <text:p>Variety: Pizza</text:p>
            <text:p>Original Seed Source: Territorial Seed Co.</text:p>
            <text:p>Comments: Start inside 1/4” deep in loose soil 8- 10 weeks before last frost.  Slow to germinate; need warmth; plant 12-16” apart in full sun. Thick walled, flavorful with a hint of zing. Can cross pollinate.</text:p>
          </table:table-cell>
          <table:table-cell office:value-type="string" calcext:value-type="string">
            <text:p>2018</text:p>
            <text:p>EDIBLE</text:p>
            <text:p>Warm Season</text:p>
            <text:p>5 Seeds</text:p>
            <text:p>Easy Seed Saver</text:p>
            <text:p>Germination: 10-25 days</text:p>
          </table:table-cell>
          <table:table-cell table:style-name="Default" table:number-columns-repeated="16382"/>
        </table:table-row>
        <table:table-row table:style-name="ro15">
          <table:table-cell table:style-name="ce42" office:value-type="string" calcext:value-type="string">
            <text:p>Family: PEPPER CHILE (Capsicum annuum)</text:p>
            <text:p>Variety: Santaka (hot, 40,000-50,000 SHU)</text:p>
            <text:p>Original Seed Source: Botanical Interests</text:p>
            <text:p>Comments: Start inside 1/4” deep in loose soil 8-10 weeks before last frost.  Slow to germinate; need warmth. Transplant 24”-36”” apart in full sun. Size to 2”; 70 to 80 days.   Can cross pollinate.  Origin Japan. Use in Asian dishes such as stir-fries</text:p>
            <text:p>and soups.</text:p>
          </table:table-cell>
          <table:table-cell table:style-name="ce42" office:value-type="string" calcext:value-type="string">
            <text:p>2021</text:p>
            <text:p>EDIBLE</text:p>
            <text:p>Warm Season</text:p>
            <text:p>8+ Seeds</text:p>
            <text:p>Easy Seed Saver</text:p>
            <text:p>Germination: 10-25 days</text:p>
          </table:table-cell>
          <table:table-cell table:style-name="Default" table:number-columns-repeated="16382"/>
        </table:table-row>
        <table:table-row table:style-name="ro15">
          <table:table-cell office:value-type="string" calcext:value-type="string">
            <text:p>Family: PEPPER CHILE (Capsicum annuum)</text:p>
            <text:p>Variety: Serrano\ (hot) Original Seed Source: Ferry-Morse</text:p>
            <text:p>Comments: Start inside 1/4” deep, 8-10 weeks before last frost. Transplant outside when 3” tall in full sun. Dark red when ripe. Said to be one of the hottest peppers.</text:p>
          </table:table-cell>
          <table:table-cell office:value-type="string" calcext:value-type="string">
            <text:p>2024</text:p>
            <text:p>EDIBLE</text:p>
            <text:p>Warm Season</text:p>
            <text:p>10 Seeds</text:p>
            <text:p>Easy Seed Saver</text:p>
            <text:p>Germination: 10-25 days</text:p>
          </table:table-cell>
          <table:table-cell table:style-name="Default" table:number-columns-repeated="16382"/>
        </table:table-row>
        <table:table-row table:style-name="ro15">
          <table:table-cell table:style-name="ce42" office:value-type="string" calcext:value-type="string">
            <text:p>Family: PEPPER CHILE (Capsicum annuum)</text:p>
            <text:p>Variety: Coolapeno  (No Heat Jalapeno) Comments: Prolific, shiny, dark green to red pepper. Produces all season.  Start inside 1/4” deep in loose soil 8-10 weeks before last frost.  Slow to germinate; need warmth.</text:p>
          </table:table-cell>
          <table:table-cell table:style-name="ce42" office:value-type="string" calcext:value-type="string">
            <text:p>2019</text:p>
            <text:p>EDIBLE</text:p>
            <text:p>Warm Season</text:p>
            <text:p>5+ Seeds</text:p>
            <text:p>HYBRID</text:p>
            <text:p>Do not save seeds</text:p>
            <text:p>Germination: 10-25 days</text:p>
          </table:table-cell>
          <table:table-cell table:style-name="Default" table:number-columns-repeated="16382"/>
        </table:table-row>
        <table:table-row table:style-name="ro15">
          <table:table-cell office:value-type="string" calcext:value-type="string">
            <text:p>Family: PEPPER CHILE (Capsicum annuum)</text:p>
            <text:p>Variety: Mama Mia Red Chili</text:p>
            <text:p>Comments: Hybrid, red Italian roasting pepper. Sweet flavor and thick walls. Start indoors barely covering seeds in loose, rich soil 8-10 weeks before last frost.  Slow to germinate; need warmth; move to sunny window or grow light</text:p>
            <text:p>after sprouting. In ground, plant 12-16” apart in full sun.</text:p>
          </table:table-cell>
          <table:table-cell office:value-type="string" calcext:value-type="string">
            <text:p>2022</text:p>
            <text:p>EDIBLE</text:p>
            <text:p>Warm Season</text:p>
            <text:p>10+ Seeds</text:p>
            <text:p>Hybrid Do not save</text:p>
            <text:p>Seeds</text:p>
            <text:p>Germination: 8-10 days</text:p>
          </table:table-cell>
          <table:table-cell table:style-name="Default" table:number-columns-repeated="16382"/>
        </table:table-row>
        <table:table-row table:style-name="ro15">
          <table:table-cell table:style-name="ce42" office:value-type="string" calcext:value-type="string">
            <text:p>Family: PEPPER SWEET (Capsicum chinense)</text:p>
            <text:p>Variety: Habanada</text:p>
            <text:p>Original Seed Source: Botanical Interests</text:p>
            <text:p>Comments: Start inside 1/4” deep in loose soil 8-10 weeks before last frost.  Slow to germinate; need warmth; plant</text:p>
            <text:p>18”-24” apart in full sun. Size to 2”-3” that taste like habanero flavor without the heat.  Typically harvested yellow; tasty when red.  Save seeds from fully ripe, slightly shriveled fruit. Can</text:p>
            <text:p>cross pollinate.</text:p>
          </table:table-cell>
          <table:table-cell table:style-name="ce42" office:value-type="string" calcext:value-type="string">
            <text:p>2021</text:p>
            <text:p>EDIBLE</text:p>
            <text:p>Warm Season</text:p>
            <text:p>3+ Seeds</text:p>
            <text:p>Easy Seed Saver</text:p>
            <text:p>Germination: 10-25 days</text:p>
          </table:table-cell>
          <table:table-cell table:style-name="Default" table:number-columns-repeated="16382"/>
        </table:table-row>
        <table:table-row table:style-name="ro15">
          <table:table-cell office:value-type="string" calcext:value-type="string">
            <text:p>Family: PEPPER, SWEET (Capsicum annuum)</text:p>
            <text:p>Variety: Banana</text:p>
            <text:p>Original Seed Source: Baker Creek Heirloom Seeds</text:p>
            <text:p>Rareseeds.com</text:p>
            <text:p>Comments: Start inside barely covering seeds in loose soil 8-10 weeks before last frost.  Slow to germinate; need warmth; plant 12-16” apart in full sun. Glossy, yellow, sweet 6” fruit; red at maturity.  Save seeds from fully ripe, slightly shriveled</text:p>
            <text:p>fruit. Can cross pollinate.  Superb pickled, stuffed, or in salads.</text:p>
            <text:p>Soil Temp Range: 60°-95° Optimum: 85°</text:p>
          </table:table-cell>
          <table:table-cell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PEPPER, SWEET (Capsicum annuum)</text:p>
            <text:p>Variety: Banana</text:p>
            <text:p>Original Seed Source: Baker Creek Heirloom Seeds</text:p>
            <text:p>Rareseeds.com</text:p>
            <text:p>Comments: Start inside barely covering seeds in loose soil 8-10 weeks before last frost.  Slow to germinate; need warmth; plant 12-16” apart in full sun. Glossy, yellow, sweet 6” fruit; red at maturity.  Save seeds from fully ripe, slightly shriveled</text:p>
            <text:p>fruit. Can cross pollinate.  Superb pickled, stuffed, or in salads.</text:p>
            <text:p>Soil Temp Range: 60°-95° Optimum: 85°</text:p>
          </table:table-cell>
          <table:table-cell table:style-name="ce42"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PEPPER, SWEET (Capsicum annuum))</text:p>
            <text:p>Variety: California Wonder</text:p>
            <text:p>Original Seed Source: Ferry-Morse</text:p>
            <text:p>Comments: Sow indoors 6-8 weeks before last frost.  Plant 1/4 inch below soil; transplant to garden 12” apart.  Peppers are slow to germinate. Save seed from fully ripe, slightly shriveled fruit.</text:p>
          </table:table-cell>
          <table:table-cell office:value-type="string" calcext:value-type="string">
            <text:p>2022</text:p>
            <text:p>EDIBLE</text:p>
            <text:p>Warm Season</text:p>
            <text:p>10 Seeds</text:p>
            <text:p>Easy Seed Saver</text:p>
            <text:p>Germination: 8-10 days</text:p>
          </table:table-cell>
          <table:table-cell table:style-name="Default" table:number-columns-repeated="16382"/>
        </table:table-row>
        <table:table-row table:style-name="ro15">
          <table:table-cell table:style-name="ce42" office:value-type="string" calcext:value-type="string">
            <text:p>Family: PEPPER, SWEET (Capsicum annuum)</text:p>
            <text:p>Variety: Banana Original Seed Source: Botanical Interests</text:p>
            <text:p>Comments: Start inside 1/4” deep in loose soil 8-10 weeks before last frost.  Transplant 12-16” apart in full sun/partial shade low desert. Glossy, yellow, sweet 6” fruit.  Save seeds from fully ripe, slightly shriveled fruit. Can cross pollinate.</text:p>
          </table:table-cell>
          <table:table-cell table:style-name="ce42" office:value-type="string" calcext:value-type="string">
            <text:p>2021</text:p>
            <text:p>EDIBLE</text:p>
            <text:p>Warm Season</text:p>
            <text:p>4 Seeds</text:p>
            <text:p>Easy Seed Saver</text:p>
            <text:p>Germination: 8-10 days</text:p>
          </table:table-cell>
          <table:table-cell table:style-name="Default" table:number-columns-repeated="16382"/>
        </table:table-row>
        <table:table-row table:style-name="ro15">
          <table:table-cell office:value-type="string" calcext:value-type="string">
            <text:p>Family: PEPPER, SWEET (Capsicum annuum)</text:p>
            <text:p>Variety: California Wonder</text:p>
            <text:p>Original Seed Source: Ferry Morse</text:p>
            <text:p>Comments: Start inside 1/4” deep in loose soil 8-10 weeks before last frost.  Slow to germinate; need warmth; plant 12- 16” apart in full sun/partial in shade low desert. Save seeds from fully ripe, slightly shriveled fruit. Can cross pollinate.</text:p>
          </table:table-cell>
          <table:table-cell office:value-type="string" calcext:value-type="string">
            <text:p>2022</text:p>
            <text:p>EDIBLE</text:p>
            <text:p>Warm Season</text:p>
            <text:p>8+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PEPPER, SWEET (Capsicum annuum)</text:p>
            <text:p>Variety: Cubanelle (Italian Sweet)</text:p>
            <text:p>Grown by: Deborah Hargrove, Cochise County Master Gardener Original Seed Source: www.seedtreasures.com Comments: Start inside 1/4” deep in loose soil 8-10 weeks before last frost.  Slow to germinate; need warmth; plant 12- 16” apart in full sun/partial in shade low desert. Fruit is up to 5</text:p>
            <text:p>inches long; 65 days. Save seeds from fully ripe, slightly shriveled fruit. Can cross pollinate.  Great for frying.</text:p>
            <text:p>Soil Temp Range: 60°-95° Optimum: 85°</text:p>
          </table:table-cell>
          <table:table-cell table:style-name="ce42"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PEPPER, SWEET (Capsicum annuum) Variety: Italian Pepperoncini—Heirloom of Southern Italy</text:p>
            <text:p>Grown by:  Deborah Hargrove, CCMGA Master Gardener Original Seed Source: www.rareseeds.com Comments: Popular pickling pepper, 3”-5” fruit with just a little heat.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5">
          <table:table-cell table:style-name="ce42" office:value-type="string" calcext:value-type="string">
            <text:p>Family: PEPPER, SWEET (Capsicum annuum)</text:p>
            <text:p>Variety: Jimmy Nardello Italian Pepper Grown by:  Botanical Interests</text:p>
            <text:p>Comments: Long, thin-skinned frying pepper from Southern Italy. Rich flavor, ripens red, prolific.  Start inside 1/4” deep in loose soil 8-10 weeks before last frost.  Slow to germinate; need warmth; plant 12-16” apart in full sun/partial in shade low desert. Save seeds from fully ripe, slightly</text:p>
            <text:p>shriveled fruit. Can cross pollinate.</text:p>
          </table:table-cell>
          <table:table-cell table:style-name="ce42" office:value-type="string" calcext:value-type="string">
            <text:p>2022</text:p>
            <text:p>EDIBLE</text:p>
            <text:p>Warm Season</text:p>
            <text:p>3+ Seeds</text:p>
            <text:p>Easy Seed Saver</text:p>
            <text:p>Germination: 8-10 days</text:p>
          </table:table-cell>
          <table:table-cell table:style-name="Default" table:number-columns-repeated="16382"/>
        </table:table-row>
        <table:table-row table:style-name="ro15">
          <table:table-cell office:value-type="string" calcext:value-type="string">
            <text:p>Family: PEPPER, SWEET (Capsicum annuum))</text:p>
            <text:p>Variety: Orange Sun</text:p>
            <text:p>Original Seed Source: Botanical Interests</text:p>
            <text:p>Comments: Sow indoors 6-8 weeks before last frost.  Plant 1/4 inch below soil; transplant to garden 12” apart.  Peppers are slow to germinate. Save seed from fully ripe, slightly shriveled fruit.</text:p>
          </table:table-cell>
          <table:table-cell office:value-type="string" calcext:value-type="string">
            <text:p>2021</text:p>
            <text:p>EDIBLE</text:p>
            <text:p>Warm Season</text:p>
            <text:p>4 Seeds</text:p>
            <text:p>Easy Seed Saver</text:p>
            <text:p>Germination: 8-10 days</text:p>
          </table:table-cell>
          <table:table-cell table:style-name="Default" table:number-columns-repeated="16382"/>
        </table:table-row>
        <table:table-row table:style-name="ro15">
          <table:table-cell table:style-name="ce42" office:value-type="string" calcext:value-type="string">
            <text:p>Family:  PEPPER, SWEET (Capsicum annuum)</text:p>
            <text:p>Variety: Shishito (Japanese Sweet Pepper) Original Seed Source: Alan Wendt, Hereford AZ Comments: Start inside 1/4” deep in loose soil 8-10 weeks before last frost.  Slow to germinate; need warmth; plant 12-16” apart in full sun/partial in shade low desert. Fruit is 3-4 inches long; 60 days to green/80 days to red. Save seeds from fully ripe, slightly shriveled fruit. Can cross pollinate. Great in a 18 inch pot.</text:p>
            <text:p>Wonderful for tempura and stir fry.</text:p>
          </table:table-cell>
          <table:table-cell table:style-name="ce42"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5">
          <table:table-cell office:value-type="string" calcext:value-type="string">
            <text:p>Family:  BEAN, TEPARY (Phaseolus acutifolius)</text:p>
            <text:p>Variety: Blue Speckled</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5">
          <table:table-cell table:style-name="ce42" office:value-type="string" calcext:value-type="string">
            <text:p>Family:  PUMPKIN (Cucurbita maxima)</text:p>
            <text:p>Variety: Atlantic Giant</text:p>
            <text:p>Original Seed Source: Botanical Interests</text:p>
            <text:p>Comments: Direct sow outdoors 1”deep 2-4 weeks after last frost. Full sun; 120 days. May be</text:p>
          </table:table-cell>
          <table:table-cell table:style-name="ce42" office:value-type="string" calcext:value-type="string">
            <text:p>2022</text:p>
            <text:p>EDIBLE</text:p>
            <text:p>warm Season</text:p>
            <text:p>1 Seeds</text:p>
            <text:p>Easy Seed Saver</text:p>
            <text:p>Germination: 7-14 days</text:p>
          </table:table-cell>
          <table:table-cell table:style-name="Default" table:number-columns-repeated="16382"/>
        </table:table-row>
        <table:table-row table:style-name="ro15">
          <table:table-cell office:value-type="string" calcext:value-type="string">
            <text:p>Family:  PUMPKIN (Cucurbita maxima)</text:p>
            <text:p>Variety: Cinderella Original Seed Source: Botanical Interests</text:p>
            <text:p>Comments: Direct sow outdoors 2-3 seeds 1”deep. Make mounds 4-6 feet apart; thin to 1 healthy plant per mound. Tolerates heat and humidity. Full sun; 110 days. Large, deeply ridged and good for</text:p>
            <text:p>eating.</text:p>
          </table:table-cell>
          <table:table-cell office:value-type="string" calcext:value-type="string">
            <text:p>2024</text:p>
            <text:p>EDIBLE</text:p>
            <text:p>warm Season</text:p>
            <text:p>2 Seeds</text:p>
            <text:p>Easy Seed Saver</text:p>
            <text:p>Germination: 7-10 days</text:p>
          </table:table-cell>
          <table:table-cell table:style-name="Default" table:number-columns-repeated="16382"/>
        </table:table-row>
        <table:table-row table:style-name="ro15">
          <table:table-cell table:style-name="ce42" office:value-type="string" calcext:value-type="string">
            <text:p>Family:  PUMPKIN (Cucurbita maxima)</text:p>
            <text:p>Variety: Connecticut Field Original Seed Source: American Seed</text:p>
            <text:p>Comments: Direct sow outdoors 2-3 seeds 1”deep. Make mounds 4-6 feet apart; thin to 1 healthy plant per mound. Tolerates heat and humidity. Full sun; 110 days. Large, deeply ridged and good for eating or carving.</text:p>
          </table:table-cell>
          <table:table-cell table:style-name="ce42" office:value-type="string" calcext:value-type="string">
            <text:p>2023</text:p>
            <text:p>EDIBLE</text:p>
            <text:p>warm Season</text:p>
            <text:p>5+ Seeds</text:p>
            <text:p>Easy Seed Saver</text:p>
            <text:p>Germination: 7-10 days</text:p>
          </table:table-cell>
          <table:table-cell table:style-name="Default" table:number-columns-repeated="16382"/>
        </table:table-row>
        <table:table-row table:style-name="ro15">
          <table:table-cell office:value-type="string" calcext:value-type="string">
            <text:p>Family:  PUMPKIN (Cucurbita maxima)</text:p>
            <text:p>Variety: Jack O’Lantern Original Seed Source: Ferry Morse</text:p>
            <text:p>Comments: Direct sow outdoors 2-3 seeds 1”deep. Make mounds 4-6 feet apart; thin to 1 healthy plant per mound. Tolerates heat and humidity. Full sun; 110 days. Perfect for carving.</text:p>
          </table:table-cell>
          <table:table-cell office:value-type="string" calcext:value-type="string">
            <text:p>2022</text:p>
            <text:p>EDIBLE</text:p>
            <text:p>warm Season</text:p>
            <text:p>5+ Seeds</text:p>
            <text:p>Easy Seed Saver</text:p>
            <text:p>Germination: 7-10 days</text:p>
          </table:table-cell>
          <table:table-cell table:style-name="Default" table:number-columns-repeated="16382"/>
        </table:table-row>
        <table:table-row table:style-name="ro15">
          <table:table-cell table:style-name="ce42" office:value-type="string" calcext:value-type="string">
            <text:p>Family:  PUMPKIN (Cucurbita maxima)</text:p>
            <text:p>Variety: Lumina (White Pumpkin) Original Seed Source: Botanical Interests</text:p>
            <text:p>Comments: Direct sow outdoors 1”deep. Make mounds 4-6 feet apart;  1 healthy plant per mound. Tolerates heat and humidity. Full sun; 90 days.</text:p>
            <text:p>Large, smooth, deeply ridged and good for eating, painting or carving.</text:p>
          </table:table-cell>
          <table:table-cell table:style-name="ce42" office:value-type="string" calcext:value-type="string">
            <text:p>2023</text:p>
            <text:p>EDIBLE</text:p>
            <text:p>warm Season</text:p>
            <text:p>2 Seeds</text:p>
            <text:p>Easy Seed Saver</text:p>
            <text:p>Germination: 7-10 days</text:p>
          </table:table-cell>
          <table:table-cell table:style-name="Default" table:number-columns-repeated="16382"/>
        </table:table-row>
        <table:table-row table:style-name="ro15">
          <table:table-cell office:value-type="string" calcext:value-type="string">
            <text:p>Family:  PUMPKIN (Cucurbita pepo)</text:p>
            <text:p>Variety: Mini Harvest Blend</text:p>
            <text:p>Original Seed Source: Ferry Morse</text:p>
            <text:p>Comments: Direct sow outdoors 2-3 seeds 1”deep. Make mounds 4-6 feet apart; thin to 1 healthy plant per mound.  Full sun; 90 days. Very small for decorating and also good for</text:p>
            <text:p>eating.</text:p>
          </table:table-cell>
          <table:table-cell office:value-type="string" calcext:value-type="string">
            <text:p>2022</text:p>
            <text:p>EDIBLE</text:p>
            <text:p>warm Season</text:p>
            <text:p>5+ Seeds</text:p>
            <text:p>Easy Seed Saver</text:p>
            <text:p>Germination: 7-10 days</text:p>
          </table:table-cell>
          <table:table-cell table:style-name="Default" table:number-columns-repeated="16382"/>
        </table:table-row>
        <table:table-row table:style-name="ro15">
          <table:table-cell table:style-name="ce42" office:value-type="string" calcext:value-type="string">
            <text:p>Family:  PUMPKIN (Cucurbita pepo)</text:p>
            <text:p>Variety: Sugar Pie Comments: Direct sow outdoors 2-3 seeds 1”deep. Make mounds 4-6 feet apart; thin to 1 healthy plant per mound.  Full sun; 100 days. Small 6” has been the standard for baking or for making jack o’lanterns.</text:p>
          </table:table-cell>
          <table:table-cell table:style-name="ce42" office:value-type="string" calcext:value-type="string">
            <text:p>2020</text:p>
            <text:p>EDIBLE</text:p>
            <text:p>warm Season</text:p>
            <text:p>10 Seeds</text:p>
            <text:p>Easy Seed Saver</text:p>
            <text:p>Germination: 7-14 days</text:p>
          </table:table-cell>
          <table:table-cell table:style-name="Default" table:number-columns-repeated="16382"/>
        </table:table-row>
        <table:table-row table:style-name="ro15">
          <table:table-cell office:value-type="string" calcext:value-type="string">
            <text:p>Family: Quinoa (Chenopodium quinoa)</text:p>
            <text:p>Variety: Brightest Brilliant Rainbow</text:p>
            <text:p>Original Seed Source: Botanical Interests</text:p>
            <text:p>Comments: Plant 1/4” deep 12”-18” apart 1-2 weeks after last frost or in winter for maturity prior to summer heat. Fairly drought tolerant. Deer resistant. Various colors like pink, burgundy, red, orange, yellow, white and green.</text:p>
          </table:table-cell>
          <table:table-cell office:value-type="string" calcext:value-type="string">
            <text:p>2023</text:p>
            <text:p>EDIBLE</text:p>
            <text:p>Warm Season</text:p>
            <text:p>15 Seeds</text:p>
            <text:p>Beginner Seed Saver</text:p>
            <text:p>90-100 days to maturity</text:p>
          </table:table-cell>
          <table:table-cell table:style-name="Default" table:number-columns-repeated="16382"/>
        </table:table-row>
        <table:table-row table:style-name="ro15">
          <table:table-cell table:style-name="ce42" office:value-type="string" calcext:value-type="string">
            <text:p>Family: RADISH (Raphanus sativus)</text:p>
            <text:p>Variety: Champion</text:p>
            <text:p>Original Seed Source:</text:p>
            <text:p>www.survivalseeds4patriots.com Seed Vault</text:p>
            <text:p>Comments: Direct sow in early spring and early fall, 1/2” deep, plant 2” apart (or closer and thinned later), rows 12-18” apart.</text:p>
            <text:p>Soil Temp Range: 40°-95° Optimum: 85°</text:p>
          </table:table-cell>
          <table:table-cell table:style-name="ce42" office:value-type="string" calcext:value-type="string">
            <text:p>2014</text:p>
            <text:p>EDIBLE</text:p>
            <text:p>Warm Season</text:p>
            <text:p>25-30 Seeds</text:p>
            <text:p>Intermediate Seed Saver</text:p>
            <text:p>Germination: 3-4 days</text:p>
            <text:p>@ 85 degrees</text:p>
          </table:table-cell>
          <table:table-cell table:style-name="Default" table:number-columns-repeated="16382"/>
        </table:table-row>
        <table:table-row table:style-name="ro15">
          <table:table-cell office:value-type="string" calcext:value-type="string">
            <text:p>Family: RADISH (Raphanus sativus)</text:p>
            <text:p>Variety: Cherry Belle</text:p>
            <text:p>Original Seed Source: Ferry-Morse</text:p>
            <text:p>Comments: Direct sow in early spring and early fall, 1/4-1/2” deep, plant 1” apart (or closer and thinned later), rows 12-18” apart. Harvest in 30 days or less.</text:p>
          </table:table-cell>
          <table:table-cell office:value-type="string" calcext:value-type="string">
            <text:p>2022</text:p>
            <text:p>EDIBLE</text:p>
            <text:p>Cool Season</text:p>
            <text:p>Various Seeds</text:p>
            <text:p>Intermediate Seed Saver</text:p>
            <text:p>Germination: 3-4 days</text:p>
          </table:table-cell>
          <table:table-cell table:style-name="Default" table:number-columns-repeated="16382"/>
        </table:table-row>
        <table:table-row table:style-name="ro15">
          <table:table-cell table:style-name="ce42" office:value-type="string" calcext:value-type="string">
            <text:p>Family: RADISH (Raphanus sativus)</text:p>
            <text:p>Variety: China Rose</text:p>
            <text:p>Grown by:  Deborah Avery-Hargrove</text:p>
            <text:p>Original Seed Source: From seed donated by the Duncan, AZ Seed Library</text:p>
            <text:p>Comments: Direct sow in early spring and early fall, 1/4” deep, plant 2” apart (or closer and thin later), rows 10-12” apart.  50-60 days — this radish is SPICY</text:p>
            <text:p>Soil Temp Range: 40°-95° Optimum: 85°</text:p>
          </table:table-cell>
          <table:table-cell table:style-name="ce42" office:value-type="string" calcext:value-type="string">
            <text:p>2017</text:p>
            <text:p>EDIBLE</text:p>
            <text:p>Warm Season</text:p>
            <text:p>25-30 Seeds</text:p>
            <text:p>Easy Seed Saver</text:p>
            <text:p>Germination: 3-4 days</text:p>
            <text:p>@ 85 degrees</text:p>
          </table:table-cell>
          <table:table-cell table:style-name="Default" table:number-columns-repeated="16382"/>
        </table:table-row>
        <table:table-row table:style-name="ro15">
          <table:table-cell office:value-type="string" calcext:value-type="string">
            <text:p>Family: RADISH (Raphanus sativus)</text:p>
            <text:p>Variety: Crimson Giant</text:p>
            <text:p>Original Seed Source: Botanical Interests</text:p>
            <text:p>Comments: Direct sow in early spring and early fall, 1/2” deep, plant 5” apart (or closer and thinned later), rows 12-18” apart.</text:p>
          </table:table-cell>
          <table:table-cell office:value-type="string" calcext:value-type="string">
            <text:p>2017</text:p>
            <text:p>EDIBLE</text:p>
            <text:p>Warm Season</text:p>
            <text:p>10 Seeds</text:p>
            <text:p>Intermediate Seed Saver</text:p>
            <text:p>Germination: 3-4 days</text:p>
          </table:table-cell>
          <table:table-cell table:style-name="Default" table:number-columns-repeated="16382"/>
        </table:table-row>
        <table:table-row table:style-name="ro15">
          <table:table-cell table:style-name="ce42" office:value-type="string" calcext:value-type="string">
            <text:p>Family: RADISH Daikon (Raphanus sativus)</text:p>
            <text:p>Variety: Miyashige White Original Seed Source: Botanical Interests</text:p>
            <text:p>Comments: Direct sow 8-10 weeks before first frost. Plant every 10 days until temperatures are too cold (below 40). 1/2” deep, plant 5” apart (or closer and thin later), rows 10-12” apart.  65 days. Produces large mild radish that can weigh up to 1 lb. Can be eaten raw, cooked or pickled.</text:p>
          </table:table-cell>
          <table:table-cell table:style-name="ce42" office:value-type="string" calcext:value-type="string">
            <text:p>2023</text:p>
            <text:p>EDIBLE</text:p>
            <text:p>Warm Season</text:p>
            <text:p>10+ Seeds</text:p>
            <text:p>Easy Seed Saver</text:p>
            <text:p>Germination: 5-10 days</text:p>
          </table:table-cell>
          <table:table-cell table:style-name="Default" table:number-columns-repeated="16382"/>
        </table:table-row>
        <table:table-row table:style-name="ro15">
          <table:table-cell office:value-type="string" calcext:value-type="string">
            <text:p>Family: RADISH (Raphanus sativus)</text:p>
            <text:p>Variety: Dragon Hybrid</text:p>
            <text:p>Original Seed Source: Territorial Seed Co. Comments: Direct sow in early spring and early fall, 1/2” deep, plant 2” apart (or closer and thin later), rows 10-12” apart.  40 days — Fiery red skin with white interior and crisp mild flavor. Fine cylindrical roots, best harvested 4-5 inches</text:p>
            <text:p>long.</text:p>
          </table:table-cell>
          <table:table-cell office:value-type="string" calcext:value-type="string">
            <text:p>2016</text:p>
            <text:p>EDIBLE</text:p>
            <text:p>Cool Season</text:p>
            <text:p>10 Seeds</text:p>
            <text:p>Hybrid  Do Not Save</text:p>
            <text:p>Seeds</text:p>
            <text:p>Germination: 3-4 days</text:p>
          </table:table-cell>
          <table:table-cell table:style-name="Default" table:number-columns-repeated="16382"/>
        </table:table-row>
        <table:table-row table:style-name="ro15">
          <table:table-cell table:style-name="ce42" office:value-type="string" calcext:value-type="string">
            <text:p>Family: RADISH (Raphanus sativus)</text:p>
            <text:p>Variety: Early Scarlet Globe Original Seed Source: American Seed</text:p>
            <text:p>Comments: Direct sow in early spring and early fall, 1/4-1/2” deep, plant 1” apart (or closer and thinned later), rows 12-18” apart. Harvest in 30 days or less.</text:p>
          </table:table-cell>
          <table:table-cell table:style-name="ce42" office:value-type="string" calcext:value-type="string">
            <text:p>2020</text:p>
            <text:p>EDIBLE</text:p>
            <text:p>Cool Season</text:p>
            <text:p>10 Seeds</text:p>
            <text:p>Intermediate Seed Saver</text:p>
            <text:p>Germination: 3-4 days</text:p>
          </table:table-cell>
          <table:table-cell table:style-name="Default" table:number-columns-repeated="16382"/>
        </table:table-row>
        <table:table-row table:style-name="ro15">
          <table:table-cell office:value-type="string" calcext:value-type="string">
            <text:p>Family: RADISH (Raphanus sativus)</text:p>
            <text:p>Variety: French Breakfast</text:p>
            <text:p>Original Seed Source: Burpee</text:p>
            <text:p>Comments: Direct sow in early spring and early fall, 1/4” deep, plant 2” apart (or closer and thin later), rows 10-12” apart at 2-3 week intervals.  50-60 days — a pre-1885 French heirloom, mild spicy flavor.  Red top, white bottom.  Attractive</text:p>
            <text:p>gourmet variety.</text:p>
          </table:table-cell>
          <table:table-cell office:value-type="string" calcext:value-type="string">
            <text:p>2017</text:p>
            <text:p>EDIBLE</text:p>
            <text:p>Cool Season</text:p>
            <text:p>25-30 Seeds</text:p>
            <text:p>Intermediate Seed Saver</text:p>
            <text:p>Germination: 3-4 days</text:p>
          </table:table-cell>
          <table:table-cell table:style-name="Default" table:number-columns-repeated="16382"/>
        </table:table-row>
        <table:table-row table:style-name="ro15">
          <table:table-cell table:style-name="ce42" office:value-type="string" calcext:value-type="string">
            <text:p>Family: RADISH (Raphanus sativus)</text:p>
            <text:p>Variety: Mantanghong Original Seed Source: Botanical Interests</text:p>
            <text:p>Comments: Direct sow 8-10 weeks before first frost. Plant every 10 days until temperatures are too cold (below 40). 1/2” deep, plant 5” apart (or closer and thin later), rows 10-12” apart.  65 days. Produces 3” round mild radish that can weigh up to 1 lb. Greenish white exterior with fuchsia interior. Can be</text:p>
            <text:p>eaten raw, cooked or pickled.</text:p>
          </table:table-cell>
          <table:table-cell table:style-name="ce42" office:value-type="string" calcext:value-type="string">
            <text:p>2020</text:p>
            <text:p>EDIBLE</text:p>
            <text:p>Warm Season</text:p>
            <text:p>10+ Seeds</text:p>
            <text:p>Easy Seed Saver</text:p>
            <text:p>Germination: 5-10 days</text:p>
          </table:table-cell>
          <table:table-cell table:style-name="Default" table:number-columns-repeated="16382"/>
        </table:table-row>
        <table:table-row table:style-name="ro15">
          <table:table-cell office:value-type="string" calcext:value-type="string">
            <text:p>Family: RADISH (Raphanus sativus var. mougri)</text:p>
            <text:p>Variety: Rat’s Tail Original Seed Source: Botanical Interests</text:p>
            <text:p>Comments: Direct sow 8-10 weeks before first frost. Plant every 1-2 weeks until mid to late summer. 1/2” deep, plant 6-12” apart, rows 24” apart.  40-50 days. Instead of edible roots, this prehistoric origin is grown for the seed pods that grow above the ground on the 24-26” plants. The pods have a subtle spiciness. Can be eaten raw, stir-fried, in curries or</text:p>
            <text:p>pickled. Continue to produce even in hot weather.</text:p>
          </table:table-cell>
          <table:table-cell office:value-type="string" calcext:value-type="string">
            <text:p>2022</text:p>
            <text:p>EDIBLE</text:p>
            <text:p>Warm Season</text:p>
            <text:p>5+ Seeds</text:p>
            <text:p>Easy Seed Saver</text:p>
            <text:p>Germination: 5-10 days</text:p>
          </table:table-cell>
          <table:table-cell table:style-name="Default" table:number-columns-repeated="16382"/>
        </table:table-row>
        <table:table-row table:style-name="ro15">
          <table:table-cell table:style-name="ce42" office:value-type="string" calcext:value-type="string">
            <text:p>Family: ROOT PARSLEY (Petroselinum crispum)</text:p>
            <text:p>Variety: Tuberosum (Wurzelpetersilie “Halblange”)</text:p>
            <text:p>Original Seed Source: Seeds donated by Elisabeth Brackelsberg, Hereford AZ</text:p>
            <text:p>Comments: Root parsley is a biennial herb grown for its tasty roots (nutty flavor reminiscent of celery).  Foliage can be used sparingly as a garnish.  Long, white, carrot-like roots are ready to harvest around 100 days.  Plant early spring in full sun.    A few frosts sweetens the flavor.</text:p>
            <text:p>Best enjoyed sautéed, roasted or pureed in soups.   Seeds are biennial. These seeds came from Germany.</text:p>
            <text:p>Soil Temp Range: 40°-95° Optimum: 85°</text:p>
          </table:table-cell>
          <table:table-cell table:style-name="ce42" office:value-type="string" calcext:value-type="string">
            <text:p>2017</text:p>
            <text:p>EDIBLE</text:p>
            <text:p>Cool Season</text:p>
            <text:p>50+ Seeds</text:p>
            <text:p>Advanced Seed Saver</text:p>
            <text:p>Germination: 4-6 days</text:p>
            <text:p>@ 85 degrees</text:p>
          </table:table-cell>
          <table:table-cell table:style-name="Default" table:number-columns-repeated="16382"/>
        </table:table-row>
        <table:table-row table:style-name="ro15">
          <table:table-cell office:value-type="string" calcext:value-type="string">
            <text:p>Family: RUTABAGA (Brassica napus susp. rapifera)</text:p>
            <text:p>Variety: American Purple Top Seed Source: Botanical Interests</text:p>
            <text:p>Comments: Sow 1/4” deep, 6-8” apart with rows 18” apart. 30-40 days. Harvest when fully formed, usually about 3-4 inches in diameter. Sweet and rich tasting.</text:p>
          </table:table-cell>
          <table:table-cell office:value-type="string" calcext:value-type="string">
            <text:p>2024</text:p>
            <text:p>EDIBLE</text:p>
            <text:p>Cool Season</text:p>
            <text:p>Various Seeds</text:p>
            <text:p>Intermediate Seed Saver</text:p>
            <text:p>Germination: 4-7 days</text:p>
          </table:table-cell>
          <table:table-cell table:style-name="Default" table:number-columns-repeated="16382"/>
        </table:table-row>
        <table:table-row table:style-name="ro15">
          <table:table-cell table:style-name="ce42" office:value-type="string" calcext:value-type="string">
            <text:p>Family: RUTABAGA (Brassica napus)</text:p>
            <text:p>Variety: Navone Yellow</text:p>
            <text:p>Seed Source: Baker Creek Heirloom Seed</text:p>
            <text:p>Comments: Sow 1/4” deep, 6-8” apart with rows 18” apart. 30-40 days. Harvest when fully formed, usually about 3-4 inches in diameter. Sweet and rich tasting.</text:p>
          </table:table-cell>
          <table:table-cell table:style-name="ce42" office:value-type="string" calcext:value-type="string">
            <text:p>2023</text:p>
            <text:p>EDIBLE</text:p>
            <text:p>Cool Season</text:p>
            <text:p>36-40 Seeds</text:p>
            <text:p>Intermediate Seed Saver</text:p>
            <text:p>Germination: 4-7 days</text:p>
          </table:table-cell>
          <table:table-cell table:style-name="Default" table:number-columns-repeated="16382"/>
        </table:table-row>
        <table:table-row table:style-name="ro15">
          <table:table-cell office:value-type="string" calcext:value-type="string">
            <text:p>Family: SQUASH (Cucubirta moschata)</text:p>
            <text:p>Variety: Magdalena Big Cheese</text:p>
            <text:p>Original Seed Source: Native Seed Search (seeds saved by BJ</text:p>
            <text:p>Comments: Direct sow outdoors 2-3 seeds 1”deep, 3-4 feet apart; thin to 1 healthy plant.  Full sun; 75-90 days; Large, pale orange, ribbed squashes, with a pumpkin shape and wonderful sweet brilliant orange flesh. Draught tolerant and prolific</text:p>
            <text:p>producer if only watered when very dry.</text:p>
          </table:table-cell>
          <table:table-cell office:value-type="string" calcext:value-type="string">
            <text:p>2020</text:p>
            <text:p>EDIBLE</text:p>
            <text:p>Cool Season</text:p>
            <text:p>5+ Seeds</text:p>
            <text:p>Easy Seed Saver</text:p>
            <text:p>Germination: 3-4 days</text:p>
          </table:table-cell>
          <table:table-cell table:style-name="Default" table:number-columns-repeated="16382"/>
        </table:table-row>
        <table:table-row table:style-name="ro15">
          <table:table-cell table:style-name="ce42" office:value-type="string" calcext:value-type="string">
            <text:p>Family: SQUASH (Cucubirta maxima)</text:p>
            <text:p>Variety: Sweet Meat</text:p>
            <text:p>Original Seed Source: Botanical Interests</text:p>
            <text:p>Comments: Direct sow outdoors 2-3 seeds 1”deep, 3-4 feet apart; thin to 1 healthy plant.  Full sun; 95-110 days; Large, green, ribbed squashes, with a pumpkin shape and wonderful sweet brilliant yellow flesh.</text:p>
          </table:table-cell>
          <table:table-cell table:style-name="ce42" office:value-type="string" calcext:value-type="string">
            <text:p>2022</text:p>
            <text:p>EDIBLE</text:p>
            <text:p>Cool Season</text:p>
            <text:p>2 Seeds</text:p>
            <text:p>Easy Seed Saver</text:p>
            <text:p>Germination: 5-10 days</text:p>
          </table:table-cell>
          <table:table-cell table:style-name="Default" table:number-columns-repeated="16382"/>
        </table:table-row>
        <table:table-row table:style-name="ro15">
          <table:table-cell office:value-type="string" calcext:value-type="string">
            <text:p>Family: SHRUB  (Gossypium thurberi) Variety: Desert Cotton (Mallow Family: Malvaceae)</text:p>
            <text:p>Where Harvested:  University of Arizona Discovery Garden, Sierra Vista AZ Comments: Plant 1” deep in moist soil. Do not overwater. May be planted inside to get a healthy start and transplanted outside when the weather is warm. This beautiful deciduous shrub blooms August through October at 2,500 to 5,000 feet. Grows to 7 feet with flowers that are white to very pale pink with crinkly petals.</text:p>
          </table:table-cell>
          <table:table-cell office:value-type="string" calcext:value-type="string">
            <text:p>2022</text:p>
            <text:p>Warm Season</text:p>
            <text:p>10-15 Seeds</text:p>
          </table:table-cell>
          <table:table-cell table:style-name="Default" table:number-columns-repeated="16382"/>
        </table:table-row>
        <table:table-row table:style-name="ro15">
          <table:table-cell table:style-name="ce42" office:value-type="string" calcext:value-type="string">
            <text:p>Family: SHRUB  (Hesperaloe parviflora)</text:p>
            <text:p>Variety: Red Yucca</text:p>
            <text:p>Comments: Succulent plant that is hardy, low care, drought resistant and provides lovely color through the warm months. Scarify (gently sand the ends of the seed) then soak in warm water for several hours. Plant in full sun and barely cover seeds with soil. Keep soil moist until germinated. When seedlings are several inches tall, allow the soil to slightly dry out. Mature plants prefers soil to dry between waterings. May start indoors</text:p>
            <text:p>before transplanting outside.</text:p>
          </table:table-cell>
          <table:table-cell table:style-name="ce42" office:value-type="string" calcext:value-type="string">
            <text:p>2020</text:p>
            <text:p>Warm Season</text:p>
            <text:p>Various Seeds</text:p>
            <text:p>Perennial</text:p>
          </table:table-cell>
          <table:table-cell table:style-name="Default" table:number-columns-repeated="16382"/>
        </table:table-row>
        <table:table-row table:style-name="ro15">
          <table:table-cell office:value-type="string" calcext:value-type="string">
            <text:p>Family:   SHRUB  (Caesalpinia pulcherrima)</text:p>
            <text:p>Variety: Bird of Paradise, Red Mexican</text:p>
            <text:p>Grown By: Ken Forrester, Master Gardener, Herford, AZ Comments: 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text:p>
            <text:p>bird of paradise prefers soil to dry between waterings.</text:p>
          </table:table-cell>
          <table:table-cell office:value-type="string" calcext:value-type="string">
            <text:p>2018</text:p>
            <text:p>Warm Season</text:p>
            <text:p>10 Seeds</text:p>
          </table:table-cell>
          <table:table-cell table:style-name="Default" table:number-columns-repeated="16382"/>
        </table:table-row>
        <table:table-row table:style-name="ro15">
          <table:table-cell table:style-name="ce42" office:value-type="string" calcext:value-type="string">
            <text:p>Family: SHRUB  (Caesalpinia pulcherrima)</text:p>
            <text:p>Variety: Mexican Red Bird of Paradise</text:p>
            <text:p>Comments: 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text:p>
            <text:p>allow the soil to slightly dry out. As mature plants, the bird of paradise prefers soil to dry between waterings.</text:p>
          </table:table-cell>
          <table:table-cell table:style-name="ce42" office:value-type="string" calcext:value-type="string">
            <text:p>2018</text:p>
            <text:p>Warm Season</text:p>
            <text:p>Various Seeds</text:p>
          </table:table-cell>
          <table:table-cell table:style-name="Default" table:number-columns-repeated="16382"/>
        </table:table-row>
        <table:table-row table:style-name="ro15">
          <table:table-cell office:value-type="string" calcext:value-type="string">
            <text:p>Family: SORREL (Rumex aacetosa)</text:p>
            <text:p>Variety: Common Sorrel</text:p>
            <text:p>Seed Source: Botanical Interests</text:p>
            <text:p>Comments: Direct sow in early spring 1 to 2 weeks before average last frost. Plant 1/8” every 8”. Use as a salad green, as a compliment to fish or mixed with spinach or chard. Very high in Vitamin C.</text:p>
          </table:table-cell>
          <table:table-cell office:value-type="string" calcext:value-type="string">
            <text:p>2023</text:p>
            <text:p>EDIBLE</text:p>
            <text:p>Cool Season</text:p>
            <text:p>20+ Seeds</text:p>
            <text:p>Intermediate Seed Saver 5-10 days  to germination</text:p>
            <text:p>Perennial in mild climates</text:p>
          </table:table-cell>
          <table:table-cell table:style-name="Default" table:number-columns-repeated="16382"/>
        </table:table-row>
        <table:table-row table:style-name="ro15">
          <table:table-cell table:style-name="ce42" office:value-type="string" calcext:value-type="string">
            <text:p>Family: SPINACH (Spinacia oleracea)</text:p>
            <text:p>Variety: Bloomsdale</text:p>
            <text:p>Grown By:  Deborah Avery-Hargrove</text:p>
            <text:p>Original Seed Source: seedtreasures.com</text:p>
            <text:p>Comments: Direct sow in early spring &amp; late summer, 1/2” deep, thin to 1” apart, rows 12” apart.</text:p>
            <text:p>Soil Temp Range: 35°-85° Optimum: 70°</text:p>
          </table:table-cell>
          <table:table-cell table:style-name="ce42" office:value-type="string" calcext:value-type="string">
            <text:p>2016</text:p>
            <text:p>EDIBLE</text:p>
            <text:p>Cool Season</text:p>
            <text:p>45-50 Seeds</text:p>
            <text:p>Intermediate Seed Saver</text:p>
            <text:p>Germination: 5-6 days</text:p>
            <text:p>@ 70 degrees</text:p>
          </table:table-cell>
          <table:table-cell table:style-name="Default" table:number-columns-repeated="16382"/>
        </table:table-row>
        <table:table-row table:style-name="ro15">
          <table:table-cell office:value-type="string" calcext:value-type="string">
            <text:p>Family: SPINACH (Spinacia oleracea)</text:p>
            <text:p>Variety: Bloomsdale Long Standing Comments: Direct sow in early spring &amp; late summer, 1/2” deep, thin to 12” apart, rows 12” apart. Harvest outer leaves when ready.</text:p>
            <text:p>Soil Temp Range: 35°-85° Optimum: 70°</text:p>
          </table:table-cell>
          <table:table-cell office:value-type="string" calcext:value-type="string">
            <text:p>2020</text:p>
            <text:p>EDIBLE</text:p>
            <text:p>Cool Season</text:p>
            <text:p>25+ Seeds</text:p>
            <text:p>Intermediate Seed Saver</text:p>
            <text:p>Germination: 5-6 days</text:p>
            <text:p>@ 70 degrees</text:p>
          </table:table-cell>
          <table:table-cell table:style-name="Default" table:number-columns-repeated="16382"/>
        </table:table-row>
        <table:table-row table:style-name="ro15">
          <table:table-cell table:style-name="ce42" office:value-type="string" calcext:value-type="string">
            <text:p>Family: SPINACH (Spinacia oleracea)</text:p>
            <text:p>Variety: Bloomsdale</text:p>
            <text:p>Original Seed Source:</text:p>
            <text:p>www.survivalseeds4patriots.com Seed Vault</text:p>
            <text:p>Comments: Direct sow in early spring &amp; late summer, 1/2” deep, thin to 1” apart, rows 12” apart.</text:p>
            <text:p>Soil Temp Range: 35°-85° Optimum: 70°</text:p>
          </table:table-cell>
          <table:table-cell table:style-name="ce42" office:value-type="string" calcext:value-type="string">
            <text:p>2014</text:p>
            <text:p>EDIBLE</text:p>
            <text:p>Cool Season</text:p>
            <text:p>25+ Seeds</text:p>
            <text:p>Intermediate Seed Saver</text:p>
            <text:p>Germination: 5-6 days</text:p>
            <text:p>@ 70 degrees</text:p>
          </table:table-cell>
          <table:table-cell table:style-name="Default" table:number-columns-repeated="16382"/>
        </table:table-row>
        <table:table-row table:style-name="ro15">
          <table:table-cell office:value-type="string" calcext:value-type="string">
            <text:p>Master Gardeer Seed Library</text:p>
            <text:p>Family: SPINACH (Spinacia oleracea)</text:p>
            <text:p>Variety: Galilee</text:p>
            <text:p>Grown By:  Deborah Avery-Hargrove</text:p>
            <text:p>Original Seed Source: rareseeds.com</text:p>
            <text:p>Comments: Direct sow in early spring &amp; late summer, 1/2” deep, thin to 1” apart, rows 12” apart.  35 days, heat tolerant, from Middle East, triangular light green leaves.  Sweet, mild</text:p>
            <text:p>flavor.</text:p>
            <text:p>Soil Temp Range: 35°-85° Optimum: 70°</text:p>
          </table:table-cell>
          <table:table-cell office:value-type="string" calcext:value-type="string">
            <text:p>2017</text:p>
            <text:p>EDIBLE</text:p>
            <text:p>Cool Season</text:p>
            <text:p>45-50 Seeds</text:p>
            <text:p>Intermediate Seed Saver</text:p>
            <text:p>Germination: 5-6 days</text:p>
            <text:p>@ 70 degrees</text:p>
          </table:table-cell>
          <table:table-cell table:style-name="Default" table:number-columns-repeated="16382"/>
        </table:table-row>
        <table:table-row table:style-name="ro15">
          <table:table-cell table:style-name="ce42" office:value-type="string" calcext:value-type="string">
            <text:p>Family: SPINACH (Spinacia oleracea)</text:p>
            <text:p>Variety: Giant Noble</text:p>
            <text:p>Original Seed Source: americanseedco.com</text:p>
            <text:p>Comments: Direct sow in early spring &amp; late summer, 1/2” deep, thin to 1” apart, rows 12” apart.  High yields, rich flavor, tender, slow to bolt; maturity 45 days.</text:p>
            <text:p>Soil Temp Range: 35°-85° Optimum: 70°</text:p>
          </table:table-cell>
          <table:table-cell table:style-name="ce42" office:value-type="string" calcext:value-type="string">
            <text:p>2016</text:p>
            <text:p>EDIBLE</text:p>
            <text:p>Cool Season</text:p>
            <text:p>20+ Seeds</text:p>
            <text:p>Intermediate Seed Saver</text:p>
            <text:p>Germination: 5-6 days</text:p>
            <text:p>@ 70 degrees</text:p>
          </table:table-cell>
          <table:table-cell table:style-name="Default" table:number-columns-repeated="16382"/>
        </table:table-row>
        <table:table-row table:style-name="ro15">
          <table:table-cell office:value-type="string" calcext:value-type="string">
            <text:p>Family: SPINACH (Spinacia oleracea)</text:p>
            <text:p>Variety: Lavewa</text:p>
            <text:p>Original Seed Source: BotanicalInterests.com</text:p>
            <text:p>Comments: Direct sow in early spring &amp; late summer, group of 3 seeds 4-6” apart, 1/2” deep, rows 12” apart.  Thin to 1 plant every 4-6”; use these as baby greens.  Open-pollinated</text:p>
            <text:p>variety, excellent flavor, heat tolerant, mildew resistant!</text:p>
            <text:p>Soil Temp Range: 35°-85° Optimum: 70°</text:p>
          </table:table-cell>
          <table:table-cell office:value-type="string" calcext:value-type="string">
            <text:p>2016</text:p>
            <text:p>EDIBLE</text:p>
            <text:p>Cool Season</text:p>
            <text:p>10+ Seeds</text:p>
            <text:p>Intermediate Seed Saver</text:p>
            <text:p>Germination: 5-10 days</text:p>
            <text:p>@ 70 degrees</text:p>
          </table:table-cell>
          <table:table-cell table:style-name="Default" table:number-columns-repeated="16382"/>
        </table:table-row>
        <table:table-row table:style-name="ro15">
          <table:table-cell table:style-name="ce42" office:value-type="string" calcext:value-type="string">
            <text:p>Family: SPINACH (Spinacia oleracea)</text:p>
            <text:p>Variety: LIZARD</text:p>
            <text:p>Original Seed Source: Rijk Zwaan</text:p>
            <text:p>Comments: Good for babyleaf.  Fast growing. Direct sow in early spring &amp; late summer, 1/2” deep, thin to 2” apart, rows 12” apart. Days to mature, 30.</text:p>
          </table:table-cell>
          <table:table-cell table:style-name="ce42" office:value-type="string" calcext:value-type="string">
            <text:p>2017</text:p>
            <text:p>EDIBLE</text:p>
            <text:p>Cool Season</text:p>
            <text:p>12+ Seeds</text:p>
            <text:p>Intermediate Seed Saver</text:p>
            <text:p>Germination: 3-7 days</text:p>
          </table:table-cell>
          <table:table-cell table:style-name="Default" table:number-columns-repeated="16382"/>
        </table:table-row>
        <table:table-row table:style-name="ro15">
          <table:table-cell office:value-type="string" calcext:value-type="string">
            <text:p>Family: SPINACH (Spinacia oleracea)</text:p>
            <text:p>Variety: Merlo Nero (rare in U.S.)</text:p>
            <text:p>Original Seed Source: Baker Creek Heirloom Seeds</text:p>
            <text:p>www.rareseeds.com</text:p>
            <text:p>Comments: Fine flavored Italian spinach.  Direct sow in early spring &amp; late summer, 1/2” deep, thin to 3-6” apart, rows 12” apart. Loves cool weather; will bolt in summer heat.</text:p>
            <text:p>Needs rich, moist soil to thrive</text:p>
            <text:p>Soil Temp Range: 35°-85° Optimum: 70°</text:p>
          </table:table-cell>
          <table:table-cell office:value-type="string" calcext:value-type="string">
            <text:p>2018</text:p>
            <text:p>EDIBLE</text:p>
            <text:p>Cool Season</text:p>
            <text:p>25+ Seeds</text:p>
            <text:p>Intermediate Seed Saver</text:p>
            <text:p>Germination: 5-6 days</text:p>
            <text:p>@ 70 degrees</text:p>
          </table:table-cell>
          <table:table-cell table:style-name="Default" table:number-columns-repeated="16382"/>
        </table:table-row>
        <table:table-row table:style-name="ro15">
          <table:table-cell table:style-name="ce42" office:value-type="string" calcext:value-type="string">
            <text:p>Family: SPINACH (Spinacia oleracea)</text:p>
            <text:p>Variety: Monstrueux de Viroflay</text:p>
            <text:p>Original Seed Source: Botanical Interests</text:p>
            <text:p>Comments: Direct sow in early spring &amp; late summer, group of 3 seeds 12-18” apart, 1/2” deep, rows 12” apart. Plants can get up to 24” wide with 10” leaves — a gourmet</text:p>
            <text:p>delight!</text:p>
            <text:p>Soil Temp Range: 35°-85° Optimum: 70°</text:p>
          </table:table-cell>
          <table:table-cell table:style-name="ce42" office:value-type="string" calcext:value-type="string">
            <text:p>2016</text:p>
            <text:p>EDIBLE</text:p>
            <text:p>Cool Season</text:p>
            <text:p>10+ Seeds</text:p>
            <text:p>Intermediate Seed Saver</text:p>
            <text:p>Germination: 5-6 days</text:p>
            <text:p>@ 70 degrees</text:p>
          </table:table-cell>
          <table:table-cell table:style-name="Default" table:number-columns-repeated="16382"/>
        </table:table-row>
        <table:table-row table:style-name="ro15">
          <table:table-cell office:value-type="string" calcext:value-type="string">
            <text:p>Family: SPINACH (Spinacia oleracea)</text:p>
            <text:p>Variety: Malabar (Red Stem)</text:p>
            <text:p>Comments: Red veined with tender smooth leaves. Makes an excellent baby leaf spinach. Direct sow in early spring &amp; late summer, 1/2” deep, thin to 2-4” apart, rows 12” apart. Days to mature, 30.</text:p>
          </table:table-cell>
          <table:table-cell office:value-type="string" calcext:value-type="string">
            <text:p>2024</text:p>
            <text:p>EDIBLE</text:p>
            <text:p>Cool Season</text:p>
            <text:p>10-15 Seeds</text:p>
            <text:p>Intermediate Seed Saver</text:p>
            <text:p>Germination: 4-9 days</text:p>
          </table:table-cell>
          <table:table-cell table:style-name="Default" table:number-columns-repeated="16382"/>
        </table:table-row>
        <table:table-row table:style-name="ro15">
          <table:table-cell table:style-name="ce42" office:value-type="string" calcext:value-type="string">
            <text:p>Family: SPINACH (Spinacia oleracea)</text:p>
            <text:p>Variety: Matador</text:p>
            <text:p>Original Seed Source: Botanical Interests</text:p>
            <text:p>Comments: Direct sow in early spring &amp; late summer, 1/2” deep, thin to 3-6” apart, rows 12” apart. Loves cool weather; will bolt in summer heat.</text:p>
          </table:table-cell>
          <table:table-cell table:style-name="ce42" office:value-type="string" calcext:value-type="string">
            <text:p>2023</text:p>
            <text:p>EDIBLE</text:p>
            <text:p>Cool Season</text:p>
            <text:p>25+ Seeds</text:p>
            <text:p>Intermediate Seed Saver</text:p>
            <text:p>Germination: 5-6 days</text:p>
          </table:table-cell>
          <table:table-cell table:style-name="Default" table:number-columns-repeated="16382"/>
        </table:table-row>
        <table:table-row table:style-name="ro15">
          <table:table-cell office:value-type="string" calcext:value-type="string">
            <text:p>Family: SPINACH (Spinacia oleracea)</text:p>
            <text:p>Variety: RED KITTEN</text:p>
            <text:p>Original Seed Source: Rijk Zwaan</text:p>
            <text:p>Comments: Red veined with tender smooth leaves. Makes an excellent baby leaf spinach. Direct sow in early spring &amp; late summer, 1/2” deep, thin to 2” apart, rows 12” apart. Days to mature, 30.</text:p>
            <text:p>Soil Temp Range: 35°-85° Optimum: 70°</text:p>
          </table:table-cell>
          <table:table-cell office:value-type="string" calcext:value-type="string">
            <text:p>2017</text:p>
            <text:p>EDIBLE</text:p>
            <text:p>Cool Season</text:p>
            <text:p>25+ Seeds</text:p>
            <text:p>Intermediate Seed Saver</text:p>
            <text:p>Germination: 4-9 days</text:p>
            <text:p>@ 70 degrees</text:p>
          </table:table-cell>
          <table:table-cell table:style-name="Default" table:number-columns-repeated="16382"/>
        </table:table-row>
        <table:table-row table:style-name="ro15">
          <table:table-cell table:style-name="ce42" office:value-type="string" calcext:value-type="string">
            <text:p>Family: SPINACH (Spinacia oleracea)</text:p>
            <text:p>Variety: STARFISH</text:p>
            <text:p>Original Seed Source: Rijk Zwaan</text:p>
            <text:p>Comments: Oriental type. Also can be used for hydroponic growing. Thick leaves, fast growing.</text:p>
            <text:p>Direct sow in early spring &amp; late summer, 1/2” deep, thin to 2” apart, rows 12” apart. Days to mature, 30.</text:p>
            <text:p>Soil Temp Range: 35°-85° Optimum: 70°</text:p>
          </table:table-cell>
          <table:table-cell table:style-name="ce42" office:value-type="string" calcext:value-type="string">
            <text:p>2017</text:p>
            <text:p>EDIBLE</text:p>
            <text:p>Cool Season</text:p>
            <text:p>25+ Seeds</text:p>
            <text:p>Intermediate Seed Saver</text:p>
            <text:p>Germination: 4-9 days</text:p>
            <text:p>@ 70 degrees</text:p>
          </table:table-cell>
          <table:table-cell table:style-name="Default" table:number-columns-repeated="16382"/>
        </table:table-row>
        <table:table-row table:style-name="ro15">
          <table:table-cell office:value-type="string" calcext:value-type="string">
            <text:p>Family: Sprouts Alfalfa (Medicago sativa)</text:p>
            <text:p>Comments: Soak seeds in in twice their own volume of water with a pinch of salt for 8-12 hours. Rince thoroughly and place in a sprouting container, in a warm area (70 degrees). Rinse at least twice daily until sprouts are desired length (3-5 cm). Can also be grown as a crop</text:p>
            <text:p>by planting 1/2” deep after last frost. Keep soil consistently moist until harvest.</text:p>
          </table:table-cell>
          <table:table-cell office:value-type="string" calcext:value-type="string">
            <text:p>2023</text:p>
            <text:p>EDIBLE</text:p>
            <text:p>All Season</text:p>
            <text:p>50 Seeds</text:p>
          </table:table-cell>
          <table:table-cell table:style-name="Default" table:number-columns-repeated="16382"/>
        </table:table-row>
        <table:table-row table:style-name="ro15">
          <table:table-cell table:style-name="ce42" office:value-type="string" calcext:value-type="string">
            <text:p>Family: Sprouts Broccoli (Brassica oleracea var italica)</text:p>
            <text:p>Original Seed Source: Botanical Interests</text:p>
            <text:p>Comments: Soak seeds in water for 8-12 hours, place in a sprouting container, in a warm area (70 degrees).</text:p>
            <text:p>Rinse at least twice daily for 6-9 days until sprouts have small, green leaves.</text:p>
          </table:table-cell>
          <table:table-cell table:style-name="ce42" office:value-type="string" calcext:value-type="string">
            <text:p>2022</text:p>
            <text:p>EDIBLE</text:p>
            <text:p>All Season</text:p>
            <text:p>30 Seeds</text:p>
          </table:table-cell>
          <table:table-cell table:style-name="Default" table:number-columns-repeated="16382"/>
        </table:table-row>
        <table:table-row table:style-name="ro15">
          <table:table-cell office:value-type="string" calcext:value-type="string">
            <text:p>Family: Sprouts China Rose Radish (Raphanus sativus)</text:p>
            <text:p>Original Seed Source: Botanical Interests</text:p>
            <text:p>Comments: Soak seeds in water for 8-12 hours, place in a sprouting container, in a warm area (70 degrees).</text:p>
            <text:p>Rinse at least twice daily for 4-6 days until sprouts have small, green leaves.</text:p>
          </table:table-cell>
          <table:table-cell office:value-type="string" calcext:value-type="string">
            <text:p>2022</text:p>
            <text:p>EDIBLE</text:p>
            <text:p>All Season</text:p>
            <text:p>Various Seeds</text:p>
          </table:table-cell>
          <table:table-cell table:style-name="Default" table:number-columns-repeated="16382"/>
        </table:table-row>
        <table:table-row table:style-name="ro15">
          <table:table-cell table:style-name="ce42" office:value-type="string" calcext:value-type="string">
            <text:p>Family: Sprouts  (Trigonella foenum-graecum)</text:p>
            <text:p>Variety: Fenugreek</text:p>
            <text:p>Original Seed Source: Botanical Interests</text:p>
            <text:p>Comments: Soak seeds in water for 8-12 hours, place in a sprouting container, in a warm area (70 degrees).</text:p>
            <text:p>Rinse at least twice daily for 2-4 days until sprouts have roots 1/2” - 1” long.</text:p>
          </table:table-cell>
          <table:table-cell table:style-name="ce42" office:value-type="string" calcext:value-type="string">
            <text:p>2022</text:p>
            <text:p>EDIBLE</text:p>
            <text:p>All Season 30+ Seeds</text:p>
          </table:table-cell>
          <table:table-cell table:style-name="Default" table:number-columns-repeated="16382"/>
        </table:table-row>
        <table:table-row table:style-name="ro15">
          <table:table-cell office:value-type="string" calcext:value-type="string">
            <text:p>Family: Sprouts Mung Beans (Vigna radiata var. radiata)</text:p>
            <text:p>Original Seed Source: Botanical Interests</text:p>
            <text:p>Comments: Soak seeds in water for 8-12 hours, place in a sprouting container, in a warm area (70 degrees).</text:p>
            <text:p>Rinse at least twice daily for 2-4 days until sprouts have roots 1/2” - 1” long.</text:p>
          </table:table-cell>
          <table:table-cell office:value-type="string" calcext:value-type="string">
            <text:p>2022</text:p>
            <text:p>EDIBLE</text:p>
            <text:p>All Season 50+ Seeds</text:p>
          </table:table-cell>
          <table:table-cell table:style-name="Default" table:number-columns-repeated="16382"/>
        </table:table-row>
        <table:table-row table:style-name="ro15">
          <table:table-cell table:style-name="ce42" office:value-type="string" calcext:value-type="string">
            <text:p>Family: Sprouts Purple Kohlrabi (Brassica oleracea var. gongylodes)</text:p>
            <text:p>Original Seed Source: Botanical Interests</text:p>
            <text:p>Comments: Soak seeds in water for 8-12 hours, place in a sprouting container, in a warm area (70 degrees).</text:p>
            <text:p>Rinse at least twice daily for 6-8 days until sprouts have small green leaves.</text:p>
          </table:table-cell>
          <table:table-cell table:style-name="ce42" office:value-type="string" calcext:value-type="string">
            <text:p>2020</text:p>
            <text:p>EDIBLE</text:p>
            <text:p>All Season 50-100 Seeds</text:p>
          </table:table-cell>
          <table:table-cell table:style-name="Default" table:number-columns-repeated="16382"/>
        </table:table-row>
        <table:table-row table:style-name="ro15">
          <table:table-cell office:value-type="string" calcext:value-type="string">
            <text:p>Family: Sprouts Salad Mix (Brassica spp, Amaranthus hypochondriacus, Medicago sativia, Trifolium pratense)</text:p>
            <text:p>Original Seed Source: Botanical Interests</text:p>
            <text:p>Comments: Soak seeds in water for 8-12 hours, place in a sprouting container, in a warm area (70 degrees).</text:p>
            <text:p>Rinse at least twice daily for 6-9 days until sprouts have small, green leaves.</text:p>
          </table:table-cell>
          <table:table-cell office:value-type="string" calcext:value-type="string">
            <text:p>2022</text:p>
            <text:p>EDIBLE</text:p>
            <text:p>All Season 50-100 Seeds</text:p>
          </table:table-cell>
          <table:table-cell table:style-name="Default" table:number-columns-repeated="16382"/>
        </table:table-row>
        <table:table-row table:style-name="ro15">
          <table:table-cell table:style-name="ce42" office:value-type="string" calcext:value-type="string">
            <text:p>Family: SQUASH (Cucubirta pepo)</text:p>
            <text:p>Variety: Acorn (Organic) Grown By: Mary Jackson, Master Gardener</text:p>
            <text:p>Comments: Direct sow outdoors 2-3 seeds  1”deep, 3-4 feet apart; thin to 1 healthy plant.  Full sun; 75-90 days; Winter squash with distinctive longitudinal ridges on its exterior and sweet yellow orange flesh inside.</text:p>
          </table:table-cell>
          <table:table-cell table:style-name="ce42" office:value-type="string" calcext:value-type="string">
            <text:p>2017</text:p>
            <text:p>EDIBLE</text:p>
            <text:p>Warm Season</text:p>
            <text:p>5+ Seeds</text:p>
            <text:p>Easy Seed Saver</text:p>
            <text:p>Germination: 3-4 days</text:p>
            <text:p>@ 95 degrees</text:p>
          </table:table-cell>
          <table:table-cell table:style-name="Default" table:number-columns-repeated="16382"/>
        </table:table-row>
        <table:table-row table:style-name="ro15">
          <table:table-cell office:value-type="string" calcext:value-type="string">
            <text:p>Family: SQUASH (Cucubirta pepo)</text:p>
            <text:p>Variety: Acorn, Table Queen</text:p>
            <text:p>Comments: Direct sow outdoors 2-3 seeds 1”deep, 3-4 feet apart; thin to 1 healthy plant.  Full sun; 75-90 days; Winter squash with distinctive longitudinal ridges on its exterior and</text:p>
            <text:p>sweet yellow orange flesh inside.</text:p>
            <text:p>Soil Temp Range: 60°-100° Optimum: 95°</text:p>
          </table:table-cell>
          <table:table-cell office:value-type="string" calcext:value-type="string">
            <text:p>2017</text:p>
            <text:p>EDIBLE</text:p>
            <text:p>Cool Season</text:p>
            <text:p>5+ Seeds</text:p>
            <text:p>Easy Seed Saver</text:p>
            <text:p>Germination: 3-4 days</text:p>
            <text:p>@ 95 degrees</text:p>
          </table:table-cell>
          <table:table-cell table:style-name="Default" table:number-columns-repeated="16382"/>
        </table:table-row>
        <table:table-row table:style-name="ro15">
          <table:table-cell table:style-name="ce42" office:value-type="string" calcext:value-type="string">
            <text:p>Family:  SQUASH (Cucurbirta maxima)</text:p>
            <text:p>Variety: Buttercup</text:p>
            <text:p>Original Seed Source: Ferry Morse</text:p>
            <text:p>Comments: Direct sow outside after last frost. Plant</text:p>
            <text:p>1” deep in hills of 2-3 plants per hill, 6 feet apart. Full sun; 95-100 days; fruit 5-8” diameter, up to 5 pounds. One of the finest winter squashes; sweet golden-yellow meat; thin skinned.  Will cross with other maxima.</text:p>
            <text:p>Soil Temp Range: 60– 100 Optimum: 95°</text:p>
          </table:table-cell>
          <table:table-cell table:style-name="ce42" office:value-type="string" calcext:value-type="string">
            <text:p>2021</text:p>
            <text:p>EDIBLE</text:p>
            <text:p>Warm Season</text:p>
            <text:p>5 Seeds</text:p>
            <text:p>Easy Seed Saver</text:p>
            <text:p>Germination: 3-4 days</text:p>
            <text:p>@ 95 degrees</text:p>
          </table:table-cell>
          <table:table-cell table:style-name="Default" table:number-columns-repeated="16382"/>
        </table:table-row>
        <table:table-row table:style-name="ro15">
          <table:table-cell office:value-type="string" calcext:value-type="string">
            <text:p>Master Gardeer Seed Library</text:p>
            <text:p>Family: SQUASH (Cucubirta pepo)</text:p>
            <text:p>Variety: Cocozella Di Napoli (Italian Heirloom)</text:p>
            <text:p>Original Seed Source: Baker Creek Heirloom Seeds</text:p>
            <text:p>www.rareseeds.com Comments: Long, Slender fruit, ribbed, pale greenish- yellow, striped with dark green, firm &amp; flavorful.  Direct sow 2-3 seeds 1”deep, 3-4 feet apart; thin to 1 healthy plant.  Pick</text:p>
            <text:p>regularly to encourage fruit development; best flavor when skin is thin.  Will cross with other Cucubirta pepo.  55-60 days</text:p>
            <text:p>Soil Temp Range: 60°-100° Optimum: 90°</text:p>
          </table:table-cell>
          <table:table-cell office:value-type="string" calcext:value-type="string">
            <text:p>2018</text:p>
            <text:p>EDIBLE</text:p>
            <text:p>Warm Season</text:p>
            <text:p>5 Seeds</text:p>
            <text:p>Intermediate Seed Saver</text:p>
            <text:p>Germination: 3-4 days</text:p>
            <text:p>@ 90 degrees</text:p>
          </table:table-cell>
          <table:table-cell table:style-name="Default" table:number-columns-repeated="16382"/>
        </table:table-row>
        <table:table-row table:style-name="ro15">
          <table:table-cell table:style-name="ce42" office:value-type="string" calcext:value-type="string">
            <text:p>CCMG Seed Library</text:p>
            <text:p>Family: SQUASH (Cucubirta pepo)</text:p>
            <text:p>Variety: Costata Romanesco</text:p>
            <text:p>Original Seed Source: Botanical Interest</text:p>
            <text:p>Comments: striped and mottled ribbed skin, firm &amp; flavorful.</text:p>
            <text:p>Direct sow  2-3 seeds 1”deep, 3-4 feet apart; thin to 1 healthy plant.  Pick regularly to encourage fruit development; best flavor when skin is thin.   Will cross with other Cucubirta pepo.  55-60 days</text:p>
            <text:p>Soil Temp Range: 60°-100° Optimum: 90°</text:p>
          </table:table-cell>
          <table:table-cell table:style-name="ce42" office:value-type="string" calcext:value-type="string">
            <text:p>2022</text:p>
            <text:p>EDIBLE</text:p>
            <text:p>Warm Season</text:p>
            <text:p>5 Seeds</text:p>
            <text:p>Intermediate Seed Saver</text:p>
            <text:p>Germination: 3-4 days</text:p>
            <text:p>@ 90 degrees</text:p>
          </table:table-cell>
          <table:table-cell table:style-name="Default" table:number-columns-repeated="16382"/>
        </table:table-row>
        <table:table-row table:style-name="ro15">
          <table:table-cell office:value-type="string" calcext:value-type="string">
            <text:p>Family: SQUASH (Cucubirta pepo)</text:p>
            <text:p>Variety: Delicata (Honey Boat) Comments: Direct sow 1”deep in basins or 6-12 inches apart in rows; thin to healthiest plants.  Full sun, ample moisture.  Harvest in autumn when skins are too tough to be easily punctured with thumbnail.  Will cross with other squash.</text:p>
            <text:p>Oblong, tan skin, green stripes.</text:p>
          </table:table-cell>
          <table:table-cell office:value-type="string" calcext:value-type="string">
            <text:p>2024</text:p>
            <text:p>EDIBLE</text:p>
            <text:p>Warm Season</text:p>
            <text:p>5+ Seeds</text:p>
            <text:p>Intermediate Seed Saver</text:p>
            <text:p>Germination: 3-4 days</text:p>
          </table:table-cell>
          <table:table-cell table:style-name="Default" table:number-columns-repeated="16382"/>
        </table:table-row>
        <table:table-row table:style-name="ro15">
          <table:table-cell table:style-name="ce42" office:value-type="string" calcext:value-type="string">
            <text:p>Family:  SQUASH (Cucurbirta argyrosperma)</text:p>
            <text:p>Variety: Gila Pima HA:l</text:p>
            <text:p>Grown by: BJ Searcy, Master Gardener</text:p>
            <text:p>Comments: Summer squash if eaten young. Winter squash when mature. Direct sow outside after last frost. Plant 1” deep in hills of 2-3 plants per hill, 6-10 feet apart. Full sun; 92-105 days;</text:p>
            <text:p>fruit 15” long and 8” wide when mature. Will cross with other squash, gourds or cucumber.</text:p>
          </table:table-cell>
          <table:table-cell table:style-name="ce42" office:value-type="string" calcext:value-type="string">
            <text:p>2022</text:p>
            <text:p>EDIBLE</text:p>
            <text:p>Warm Season</text:p>
            <text:p>5 Seeds</text:p>
            <text:p>Easy Seed Saver</text:p>
            <text:p>Germination: 3-4 days</text:p>
            <text:p>@ 95 degrees</text:p>
          </table:table-cell>
          <table:table-cell table:style-name="Default" table:number-columns-repeated="16382"/>
        </table:table-row>
        <table:table-row table:style-name="ro15">
          <table:table-cell office:value-type="string" calcext:value-type="string">
            <text:p>Family:  SQUASH (Cucurbita pepo)</text:p>
            <text:p>Variety: Honey Boat</text:p>
            <text:p>Seed Source: Botanical Interests</text:p>
            <text:p>Comments: Winter squash with sweet flavor and full of vitamins. Direct sow outside after last frost. Plant 1” deep in hills of 2-3 plants per hill, 4-6 feet apart. Full sun; 90 days.</text:p>
            <text:p>Soil Temp Range: 60– 100 Optimum: 95°</text:p>
          </table:table-cell>
          <table:table-cell office:value-type="string" calcext:value-type="string">
            <text:p>2022</text:p>
            <text:p>EDIBLE</text:p>
            <text:p>Warm Season</text:p>
            <text:p>5 Seeds</text:p>
            <text:p>Easy Seed Saver</text:p>
            <text:p>Germination: 5-10 days</text:p>
            <text:p>@ 95 degrees</text:p>
          </table:table-cell>
          <table:table-cell table:style-name="Default" table:number-columns-repeated="16382"/>
        </table:table-row>
        <table:table-row table:style-name="ro15">
          <table:table-cell table:style-name="ce42" office:value-type="string" calcext:value-type="string">
            <text:p>Family:  SQUASH (Cucurbirta moschata)</text:p>
            <text:p>Variety: Honeynut</text:p>
            <text:p>Original Seed Source: Botanicle Interests</text:p>
            <text:p>Comments: Direct sow outside after last frost. Plant</text:p>
            <text:p>1” deep in hills of 2-3 plants per hill, 6 feet apart. Full sun; 95-100 days; fruit 5-8” diameter, up to 5 pounds. One of the finest winter squashes; sweet golden-yellow meat; thin skinned.</text:p>
            <text:p>Soil Temp Range: 60– 100 Optimum: 95°</text:p>
          </table:table-cell>
          <table:table-cell table:style-name="ce42" office:value-type="string" calcext:value-type="string">
            <text:p>2022</text:p>
            <text:p>EDIBLE</text:p>
            <text:p>Warm Season</text:p>
            <text:p>2+ Seeds</text:p>
            <text:p>Easy Seed Saver</text:p>
            <text:p>Germination: 5-10 days</text:p>
            <text:p>@ 95 degrees</text:p>
          </table:table-cell>
          <table:table-cell table:style-name="Default" table:number-columns-repeated="16382"/>
        </table:table-row>
        <table:table-row table:style-name="ro15">
          <table:table-cell office:value-type="string" calcext:value-type="string">
            <text:p>Family:  SQUASH (Cucurbirta maxima)</text:p>
            <text:p>Variety: Lakota</text:p>
            <text:p>Original Seed Source:  Botanical Interests Comments: Direct sow outside after last frost. Plant 1” deep in hills of 2-3 plants per hill,  feet apart. Full sun;</text:p>
            <text:p>85-100 days; fruit is large, smooth green and orange skin and weighs up to 15+ pounds.  Excellent cooked squash; smooth, deep orange, sweet nutty flavor.  Stores well over winter</text:p>
          </table:table-cell>
          <table:table-cell office:value-type="string" calcext:value-type="string">
            <text:p>2022</text:p>
            <text:p>EDIBLE</text:p>
            <text:p>Warm Season</text:p>
            <text:p>2 Seeds</text:p>
            <text:p>Easy Seed Saver</text:p>
            <text:p>Germination: 5-10 days</text:p>
            <text:p>@ 95 degrees</text:p>
          </table:table-cell>
          <table:table-cell table:style-name="Default" table:number-columns-repeated="16382"/>
        </table:table-row>
        <table:table-row table:style-name="ro15">
          <table:table-cell table:style-name="ce42" office:value-type="string" calcext:value-type="string">
            <text:p>Family: SQUASH (Cucurbita maxima)</text:p>
            <text:p>Variety: Navajo Hubbard</text:p>
            <text:p>Grown By: Linda Lawson, CCMGA Master Gardener</text:p>
            <text:p>Where Grown: Linda’s garden</text:p>
            <text:p>Original Seed Source: www.nativeseeds.org</text:p>
            <text:p>Comments: Common across the Navajo Nation.  Fruits can Be eaten immature as summer squash or mature as winter squash.  Plant in spring or summer rains 1” deep, 3-6 ft apart.</text:p>
            <text:p>Soil Temp Range: 60°-100° Optimum: 90°</text:p>
          </table:table-cell>
          <table:table-cell table:style-name="ce42" office:value-type="string" calcext:value-type="string">
            <text:p>2017</text:p>
            <text:p>EDIBLE</text:p>
            <text:p>Warm Season</text:p>
            <text:p>6+ Seeds Easy</text:p>
            <text:p>Seed Saver</text:p>
            <text:p>Germination: 3-4 days</text:p>
            <text:p>@ 90 degrees</text:p>
          </table:table-cell>
          <table:table-cell table:style-name="Default" table:number-columns-repeated="16382"/>
        </table:table-row>
        <table:table-row table:style-name="ro15">
          <table:table-cell office:value-type="string" calcext:value-type="string">
            <text:p>Family:  SQUASH (Cucurbirta moschata)</text:p>
            <text:p>Variety: Rumbo</text:p>
            <text:p>Grown by:  Deborah Avery-Hargrove (CCMGA Master Gardener) Original Seed Source: Donated by Master Gardener Comments: Direct sow outside after last frost. Plant</text:p>
            <text:p>1” deep in hills of 2-3 plants per hill, 6-10 feet apart. Full sun; 115-125 days; fruit is flat shaped, ribbed, smooth and weighs up to 15+ pounds.  Excellent cooked squash; smooth, deep orange, sweet flesh.  Will cross with other moschata.</text:p>
            <text:p>Soil Temp Range: 60– 100 Optimum: 95°</text:p>
          </table:table-cell>
          <table:table-cell office:value-type="string" calcext:value-type="string">
            <text:p>2016</text:p>
            <text:p>EDIBLE</text:p>
            <text:p>Warm Season</text:p>
            <text:p>6 Seeds</text:p>
            <text:p>Easy Seed Saver</text:p>
            <text:p>Germination: 3-4 days</text:p>
            <text:p>@ 95 degrees</text:p>
          </table:table-cell>
          <table:table-cell table:style-name="Default" table:number-columns-repeated="16382"/>
        </table:table-row>
        <table:table-row table:style-name="ro15">
          <table:table-cell table:style-name="ce42" office:value-type="string" calcext:value-type="string">
            <text:p>Family: SQUASH (Cucubita argyroserma)</text:p>
            <text:p>Variety: Silver Edged</text:p>
            <text:p>Original Seed Source: Native Seed/SEARCH sww.nativeseeds.org</text:p>
            <text:p>Comments: Plant outdoors 2-3 seeds 1”deep in basins, 3-4 feet apart; abundant vine growth.  Eat immature as summer squash or mature as winter squash.  Flower, seeds, and growing tips of vines all edible.</text:p>
            <text:p>Grown for tasty seeds (roasted) which are white with silvery edge. Will cross pollinate same species. Seed saving: pick mature and after-ripen 30 days before collecting the seed.</text:p>
            <text:p>Soil Temp Range: 60°-100° Optimum: 95°</text:p>
          </table:table-cell>
          <table:table-cell table:style-name="ce42" office:value-type="string" calcext:value-type="string">
            <text:p>2018</text:p>
            <text:p>EDIBLE</text:p>
            <text:p>Warm Season</text:p>
            <text:p>6 Seeds</text:p>
            <text:p>Intermediate Seed Saver</text:p>
            <text:p>Germination: 3-4 days</text:p>
            <text:p>@ 95 degrees</text:p>
          </table:table-cell>
          <table:table-cell table:style-name="Default" table:number-columns-repeated="16382"/>
        </table:table-row>
        <table:table-row table:style-name="ro15">
          <table:table-cell office:value-type="string" calcext:value-type="string">
            <text:p>Family: SQUASH (Cucubirta pepo)</text:p>
            <text:p>Variety: Spaghetti</text:p>
            <text:p>Comments: Plant outdoors 2-3 seeds 1”deep, 3-4 feet apart; thin to 1 healthy plant.  Full sun; 9”-12” fruit. Will cross with other squash, cucmbers and melons.  90 days</text:p>
          </table:table-cell>
          <table:table-cell office:value-type="string" calcext:value-type="string">
            <text:p>2018</text:p>
            <text:p>EDIBLE</text:p>
            <text:p>Warm Season</text:p>
            <text:p>6+ Seeds</text:p>
            <text:p>Intermediate Seed Saver</text:p>
            <text:p>Germination: 3-4 days</text:p>
            <text:p>@ 95 degrees</text:p>
          </table:table-cell>
          <table:table-cell table:style-name="Default" table:number-columns-repeated="16382"/>
        </table:table-row>
        <table:table-row table:style-name="ro15">
          <table:table-cell table:style-name="ce42" office:value-type="string" calcext:value-type="string">
            <text:p>Family: SQUASH Summer (Cucubirta pepo)</text:p>
            <text:p>Variety: Costata Romanesco</text:p>
            <text:p>Original Seed Source: Botanical Interests</text:p>
            <text:p>Comments: Plant outdoors1-2 weeks after last frost. Sow 1/2”-1”deep, on mounds spaced 3-4 feet apart. Pick regularly to encourage fruit development.  Will cross with other squash.</text:p>
            <text:p>52-60 days</text:p>
          </table:table-cell>
          <table:table-cell table:style-name="ce42" office:value-type="string" calcext:value-type="string">
            <text:p>2022</text:p>
            <text:p>EDIBLE</text:p>
            <text:p>Warm Season</text:p>
            <text:p>3 Seeds</text:p>
            <text:p>Intermediate Seed Saver</text:p>
            <text:p>Germination: 5-10 days</text:p>
          </table:table-cell>
          <table:table-cell table:style-name="Default" table:number-columns-repeated="16382"/>
        </table:table-row>
        <table:table-row table:style-name="ro15">
          <table:table-cell office:value-type="string" calcext:value-type="string">
            <text:p>Family: SQUASH Summer (Cucubirta pepo)</text:p>
            <text:p>Variety: Dirani Hybrid</text:p>
            <text:p>Original Seed Source: Botanical Interests</text:p>
            <text:p>Comments: Plant outdoors1-2 weeks after last frost. Sow 2-3 seeds 1/2”deep, on mounds spaced 3-4 feet apart; thin to 1 healthy plant. Pick regularly to encourage fruit development.  Harvest when small for</text:p>
            <text:p>fresh use or allow to grow for stuffing and baking. Will cross with other squash.  50 days.</text:p>
          </table:table-cell>
          <table:table-cell office:value-type="string" calcext:value-type="string">
            <text:p>2022</text:p>
            <text:p>EDIBLE</text:p>
            <text:p>Warm Season</text:p>
            <text:p>Various</text:p>
            <text:p>Seeds</text:p>
            <text:p>Hybrid; do not save seeds</text:p>
            <text:p>Germination: 7-10 days</text:p>
          </table:table-cell>
          <table:table-cell table:style-name="Default" table:number-columns-repeated="16382"/>
        </table:table-row>
        <table:table-row table:style-name="ro15">
          <table:table-cell table:style-name="ce42" office:value-type="string" calcext:value-type="string">
            <text:p>Family: SQUASH Summer (Cucubirta pepo)</text:p>
            <text:p>Variety: Dixie Hybrid</text:p>
            <text:p>Original Seed Source: Ferry-Morse</text:p>
            <text:p>Comments: Plant outdoors1-2 weeks after last frost. Sow 2- 3 seeds 1”deep, on mounds spaced 3-4 feet apart; thin to 1 healthy plant. Pick regularly to encourage fruit development.</text:p>
            <text:p>Will cross with other squash.  41 days. Hybrid yellow crookneck that is tastiest 4-6” long.</text:p>
          </table:table-cell>
          <table:table-cell table:style-name="ce42" office:value-type="string" calcext:value-type="string">
            <text:p>2022</text:p>
            <text:p>EDIBLE</text:p>
            <text:p>Warm Season 5 Seeds</text:p>
            <text:p>Hybrid; do not save seeds</text:p>
            <text:p>Germination: 7-10 days</text:p>
          </table:table-cell>
          <table:table-cell table:style-name="Default" table:number-columns-repeated="16382"/>
        </table:table-row>
        <table:table-row table:style-name="ro15">
          <table:table-cell office:value-type="string" calcext:value-type="string">
            <text:p>Family: SQUASH Summer (Cucubirta pepo)</text:p>
            <text:p>Variety: Early Prolific Straightneck</text:p>
            <text:p>Original Seed Source: Ferry-Morse</text:p>
            <text:p>Comments: Plant outdoors1-2 weeks after last frost. Sow 2- 3 seeds 1/2”-1”deep, on mounds spaced 3-4 feet apart; thin to 1 healthy plant. Pick regularly to encourage fruit development.</text:p>
            <text:p>Will cross with other squash.  55 days. Long straight fruit with small seed cavity.</text:p>
          </table:table-cell>
          <table:table-cell office:value-type="string" calcext:value-type="string">
            <text:p>2022</text:p>
            <text:p>EDIBLE</text:p>
            <text:p>Warm Season 10 Seeds</text:p>
            <text:p>Hybrid; do not save seeds</text:p>
            <text:p>Germination: 5-10 days</text:p>
          </table:table-cell>
          <table:table-cell table:style-name="Default" table:number-columns-repeated="16382"/>
        </table:table-row>
        <table:table-row table:style-name="ro15">
          <table:table-cell table:style-name="ce42" office:value-type="string" calcext:value-type="string">
            <text:p>Family: SQUASH Summer (Cucubirta pepo)</text:p>
            <text:p>Variety: EasyPick Gold Hybrid</text:p>
            <text:p>Original Seed Source: Territorial Seed Company</text:p>
            <text:p>Comments: Plant outdoors1-2 weeks after last frost. Sow 2 seeds 1”deep, on mounds spaced 3-4 feet apart; thin to 1 healthy plant. Pick regularly to encourage fruit development. Will cross with other squash. Long straight fruit with small seed cavity.</text:p>
          </table:table-cell>
          <table:table-cell table:style-name="ce42" office:value-type="string" calcext:value-type="string">
            <text:p>2013</text:p>
            <text:p>EDIBLE</text:p>
            <text:p>Warm Season</text:p>
            <text:p>4 Seeds</text:p>
            <text:p>Hybrid; do not save seeds</text:p>
            <text:p>Germination: 5-10 days</text:p>
          </table:table-cell>
          <table:table-cell table:style-name="Default" table:number-columns-repeated="16382"/>
        </table:table-row>
        <table:table-row table:style-name="ro15">
          <table:table-cell office:value-type="string" calcext:value-type="string">
            <text:p>Family: SQUASH Summer (Cucubirta pepo)</text:p>
            <text:p>Variety: Max’s Gold</text:p>
            <text:p>Original Seed Source: Botanical Interests</text:p>
            <text:p>Comments: Plant outdoors1-2 weeks after last frost. Sow 2-3 seeds 1/2”-1”deep, on mounds spaced 3-4 feet apart; thin to 1 healthy plant. Pick regularly to encourage fruit development.  Will cross with other</text:p>
            <text:p>squash.  55 days. Long straight fruit with small seed cavity.</text:p>
          </table:table-cell>
          <table:table-cell office:value-type="string" calcext:value-type="string">
            <text:p>2021</text:p>
            <text:p>EDIBLE</text:p>
            <text:p>Warm Season</text:p>
            <text:p>6 Seeds</text:p>
            <text:p>Hybrid; do not save seeds</text:p>
            <text:p>Germination: 5-10 days</text:p>
          </table:table-cell>
          <table:table-cell table:style-name="Default" table:number-columns-repeated="16382"/>
        </table:table-row>
        <table:table-row table:style-name="ro15">
          <table:table-cell table:style-name="ce42" office:value-type="string" calcext:value-type="string">
            <text:p>Family: SQUASH Summer (Cucubirta pepo)</text:p>
            <text:p>Variety: Patty Pan-Bennings Green Tint</text:p>
            <text:p>Original Seed Source: Botanical Interests</text:p>
            <text:p>Comments: Plant outdoors1-2 weeks after last frost. Sow 2- 3 seeds 1/2”-1”deep, on mounds spaced 3-4 feet apart; thin to 1 healthy plant. Pick regularly to encourage fruit development.</text:p>
            <text:p>45-60 days</text:p>
          </table:table-cell>
          <table:table-cell table:style-name="ce42" office:value-type="string" calcext:value-type="string">
            <text:p>2022</text:p>
            <text:p>EDIBLE</text:p>
            <text:p>Warm Season</text:p>
            <text:p>5 Seeds</text:p>
            <text:p>Intermediate Seed Saver</text:p>
            <text:p>Germination: 5-10 days</text:p>
          </table:table-cell>
          <table:table-cell table:style-name="Default" table:number-columns-repeated="16382"/>
        </table:table-row>
        <table:table-row table:style-name="ro15">
          <table:table-cell office:value-type="string" calcext:value-type="string">
            <text:p>Family: SQUASH Summer (Cucubirta pepo)</text:p>
            <text:p>Variety: Patty Pan Scallop Blend</text:p>
            <text:p>Original Seed Source: Botanical Interests</text:p>
            <text:p>Comments: Plant outdoors1-2 weeks after last frost. Sow 2- 3 seeds 1/2”-1”deep, on mounds spaced 3-4 feet apart; thin to 1 healthy plant. Pick regularly to encourage fruit development.</text:p>
            <text:p>45-60 days</text:p>
          </table:table-cell>
          <table:table-cell office:value-type="string" calcext:value-type="string">
            <text:p>2022</text:p>
            <text:p>EDIBLE</text:p>
            <text:p>Warm Season</text:p>
            <text:p>6 Seeds</text:p>
            <text:p>Intermediate Seed Saver</text:p>
            <text:p>Germination: 5-10 days</text:p>
          </table:table-cell>
          <table:table-cell table:style-name="Default" table:number-columns-repeated="16382"/>
        </table:table-row>
        <table:table-row table:style-name="ro15">
          <table:table-cell table:style-name="ce42" office:value-type="string" calcext:value-type="string">
            <text:p>Family: SQUASH Summer (Cucubirta pepo)</text:p>
            <text:p>Variety: Yellow Crookneck, Early Summer</text:p>
            <text:p>Comments: Plant outdoors1-2 weeks after last frost. Sow 2- 3 seeds 1/2”-1”deep, on mounds spaced 3-4 feet apart; thin to 1 healthy plant. Pick regularly to encourage fruit development.</text:p>
            <text:p>Will cross with other squash.  55 days. Long straight fruit with small seed cavity.</text:p>
          </table:table-cell>
          <table:table-cell table:style-name="ce42" office:value-type="string" calcext:value-type="string">
            <text:p>2022</text:p>
            <text:p>EDIBLE</text:p>
            <text:p>Warm Season</text:p>
            <text:p>8 Seeds</text:p>
            <text:p>Hybrid; do not save seeds</text:p>
            <text:p>Germination: 5-10 days</text:p>
          </table:table-cell>
          <table:table-cell table:style-name="Default" table:number-columns-repeated="16382"/>
        </table:table-row>
        <table:table-row table:style-name="ro15">
          <table:table-cell office:value-type="string" calcext:value-type="string">
            <text:p>Family: SQUASH (Cucurbita maxima)</text:p>
            <text:p>Variety: Turks Turban</text:p>
            <text:p>Original Seed Source: Baker Creek Heirloom Seeds—www.rareseeds.com</text:p>
            <text:p>Comments: Beautiful striped in red, orange, green, and white, turban shaped ‘winter’ squash.  Direct sow after frost, 1” deep, 3-5 seeds per basin or 6-12 inches apart in rows.  Thin to best 3 plants. Harvest in fall when skins are too tough to be easily punctured with thumbnail.  Very old variety from France with thick orange flesh.   Soil Temp Range: 60°-100°</text:p>
            <text:p>Optimum: 90°</text:p>
          </table:table-cell>
          <table:table-cell office:value-type="string" calcext:value-type="string">
            <text:p>2018</text:p>
            <text:p>EDIBLE</text:p>
            <text:p>Warm Season</text:p>
            <text:p>4+ Seeds Easy</text:p>
            <text:p>Seed Saver</text:p>
            <text:p>Germination: 3-4 days</text:p>
            <text:p>@ 90 degrees</text:p>
          </table:table-cell>
          <table:table-cell table:style-name="Default" table:number-columns-repeated="16382"/>
        </table:table-row>
        <table:table-row table:style-name="ro15">
          <table:table-cell table:style-name="ce42" office:value-type="string" calcext:value-type="string">
            <text:p>Family:  SQUASH (Cucurbirta moschata)</text:p>
            <text:p>Variety: Waltham Butternut Seed Source: American Seed</text:p>
            <text:p>Comments: Winter squash. Great for baking or making pies.  Direct sow outside after last frost. Plant 1” deep in hills of 2-3 plants per hill, 6-10 feet apart. Full sun; 92- 105 days; fruit 12-15” long, 3-6 pounds. Will cross with other squash, gourds or cucumber.</text:p>
          </table:table-cell>
          <table:table-cell table:style-name="ce42" office:value-type="string" calcext:value-type="string">
            <text:p>2022</text:p>
            <text:p>EDIBLE</text:p>
            <text:p>Warm Season</text:p>
            <text:p>3 Seeds</text:p>
            <text:p>Easy Seed Saver</text:p>
            <text:p>Germination: 3-4 days</text:p>
          </table:table-cell>
          <table:table-cell table:style-name="Default" table:number-columns-repeated="16382"/>
        </table:table-row>
        <table:table-row table:style-name="ro15">
          <table:table-cell office:value-type="string" calcext:value-type="string">
            <text:p>Family: SQUASH (Cucubirta pepo)</text:p>
            <text:p>Variety: Zucchini—Black Beauty</text:p>
            <text:p>Original Seed Source: Ferry Morse</text:p>
            <text:p>Comments: Plant outdoors 2-3 seeds 1”deep, 3-4 feet apart; thin to 1 healthy plant.  Prolific, long harvest. Pick regularly to encourage fruit development; best flavor when skin is thin.  Will cross with other squash.  55-60 days</text:p>
          </table:table-cell>
          <table:table-cell office:value-type="string" calcext:value-type="string">
            <text:p>2022</text:p>
            <text:p>EDIBLE</text:p>
            <text:p>Warm Season</text:p>
            <text:p>5+ Seeds</text:p>
            <text:p>Intermediate Seed Saver</text:p>
            <text:p>Germination: 3-4 days</text:p>
          </table:table-cell>
          <table:table-cell table:style-name="Default" table:number-columns-repeated="16382"/>
        </table:table-row>
        <table:table-row table:style-name="ro15">
          <table:table-cell table:style-name="ce42" office:value-type="string" calcext:value-type="string">
            <text:p>Family: SQUASH (Cucubirta pepo)</text:p>
            <text:p>Variety: Zucchini—Dark Green</text:p>
            <text:p>Original Seed Source: Ferry Morse</text:p>
            <text:p>Comments: Plant outdoors 2 seeds 1”deep, 3-4 feet apart; thin to 1 healthy plant.  Prolific, long harvest. Pick regularly to encourage fruit development; best flavor when skin is thin.</text:p>
            <text:p>Will cross with other squash and cucumbers. 50 days to</text:p>
            <text:p>harvest.</text:p>
          </table:table-cell>
          <table:table-cell table:style-name="ce42" office:value-type="string" calcext:value-type="string">
            <text:p>2022</text:p>
            <text:p>EDIBLE</text:p>
            <text:p>Warm Season</text:p>
            <text:p>5 Seeds</text:p>
            <text:p>Intermediate Seed Saver</text:p>
            <text:p>Germination: 3-4 days</text:p>
            <text:p>@ 95 degrees</text:p>
          </table:table-cell>
          <table:table-cell table:style-name="Default" table:number-columns-repeated="16382"/>
        </table:table-row>
        <table:table-row table:style-name="ro15">
          <table:table-cell office:value-type="string" calcext:value-type="string">
            <text:p>Family: SQUASH Zucchini (Cucubirta pepo) Original Seed Source: Territorial Seed Source</text:p>
            <text:p>Comments: Plant outdoors 2-3 seeds 1”deep, 3-4 feet apart; thin to 1 healthy plant.  Prolific, long harvest. Pick regularly to encourage fruit development; best flavor when skin is thin.</text:p>
            <text:p>Variety: Easypick Gold, Yellow Zucchini</text:p>
          </table:table-cell>
          <table:table-cell office:value-type="string" calcext:value-type="string">
            <text:p>2018</text:p>
            <text:p>EDIBLE</text:p>
            <text:p>Warm Season</text:p>
            <text:p>4 Seeds</text:p>
            <text:p>Intermediate Seed Saver</text:p>
            <text:p>Germination: 5-10 days</text:p>
          </table:table-cell>
          <table:table-cell table:style-name="Default" table:number-columns-repeated="16382"/>
        </table:table-row>
        <table:table-row table:style-name="ro15">
          <table:table-cell table:style-name="ce42" office:value-type="string" calcext:value-type="string">
            <text:p>Family: SQUASH (Cucubirta pepo)</text:p>
            <text:p>Variety: Zucchini, Grey Comments: Plant outdoors 2-3 seeds 1”deep, 3-4 feet apart; thin to 1 healthy plant.  Prolific, long harvest. Pick regularly to encourage fruit development; best flavor when skin is thin.</text:p>
            <text:p>55-60 days</text:p>
            <text:p>Soil Temp Range: 60°-100° Optimum: 95°</text:p>
          </table:table-cell>
          <table:table-cell table:style-name="ce42" office:value-type="string" calcext:value-type="string">
            <text:p>2020</text:p>
            <text:p>EDIBLE</text:p>
            <text:p>Warm Season</text:p>
            <text:p>10+ Seeds</text:p>
            <text:p>Intermediate Seed Saver</text:p>
            <text:p>Germination: 3-4 days</text:p>
            <text:p>@ 95 degrees</text:p>
          </table:table-cell>
          <table:table-cell table:style-name="Default" table:number-columns-repeated="16382"/>
        </table:table-row>
        <table:table-row table:style-name="ro15">
          <table:table-cell office:value-type="string" calcext:value-type="string">
            <text:p>Family: SQUASH (Cucubirta pepo)</text:p>
            <text:p>Variety: Zucchini—Round</text:p>
            <text:p>Original Seed Source: americanseedco.com</text:p>
            <text:p>Comments: Plant outdoors 2-3 seeds 1”deep, 3-4 feet apart; thin to 1 healthy plant.  Globe shaped, 4-6” fruit; great for stuffing; compact; productive. Pick regularly to encourage fruit development; best flavor when skin is thin.  Will cross with</text:p>
            <text:p>other Cucubirta pepo.  50 days</text:p>
            <text:p>Soil Temp Range: 60°-100° Optimum: 95°</text:p>
          </table:table-cell>
          <table:table-cell office:value-type="string" calcext:value-type="string">
            <text:p>2016</text:p>
            <text:p>EDIBLE</text:p>
            <text:p>Warm Season</text:p>
            <text:p>5+ Seeds</text:p>
            <text:p>Intermediate Seed Saver</text:p>
            <text:p>Germination: 3-4 days</text:p>
            <text:p>@ 95 degrees</text:p>
          </table:table-cell>
          <table:table-cell table:style-name="Default" table:number-columns-repeated="16382"/>
        </table:table-row>
        <table:table-row table:style-name="ro15">
          <table:table-cell table:style-name="ce42" office:value-type="string" calcext:value-type="string">
            <text:p>Family: SWISS CHARD (Beta vulgaris)</text:p>
            <text:p>Variety: Bright Lights Seed Source: Ferry-Morse</text:p>
            <text:p>Comments: Sow direct or indoors for transplant, 1/2” deep, 2-4” apart for baby leaf. Thin to 8-12” for full size. Sun/partial shade, 40-60 days.  Stalks will be 8-10” tall.</text:p>
            <text:p>Harvest outer leaves as they are ready. Drought and frost tolerant.</text:p>
          </table:table-cell>
          <table:table-cell table:style-name="ce42" office:value-type="string" calcext:value-type="string">
            <text:p>2023</text:p>
            <text:p>EDIBLE</text:p>
            <text:p>Cool Season</text:p>
            <text:p>6-8 Seeds</text:p>
            <text:p>Intermediate Seed Saver</text:p>
          </table:table-cell>
          <table:table-cell table:style-name="Default" table:number-columns-repeated="16382"/>
        </table:table-row>
        <table:table-row table:style-name="ro15">
          <table:table-cell office:value-type="string" calcext:value-type="string">
            <text:p>Family: SWISS CHARD (Beta vulgaris)</text:p>
            <text:p>Variety: Fordhook Giant</text:p>
            <text:p>Original Seed Source: Territorial Seed Co Comments: Sow direct or indoors for transplant, 1/2” deep, 8” apart early spring.  Sun/partial shade, 40-60 days.  Stalks will be 8-10” tall.  Begin harvesting when outer leaves are 6-8” tall; cut off individual leaves near</text:p>
            <text:p>the base to encourage new growth. Cold hardy variety that is tolerant to heat.</text:p>
          </table:table-cell>
          <table:table-cell office:value-type="string" calcext:value-type="string">
            <text:p>2020</text:p>
            <text:p>EDIBLE</text:p>
            <text:p>Cool Season</text:p>
            <text:p>10 Seeds</text:p>
            <text:p>Intermediate Seed Saver</text:p>
          </table:table-cell>
          <table:table-cell table:style-name="Default" table:number-columns-repeated="16382"/>
        </table:table-row>
        <table:table-row table:style-name="ro15">
          <table:table-cell table:style-name="ce42" office:value-type="string" calcext:value-type="string">
            <text:p>Family: SWISS CHARD (Beta vulgaris)</text:p>
            <text:p>Variety: Mixed Colors Acelga Original Seed Source: Ferry Morse</text:p>
            <text:p>Comments: Sow direct or indoors for transplant, 1/2” deep, 8” apart.  Sun/partial shade, 40-60 days.  Stalks will be 8-10” tall.</text:p>
            <text:p>Soil Temp:  Range: 40-95 degrees Optimum: 85 degrees</text:p>
          </table:table-cell>
          <table:table-cell table:style-name="ce42" office:value-type="string" calcext:value-type="string">
            <text:p>2016</text:p>
            <text:p>EDIBLE</text:p>
            <text:p>Cool Season</text:p>
            <text:p>20+ Seeds</text:p>
            <text:p>Intermediate Seed Saver</text:p>
            <text:p>Germination:</text:p>
            <text:p>4-5 days @ 85 degrees</text:p>
          </table:table-cell>
          <table:table-cell table:style-name="Default" table:number-columns-repeated="16382"/>
        </table:table-row>
        <table:table-row table:style-name="ro15">
          <table:table-cell office:value-type="string" calcext:value-type="string">
            <text:p>Family: SWISS CHARD (Beta vulgaris)</text:p>
            <text:p>Variety: PEPPERMINT</text:p>
            <text:p>Original Source: Johnny’s Seeds</text:p>
            <text:p>Comments: Pink on white stems. Sow direct or indoors for transplant, 1/2” deep, 8” apart early spring. Sun/partial shade, 40-60 days.  Stalks will be 8-10” tall. Begin harvesting when outer leaves are 6-8” tall; cut off individual leaves near the base; new leaves will grow back. Loves warm weather.</text:p>
            <text:p>Soil Temp:  Range: 40-95 degrees Optimum: 85 degrees</text:p>
          </table:table-cell>
          <table:table-cell office:value-type="string" calcext:value-type="string">
            <text:p>2017</text:p>
            <text:p>EDIBLE</text:p>
            <text:p>Cool Season</text:p>
            <text:p>20+ Seeds</text:p>
            <text:p>Intermediate Seed Saver</text:p>
            <text:p>Germination:</text:p>
            <text:p>4-5 days @ 85 degrees</text:p>
          </table:table-cell>
          <table:table-cell table:style-name="Default" table:number-columns-repeated="16382"/>
        </table:table-row>
        <table:table-row table:style-name="ro15">
          <table:table-cell table:style-name="ce42" office:value-type="string" calcext:value-type="string">
            <text:p>Family: SWISS CHARD (Beta vulgaris)</text:p>
            <text:p>Variety: Rainbow Blend</text:p>
            <text:p>Comments: Sow direct or indoors for transplant, 1/2” deep, 2-4” apart for baby leaf. Thin to 8-12” for full size. Sun/partial shade, 40-60 days.  Stalks will be 8-10” tall. Harvest outer leaves as they are ready.</text:p>
            <text:p>Soil Temp:  Range: 40-95 degrees Optimum: 85 degrees</text:p>
          </table:table-cell>
          <table:table-cell table:style-name="ce42" office:value-type="string" calcext:value-type="string">
            <text:p>2020</text:p>
            <text:p>EDIBLE</text:p>
            <text:p>Cool Season</text:p>
            <text:p>12 Seeds</text:p>
            <text:p>Intermediate Seed Saver</text:p>
          </table:table-cell>
          <table:table-cell table:style-name="Default" table:number-columns-repeated="16382"/>
        </table:table-row>
        <table:table-row table:style-name="ro15">
          <table:table-cell office:value-type="string" calcext:value-type="string">
            <text:p>Family: SWISS CHARD (Beta vulgaris)</text:p>
            <text:p>Variety: Ruby Red</text:p>
            <text:p>Original Seed Source: Lilly Miller Seeds Comments: Sow direct or indoors for transplant, 1/2” deep, 8” apart early spring.  Sun/partial shade, 40-60 days.  Stalks will be 8-10” tall.  Begin harvesting when outer leaves are 6-8” tall; cut off individual leaves near the base; new leaves will grow back. Loves warm weather.</text:p>
            <text:p>Soil Temp:  Range: 40-95 degrees Optimum: 85 degrees</text:p>
          </table:table-cell>
          <table:table-cell office:value-type="string" calcext:value-type="string">
            <text:p>2016</text:p>
            <text:p>EDIBLE</text:p>
            <text:p>Cool Season</text:p>
            <text:p>6+ Seeds</text:p>
            <text:p>Intermediate Seed Saver</text:p>
            <text:p>Germination:</text:p>
            <text:p>4-5 days @ 85 degrees</text:p>
          </table:table-cell>
          <table:table-cell table:style-name="Default" table:number-columns-repeated="16382"/>
        </table:table-row>
        <table:table-row table:style-name="ro15">
          <table:table-cell table:style-name="ce42" office:value-type="string" calcext:value-type="string">
            <text:p>“THREE SISTERS” SEED PACKET</text:p>
            <text:p>Seeds:    Bean, Common—Cherokee Trail of Tears Corn, Sweet—Stowell’s Evergreen</text:p>
            <text:p>Squash, C. moschata—Waltham Butternut</text:p>
            <text:p>Grown by and/or Original Seed Source:</text:p>
            <text:p>Bean - D. Hargrove (CCMGA Master Gardener) and seedsavers.org</text:p>
            <text:p>Corn - seedsavers.org</text:p>
            <text:p>Squash - Mary Jackson (CCMGA Master Gardener)</text:p>
          </table:table-cell>
          <table:table-cell table:style-name="ce42" office:value-type="string" calcext:value-type="string">
            <text:p>2017</text:p>
            <text:p>EDIBLE</text:p>
            <text:p>Warm Season</text:p>
            <text:p>Bean, 10+</text:p>
            <text:p>Corn, 20+</text:p>
            <text:p>Squash, 6+</text:p>
            <text:p>Easy Seed Saver</text:p>
          </table:table-cell>
          <table:table-cell table:style-name="Default" table:number-columns-repeated="16382"/>
        </table:table-row>
        <table:table-row table:style-name="ro15">
          <table:table-cell office:value-type="string" calcext:value-type="string">
            <text:p>“THREE SISTERS” SEED PACKET</text:p>
            <text:p>Seeds:    Bean, Common—Cherokee Trail of Tears Corn, Sweet—Stowell’s Evergreen Squash, C.maxima—Navajo Hubbard</text:p>
            <text:p>Grown by and/or Original Seed Source:</text:p>
            <text:p>Bean - D. Hargrove (CCMGA Master Gardener) and seedsavers.org</text:p>
            <text:p>Corn - seedsavers.org</text:p>
            <text:p>Squash - Linda Larson (CCMGA Master Gardener)</text:p>
          </table:table-cell>
          <table:table-cell office:value-type="string" calcext:value-type="string">
            <text:p>2017</text:p>
            <text:p>EDIBLE</text:p>
            <text:p>Warm Season</text:p>
            <text:p>Bean, 10+</text:p>
            <text:p>Corn, 20+</text:p>
            <text:p>Squash, 6+</text:p>
            <text:p>Easy Seed Saver</text:p>
          </table:table-cell>
          <table:table-cell table:style-name="Default" table:number-columns-repeated="16382"/>
        </table:table-row>
        <table:table-row table:style-name="ro15">
          <table:table-cell table:style-name="ce42" office:value-type="string" calcext:value-type="string">
            <text:p>Family: TOMATILLO (Physalis philadelphica)</text:p>
            <text:p>Variety: Grande Rio Verde</text:p>
            <text:p>Original Seed Source: Botanical Interests</text:p>
            <text:p>Comments: Start indoors 4-6 weeks before transplant, 1/4” below surface; plant outdoors 36” apart, full sun; 80 days; up to  3 ounce green fruit. Makes a tangy salsa verde or enchilada sauce.</text:p>
          </table:table-cell>
          <table:table-cell table:style-name="ce42" office:value-type="string" calcext:value-type="string">
            <text:p>2024</text:p>
            <text:p>EDIBLE</text:p>
            <text:p>Warm Season</text:p>
            <text:p>18 Seeds</text:p>
            <text:p>Intermediate Seed Saver</text:p>
            <text:p>Germination: 6-7 days</text:p>
          </table:table-cell>
          <table:table-cell table:style-name="Default" table:number-columns-repeated="16382"/>
        </table:table-row>
        <table:table-row table:style-name="ro15">
          <table:table-cell office:value-type="string" calcext:value-type="string">
            <text:p>Family: TOMATILLO (Physalis philadelphica)</text:p>
            <text:p>Variety: Purple</text:p>
            <text:p>Original Seed Source: Botanical Interests</text:p>
            <text:p>Comments: Start indoors 4-6 weeks before transplant, 1/4” below surface; plant outdoors 36” apart, full sun; 80 days; up to  3 ounce fruit.</text:p>
            <text:p>Sweeter than green.</text:p>
          </table:table-cell>
          <table:table-cell office:value-type="string" calcext:value-type="string">
            <text:p>2022</text:p>
            <text:p>EDIBLE</text:p>
            <text:p>Warm Season</text:p>
            <text:p>11 Seeds</text:p>
            <text:p>Intermediate Seed Saver</text:p>
            <text:p>Germination: 6-7 days</text:p>
          </table:table-cell>
          <table:table-cell table:style-name="Default" table:number-columns-repeated="16382"/>
        </table:table-row>
        <table:table-row table:style-name="ro15">
          <table:table-cell table:style-name="ce42" office:value-type="string" calcext:value-type="string">
            <text:p>Family: TOMATILLO (Physalis ixocarpa)</text:p>
            <text:p>Variety: Toma Verde</text:p>
            <text:p>Original Seed Source: Native Seed/SEARCH www.nativeseeds.org</text:p>
            <text:p>Comments: Start indoors 4-6 weeks before transplant, 1/4” below surface; plant outdoors 36” apart, full sun; 80 days; up to up to 3 ounce fruit.</text:p>
            <text:p>Soil Temp Range: 50°-95° Optimum: 85°</text:p>
          </table:table-cell>
          <table:table-cell table:style-name="ce42" office:value-type="string" calcext:value-type="string">
            <text:p>2017</text:p>
            <text:p>EDIBLE</text:p>
            <text:p>Warm Season</text:p>
            <text:p>5 Seeds</text:p>
            <text:p>Intermediate Seed Saver</text:p>
            <text:p>Germination: 6-7 days</text:p>
            <text:p>@ 85 degrees</text:p>
          </table:table-cell>
          <table:table-cell table:style-name="Default" table:number-columns-repeated="16382"/>
        </table:table-row>
        <table:table-row table:style-name="ro15">
          <table:table-cell office:value-type="string" calcext:value-type="string">
            <text:p>Family: TOMATO (Solanum lycopersiucm)</text:p>
            <text:p>Variety: Gardener’s Delight Cherry Tomato</text:p>
            <text:p>Original Seed Source: Botanical Interest</text:p>
            <text:p>Comments: Start indoors 4-6 weeks before transplant,</text:p>
            <text:p>1/4” deep; plant outdoors 36” apart, full sun. Vigorous vines reaching 6’ long</text:p>
          </table:table-cell>
          <table:table-cell office:value-type="string" calcext:value-type="string">
            <text:p>2024</text:p>
            <text:p>EDIBLE</text:p>
            <text:p>Warm Season</text:p>
            <text:p>8 Seeds</text:p>
            <text:p>Intermediate Seed Saver</text:p>
            <text:p>Germination: 5-10 days</text:p>
          </table:table-cell>
          <table:table-cell table:style-name="Default" table:number-columns-repeated="16382"/>
        </table:table-row>
        <table:table-row table:style-name="ro15">
          <table:table-cell table:style-name="ce42" office:value-type="string" calcext:value-type="string">
            <text:p>Family: TOMATO (Lycopersicon esculentum)</text:p>
            <text:p>Variety: Ace 55 (Determinate)</text:p>
            <text:p>Original Seed Source: Botanical Interests</text:p>
            <text:p>Comments: Start indoors 4-6 weeks before transplant, usually 1-2 weeks after last frost. Plant outdoors 24”-36” apart. 1/4” below surface; plant outdoors 36” apart. Majority of fruit ripens over a 1-2 week period about 80 days from transplant.</text:p>
            <text:p>Great for canning.</text:p>
          </table:table-cell>
          <table:table-cell table:style-name="ce42" office:value-type="string" calcext:value-type="string">
            <text:p>2020</text:p>
            <text:p>EDIBLE</text:p>
            <text:p>Warm Season</text:p>
            <text:p>10+ Seeds</text:p>
            <text:p>Intermediate Seed Saver</text:p>
            <text:p>Germination: 5-10 days</text:p>
          </table:table-cell>
          <table:table-cell table:style-name="Default" table:number-columns-repeated="16382"/>
        </table:table-row>
        <table:table-row table:style-name="ro15">
          <table:table-cell office:value-type="string" calcext:value-type="string">
            <text:p>Family: TOMATO (Lycopersicon esculentum)</text:p>
            <text:p>Variety: Abe Lincoln</text:p>
            <text:p>Original Seed Source: Heirloom Seeds</text:p>
            <text:p>Comments: Start indoors 4-6 weeks before transplant, 1/4” below surface; plant outdoors 24” apart. Large vining plant; full sun; 70-77 days; medium fruit that grows in clusters; great slicer.</text:p>
          </table:table-cell>
          <table:table-cell office:value-type="string" calcext:value-type="string">
            <text:p>2022</text:p>
            <text:p>EDIBLE</text:p>
            <text:p>Warm Season</text:p>
            <text:p>8+ Seeds</text:p>
            <text:p>Intermediate Seed Saver</text:p>
            <text:p>Germination: 7-10 days</text:p>
          </table:table-cell>
          <table:table-cell table:style-name="Default" table:number-columns-repeated="16382"/>
        </table:table-row>
        <table:table-row table:style-name="ro15">
          <table:table-cell table:style-name="ce42" office:value-type="string" calcext:value-type="string">
            <text:p>Family: TOMATO (Lycopersicon esculentum)</text:p>
            <text:p>Variety: Beefsteak Original Seed Source: Botanical Interests</text:p>
            <text:p>Comments: Start indoors 4-6 weeks before transplant, 1/4” below surface; plant outdoors 24” apart. Large vining plant; full sun; 80 days; Large fruit and great slicer.</text:p>
          </table:table-cell>
          <table:table-cell table:style-name="ce42" office:value-type="string" calcext:value-type="string">
            <text:p>2022</text:p>
            <text:p>EDIBLE</text:p>
            <text:p>Warm Season</text:p>
            <text:p>5+ Seeds</text:p>
            <text:p>Intermediate Seed Saver</text:p>
            <text:p>Germination: 7-10 days</text:p>
          </table:table-cell>
          <table:table-cell table:style-name="Default" table:number-columns-repeated="16382"/>
        </table:table-row>
        <table:table-row table:style-name="ro15">
          <table:table-cell office:value-type="string" calcext:value-type="string">
            <text:p>Family: TOMATO (Lycopersicon esculentum)</text:p>
            <text:p>Variety: Black Krim</text:p>
            <text:p>Original Seed Source: Botanical Interests</text:p>
            <text:p>Comments: Start indoors 4-6 weeks before transplant. Sow 1/4” below surface in containers. Transplant 1-2 weeks after last frost. ; plant outdoors 24”-36” apart. Matures 70-90 days</text:p>
            <text:p>from transplant. Best eaten fresh.</text:p>
          </table:table-cell>
          <table:table-cell office:value-type="string" calcext:value-type="string">
            <text:p>2021</text:p>
            <text:p>EDIBLE</text:p>
            <text:p>Warm Season</text:p>
            <text:p>5+ Seeds</text:p>
            <text:p>Intermediate Seed Saver</text:p>
            <text:p>Germination: 5-10 days</text:p>
          </table:table-cell>
          <table:table-cell table:style-name="Default" table:number-columns-repeated="16382"/>
        </table:table-row>
        <table:table-row table:style-name="ro15">
          <table:table-cell table:style-name="ce42" office:value-type="string" calcext:value-type="string">
            <text:p>Family: TOMATO (Solanaceae)</text:p>
            <text:p>Variety: Brad’s Atomic Grape (Lycopersicum)</text:p>
            <text:p>Grown By: Deborah Avery-Hargrove</text:p>
            <text:p>Where Grown: Hereford, AZ</text:p>
            <text:p>Original Seed Source: www.rareseeds.com Comments: Full blown assault on the senses.  Elongated clusters purple stripes turning green/red/brown/blue stripes when mature with green/yellow flesh interior; start indoors 6 weeks before last frost. Sweet, PROLIFIC, Indeterminate.</text:p>
            <text:p>Soil Temp Range: 75°-85° Optimum: 80°</text:p>
          </table:table-cell>
          <table:table-cell table:style-name="ce42"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5">
          <table:table-cell office:value-type="string" calcext:value-type="string">
            <text:p>Family: TOMATO (Solanaceae)</text:p>
            <text:p>Variety: Brad’s Atomic Grape (Lycopersicum)</text:p>
            <text:p>Grown By: Deborah Avery-Hargrove</text:p>
            <text:p>Where Grown: Hereford, AZ</text:p>
            <text:p>Original Seed Source: www.rareseeds.com Comments: Full blown assault on the senses.  Elongated clusters purple stripes turning green/red/brown/blue stripes when mature with green/yellow flesh interior; start indoors 6 weeks before last frost. Sweet, PROLIFIC, Indeterminate.</text:p>
            <text:p>Soil Temp Range: 75°-85° Optimum: 80°</text:p>
          </table:table-cell>
          <table:table-cell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5">
          <table:table-cell table:style-name="ce42" office:value-type="string" calcext:value-type="string">
            <text:p>Family: TOMATO (Lycopersicon esculentum)</text:p>
            <text:p>Variety: Brandywine: Red and Yellow Blend</text:p>
            <text:p>Original Seed Source: Botanical Interests</text:p>
            <text:p>Comments: Start indoors 4-6 weeks before transplant, usually 1-2 weeks after last frost. Sow 1/4” and thin to one healthy plant for transplant, Plant outdoors 24”-36” apart.  76-110 days from transplant.</text:p>
          </table:table-cell>
          <table:table-cell table:style-name="ce42" office:value-type="string" calcext:value-type="string">
            <text:p>2022</text:p>
            <text:p>EDIBLE</text:p>
            <text:p>Warm Season</text:p>
            <text:p>6+ Seeds</text:p>
            <text:p>Intermediate Seed Saver</text:p>
            <text:p>Germination: 5-10 days</text:p>
          </table:table-cell>
          <table:table-cell table:style-name="Default" table:number-columns-repeated="16382"/>
        </table:table-row>
        <table:table-row table:style-name="ro15">
          <table:table-cell office:value-type="string" calcext:value-type="string">
            <text:p>Family: TOMATO (Lycopersicon esculentum)</text:p>
            <text:p>Variety: Big Boy (indeterminate) Hybrid Original Seed Source: Ferry-Morse</text:p>
            <text:p>Comments: Start indoors 4-6 weeks before transplant, 1/4” below surface; plant outdoors 24” apart. Large vining plant; full sun; 80 days; Large fruit and great slicer.</text:p>
          </table:table-cell>
          <table:table-cell office:value-type="string" calcext:value-type="string">
            <text:p>2024</text:p>
            <text:p>EDIBLE</text:p>
            <text:p>Warm Season</text:p>
            <text:p>5+ Seeds</text:p>
            <text:p>Hybrid Do not save</text:p>
            <text:p>seeds</text:p>
            <text:p>Germination: 7-10 days</text:p>
          </table:table-cell>
          <table:table-cell table:style-name="Default" table:number-columns-repeated="16382"/>
        </table:table-row>
        <table:table-row table:style-name="ro15">
          <table:table-cell table:style-name="ce42" office:value-type="string" calcext:value-type="string">
            <text:p>Family: TOMATO (Solanaceae)</text:p>
            <text:p>Variety: Coyote (Lycopersicum)</text:p>
            <text:p>Grown By: Deborah Avery-Hargrove</text:p>
            <text:p>Where Grown: Hereford, AZ</text:p>
            <text:p>Original Seed Source: www.seedtreasures.com Comments: Originally from Vera Cruz, Mexico, cherry size, pale translucent yellow, prolific,  start indoors 6 weeks</text:p>
            <text:p>before last frost. 70 days, indeterminate—wonderful for yellow salsa!</text:p>
            <text:p>Soil Temp Range: 75°-85° Optimum: 80°</text:p>
          </table:table-cell>
          <table:table-cell table:style-name="ce42"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5">
          <table:table-cell office:value-type="string" calcext:value-type="string">
            <text:p>Family: TOMATO CHERRY (Solanum lycopersicum)</text:p>
            <text:p>Variety: Chocolate Cherry</text:p>
            <text:p>Original Seed Source: Botanical Interests</text:p>
            <text:p>Comments: Start indoors 4-6 weeks before transplant. Sow 1/8” below surface in containers. Transplant 1-2 weeks after last frost. ; plant outdoors 24”-36” apart. Matures 70 days from transplant.  Classic cherry tomato, 3/4” - 1” in clusters.</text:p>
            <text:p>Purplish  red, very sweet.</text:p>
          </table:table-cell>
          <table:table-cell office:value-type="string" calcext:value-type="string">
            <text:p>2022</text:p>
            <text:p>EDIBLE</text:p>
            <text:p>Warm Season</text:p>
            <text:p>4 Seeds</text:p>
            <text:p>Intermediate Seed Saver</text:p>
            <text:p>Germination: 5-10 days</text:p>
          </table:table-cell>
          <table:table-cell table:style-name="Default" table:number-columns-repeated="16382"/>
        </table:table-row>
        <table:table-row table:style-name="ro15">
          <table:table-cell table:style-name="ce42" office:value-type="string" calcext:value-type="string">
            <text:p>Family:TOMATO CHERRY(Solanum lycopersicum)</text:p>
            <text:p>Variety: Rainbow Blend</text:p>
            <text:p>Original Seed Source: Botanical Interests</text:p>
            <text:p>Comments: Start indoors 4-6 weeks before transplant. Sow 1/8” below surface in containers. Transplant 1-2 weeks after last frost. ; plant outdoors 24”-36” apart. Matures 55-90 days from transplant.  Unique combination of different cherry tomatoes. May include Sundrop, Gold Nugget, Chocolate Cherry, Sweetie, Green Grape, Super Snow White and Bicolor</text:p>
            <text:p>Cherry. Provide support for vines.</text:p>
          </table:table-cell>
          <table:table-cell table:style-name="ce42" office:value-type="string" calcext:value-type="string">
            <text:p>2022</text:p>
            <text:p>EDIBLE</text:p>
            <text:p>Warm Season</text:p>
            <text:p>12+ Seeds</text:p>
            <text:p>Intermediate Seed Saver</text:p>
            <text:p>Germination: 5-10 days</text:p>
          </table:table-cell>
          <table:table-cell table:style-name="Default" table:number-columns-repeated="16382"/>
        </table:table-row>
        <table:table-row table:style-name="ro15">
          <table:table-cell office:value-type="string" calcext:value-type="string">
            <text:p>Family:TOMATO CHERRY(Lycopersicon esculentum)</text:p>
            <text:p>Variety: Patio Choice Yellow</text:p>
            <text:p>Original Seed Source: Botanical Interests</text:p>
            <text:p>Comments: Start indoors 4-6 weeks before</text:p>
            <text:p>transplant. Sow 1/8” below surface in containers. Transplant 1-2 weeks after last frost. ; plant outdoors</text:p>
          </table:table-cell>
          <table:table-cell office:value-type="string" calcext:value-type="string">
            <text:p>2023</text:p>
            <text:p>EDIBLE</text:p>
            <text:p>Warm Season</text:p>
            <text:p>4+ Seeds</text:p>
            <text:p>Intermediate Seed Saver</text:p>
            <text:p>Germination: 5-10 days</text:p>
          </table:table-cell>
          <table:table-cell table:style-name="Default" table:number-columns-repeated="16382"/>
        </table:table-row>
        <table:table-row table:style-name="ro15">
          <table:table-cell table:style-name="ce42" office:value-type="string" calcext:value-type="string">
            <text:p>Family: TOMATO (Solanaceae lycopersicum)</text:p>
            <text:p>Variety: Dark Galaxy</text:p>
            <text:p>Grown By: Baker Creek Heirloom-rareseeds.com Comments: Stunning 2-8 oz fruits, flattened shape with red and orange stripes and random speckles layered by deep blue on 5-6ft vines.  Start indoors 6-8 weeks before last frost. Cover seeds lightly to allow light to assist germination.  Keep moist.</text:p>
            <text:p>Move to bright light after sprouted.  After last frost, plant in garden 2 to 3 feet apart.</text:p>
            <text:p>Soil Temp Range: 75°-85° Optimum: 80°</text:p>
          </table:table-cell>
          <table:table-cell table:style-name="ce42"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5">
          <table:table-cell office:value-type="string" calcext:value-type="string">
            <text:p>Family: TOMATO (Solanaceae lycopersicum)</text:p>
            <text:p>Variety: Flamenco</text:p>
            <text:p>Grown By: Native Seed/SEARCH ww.nativeseeds.org</text:p>
            <text:p>Comments: Originally domesticated in the Andes, South America.  Start indoors 6-8 weeks before last frost. Semi-determinate 4 ft bush loaded with highly flavored 2” red round fruits. Continues to produce in hot weather.</text:p>
            <text:p>Soil Temp Range: 75°-85° Optimum: 80°</text:p>
          </table:table-cell>
          <table:table-cell office:value-type="string" calcext:value-type="string">
            <text:p>2016</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5">
          <table:table-cell table:style-name="ce42" office:value-type="string" calcext:value-type="string">
            <text:p>Family: TOMATO (Lycopersicon esculentum)</text:p>
            <text:p>Variety: Green Zebra</text:p>
            <text:p>Original Seed Source: Botanical Interests</text:p>
            <text:p>Comments: Start indoors 4-6 weeks before transplant. Sow 1/4” below surface in containers. Transplant 1-2 weeks after last frost. ; plant outdoors 24”-36” apart. Matures 75-90 days from transplant. Best eaten fresh. Slight amber blush when ripe. Crack resistant. Drought and heat tolerant.</text:p>
          </table:table-cell>
          <table:table-cell table:style-name="ce42"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5">
          <table:table-cell office:value-type="string" calcext:value-type="string">
            <text:p>Family: TOMATO (Solanum lycopersiucm)</text:p>
            <text:p>Variety: Golden Jubilee</text:p>
            <text:p>Original Seed Source: Botanical Interest</text:p>
            <text:p>Comments: Start indoors 4-6 weeks before transplant, 1/4” deep; plant outdoors 36” apart, full sun. Bright golden-orange tomato, mild delectable flavor, great for fresh eating; rich in lycopene.  Small seed cavities with solid meaty slices. High</text:p>
            <text:p>yield.</text:p>
          </table:table-cell>
          <table:table-cell office:value-type="string" calcext:value-type="string">
            <text:p>2021</text:p>
            <text:p>EDIBLE</text:p>
            <text:p>Warm Season</text:p>
            <text:p>10 Seeds</text:p>
            <text:p>Intermediate Seed Saver</text:p>
            <text:p>Germination: 5-10 days</text:p>
          </table:table-cell>
          <table:table-cell table:style-name="Default" table:number-columns-repeated="16382"/>
        </table:table-row>
        <table:table-row table:style-name="ro15">
          <table:table-cell table:style-name="ce42" office:value-type="string" calcext:value-type="string">
            <text:p>Family: TOMATO (Lycopersicon esculentum)</text:p>
            <text:p>Variety: Moneymaker</text:p>
            <text:p>Original Seed Source: Botanical Interests</text:p>
            <text:p>Comments: Start indoors 4-6 weeks before transplant. Sow 1/4” below surface in containers. Transplant 1-2 weeks after last frost. ; plant outdoors 24”-36” apart. Matures 75-80 days from transplant. Uniform medium size are sweet and meaty.</text:p>
            <text:p>Good for fresh or cooked dishes. Tolerates humidity.</text:p>
          </table:table-cell>
          <table:table-cell table:style-name="ce42"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5">
          <table:table-cell office:value-type="string" calcext:value-type="string">
            <text:p>Family: TOMATO (Solanum lycopersiucm)</text:p>
            <text:p>Variety: Moonglow</text:p>
            <text:p>Original Seed Source: Native Seed/SEARCH www.nativeseeds.org</text:p>
            <text:p>Comments: Start indoors 4-6 weeks before transplant, 1/4” below surface; plant outdoors 36” apart, full sun. Bright orange tomato, rich flavor, great for fresh eating; rich in lycopene.</text:p>
            <text:p>Indeterminate habit.</text:p>
            <text:p>Soil Temp Range: 50°-95° Optimum: 85°</text:p>
          </table:table-cell>
          <table:table-cell office:value-type="string" calcext:value-type="string">
            <text:p>2017</text:p>
            <text:p>EDIBLE</text:p>
            <text:p>Warm Season</text:p>
            <text:p>5 Seeds</text:p>
            <text:p>Intermediate Seed Saver</text:p>
            <text:p>Germination: 6-7 days</text:p>
            <text:p>@ 85 degrees</text:p>
          </table:table-cell>
          <table:table-cell table:style-name="Default" table:number-columns-repeated="16382"/>
        </table:table-row>
        <table:table-row table:style-name="ro15">
          <table:table-cell table:style-name="ce42" office:value-type="string" calcext:value-type="string">
            <text:p>Family: TOMATO (Lycopersicon esculentum)</text:p>
            <text:p>Variety: Principe Borghese</text:p>
            <text:p>Original Seed Source: Botanical Interests</text:p>
            <text:p>Comments: Start indoors 4-6 weeks before transplant. Sow 1/4” below surface in containers. Transplant 1-2 weeks after last frost. ; plant outdoors 24”-36” apart. Matures 75-80 days from transplant. Small fragrant tomato excellent for drying,</text:p>
            <text:p>roasting or in sauce.</text:p>
          </table:table-cell>
          <table:table-cell table:style-name="ce42"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5">
          <table:table-cell office:value-type="string" calcext:value-type="string">
            <text:p>Family: TOMATO (Solanaceae)</text:p>
            <text:p>Variety: Punta Banda (Lycopersicum)</text:p>
            <text:p>Grown By: Deborah Avery-Hargrove</text:p>
            <text:p>Where Grown: Hereford, AZ</text:p>
            <text:p>Original Seed Source: www.seedtreasures.com Comments: Old Mexico wild tomato, plum size, bush type, prolific, for sauce and salsa, start indoors 6 weeks before last frost.</text:p>
            <text:p>Soil Temp Range: 75°-85° Optimum: 80°</text:p>
          </table:table-cell>
          <table:table-cell office:value-type="string" calcext:value-type="string">
            <text:p>2016</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5">
          <table:table-cell table:style-name="ce42" office:value-type="string" calcext:value-type="string">
            <text:p>Family: TOMATO (Sloanum lycopersicum)</text:p>
            <text:p>Variety: Red and Yellow Pear Blend</text:p>
            <text:p>Original Seed Source: Botanical Interests</text:p>
            <text:p>Comments: Start indoors 4-6 weeks before transplant, usually 1-2 weeks after last frost. Sow 1/4” and thin to one healthy plant for transplant, Plant outdoors 24”-36” apart.  75 days from transplant.</text:p>
          </table:table-cell>
          <table:table-cell table:style-name="ce42" office:value-type="string" calcext:value-type="string">
            <text:p>2023</text:p>
            <text:p>EDIBLE</text:p>
            <text:p>Warm Season</text:p>
            <text:p>5+ Seeds</text:p>
            <text:p>Intermediate Seed Saver</text:p>
            <text:p>Germination: 5-10 days</text:p>
          </table:table-cell>
          <table:table-cell table:style-name="Default" table:number-columns-repeated="16382"/>
        </table:table-row>
        <table:table-row table:style-name="ro15">
          <table:table-cell office:value-type="string" calcext:value-type="string">
            <text:p>Family:TOMATO Roma (Lycopersicon esculentum)</text:p>
            <text:p>Variety: Supremo (Determinate)</text:p>
            <text:p>Original Seed Source: Botanical Interests</text:p>
            <text:p>Comments: Start indoors 4-6 weeks before transplant. Sow 1/4” below surface in containers. Transplant 1-2 weeks after last frost; plant outdoors 24”-36” apart. Matures 68 days from transplant.  Fruit ripens within a week or two. Disease resistant. Large uniform tomatoes that set well even in heat. Great for</text:p>
            <text:p>sauce or paste, chop for salads or salsa, slice for sandwiches.</text:p>
          </table:table-cell>
          <table:table-cell office:value-type="string" calcext:value-type="string">
            <text:p>2020</text:p>
            <text:p>EDIBLE</text:p>
            <text:p>Warm Season</text:p>
            <text:p>5+ Seeds</text:p>
            <text:p>Hybrid do not save seeds</text:p>
            <text:p>Germination: 5-10 days</text:p>
          </table:table-cell>
          <table:table-cell table:style-name="Default" table:number-columns-repeated="16382"/>
        </table:table-row>
        <table:table-row table:style-name="ro15">
          <table:table-cell table:style-name="ce42" office:value-type="string" calcext:value-type="string">
            <text:p>Family: TOMATO (Lycopersicon esculentum)</text:p>
            <text:p>Variety: Roma, San Marzano Gigante 3</text:p>
            <text:p>Original Seed Source: Territorial Seed Company</text:p>
            <text:p>Comments: Start indoors 4-6 weeks before transplant, 1/4”</text:p>
            <text:p>below surface; plant outdoors 36” apart. Full sun; 90 days; large fruit, great in salads, salsa or for making sauces.</text:p>
          </table:table-cell>
          <table:table-cell table:style-name="ce42" office:value-type="string" calcext:value-type="string">
            <text:p>2016</text:p>
            <text:p>EDIBLE</text:p>
            <text:p>Warm Season</text:p>
            <text:p>9+ Seeds</text:p>
            <text:p>Intermediate Seed Saver</text:p>
            <text:p>Germination: 6-7 days</text:p>
            <text:p>@ 85 degrees</text:p>
          </table:table-cell>
          <table:table-cell table:style-name="Default" table:number-columns-repeated="16382"/>
        </table:table-row>
        <table:table-row table:style-name="ro15">
          <table:table-cell office:value-type="string" calcext:value-type="string">
            <text:p>Family: TOMATO (Lycopersicon esculentum)</text:p>
            <text:p>Variety: Roma, San Marzano</text:p>
            <text:p>Original Seed Source: Territorial Seed Company</text:p>
            <text:p>Comments: Start indoors 4-6 weeks before transplant, 1/4” below surface; plant outdoors 36” apart. Indeterminate ripening (throughout the season); full sun; 78 days; great in salads, salsa or for making sauces.</text:p>
          </table:table-cell>
          <table:table-cell office:value-type="string" calcext:value-type="string">
            <text:p>2016</text:p>
            <text:p>EDIBLE</text:p>
            <text:p>Warm Season</text:p>
            <text:p>10+ Seeds</text:p>
            <text:p>Intermediate Seed Saver</text:p>
            <text:p>Germination: 6-7 days</text:p>
            <text:p>@ 85 degrees</text:p>
          </table:table-cell>
          <table:table-cell table:style-name="Default" table:number-columns-repeated="16382"/>
        </table:table-row>
        <table:table-row table:style-name="ro15">
          <table:table-cell table:style-name="ce42" office:value-type="string" calcext:value-type="string">
            <text:p>Family: TOMATO (Lycopersicon esculentum)</text:p>
            <text:p>Variety: Roma</text:p>
            <text:p>Original Seed Source: Harris Seeds</text:p>
            <text:p>Comments: Start indoors 4-6 weeks before transplant, 1/4” below surface; plant outdoors 36” apart. Determinate ripening (nearly all at once); full sun; 72 days; great in salads, salsa or for making sauces.</text:p>
          </table:table-cell>
          <table:table-cell table:style-name="ce42" office:value-type="string" calcext:value-type="string">
            <text:p>2015</text:p>
            <text:p>EDIBLE</text:p>
            <text:p>Warm Season</text:p>
            <text:p>5+ Seeds</text:p>
            <text:p>Intermediate Seed Saver</text:p>
            <text:p>Germination: 6-7 days</text:p>
            <text:p>@ 85 degrees</text:p>
          </table:table-cell>
          <table:table-cell table:style-name="Default" table:number-columns-repeated="16382"/>
        </table:table-row>
        <table:table-row table:style-name="ro15">
          <table:table-cell office:value-type="string" calcext:value-type="string">
            <text:p>Family: TOMATO (Solanaceae lycopersicum)</text:p>
            <text:p>Variety: Solar Flair</text:p>
            <text:p>Grown By: Baker Creek Heirloom-rareseeds.com Comments: 6-8 oz beefsteak, red with gold stripes. Very meaty with luscious sweet red tomato flavor.  Start indoors 6-8 weeks before last frost. Cover seeds lightly to allow light to assist germination.  Keep most. Move to bright light after sprouted.  After last frost, plant in garden 2 to 3 feet apart.</text:p>
            <text:p>Soil Temp Range: 75°-85° Optimum: 80°</text:p>
          </table:table-cell>
          <table:table-cell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5">
          <table:table-cell table:style-name="ce42" office:value-type="string" calcext:value-type="string">
            <text:p>Family: TOMATO (Solanaceae lycopersicum)</text:p>
            <text:p>Variety: Sunrise Bumblebee</text:p>
            <text:p>Grown By: Baker Creek Heirloom-rareseeds.com</text:p>
            <text:p>Comments: Oblong little fruits weigh barely an ounce with swirls of red and orange inside and out.   Start indoors 6-8 weeks before last frost. Cover seeds lightly to allow light to assist germination.  Keep moist. Move to bright light after sprouted.  After last frost, plant in garden 2 to 3 feet apart.</text:p>
            <text:p>Soil Temp Range: 75°-85° Optimum: 80°</text:p>
          </table:table-cell>
          <table:table-cell table:style-name="ce42"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5">
          <table:table-cell office:value-type="string" calcext:value-type="string">
            <text:p>Family: TREE (Vitex agnus-castus)</text:p>
            <text:p>Variety: Chaste Tree  COLOR: Lavender</text:p>
            <text:p>Harvested by:  Mary Jackson</text:p>
            <text:p>Original Seed Source: Wild Harvested, Sierra Vista AZ Comments: Also called Chasteberry, Abraham’s Balm, Monk’s Pepper. Native of Mediterranean region.  Delicate- textured aromatic foliage and spikes of lavender flowers.</text:p>
            <text:p>Attracts butterflies. Full sun or partial shade, well drained soil.</text:p>
            <text:p>Size 1-5 meters, 3-15 feet.</text:p>
          </table:table-cell>
          <table:table-cell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5">
          <table:table-cell table:style-name="ce42" office:value-type="string" calcext:value-type="string">
            <text:p>Family: TREE (Vitex agnus-castus)</text:p>
            <text:p>Variety: Chaste Tree  COLOR: Purple</text:p>
            <text:p>Harvested by:  Mary Jackson</text:p>
            <text:p>Original Seed Source: Wild Harvested, Sierra Vista AZ Comments: Also called Chasteberry, Abraham’s Balm, Monk’s Pepper. Native of Mediterranean region.  Delicate- textured aromatic foliage and spikes of lavender flowers.</text:p>
            <text:p>Attracts butterflies. Full sun or partial shade, well drained soil.</text:p>
            <text:p>Size 1-5 meters, 3-15 feet.</text:p>
          </table:table-cell>
          <table:table-cell table:style-name="ce42"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5">
          <table:table-cell office:value-type="string" calcext:value-type="string">
            <text:p>Family: TREE (Vitex agnus-castus)</text:p>
            <text:p>Variety: Chaste Tree  COLOR: White</text:p>
            <text:p>Harvested by:  Linda Lawson</text:p>
            <text:p>Original Seed Source: Linda’s Backyard, Sierra Vista AZ Comments: Also called Chasteberry, Abraham’s Balm, Monk’s Pepper. Native of Mediterranean region.  Delicate- textured aromatic foliage and spikes of lavender flowers. Attracts butterflies. Full sun or partial shade, well drained soil.</text:p>
            <text:p>Size 1-5 meters, 3-15 feet.</text:p>
          </table:table-cell>
          <table:table-cell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5">
          <table:table-cell table:style-name="ce42" office:value-type="string" calcext:value-type="string">
            <text:p>Family: TREE (Albizia julibrissin)</text:p>
            <text:p>Variety: Mimosa</text:p>
            <text:p>Grown by: Mary Jackson, Master Gardener</text:p>
            <text:p>Comments: Also called Silk Trees.  Fragrant pink flowers and airy foliage. Subtropical deciduous tree.  Attract hummingbirds, butterflies and bees. Prepare seeds after the last spring frost. Scarify (file or sand a spot on the end of the seed) then soak in hot water for 24 hours. Plant 1 in deep in a 5 in. pot filled with half sand and half loam. Spread 1/4 in of sand over soil. Set in direct sun and keep soil warm but not hot. Water to a 2 in depth when top 1/2 in is dry. Avoid under or over watering.</text:p>
            <text:p>Transplant into a permanent bed at least 6 weeks before first frost in full sun and at least 20 ft from structures and other trees. Until well established, water when dry.</text:p>
          </table:table-cell>
          <table:table-cell table:style-name="ce42" office:value-type="string" calcext:value-type="string">
            <text:p>2019</text:p>
            <text:p>NON-EDIBLE</text:p>
            <text:p>5 Seeds</text:p>
          </table:table-cell>
          <table:table-cell table:style-name="Default" table:number-columns-repeated="16382"/>
        </table:table-row>
        <table:table-row table:style-name="ro15">
          <table:table-cell office:value-type="string" calcext:value-type="string">
            <text:p>Family: TURNIP (Brassica rapa)</text:p>
            <text:p>Variety: Market Express</text:p>
            <text:p>Original Seed Source: Botanical Interests</text:p>
            <text:p>Comments: Plant 2-4 weeks before last frost and fall for cool season harvest. Sow 1/4” deep, 4”-6” apart with rows 18” apart. 30-40 days. Pure white and mild, great baby turnip in salads, pickling and traditional turnip dishes. Greens are also edible.</text:p>
          </table:table-cell>
          <table:table-cell office:value-type="string" calcext:value-type="string">
            <text:p>2022</text:p>
            <text:p>EDIBLE</text:p>
            <text:p>Cool Season</text:p>
            <text:p>15-20 Seeds</text:p>
            <text:p>Intermediate Seed Saver</text:p>
            <text:p>Germination: 5-10 days</text:p>
          </table:table-cell>
          <table:table-cell table:style-name="Default" table:number-columns-repeated="16382"/>
        </table:table-row>
        <table:table-row table:style-name="ro15">
          <table:table-cell table:style-name="ce42" office:value-type="string" calcext:value-type="string">
            <text:p>Family: TURNIP (Brassica rapa)</text:p>
            <text:p>Variety: Purple Top White Globe</text:p>
            <text:p>Comments: Sow 1/4” deep, 3-4” apart with rows 18” apart. 30-40 days. Harvest when fully formed, usually about 3-4 inches in diameter. Greens are also edible.</text:p>
          </table:table-cell>
          <table:table-cell table:style-name="ce42" office:value-type="string" calcext:value-type="string">
            <text:p>2022</text:p>
            <text:p>EDIBLE</text:p>
            <text:p>Cool Season</text:p>
            <text:p>50+ Seeds</text:p>
            <text:p>Intermediate Seed Saver</text:p>
            <text:p>Germination: 5-10 days</text:p>
          </table:table-cell>
          <table:table-cell table:style-name="Default" table:number-columns-repeated="16382"/>
        </table:table-row>
        <table:table-row table:style-name="ro15">
          <table:table-cell office:value-type="string" calcext:value-type="string">
            <text:p>Family: TURNIP (Brassica campestris)</text:p>
            <text:p>Variety: White Egg</text:p>
            <text:p>Grown By: Native Seed/SEARCH Farm</text:p>
            <text:p>Where Grown: Patagonia, AZ</text:p>
            <text:p>Original Seed Source: www.nativeseeds.org Comments: Great for edible tubers and leafy greens; turnips require little care; do not allow soil to dry out.</text:p>
            <text:p>Soil Temp Range: 40°-105° Optimum: 85°</text:p>
          </table:table-cell>
          <table:table-cell office:value-type="string" calcext:value-type="string">
            <text:p>2016</text:p>
            <text:p>EDIBLE</text:p>
            <text:p>Warm Season</text:p>
            <text:p>40-50 Seeds</text:p>
            <text:p>Intermediate Seed Saver</text:p>
            <text:p>Germination: 2 - 3 days</text:p>
            <text:p>@ 85 degrees</text:p>
          </table:table-cell>
          <table:table-cell table:style-name="Default" table:number-columns-repeated="16382"/>
        </table:table-row>
        <table:table-row table:style-name="ro15">
          <table:table-cell table:style-name="ce42" office:value-type="string" calcext:value-type="string">
            <text:p>Family: WATERCRESS (Nasturtium officinale)</text:p>
            <text:p>Variety: Watercress</text:p>
            <text:p>Comments: Plant on top of damp compost. Sprinkle seeds thickly and keep compost moist. Place in sunniest window available. Harvest at 21 days for baby/sandwich cut. Cut tips for a cut and come again crop.</text:p>
            <text:p>Soil Temp Range: 60°-100° Optimum: 95°</text:p>
          </table:table-cell>
          <table:table-cell table:style-name="ce42" office:value-type="string" calcext:value-type="string">
            <text:p>2022</text:p>
            <text:p>EDIBLE</text:p>
            <text:p>Indoors</text:p>
            <text:p>100+ Seeds</text:p>
            <text:p>Easy Seed Saver</text:p>
            <text:p>Germination: 2-3 days</text:p>
            <text:p>@ 95 degrees</text:p>
          </table:table-cell>
          <table:table-cell table:style-name="Default" table:number-columns-repeated="16382"/>
        </table:table-row>
        <table:table-row table:style-name="ro15">
          <table:table-cell office:value-type="string" calcext:value-type="string">
            <text:p>Family:  WATERMELON (Citrullus lanatus)</text:p>
            <text:p>Variety: Allsweet</text:p>
            <text:p>Original Seed Source: Ferry-Morse</text:p>
            <text:p>Comments: Direct sow outside after danger of frost. Plant 1/2” deep in hills 6’-8’ feet apart. Full sun; long growing season, rich soil (add compost as they grow). Varieties will cross.</text:p>
          </table:table-cell>
          <table:table-cell office:value-type="string" calcext:value-type="string">
            <text:p>2024</text:p>
            <text:p>EDIBLE</text:p>
            <text:p>Warm Season</text:p>
            <text:p>5 Seeds</text:p>
            <text:p>Easy Seed Saver</text:p>
            <text:p>Germination: 3-4 days</text:p>
          </table:table-cell>
          <table:table-cell table:style-name="Default" table:number-columns-repeated="16382"/>
        </table:table-row>
        <table:table-row table:style-name="ro15">
          <table:table-cell table:style-name="ce42" office:value-type="string" calcext:value-type="string">
            <text:p>Family:  WATERMELON (Citrullus lanatus)</text:p>
            <text:p>Variety: Crimson Sweet</text:p>
            <text:p>Seed Source: Ferry-Morse</text:p>
            <text:p>Comments: Direct sow outside after danger of frost. Plant 1” deep in hills of 2 to 3 plants per hill at 3-5 feet apart. Full sun; 90 days; 25+pound fruit.</text:p>
          </table:table-cell>
          <table:table-cell table:style-name="ce42" office:value-type="string" calcext:value-type="string">
            <text:p>2024</text:p>
            <text:p>EDIBLE</text:p>
            <text:p>Warm Season</text:p>
            <text:p>4+ Seeds</text:p>
            <text:p>Easy Seed Saver</text:p>
            <text:p>Germination: 3-4 days</text:p>
          </table:table-cell>
          <table:table-cell table:style-name="Default" table:number-columns-repeated="16382"/>
        </table:table-row>
        <table:table-row table:style-name="ro15">
          <table:table-cell office:value-type="string" calcext:value-type="string">
            <text:p>Family:  WATERMELON (Citrullus lanatus)</text:p>
            <text:p>Variety: Charleston Gray</text:p>
            <text:p>Original Seed Source: Ferry-Morse</text:p>
            <text:p>Comments: Direct sow outside after danger of frost. Plant 1/2” deep in hills 6’-8’ feet apart. Full sun; long growing season, rich soil (add compost as they grow). Varieties will cross.</text:p>
          </table:table-cell>
          <table:table-cell office:value-type="string" calcext:value-type="string">
            <text:p>2024</text:p>
            <text:p>EDIBLE</text:p>
            <text:p>Warm Season</text:p>
            <text:p>6 Seeds</text:p>
            <text:p>Easy Seed Saver</text:p>
            <text:p>Germination: 3-4 days</text:p>
          </table:table-cell>
          <table:table-cell table:style-name="Default" table:number-columns-repeated="16382"/>
        </table:table-row>
        <table:table-row table:style-name="ro15">
          <table:table-cell table:style-name="ce42" office:value-type="string" calcext:value-type="string">
            <text:p>Family:  WATERMELON (Citrullus lanatus)</text:p>
            <text:p>Variety: Golden Midget—Heirloom</text:p>
            <text:p>Grown by:  Lois Litvak, Sierra Vista, AZ</text:p>
            <text:p>Original Seed Source: www.rareseeds.com</text:p>
            <text:p>Comments: A fun &amp; easy early novelty melon with yellow skin and pink flesh.  Direct sow outside after danger of frost. Plant 1” deep in hills of 2 to 3 plants per hill at 3 feet apart.</text:p>
            <text:p>Full sun; 70 days; up to 3 pound fruit. Vines tend to be about 6’.</text:p>
            <text:p>Soil Temp Range: 60– 105 Optimum: 95°</text:p>
          </table:table-cell>
          <table:table-cell table:style-name="ce42" office:value-type="string" calcext:value-type="string">
            <text:p>2014</text:p>
            <text:p>EDIBLE</text:p>
            <text:p>Warm Season</text:p>
            <text:p>10 Seeds</text:p>
            <text:p>Easy Seed Saver</text:p>
            <text:p>Germination: 3-4 days</text:p>
            <text:p>@ 95 degrees</text:p>
          </table:table-cell>
          <table:table-cell table:style-name="Default" table:number-columns-repeated="16382"/>
        </table:table-row>
        <table:table-row table:style-name="ro15">
          <table:table-cell office:value-type="string" calcext:value-type="string">
            <text:p>Family:  WATERMELON (Citrullus lanatus)</text:p>
            <text:p>Variety: Jemez</text:p>
            <text:p>Original Seed Source: Native Seed/SEARCH www.nativeseeds.org</text:p>
            <text:p>Comments: An African native introduced by the Spanish to Mexico. Direct sow outside after danger of frost. Plant 3 seeds 1” deep in basins 3-5 feet apart. Full sun; long growing season, rich soil (add compost as they grow). Fruits vary in size and color of flesh and rid. Varieties will cross.</text:p>
            <text:p>Soil Temp Range: 60– 105 Optimum: 95°</text:p>
          </table:table-cell>
          <table:table-cell office:value-type="string" calcext:value-type="string">
            <text:p>2017</text:p>
            <text:p>EDIBLE</text:p>
            <text:p>Warm Season</text:p>
            <text:p>3 Seeds</text:p>
            <text:p>Easy Seed Saver</text:p>
            <text:p>Germination: 3-4 days</text:p>
            <text:p>@ 95 degrees</text:p>
          </table:table-cell>
          <table:table-cell table:style-name="Default" table:number-columns-repeated="16382"/>
        </table:table-row>
        <table:table-row table:style-name="ro15">
          <table:table-cell table:style-name="ce42" office:value-type="string" calcext:value-type="string">
            <text:p>Family:  WATERMELON (Citrullus lanatus)</text:p>
            <text:p>Variety: Jubilee</text:p>
            <text:p>Original Seed Source: Ferry– Morse</text:p>
            <text:p>Comments: Direct sow outside after danger of frost. Plant 1” deep in hills of 2 to 3 plants per hill at 3-5 feet apart. Full sun; 90 days; 25+pound fruit.</text:p>
          </table:table-cell>
          <table:table-cell table:style-name="ce42" office:value-type="string" calcext:value-type="string">
            <text:p>2024</text:p>
            <text:p>EDIBLE</text:p>
            <text:p>Warm Season</text:p>
            <text:p>5+ Seeds</text:p>
            <text:p>Easy Seed Saver</text:p>
            <text:p>Germination: 3-4 days</text:p>
          </table:table-cell>
          <table:table-cell table:style-name="Default" table:number-columns-repeated="16382"/>
        </table:table-row>
        <table:table-row table:style-name="ro15">
          <table:table-cell office:value-type="string" calcext:value-type="string">
            <text:p>Family:  WATERMELON (Citrullus lanatus)</text:p>
            <text:p>Variety: Mickylee</text:p>
            <text:p>Original Seed Source: Botanical Interests</text:p>
            <text:p>Comments: Direct sow outside 1-2 weeks after danger of frost. Plant 1/2” deep in hills at 4-6 feet apart. Full sun; 80 days; 10 pound fruit with few small seeds.</text:p>
            <text:p>Soil Temp Range: 60– 105 Optimum: 95°</text:p>
          </table:table-cell>
          <table:table-cell office:value-type="string" calcext:value-type="string">
            <text:p>2021</text:p>
            <text:p>EDIBLE</text:p>
            <text:p>Warm Season</text:p>
            <text:p>5+ Seeds</text:p>
            <text:p>Easy Seed Saver</text:p>
            <text:p>Germination: 5-10 days</text:p>
            <text:p>@ 95 degrees</text:p>
          </table:table-cell>
          <table:table-cell table:style-name="Default" table:number-columns-repeated="16382"/>
        </table:table-row>
        <table:table-row table:style-name="ro15">
          <table:table-cell table:style-name="ce42" office:value-type="string" calcext:value-type="string">
            <text:p>Family: WATERMELON (Citrullus lanatus)</text:p>
            <text:p>Variety: Sweet Dakota Rose</text:p>
            <text:p>Grown By: Native Seed/SEARCH Farm</text:p>
            <text:p>Where Grown: Patagonia, AZ</text:p>
            <text:p>Original Seed Source: www.nativeseeds.org</text:p>
            <text:p>Comments: Vary in size and color of flesh and rind; plant in spring or with summer rains 1/2” to 1” deep/3 per basin; long growing season; scoop seeds from fully ripe fruit</text:p>
            <text:p>Soil Temp Range: 60°-105° Optimum: 95°</text:p>
          </table:table-cell>
          <table:table-cell table:style-name="ce42" office:value-type="string" calcext:value-type="string">
            <text:p>2016</text:p>
            <text:p>EDIBLE</text:p>
            <text:p>Warm Season</text:p>
            <text:p>6 Seeds</text:p>
            <text:p>Easy Seed Saver</text:p>
            <text:p>Germination: 3-4 days</text:p>
            <text:p>@ 95 degrees</text:p>
          </table:table-cell>
          <table:table-cell table:style-name="Default" table:number-columns-repeated="16382"/>
        </table:table-row>
        <table:table-row table:style-name="ro15">
          <table:table-cell office:value-type="string" calcext:value-type="string">
            <text:p>Family:  WATERMELON (Citrullus lanatus)</text:p>
            <text:p>Variety: Sugar Baby Comments: Direct sow outside after danger of frost. Plant 1” deep in hills of 2 to 3 plants per hill at 3-5 feet apart. Full sun; 90 days; 25+pound fruit.</text:p>
          </table:table-cell>
          <table:table-cell office:value-type="string" calcext:value-type="string">
            <text:p>2020</text:p>
            <text:p>EDIBLE</text:p>
            <text:p>Warm Season</text:p>
            <text:p>10 Seeds</text:p>
            <text:p>Easy Seed Saver</text:p>
            <text:p>Germination: 3-4 days</text:p>
          </table:table-cell>
          <table:table-cell table:style-name="Default" table:number-columns-repeated="16382"/>
        </table:table-row>
        <table:table-row table:style-name="ro15">
          <table:table-cell table:style-name="ce42" office:value-type="string" calcext:value-type="string">
            <text:p>Family:  WATERMELON (Citrullus lanatus)</text:p>
            <text:p>Variety:  Tohono O’odham Yellow-Meated</text:p>
            <text:p>Original Seed Source: From fruit of Arevalos Farm,</text:p>
            <text:p>Double Adobe, AZ (Seed saved by BJ Searcy(CCMGA Master Gardener)</text:p>
            <text:p>Comments: Called “Gepi” in O’odham.  Withstands intense summer heat of Arizona.  Direct sow outside after danger of frost. Plant 1” deep in hills of 2 to 3 plants per hill at 3-5 feet apart. Full sun; 90 days; up to 35 pound fruit. Drought tolerant:</text:p>
            <text:p>may produce more fruit if allowed to dry between waterings while blooming.</text:p>
          </table:table-cell>
          <table:table-cell table:style-name="ce42" office:value-type="string" calcext:value-type="string">
            <text:p>2020</text:p>
            <text:p>EDIBLE</text:p>
            <text:p>Warm Season</text:p>
            <text:p>5 Seeds</text:p>
            <text:p>Easy Seed Saver</text:p>
            <text:p>Germination: 3-4 days</text:p>
          </table:table-cell>
          <table:table-cell table:style-name="Default" table:number-columns-repeated="16382"/>
        </table:table-row>
        <table:table-row table:style-name="ro15">
          <table:table-cell office:value-type="string" calcext:value-type="string">
            <text:p>Family: YARDLONG BEAN (Vigna sesquipedalis)</text:p>
            <text:p>Variety: Chinese Red Noodle</text:p>
            <text:p>Original Seed Source: rareseeds.com</text:p>
            <text:p>Comments: Deep red, 18” pods, keep their color when sautéed.  Long vines produce all summer. After frost, direct sow 1-2” deep, 4-6” apart. Needs full sun and trellis. Keep pods picked to maintain production.  Do not boil.  These beans</text:p>
            <text:p>are meant to be sautéed because of their tendernes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
      <table:table table:name="Sheet1" table:style-name="ta3">
        <table:table-column table:style-name="co2" table:default-cell-style-name="ce5"/>
        <table:table-column table:style-name="co8" table:default-cell-style-name="ce5"/>
        <table:table-column table:style-name="co15" table:number-columns-repeated="16382"/>
        <table:table-row table:style-name="ro16">
          <table:table-cell table:style-name="ce21" office:value-type="string" calcext:value-type="string">
            <text:p>Family</text:p>
          </table:table-cell>
          <table:table-cell table:style-name="ce21" office:value-type="string" calcext:value-type="string">
            <text:p>Edible</text:p>
          </table:table-cell>
        </table:table-row>
        <table:table-row table:style-name="ro16">
          <table:table-cell table:style-name="ce3" office:value-type="string" calcext:value-type="string">
            <text:p>LETTUCE Rocky Top (Lactuca sativa)</text:p>
          </table:table-cell>
          <table:table-cell table:style-name="ce12" office:value-type="string" calcext:value-type="string">
            <text:p>Edible</text:p>
          </table:table-cell>
        </table:table-row>
        <table:table-row table:style-name="ro16">
          <table:table-cell table:style-name="ce2" office:value-type="string" calcext:value-type="string">
            <text:p>Microgreens (Halian Amaro Blends)</text:p>
          </table:table-cell>
          <table:table-cell table:style-name="ce12" office:value-type="string" calcext:value-type="string">
            <text:p>Edible</text:p>
          </table:table-cell>
        </table:table-row>
        <table:table-row table:style-name="ro16">
          <table:table-cell table:style-name="ce2" office:value-type="string" calcext:value-type="string">
            <text:p>Baby GREENS (Eruca vesicaria sativa)</text:p>
          </table:table-cell>
          <table:table-cell table:style-name="ce12" office:value-type="string" calcext:value-type="string">
            <text:p>Edible</text:p>
          </table:table-cell>
        </table:table-row>
        <table:table-row table:style-name="ro16">
          <table:table-cell table:style-name="ce3" office:value-type="string" calcext:value-type="string">
            <text:p>Baby GREENS (Eruca vesicaria sativa)</text:p>
          </table:table-cell>
          <table:table-cell table:style-name="ce12" office:value-type="string" calcext:value-type="string">
            <text:p>Edible</text:p>
          </table:table-cell>
        </table:table-row>
        <table:table-row table:style-name="ro16">
          <table:table-cell table:style-name="ce2" office:value-type="string" calcext:value-type="string">
            <text:p>KALE (Brassica oleracea var. alboglabra)</text:p>
          </table:table-cell>
          <table:table-cell table:style-name="ce12" office:value-type="string" calcext:value-type="string">
            <text:p>Edible</text:p>
          </table:table-cell>
        </table:table-row>
        <table:table-row table:style-name="ro16">
          <table:table-cell table:style-name="ce2" office:value-type="string" calcext:value-type="string">
            <text:p>Microgreens Basil (Ocimum basilicum)</text:p>
          </table:table-cell>
          <table:table-cell table:style-name="ce12" office:value-type="string" calcext:value-type="string">
            <text:p>Edible</text:p>
          </table:table-cell>
        </table:table-row>
        <table:table-row table:style-name="ro16">
          <table:table-cell table:style-name="ce3" office:value-type="string" calcext:value-type="string">
            <text:p>Microgreens Beet (Beta vulgaris)</text:p>
          </table:table-cell>
          <table:table-cell table:style-name="ce12" office:value-type="string" calcext:value-type="string">
            <text:p>Edible</text:p>
          </table:table-cell>
        </table:table-row>
        <table:table-row table:style-name="ro16">
          <table:table-cell table:style-name="ce2" office:value-type="string" calcext:value-type="string">
            <text:p>Sprouts <text:s/>(Trigonella foenum-graecum)</text:p>
          </table:table-cell>
          <table:table-cell table:style-name="ce12" office:value-type="string" calcext:value-type="string">
            <text:p>Edible</text:p>
          </table:table-cell>
        </table:table-row>
        <table:table-row table:style-name="ro17">
          <table:table-cell table:style-name="ce3" office:value-type="string" calcext:value-type="string">
            <text:p>Fennel (Foeniculum vulgare var. azoricum)</text:p>
          </table:table-cell>
          <table:table-cell table:style-name="ce12" office:value-type="string" calcext:value-type="string">
            <text:p>Edible</text:p>
          </table:table-cell>
        </table:table-row>
        <table:table-row table:style-name="ro16">
          <table:table-cell table:style-name="ce2" office:value-type="string" calcext:value-type="string">
            <text:p>LETTUCE Salad Bowl (Lactuca sativa)</text:p>
          </table:table-cell>
          <table:table-cell table:style-name="ce12" office:value-type="string" calcext:value-type="string">
            <text:p>Edible</text:p>
          </table:table-cell>
        </table:table-row>
        <table:table-row table:style-name="ro17">
          <table:table-cell table:style-name="ce3" office:value-type="string" calcext:value-type="string">
            <text:p>Microgreens Chicory (Cichorium endivia, C. intybus)</text:p>
          </table:table-cell>
          <table:table-cell table:style-name="ce12" office:value-type="string" calcext:value-type="string">
            <text:p>Edible</text:p>
          </table:table-cell>
        </table:table-row>
        <table:table-row table:style-name="ro17">
          <table:table-cell table:style-name="ce3" office:value-type="string" calcext:value-type="string">
            <text:p>GREENS Wheatgrass (Triticum aestivuum)</text:p>
          </table:table-cell>
          <table:table-cell table:style-name="ce12" office:value-type="string" calcext:value-type="string">
            <text:p>Edible</text:p>
          </table:table-cell>
        </table:table-row>
        <table:table-row table:style-name="ro16">
          <table:table-cell table:style-name="ce2" office:value-type="string" calcext:value-type="string">
            <text:p>Microgreens (Brassica, assorted species)</text:p>
          </table:table-cell>
          <table:table-cell table:style-name="ce12" office:value-type="string" calcext:value-type="string">
            <text:p>Edible</text:p>
          </table:table-cell>
        </table:table-row>
        <table:table-row table:style-name="ro16">
          <table:table-cell table:style-name="ce2" office:value-type="string" calcext:value-type="string">
            <text:p>Baby GREENS (Brassica, assorted)</text:p>
          </table:table-cell>
          <table:table-cell table:style-name="ce12" office:value-type="string" calcext:value-type="string">
            <text:p>Edible</text:p>
          </table:table-cell>
        </table:table-row>
        <table:table-row table:style-name="ro16">
          <table:table-cell table:style-name="ce3" office:value-type="string" calcext:value-type="string">
            <text:p>Baby GREENS (Brassica, assorted)</text:p>
          </table:table-cell>
          <table:table-cell table:style-name="ce12" office:value-type="string" calcext:value-type="string">
            <text:p>Edible</text:p>
          </table:table-cell>
        </table:table-row>
        <table:table-row table:style-name="ro17">
          <table:table-cell table:style-name="ce2" office:value-type="string" calcext:value-type="string">
            <text:p>KALE <text:s/>Italian Lacinato (Brassica oleracea)</text:p>
          </table:table-cell>
          <table:table-cell table:style-name="ce12" office:value-type="string" calcext:value-type="string">
            <text:p>Edible</text:p>
          </table:table-cell>
        </table:table-row>
        <table:table-row table:style-name="ro16">
          <table:table-cell table:style-name="ce3" office:value-type="string" calcext:value-type="string">
            <text:p>Baby GREENS (Pisum sativum)</text:p>
          </table:table-cell>
          <table:table-cell table:style-name="ce12" office:value-type="string" calcext:value-type="string">
            <text:p>Edible</text:p>
          </table:table-cell>
        </table:table-row>
        <table:table-row table:style-name="ro16">
          <table:table-cell table:style-name="ce2" office:value-type="string" calcext:value-type="string">
            <text:p>Baby GREENS (Pisum sativum)</text:p>
          </table:table-cell>
          <table:table-cell table:style-name="ce12" office:value-type="string" calcext:value-type="string">
            <text:p>Edible</text:p>
          </table:table-cell>
        </table:table-row>
        <table:table-row table:style-name="ro17">
          <table:table-cell table:style-name="ce2" office:value-type="string" calcext:value-type="string">
            <text:p>Fennel (Foeniculum vulgare var. azoricum)</text:p>
          </table:table-cell>
          <table:table-cell table:style-name="ce12" office:value-type="string" calcext:value-type="string">
            <text:p>Edible</text:p>
          </table:table-cell>
        </table:table-row>
        <table:table-row table:style-name="ro16">
          <table:table-cell table:style-name="ce2" office:value-type="string" calcext:value-type="string">
            <text:p>Baby GREENS (Brassica oleracea)</text:p>
          </table:table-cell>
          <table:table-cell table:style-name="ce12" office:value-type="string" calcext:value-type="string">
            <text:p>Edible</text:p>
          </table:table-cell>
        </table:table-row>
        <table:table-row table:style-name="ro16">
          <table:table-cell table:style-name="ce2" office:value-type="string" calcext:value-type="string">
            <text:p>ARUGULA (Eruca vesicaria)</text:p>
          </table:table-cell>
          <table:table-cell table:style-name="ce12" office:value-type="string" calcext:value-type="string">
            <text:p>Edible</text:p>
          </table:table-cell>
        </table:table-row>
        <table:table-row table:style-name="ro16">
          <table:table-cell table:style-name="ce3" office:value-type="string" calcext:value-type="string">
            <text:p>ARUGULA (Eruca vesicaria)</text:p>
          </table:table-cell>
          <table:table-cell table:style-name="ce12" office:value-type="string" calcext:value-type="string">
            <text:p>Edible</text:p>
          </table:table-cell>
        </table:table-row>
        <table:table-row table:style-name="ro16">
          <table:table-cell table:style-name="ce3" office:value-type="string" calcext:value-type="string">
            <text:p>Baby GREENS (Assorted species)</text:p>
          </table:table-cell>
          <table:table-cell table:style-name="ce12" office:value-type="string" calcext:value-type="string">
            <text:p>Edible</text:p>
          </table:table-cell>
        </table:table-row>
        <table:table-row table:style-name="ro16">
          <table:table-cell table:style-name="ce2" office:value-type="string" calcext:value-type="string">
            <text:p>Baby GREENS (Assorted Brassica)</text:p>
          </table:table-cell>
          <table:table-cell table:style-name="ce12" office:value-type="string" calcext:value-type="string">
            <text:p>Edible</text:p>
          </table:table-cell>
        </table:table-row>
        <table:table-row table:style-name="ro16">
          <table:table-cell table:style-name="ce2" office:value-type="string" calcext:value-type="string">
            <text:p>Microgreens (Brassica assorted species)</text:p>
          </table:table-cell>
          <table:table-cell table:style-name="ce12" office:value-type="string" calcext:value-type="string">
            <text:p>Edible</text:p>
          </table:table-cell>
        </table:table-row>
        <table:table-row table:style-name="ro17">
          <table:table-cell table:style-name="ce3" office:value-type="string" calcext:value-type="string">
            <text:p>Microgreens Sunflower (Helianthus annuus)</text:p>
          </table:table-cell>
          <table:table-cell table:style-name="ce12" office:value-type="string" calcext:value-type="string">
            <text:p>Edible</text:p>
          </table:table-cell>
        </table:table-row>
        <table:table-row table:style-name="ro17">
          <table:table-cell table:style-name="ce2" office:value-type="string" calcext:value-type="string">
            <text:p>Sprouts Broccoli (Brassica oleracea var italica)</text:p>
          </table:table-cell>
          <table:table-cell table:style-name="ce12" office:value-type="string" calcext:value-type="string">
            <text:p>Edible</text:p>
          </table:table-cell>
        </table:table-row>
        <table:table-row table:style-name="ro17">
          <table:table-cell table:style-name="ce3" office:value-type="string" calcext:value-type="string">
            <text:p>Sprouts China Rose Radish (Raphanus sativus)</text:p>
          </table:table-cell>
          <table:table-cell table:style-name="ce12" office:value-type="string" calcext:value-type="string">
            <text:p>Edible</text:p>
          </table:table-cell>
        </table:table-row>
        <table:table-row table:style-name="ro17">
          <table:table-cell table:style-name="ce3" office:value-type="string" calcext:value-type="string">
            <text:p>Sprouts Mung Beans (Vigna radiata var. radiata)</text:p>
          </table:table-cell>
          <table:table-cell table:style-name="ce12" office:value-type="string" calcext:value-type="string">
            <text:p>Edible</text:p>
          </table:table-cell>
        </table:table-row>
        <table:table-row table:style-name="ro17">
          <table:table-cell table:style-name="ce2" office:value-type="string" calcext:value-type="string">
            <text:p>Sprouts Purple Kohlrabi (Brassica oleracea var. gongylodes)</text:p>
          </table:table-cell>
          <table:table-cell table:style-name="ce12" office:value-type="string" calcext:value-type="string">
            <text:p>Edible</text:p>
          </table:table-cell>
        </table:table-row>
        <table:table-row table:style-name="ro18">
          <table:table-cell table:style-name="ce3" office:value-type="string" calcext:value-type="string">
            <text:p>Sprouts Salad Mix (Brassica spp, Amaranthus hypochondriacus, Medicago sativia, Trifolium pratense)</text:p>
          </table:table-cell>
          <table:table-cell table:style-name="ce12" office:value-type="string" calcext:value-type="string">
            <text:p>Edible</text:p>
          </table:table-cell>
        </table:table-row>
        <table:table-row table:style-name="ro16">
          <table:table-cell table:style-name="ce3" office:value-type="string" calcext:value-type="string">
            <text:p>HERB Rosemary (Rosmarinus officinalis)</text:p>
          </table:table-cell>
          <table:table-cell table:style-name="ce12" office:value-type="string" calcext:value-type="string">
            <text:p>Edible</text:p>
          </table:table-cell>
        </table:table-row>
        <table:table-row table:style-name="ro17">
          <table:table-cell table:style-name="ce2" office:value-type="string" calcext:value-type="string">
            <text:p>HERB PARSLEY (Petroselinum crispum latifolium)</text:p>
          </table:table-cell>
          <table:table-cell table:style-name="ce12" office:value-type="string" calcext:value-type="string">
            <text:p>Edible</text:p>
          </table:table-cell>
        </table:table-row>
        <table:table-row table:style-name="ro16">
          <table:table-cell table:style-name="ce2" office:value-type="string" calcext:value-type="string">
            <text:p>ARUGULA (Eruca sativa)</text:p>
          </table:table-cell>
          <table:table-cell table:style-name="ce12" office:value-type="string" calcext:value-type="string">
            <text:p>Edible</text:p>
          </table:table-cell>
        </table:table-row>
        <table:table-row table:style-name="ro16">
          <table:table-cell table:style-name="ce3" office:value-type="string" calcext:value-type="string">
            <text:p>ARUGULA (Eruca sativa)</text:p>
          </table:table-cell>
          <table:table-cell table:style-name="ce12" office:value-type="string" calcext:value-type="string">
            <text:p>Edible</text:p>
          </table:table-cell>
        </table:table-row>
        <table:table-row table:style-name="ro16">
          <table:table-cell table:style-name="ce3" office:value-type="string" calcext:value-type="string">
            <text:p>LETTUCE Romaine (Latuca sativa)</text:p>
          </table:table-cell>
          <table:table-cell table:style-name="ce12" office:value-type="string" calcext:value-type="string">
            <text:p>Edible</text:p>
          </table:table-cell>
        </table:table-row>
        <table:table-row table:style-name="ro16">
          <table:table-cell table:style-name="ce2" office:value-type="string" calcext:value-type="string">
            <text:p>Microgreens CHARD (Beta vulgaris)</text:p>
          </table:table-cell>
          <table:table-cell table:style-name="ce12" office:value-type="string" calcext:value-type="string">
            <text:p>Edible</text:p>
          </table:table-cell>
        </table:table-row>
        <table:table-row table:style-name="ro16">
          <table:table-cell table:style-name="ce2" office:value-type="string" calcext:value-type="string">
            <text:p>KALE (Brassica oleracea)</text:p>
          </table:table-cell>
          <table:table-cell table:style-name="ce12" office:value-type="string" calcext:value-type="string">
            <text:p>Edible</text:p>
          </table:table-cell>
        </table:table-row>
        <table:table-row table:style-name="ro16">
          <table:table-cell table:style-name="ce3" office:value-type="string" calcext:value-type="string">
            <text:p>KALE (Brassica oleracea)</text:p>
          </table:table-cell>
          <table:table-cell table:style-name="ce12" office:value-type="string" calcext:value-type="string">
            <text:p>Edible</text:p>
          </table:table-cell>
        </table:table-row>
        <table:table-row table:style-name="ro16">
          <table:table-cell table:style-name="ce2" office:value-type="string" calcext:value-type="string">
            <text:p>KALE (Brassica napus pabularia)</text:p>
          </table:table-cell>
          <table:table-cell table:style-name="ce12" office:value-type="string" calcext:value-type="string">
            <text:p>Edible</text:p>
          </table:table-cell>
        </table:table-row>
        <table:table-row table:style-name="ro16">
          <table:table-cell table:style-name="ce3" office:value-type="string" calcext:value-type="string">
            <text:p>KALE (Brassica oleracea)</text:p>
          </table:table-cell>
          <table:table-cell table:style-name="ce12" office:value-type="string" calcext:value-type="string">
            <text:p>Edible</text:p>
          </table:table-cell>
        </table:table-row>
        <table:table-row table:style-name="ro16">
          <table:table-cell table:style-name="ce2" office:value-type="string" calcext:value-type="string">
            <text:p>LETTUCE Romaine (Lactuca sativa)</text:p>
          </table:table-cell>
          <table:table-cell table:style-name="ce12" office:value-type="string" calcext:value-type="string">
            <text:p>Edible</text:p>
          </table:table-cell>
        </table:table-row>
        <table:table-row table:style-name="ro16">
          <table:table-cell table:style-name="ce2" office:value-type="string" calcext:value-type="string">
            <text:p>KALE (Brassica oleracea)</text:p>
          </table:table-cell>
          <table:table-cell table:style-name="ce12" office:value-type="string" calcext:value-type="string">
            <text:p>Edible</text:p>
          </table:table-cell>
        </table:table-row>
        <table:table-row table:style-name="ro16">
          <table:table-cell table:style-name="ce3" office:value-type="string" calcext:value-type="string">
            <text:p>HERB, MINT <text:s/>(Menthe piperta)</text:p>
          </table:table-cell>
          <table:table-cell table:style-name="ce12" office:value-type="string" calcext:value-type="string">
            <text:p>Edible</text:p>
          </table:table-cell>
        </table:table-row>
        <table:table-row table:style-name="ro17">
          <table:table-cell table:style-name="ce3" office:value-type="string" calcext:value-type="string">
            <text:p>LETTUCE Gourmet Blend (Lactuca sativa)</text:p>
          </table:table-cell>
          <table:table-cell table:style-name="ce12" office:value-type="string" calcext:value-type="string">
            <text:p>Edible</text:p>
          </table:table-cell>
        </table:table-row>
        <table:table-row table:style-name="ro16">
          <table:table-cell table:style-name="ce3" office:value-type="string" calcext:value-type="string">
            <text:p>ARUGULA (Eruca sativa)</text:p>
          </table:table-cell>
          <table:table-cell table:style-name="ce12" office:value-type="string" calcext:value-type="string">
            <text:p>Edible</text:p>
          </table:table-cell>
        </table:table-row>
        <table:table-row table:style-name="ro16">
          <table:table-cell table:style-name="ce2" office:value-type="string" calcext:value-type="string">
            <text:p>ARUGULA (Eruca sativa)</text:p>
          </table:table-cell>
          <table:table-cell table:style-name="ce12" office:value-type="string" calcext:value-type="string">
            <text:p>Edible</text:p>
          </table:table-cell>
        </table:table-row>
        <table:table-row table:style-name="ro16">
          <table:table-cell table:style-name="ce2" office:value-type="string" calcext:value-type="string">
            <text:p>HERB Chives (Allium schoenoprasum)</text:p>
          </table:table-cell>
          <table:table-cell table:style-name="ce12" office:value-type="string" calcext:value-type="string">
            <text:p>Edible</text:p>
          </table:table-cell>
        </table:table-row>
        <table:table-row table:style-name="ro16">
          <table:table-cell table:style-name="ce2" office:value-type="string" calcext:value-type="string">
            <text:p>HERB PARSLEY (Petroselinum crispum)</text:p>
          </table:table-cell>
          <table:table-cell table:style-name="ce12" office:value-type="string" calcext:value-type="string">
            <text:p>Edible</text:p>
          </table:table-cell>
        </table:table-row>
        <table:table-row table:style-name="ro16">
          <table:table-cell table:style-name="ce3" office:value-type="string" calcext:value-type="string">
            <text:p>HERB PARSLEY (Petroselinum crispum)</text:p>
          </table:table-cell>
          <table:table-cell table:style-name="ce12" office:value-type="string" calcext:value-type="string">
            <text:p>Edible</text:p>
          </table:table-cell>
        </table:table-row>
        <table:table-row table:style-name="ro16">
          <table:table-cell table:style-name="ce2" office:value-type="string" calcext:value-type="string">
            <text:p>COWPEA (Vigna unguiculata)</text:p>
          </table:table-cell>
          <table:table-cell table:style-name="ce12" office:value-type="string" calcext:value-type="string">
            <text:p>Edible</text:p>
          </table:table-cell>
        </table:table-row>
        <table:table-row table:style-name="ro17">
          <table:table-cell table:style-name="ce2" office:value-type="string" calcext:value-type="string">
            <text:p>HERB PARSLEY COMBO (Petroselinum crispum latifolium)</text:p>
          </table:table-cell>
          <table:table-cell table:style-name="ce12" office:value-type="string" calcext:value-type="string">
            <text:p>Edible</text:p>
          </table:table-cell>
        </table:table-row>
        <table:table-row table:style-name="ro17">
          <table:table-cell table:style-name="ce3" office:value-type="string" calcext:value-type="string">
            <text:p>HERB PARSLEY (Petroselinum crispum latifolium)</text:p>
          </table:table-cell>
          <table:table-cell table:style-name="ce12" office:value-type="string" calcext:value-type="string">
            <text:p>Edible</text:p>
          </table:table-cell>
        </table:table-row>
        <table:table-row table:style-name="ro16">
          <table:table-cell table:style-name="ce2" office:value-type="string" calcext:value-type="string">
            <text:p>Baby GREENS (Assorted Brassica)</text:p>
          </table:table-cell>
          <table:table-cell table:style-name="ce12" office:value-type="string" calcext:value-type="string">
            <text:p>Edible</text:p>
          </table:table-cell>
        </table:table-row>
        <table:table-row table:style-name="ro16">
          <table:table-cell table:style-name="ce3" office:value-type="string" calcext:value-type="string">
            <text:p>Baby GREENS (Assorted Brassica)</text:p>
          </table:table-cell>
          <table:table-cell table:style-name="ce12" office:value-type="string" calcext:value-type="string">
            <text:p>Edible</text:p>
          </table:table-cell>
        </table:table-row>
        <table:table-row table:style-name="ro16">
          <table:table-cell table:style-name="ce3" office:value-type="string" calcext:value-type="string">
            <text:p>Sprouts Alfalfa (Medicago sativa)</text:p>
          </table:table-cell>
          <table:table-cell table:style-name="ce12" office:value-type="string" calcext:value-type="string">
            <text:p>Edible</text:p>
          </table:table-cell>
        </table:table-row>
        <table:table-row table:style-name="ro16">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6">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16">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2" office:value-type="string" calcext:value-type="string">
            <text:p>LETTUCE Leaf (Latuca sativa)</text:p>
          </table:table-cell>
          <table:table-cell table:style-name="ce12" office:value-type="string" calcext:value-type="string">
            <text:p>Edible</text:p>
          </table:table-cell>
        </table:table-row>
        <table:table-row table:style-name="ro16">
          <table:table-cell table:style-name="ce3" office:value-type="string" calcext:value-type="string">
            <text:p>BEET (Beta vulgaris)</text:p>
          </table:table-cell>
          <table:table-cell table:style-name="ce12" office:value-type="string" calcext:value-type="string">
            <text:p>Edible</text:p>
          </table:table-cell>
        </table:table-row>
        <table:table-row table:style-name="ro16">
          <table:table-cell table:style-name="ce3" office:value-type="string" calcext:value-type="string">
            <text:p>BEAN, RUNNER (Phaseolus coccineus)</text:p>
          </table:table-cell>
          <table:table-cell table:style-name="ce12" office:value-type="string" calcext:value-type="string">
            <text:p>Edible</text:p>
          </table:table-cell>
        </table:table-row>
        <table:table-row table:style-name="ro16">
          <table:table-cell table:style-name="ce3" office:value-type="string" calcext:value-type="string">
            <text:p>CABBAGE (Brassica rapa)</text:p>
          </table:table-cell>
          <table:table-cell table:style-name="ce12" office:value-type="string" calcext:value-type="string">
            <text:p>Edible</text:p>
          </table:table-cell>
        </table:table-row>
        <table:table-row table:style-name="ro16">
          <table:table-cell table:style-name="ce2" office:value-type="string" calcext:value-type="string">
            <text:p>CABBAGE (Brassica rapa)</text:p>
          </table:table-cell>
          <table:table-cell table:style-name="ce12" office:value-type="string" calcext:value-type="string">
            <text:p>Edible</text:p>
          </table:table-cell>
        </table:table-row>
        <table:table-row table:style-name="ro16">
          <table:table-cell table:style-name="ce3" office:value-type="string" calcext:value-type="string">
            <text:p>CABBAGE (Brassica rapa)</text:p>
          </table:table-cell>
          <table:table-cell table:style-name="ce12" office:value-type="string" calcext:value-type="string">
            <text:p>Edible</text:p>
          </table:table-cell>
        </table:table-row>
        <table:table-row table:style-name="ro16">
          <table:table-cell table:style-name="ce2" office:value-type="string" calcext:value-type="string">
            <text:p>HERB Cilantro (Coriandrum stivum)</text:p>
          </table:table-cell>
          <table:table-cell table:style-name="ce12" office:value-type="string" calcext:value-type="string">
            <text:p>Edible</text:p>
          </table:table-cell>
        </table:table-row>
        <table:table-row table:style-name="ro16">
          <table:table-cell table:style-name="ce3" office:value-type="string" calcext:value-type="string">
            <text:p>BEET (Beta vulgaris)</text:p>
          </table:table-cell>
          <table:table-cell table:style-name="ce12" office:value-type="string" calcext:value-type="string">
            <text:p>Edible</text:p>
          </table:table-cell>
        </table:table-row>
        <table:table-row table:style-name="ro16">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2" office:value-type="string" calcext:value-type="string">
            <text:p>RUTABAGA (Brassica napus)</text:p>
          </table:table-cell>
          <table:table-cell table:style-name="ce12" office:value-type="string" calcext:value-type="string">
            <text:p>Edible</text:p>
          </table:table-cell>
        </table:table-row>
        <table:table-row table:style-name="ro16">
          <table:table-cell table:style-name="ce2" office:value-type="string" calcext:value-type="string">
            <text:p>CABBAGE (Brassica rapa)</text:p>
          </table:table-cell>
          <table:table-cell table:style-name="ce12" office:value-type="string" calcext:value-type="string">
            <text:p>Edible</text:p>
          </table:table-cell>
        </table:table-row>
        <table:table-row table:style-name="ro16">
          <table:table-cell table:style-name="ce3" office:value-type="string" calcext:value-type="string">
            <text:p>GREENS (Salad Blend)</text:p>
          </table:table-cell>
          <table:table-cell table:style-name="ce12" office:value-type="string" calcext:value-type="string">
            <text:p>Edible</text:p>
          </table:table-cell>
        </table:table-row>
        <table:table-row table:style-name="ro16">
          <table:table-cell table:style-name="ce3" office:value-type="string" calcext:value-type="string">
            <text:p>BEAN, RUNNER (Phaseolus coccineus)</text:p>
          </table:table-cell>
          <table:table-cell table:style-name="ce12" office:value-type="string" calcext:value-type="string">
            <text:p>Edible</text:p>
          </table:table-cell>
        </table:table-row>
        <table:table-row table:style-name="ro16">
          <table:table-cell table:style-name="ce3" office:value-type="string" calcext:value-type="string">
            <text:p>CABBAGE (Brassica oleracea)</text:p>
          </table:table-cell>
          <table:table-cell table:style-name="ce12" office:value-type="string" calcext:value-type="string">
            <text:p>Edible</text:p>
          </table:table-cell>
        </table:table-row>
        <table:table-row table:style-name="ro16">
          <table:table-cell table:style-name="ce2" office:value-type="string" calcext:value-type="string">
            <text:p>COWPEA (Vigna unguiculata)</text:p>
          </table:table-cell>
          <table:table-cell table:style-name="ce12" office:value-type="string" calcext:value-type="string">
            <text:p>Edible</text:p>
          </table:table-cell>
        </table:table-row>
        <table:table-row table:style-name="ro16">
          <table:table-cell table:style-name="ce3" office:value-type="string" calcext:value-type="string">
            <text:p>HERB Garlic (Allium sativum)</text:p>
          </table:table-cell>
          <table:table-cell table:style-name="ce12" office:value-type="string" calcext:value-type="string">
            <text:p>Edible</text:p>
          </table:table-cell>
        </table:table-row>
        <table:table-row table:style-name="ro16">
          <table:table-cell table:style-name="ce3" office:value-type="string" calcext:value-type="string">
            <text:p>ARTICHOKE (Cynara scolymus)</text:p>
          </table:table-cell>
          <table:table-cell table:style-name="ce12" office:value-type="string" calcext:value-type="string">
            <text:p>Edible</text:p>
          </table:table-cell>
        </table:table-row>
        <table:table-row table:style-name="ro16">
          <table:table-cell table:style-name="ce3" office:value-type="string" calcext:value-type="string">
            <text:p>ARTICHOKE (Cynara scolymus)</text:p>
          </table:table-cell>
          <table:table-cell table:style-name="ce12" office:value-type="string" calcext:value-type="string">
            <text:p>Edible</text:p>
          </table:table-cell>
        </table:table-row>
        <table:table-row table:style-name="ro17">
          <table:table-cell table:style-name="ce3" office:value-type="string" calcext:value-type="string">
            <text:p>RUTABAGA (Brassica napus susp. rapifera)</text:p>
          </table:table-cell>
          <table:table-cell table:style-name="ce12" office:value-type="string" calcext:value-type="string">
            <text:p>Edible</text:p>
          </table:table-cell>
        </table:table-row>
        <table:table-row table:style-name="ro16">
          <table:table-cell table:style-name="ce3" office:value-type="string" calcext:value-type="string">
            <text:p>GREENS (Eruca vescaria subsp. sativa)</text:p>
          </table:table-cell>
          <table:table-cell table:style-name="ce12" office:value-type="string" calcext:value-type="string">
            <text:p>Edible</text:p>
          </table:table-cell>
        </table:table-row>
        <table:table-row table:style-name="ro16">
          <table:table-cell table:style-name="ce2" office:value-type="string" calcext:value-type="string">
            <text:p>BEET (Beta vulgaris)</text:p>
          </table:table-cell>
          <table:table-cell table:style-name="ce12" office:value-type="string" calcext:value-type="string">
            <text:p>Edible</text:p>
          </table:table-cell>
        </table:table-row>
        <table:table-row table:style-name="ro17">
          <table:table-cell table:style-name="ce2" office:value-type="string" calcext:value-type="string">
            <text:p>BROCCOLI (Brassica oleracea var. italica)</text:p>
          </table:table-cell>
          <table:table-cell table:style-name="ce12" office:value-type="string" calcext:value-type="string">
            <text:p>Edible</text:p>
          </table:table-cell>
        </table:table-row>
        <table:table-row table:style-name="ro17">
          <table:table-cell table:style-name="ce3" office:value-type="string" calcext:value-type="string">
            <text:p>CABBAGE (Brassica rapa subsp. narinosa)</text:p>
          </table:table-cell>
          <table:table-cell table:style-name="ce12" office:value-type="string" calcext:value-type="string">
            <text:p>Edible</text:p>
          </table:table-cell>
        </table:table-row>
        <table:table-row table:style-name="ro17">
          <table:table-cell table:style-name="ce3" office:value-type="string" calcext:value-type="string">
            <text:p>BROCCOLI (Brassica oleracea var italica)</text:p>
          </table:table-cell>
          <table:table-cell table:style-name="ce12" office:value-type="string" calcext:value-type="string">
            <text:p>Edible</text:p>
          </table:table-cell>
        </table:table-row>
        <table:table-row table:style-name="ro16">
          <table:table-cell table:style-name="ce3" office:value-type="string" calcext:value-type="string">
            <text:p>BEAN, COWPEA (Vigna unguiculata)</text:p>
          </table:table-cell>
          <table:table-cell table:style-name="ce12" office:value-type="string" calcext:value-type="string">
            <text:p>Edible</text:p>
          </table:table-cell>
        </table:table-row>
        <table:table-row table:style-name="ro16">
          <table:table-cell table:style-name="ce2" office:value-type="string" calcext:value-type="string">
            <text:p>HERB Chervil (Anthriscus cerefolium)</text:p>
          </table:table-cell>
          <table:table-cell table:style-name="ce12" office:value-type="string" calcext:value-type="string">
            <text:p>Edible</text:p>
          </table:table-cell>
        </table:table-row>
        <table:table-row table:style-name="ro17">
          <table:table-cell table:style-name="ce2" office:value-type="string" calcext:value-type="string">
            <text:p>BROCCOLI (Brassica oleracea var. alboglabra)</text:p>
          </table:table-cell>
          <table:table-cell table:style-name="ce12" office:value-type="string" calcext:value-type="string">
            <text:p>Edible</text:p>
          </table:table-cell>
        </table:table-row>
        <table:table-row table:style-name="ro16">
          <table:table-cell table:style-name="ce2" office:value-type="string" calcext:value-type="string">
            <text:p>BEET (Beta vulgaris)</text:p>
          </table:table-cell>
          <table:table-cell table:style-name="ce12" office:value-type="string" calcext:value-type="string">
            <text:p>Edible</text:p>
          </table:table-cell>
        </table:table-row>
        <table:table-row table:style-name="ro16">
          <table:table-cell table:style-name="ce3" office:value-type="string" calcext:value-type="string">
            <text:p>SORREL (Rumex aacetosa)</text:p>
          </table:table-cell>
          <table:table-cell table:style-name="ce12" office:value-type="string" calcext:value-type="string">
            <text:p>Edible</text:p>
          </table:table-cell>
        </table:table-row>
        <table:table-row table:style-name="ro16">
          <table:table-cell table:style-name="ce2" office:value-type="string" calcext:value-type="string">
            <text:p>AMARANTH (Amaranthus caudatus)</text:p>
          </table:table-cell>
          <table:table-cell table:style-name="ce12" office:value-type="string" calcext:value-type="string">
            <text:p>Edible</text:p>
          </table:table-cell>
        </table:table-row>
        <table:table-row table:style-name="ro16">
          <table:table-cell table:style-name="ce2" office:value-type="string" calcext:value-type="string">
            <text:p>AMARANTH (Amaranthus caudatus)</text:p>
          </table:table-cell>
          <table:table-cell table:style-name="ce12" office:value-type="string" calcext:value-type="string">
            <text:p>Edible</text:p>
          </table:table-cell>
        </table:table-row>
        <table:table-row table:style-name="ro16">
          <table:table-cell table:style-name="ce3" office:value-type="string" calcext:value-type="string">
            <text:p>KALE (Brassica oleracea)</text:p>
          </table:table-cell>
          <table:table-cell table:style-name="ce12" office:value-type="string" calcext:value-type="string">
            <text:p>Edible</text:p>
          </table:table-cell>
        </table:table-row>
        <table:table-row table:style-name="ro16">
          <table:table-cell table:style-name="ce2" office:value-type="string" calcext:value-type="string">
            <text:p>CAULIFLOWER (Brassica oleracea)</text:p>
          </table:table-cell>
          <table:table-cell table:style-name="ce12" office:value-type="string" calcext:value-type="string">
            <text:p>Edible</text:p>
          </table:table-cell>
        </table:table-row>
        <table:table-row table:style-name="ro17">
          <table:table-cell table:style-name="ce3" office:value-type="string" calcext:value-type="string">
            <text:p>HERB Fennel (Foeniculum vulgare var azoricum)</text:p>
          </table:table-cell>
          <table:table-cell table:style-name="ce12" office:value-type="string" calcext:value-type="string">
            <text:p>Edible</text:p>
          </table:table-cell>
        </table:table-row>
        <table:table-row table:style-name="ro16">
          <table:table-cell table:style-name="ce2" office:value-type="string" calcext:value-type="string">
            <text:p>BEET (Beta vulgaris)</text:p>
          </table:table-cell>
          <table:table-cell table:style-name="ce12" office:value-type="string" calcext:value-type="string">
            <text:p>Edible</text:p>
          </table:table-cell>
        </table:table-row>
        <table:table-row table:style-name="ro16">
          <table:table-cell table:style-name="ce2" office:value-type="string" calcext:value-type="string">
            <text:p>LETTUCE Mesclun (Lactuca sativa)</text:p>
          </table:table-cell>
          <table:table-cell table:style-name="ce12" office:value-type="string" calcext:value-type="string">
            <text:p>Edible</text:p>
          </table:table-cell>
        </table:table-row>
        <table:table-row table:style-name="ro16">
          <table:table-cell table:style-name="ce3" office:value-type="string" calcext:value-type="string">
            <text:p>BEET (Beta vulgaris)</text:p>
          </table:table-cell>
          <table:table-cell table:style-name="ce12" office:value-type="string" calcext:value-type="string">
            <text:p>Edible</text:p>
          </table:table-cell>
        </table:table-row>
        <table:table-row table:style-name="ro16">
          <table:table-cell table:style-name="ce2" office:value-type="string" calcext:value-type="string">
            <text:p>LETTUCE Crisphead (Latuca sativa)</text:p>
          </table:table-cell>
          <table:table-cell table:style-name="ce12" office:value-type="string" calcext:value-type="string">
            <text:p>Edible</text:p>
          </table:table-cell>
        </table:table-row>
        <table:table-row table:style-name="ro16">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6">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7">
          <table:table-cell table:style-name="ce3" office:value-type="string" calcext:value-type="string">
            <text:p>BRUSSELS SPROUTS (Brassica oleracea var. gemmifera)</text:p>
          </table:table-cell>
          <table:table-cell table:style-name="ce12" office:value-type="string" calcext:value-type="string">
            <text:p>Edible</text:p>
          </table:table-cell>
        </table:table-row>
        <table:table-row table:style-name="ro16">
          <table:table-cell table:style-name="ce2" office:value-type="string" calcext:value-type="string">
            <text:p>GREENS (Valerianella locusta)</text:p>
          </table:table-cell>
          <table:table-cell table:style-name="ce12" office:value-type="string" calcext:value-type="string">
            <text:p>Edible</text:p>
          </table:table-cell>
        </table:table-row>
        <table:table-row table:style-name="ro16">
          <table:table-cell table:style-name="ce3" office:value-type="string" calcext:value-type="string">
            <text:p>TURNIP (Brassica rapa)</text:p>
          </table:table-cell>
          <table:table-cell table:style-name="ce12" office:value-type="string" calcext:value-type="string">
            <text:p>Edible</text:p>
          </table:table-cell>
        </table:table-row>
        <table:table-row table:style-name="ro16">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2" office:value-type="string" calcext:value-type="string">
            <text:p>Mustard (Brassica rapa)</text:p>
          </table:table-cell>
          <table:table-cell table:style-name="ce12" office:value-type="string" calcext:value-type="string">
            <text:p>Edible</text:p>
          </table:table-cell>
        </table:table-row>
        <table:table-row table:style-name="ro16">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2" office:value-type="string" calcext:value-type="string">
            <text:p>GREENS Endive (Chichorium endivia)</text:p>
          </table:table-cell>
          <table:table-cell table:style-name="ce12" office:value-type="string" calcext:value-type="string">
            <text:p>Edible</text:p>
          </table:table-cell>
        </table:table-row>
        <table:table-row table:style-name="ro17">
          <table:table-cell table:style-name="ce2" office:value-type="string" calcext:value-type="string">
            <text:p>CABBAGE—Napa (Brassica rapa subsp. pekinensis)</text:p>
          </table:table-cell>
          <table:table-cell table:style-name="ce12" office:value-type="string" calcext:value-type="string">
            <text:p>Edible</text:p>
          </table:table-cell>
        </table:table-row>
        <table:table-row table:style-name="ro16">
          <table:table-cell table:style-name="ce2" office:value-type="string" calcext:value-type="string">
            <text:p>PEA Sugar Pod (Pisum sativum)</text:p>
          </table:table-cell>
          <table:table-cell table:style-name="ce12" office:value-type="string" calcext:value-type="string">
            <text:p>Edible</text:p>
          </table:table-cell>
        </table:table-row>
        <table:table-row table:style-name="ro17">
          <table:table-cell table:style-name="ce2" office:value-type="string" calcext:value-type="string">
            <text:p>CABBAGE Raddicchio (Chichorium intybus)</text:p>
          </table:table-cell>
          <table:table-cell table:style-name="ce12" office:value-type="string" calcext:value-type="string">
            <text:p>Edible</text:p>
          </table:table-cell>
        </table:table-row>
        <table:table-row table:style-name="ro17">
          <table:table-cell table:style-name="ce2" office:value-type="string" calcext:value-type="string">
            <text:p>HERB Fennel (Foeniculum vulgare var azoricum)</text:p>
          </table:table-cell>
          <table:table-cell table:style-name="ce12" office:value-type="string" calcext:value-type="string">
            <text:p>Edible</text:p>
          </table:table-cell>
        </table:table-row>
        <table:table-row table:style-name="ro17">
          <table:table-cell table:style-name="ce3" office:value-type="string" calcext:value-type="string">
            <text:p>COWPEA (Vigna unguiculata) Variety: Pinkeye Purple Hull Bush(Shell or dried)</text:p>
          </table:table-cell>
          <table:table-cell table:style-name="ce12" office:value-type="string" calcext:value-type="string">
            <text:p>Edible</text:p>
          </table:table-cell>
        </table:table-row>
        <table:table-row table:style-name="ro16">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7">
          <table:table-cell table:style-name="ce2" office:value-type="string" calcext:value-type="string">
            <text:p>KOHLRABI (Brassica oleracea var. gongylodes)</text:p>
          </table:table-cell>
          <table:table-cell table:style-name="ce12" office:value-type="string" calcext:value-type="string">
            <text:p>Edible</text:p>
          </table:table-cell>
        </table:table-row>
        <table:table-row table:style-name="ro16">
          <table:table-cell table:style-name="ce3" office:value-type="string" calcext:value-type="string">
            <text:p>KOHLRABI (Brassica oleracea)</text:p>
          </table:table-cell>
          <table:table-cell table:style-name="ce12" office:value-type="string" calcext:value-type="string">
            <text:p>Edible</text:p>
          </table:table-cell>
        </table:table-row>
        <table:table-row table:style-name="ro16">
          <table:table-cell table:style-name="ce2" office:value-type="string" calcext:value-type="string">
            <text:p>BROCCOLI Raab (Brassica Rapa)</text:p>
          </table:table-cell>
          <table:table-cell table:style-name="ce12" office:value-type="string" calcext:value-type="string">
            <text:p>Edible</text:p>
          </table:table-cell>
        </table:table-row>
        <table:table-row table:style-name="ro17">
          <table:table-cell table:style-name="ce2" office:value-type="string" calcext:value-type="string">
            <text:p>ARUGULA Wild Rocket (Diplotaxis Tenuifolia)</text:p>
          </table:table-cell>
          <table:table-cell table:style-name="ce12" office:value-type="string" calcext:value-type="string">
            <text:p>Edible</text:p>
          </table:table-cell>
        </table:table-row>
        <table:table-row table:style-name="ro17">
          <table:table-cell table:style-name="ce3" office:value-type="string" calcext:value-type="string">
            <text:p>ARUGULA Wild Rocket (Diplotaxis Tenuifolia)</text:p>
          </table:table-cell>
          <table:table-cell table:style-name="ce12" office:value-type="string" calcext:value-type="string">
            <text:p>Edible</text:p>
          </table:table-cell>
        </table:table-row>
        <table:table-row table:style-name="ro17">
          <table:table-cell table:style-name="ce3" office:value-type="string" calcext:value-type="string">
            <text:p>CAULIFLOWER (Brassica oleracea var.botrytis)</text:p>
          </table:table-cell>
          <table:table-cell table:style-name="ce12" office:value-type="string" calcext:value-type="string">
            <text:p>Edible</text:p>
          </table:table-cell>
        </table:table-row>
        <table:table-row table:style-name="ro17">
          <table:table-cell table:style-name="ce3" office:value-type="string" calcext:value-type="string">
            <text:p>BROCCOLI (Brassica oleracea var botrytis)</text:p>
          </table:table-cell>
          <table:table-cell table:style-name="ce12" office:value-type="string" calcext:value-type="string">
            <text:p>Edible</text:p>
          </table:table-cell>
        </table:table-row>
        <table:table-row table:style-name="ro16">
          <table:table-cell table:style-name="ce3" office:value-type="string" calcext:value-type="string">
            <text:p>BEAN, RUNNER (Phaseolus coccineus)</text:p>
          </table:table-cell>
          <table:table-cell table:style-name="ce12" office:value-type="string" calcext:value-type="string">
            <text:p>Edible</text:p>
          </table:table-cell>
        </table:table-row>
        <table:table-row table:style-name="ro16">
          <table:table-cell table:style-name="ce3" office:value-type="string" calcext:value-type="string">
            <text:p>ARUGULA (Diplotaxis Tenuifolia)</text:p>
          </table:table-cell>
          <table:table-cell table:style-name="ce12" office:value-type="string" calcext:value-type="string">
            <text:p>Edible</text:p>
          </table:table-cell>
        </table:table-row>
        <table:table-row table:style-name="ro16">
          <table:table-cell table:style-name="ce2" office:value-type="string" calcext:value-type="string">
            <text:p>ARUGULA (Diplotaxis Tenuifolia)</text:p>
          </table:table-cell>
          <table:table-cell table:style-name="ce12" office:value-type="string" calcext:value-type="string">
            <text:p>Edible</text:p>
          </table:table-cell>
        </table:table-row>
        <table:table-row table:style-name="ro16">
          <table:table-cell table:style-name="ce2" office:value-type="string" calcext:value-type="string">
            <text:p>SQUASH (Cucubirta maxima)</text:p>
          </table:table-cell>
          <table:table-cell table:style-name="ce12" office:value-type="string" calcext:value-type="string">
            <text:p>Edible</text:p>
          </table:table-cell>
        </table:table-row>
        <table:table-row table:style-name="ro16">
          <table:table-cell table:style-name="ce3" office:value-type="string" calcext:value-type="string">
            <text:p>LETTUCE Mini-Romaine (Latuca sativa)</text:p>
          </table:table-cell>
          <table:table-cell table:style-name="ce12" office:value-type="string" calcext:value-type="string">
            <text:p>Edible</text:p>
          </table:table-cell>
        </table:table-row>
        <table:table-row table:style-name="ro16">
          <table:table-cell table:style-name="ce2" office:value-type="string" calcext:value-type="string">
            <text:p>PARSNIP (Pastinaca sativa)</text:p>
          </table:table-cell>
          <table:table-cell table:style-name="ce12" office:value-type="string" calcext:value-type="string">
            <text:p>Edible</text:p>
          </table:table-cell>
        </table:table-row>
        <table:table-row table:style-name="ro16">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6">
          <table:table-cell table:style-name="ce3" office:value-type="string" calcext:value-type="string">
            <text:p>ONION Italian (Allium cepa)</text:p>
          </table:table-cell>
          <table:table-cell table:style-name="ce12" office:value-type="string" calcext:value-type="string">
            <text:p>Edible</text:p>
          </table:table-cell>
        </table:table-row>
        <table:table-row table:style-name="ro16">
          <table:table-cell table:style-name="ce2" office:value-type="string" calcext:value-type="string">
            <text:p>PEA Sugar Snap (Pisum sativum)</text:p>
          </table:table-cell>
          <table:table-cell table:style-name="ce12" office:value-type="string" calcext:value-type="string">
            <text:p>Edible</text:p>
          </table:table-cell>
        </table:table-row>
        <table:table-row table:style-name="ro16">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6">
          <table:table-cell table:style-name="ce3" office:value-type="string" calcext:value-type="string">
            <text:p>LEEK (Allium ampeloprasum)</text:p>
          </table:table-cell>
          <table:table-cell table:style-name="ce12" office:value-type="string" calcext:value-type="string">
            <text:p>Edible</text:p>
          </table:table-cell>
        </table:table-row>
        <table:table-row table:style-name="ro16">
          <table:table-cell table:style-name="ce2" office:value-type="string" calcext:value-type="string">
            <text:p>ONION (Allium fistulosum)</text:p>
          </table:table-cell>
          <table:table-cell table:style-name="ce12" office:value-type="string" calcext:value-type="string">
            <text:p>Edible</text:p>
          </table:table-cell>
        </table:table-row>
        <table:table-row table:style-name="ro17">
          <table:table-cell table:style-name="ce2" office:value-type="string" calcext:value-type="string">
            <text:p>LETTUCE Valemtin (Locusta valerianella)</text:p>
          </table:table-cell>
          <table:table-cell table:style-name="ce12" office:value-type="string" calcext:value-type="string">
            <text:p>Edible</text:p>
          </table:table-cell>
        </table:table-row>
        <table:table-row table:style-name="ro16">
          <table:table-cell table:style-name="ce2" office:value-type="string" calcext:value-type="string">
            <text:p>ROOT PARSLEY (Petroselinum crispum)</text:p>
          </table:table-cell>
          <table:table-cell table:style-name="ce12" office:value-type="string" calcext:value-type="string">
            <text:p>Edible</text:p>
          </table:table-cell>
        </table:table-row>
        <table:table-row table:style-name="ro16">
          <table:table-cell table:style-name="ce2" office:value-type="string" calcext:value-type="string">
            <text:p>SWISS CHARD (Beta vulgaris)</text:p>
          </table:table-cell>
          <table:table-cell table:style-name="ce12" office:value-type="string" calcext:value-type="string">
            <text:p>Edible</text:p>
          </table:table-cell>
        </table:table-row>
        <table:table-row table:style-name="ro16">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6">
          <table:table-cell table:style-name="ce2" office:value-type="string" calcext:value-type="string">
            <text:p>LETTUCE Bibb (Latuca sativa)</text:p>
          </table:table-cell>
          <table:table-cell table:style-name="ce12" office:value-type="string" calcext:value-type="string">
            <text:p>Edible</text:p>
          </table:table-cell>
        </table:table-row>
        <table:table-row table:style-name="ro16">
          <table:table-cell table:style-name="ce2" office:value-type="string" calcext:value-type="string">
            <text:p>BEET (Beta vulgaris)</text:p>
          </table:table-cell>
          <table:table-cell table:style-name="ce12" office:value-type="string" calcext:value-type="string">
            <text:p>Edible</text:p>
          </table:table-cell>
        </table:table-row>
        <table:table-row table:style-name="ro17">
          <table:table-cell table:style-name="ce3" office:value-type="string" calcext:value-type="string">
            <text:p>KOHLRABI (Brassica oleracea var. gongylodes)</text:p>
          </table:table-cell>
          <table:table-cell table:style-name="ce12" office:value-type="string" calcext:value-type="string">
            <text:p>Edible</text:p>
          </table:table-cell>
        </table:table-row>
        <table:table-row table:style-name="ro16">
          <table:table-cell table:style-name="ce3" office:value-type="string" calcext:value-type="string">
            <text:p>BEET (Beta vulgaris)</text:p>
          </table:table-cell>
          <table:table-cell table:style-name="ce12" office:value-type="string" calcext:value-type="string">
            <text:p>Edible</text:p>
          </table:table-cell>
        </table:table-row>
        <table:table-row table:style-name="ro16">
          <table:table-cell table:style-name="ce2" office:value-type="string" calcext:value-type="string">
            <text:p>ASPARAGUS (Asparagus officinalis)</text:p>
          </table:table-cell>
          <table:table-cell table:style-name="ce12" office:value-type="string" calcext:value-type="string">
            <text:p>Edible</text:p>
          </table:table-cell>
        </table:table-row>
        <table:table-row table:style-name="ro16">
          <table:table-cell table:style-name="ce3" office:value-type="string" calcext:value-type="string">
            <text:p>ASPARAGUS (Asparagus officinalis)</text:p>
          </table:table-cell>
          <table:table-cell table:style-name="ce12" office:value-type="string" calcext:value-type="string">
            <text:p>Edible</text:p>
          </table:table-cell>
        </table:table-row>
        <table:table-row table:style-name="ro16">
          <table:table-cell table:style-name="ce2" office:value-type="string" calcext:value-type="string">
            <text:p>SWISS CHARD (Beta vulgaris)</text:p>
          </table:table-cell>
          <table:table-cell table:style-name="ce12" office:value-type="string" calcext:value-type="string">
            <text:p>Edible</text:p>
          </table:table-cell>
        </table:table-row>
        <table:table-row table:style-name="ro16">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3" office:value-type="string" calcext:value-type="string">
            <text:p>LETTUCE Paris Island Cos (Lactuca sativa)</text:p>
          </table:table-cell>
          <table:table-cell table:style-name="ce12" office:value-type="string" calcext:value-type="string">
            <text:p>Edible</text:p>
          </table:table-cell>
        </table:table-row>
        <table:table-row table:style-name="ro16">
          <table:table-cell table:style-name="ce2" office:value-type="string" calcext:value-type="string">
            <text:p>BEET (Beta vulgaris)</text:p>
          </table:table-cell>
          <table:table-cell table:style-name="ce12" office:value-type="string" calcext:value-type="string">
            <text:p>Edible</text:p>
          </table:table-cell>
        </table:table-row>
        <table:table-row table:style-name="ro16">
          <table:table-cell table:style-name="ce3" office:value-type="string" calcext:value-type="string">
            <text:p>CAULIFLOWER (Brassica oleracea)</text:p>
          </table:table-cell>
          <table:table-cell table:style-name="ce12" office:value-type="string" calcext:value-type="string">
            <text:p>Edible</text:p>
          </table:table-cell>
        </table:table-row>
        <table:table-row table:style-name="ro16">
          <table:table-cell table:style-name="ce2" office:value-type="string" calcext:value-type="string">
            <text:p>ONION (Allium cepa)</text:p>
          </table:table-cell>
          <table:table-cell table:style-name="ce12" office:value-type="string" calcext:value-type="string">
            <text:p>Edible</text:p>
          </table:table-cell>
        </table:table-row>
        <table:table-row table:style-name="ro16">
          <table:table-cell table:style-name="ce2" office:value-type="string" calcext:value-type="string">
            <text:p>CABBAGE (Brassica oleracea)</text:p>
          </table:table-cell>
          <table:table-cell table:style-name="ce12" office:value-type="string" calcext:value-type="string">
            <text:p>Edible</text:p>
          </table:table-cell>
        </table:table-row>
        <table:table-row table:style-name="ro16">
          <table:table-cell table:style-name="ce3" office:value-type="string" calcext:value-type="string">
            <text:p>LETTUCE Romaine (Latuca sativa)</text:p>
          </table:table-cell>
          <table:table-cell table:style-name="ce12" office:value-type="string" calcext:value-type="string">
            <text:p>Edible</text:p>
          </table:table-cell>
        </table:table-row>
        <table:table-row table:style-name="ro16">
          <table:table-cell table:style-name="ce3" office:value-type="string" calcext:value-type="string">
            <text:p>LEEK (Allium porrum)</text:p>
          </table:table-cell>
          <table:table-cell table:style-name="ce12" office:value-type="string" calcext:value-type="string">
            <text:p>Edible</text:p>
          </table:table-cell>
        </table:table-row>
        <table:table-row table:style-name="ro17">
          <table:table-cell table:style-name="ce3" office:value-type="string" calcext:value-type="string">
            <text:p>BROCCOLI (Brassica oleracea var.italica)</text:p>
          </table:table-cell>
          <table:table-cell table:style-name="ce12" office:value-type="string" calcext:value-type="string">
            <text:p>Edible</text:p>
          </table:table-cell>
        </table:table-row>
        <table:table-row table:style-name="ro16">
          <table:table-cell table:style-name="ce3" office:value-type="string" calcext:value-type="string">
            <text:p>BEET (Beta vulgaris)</text:p>
          </table:table-cell>
          <table:table-cell table:style-name="ce12" office:value-type="string" calcext:value-type="string">
            <text:p>Edible</text:p>
          </table:table-cell>
        </table:table-row>
        <table:table-row table:style-name="ro16">
          <table:table-cell table:style-name="ce3" office:value-type="string" calcext:value-type="string">
            <text:p>LETTUCE Butterhead (Latuca sativa)</text:p>
          </table:table-cell>
          <table:table-cell table:style-name="ce12" office:value-type="string" calcext:value-type="string">
            <text:p>Edible</text:p>
          </table:table-cell>
        </table:table-row>
        <table:table-row table:style-name="ro16">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6">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6">
          <table:table-cell table:style-name="ce3" office:value-type="string" calcext:value-type="string">
            <text:p>GREENS (Brassica rapa)</text:p>
          </table:table-cell>
          <table:table-cell table:style-name="ce12" office:value-type="string" calcext:value-type="string">
            <text:p>Edible</text:p>
          </table:table-cell>
        </table:table-row>
        <table:table-row table:style-name="ro16">
          <table:table-cell table:style-name="ce2" office:value-type="string" calcext:value-type="string">
            <text:p>LEEK (Allium porrum)</text:p>
          </table:table-cell>
          <table:table-cell table:style-name="ce12" office:value-type="string" calcext:value-type="string">
            <text:p>Edible</text:p>
          </table:table-cell>
        </table:table-row>
        <table:table-row table:style-name="ro16">
          <table:table-cell table:style-name="ce2" office:value-type="string" calcext:value-type="string">
            <text:p>GREENS (Plantago coronopus)</text:p>
          </table:table-cell>
          <table:table-cell table:style-name="ce12" office:value-type="string" calcext:value-type="string">
            <text:p>Edible</text:p>
          </table:table-cell>
        </table:table-row>
        <table:table-row table:style-name="ro16">
          <table:table-cell table:style-name="ce3" office:value-type="string" calcext:value-type="string">
            <text:p>SWISS CHARD (Beta vulgaris)</text:p>
          </table:table-cell>
          <table:table-cell table:style-name="ce12" office:value-type="string" calcext:value-type="string">
            <text:p>Edible</text:p>
          </table:table-cell>
        </table:table-row>
        <table:table-row table:style-name="ro16">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6">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6">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6">
          <table:table-cell table:style-name="ce2" office:value-type="string" calcext:value-type="string">
            <text:p>LETTUCE Black Seeded (Latuca sativa)</text:p>
          </table:table-cell>
          <table:table-cell table:style-name="ce12" office:value-type="string" calcext:value-type="string">
            <text:p>Edible</text:p>
          </table:table-cell>
        </table:table-row>
        <table:table-row table:style-name="ro16">
          <table:table-cell table:style-name="ce3" office:value-type="string" calcext:value-type="string">
            <text:p>BEET (Beta vulgaris)</text:p>
          </table:table-cell>
          <table:table-cell table:style-name="ce12" office:value-type="string" calcext:value-type="string">
            <text:p>Edible</text:p>
          </table:table-cell>
        </table:table-row>
        <table:table-row table:style-name="ro16">
          <table:table-cell table:style-name="ce3" office:value-type="string" calcext:value-type="string">
            <text:p>PEA Sugar Snap (Pisum sativum)</text:p>
          </table:table-cell>
          <table:table-cell table:style-name="ce12" office:value-type="string" calcext:value-type="string">
            <text:p>Edible</text:p>
          </table:table-cell>
        </table:table-row>
        <table:table-row table:style-name="ro16">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6">
          <table:table-cell table:style-name="ce3" office:value-type="string" calcext:value-type="string">
            <text:p>SWISS CHARD (Beta vulgaris)</text:p>
          </table:table-cell>
          <table:table-cell table:style-name="ce12" office:value-type="string" calcext:value-type="string">
            <text:p>Edible</text:p>
          </table:table-cell>
        </table:table-row>
        <table:table-row table:style-name="ro16">
          <table:table-cell table:style-name="ce3" office:value-type="string" calcext:value-type="string">
            <text:p>LETTUCE Romaine (Latuca sativa)</text:p>
          </table:table-cell>
          <table:table-cell table:style-name="ce12" office:value-type="string" calcext:value-type="string">
            <text:p>Edible</text:p>
          </table:table-cell>
        </table:table-row>
        <table:table-row table:style-name="ro16">
          <table:table-cell table:style-name="ce2" office:value-type="string" calcext:value-type="string">
            <text:p>PEA Shell (Pisum stivum)</text:p>
          </table:table-cell>
          <table:table-cell table:style-name="ce12" office:value-type="string" calcext:value-type="string">
            <text:p>Edible</text:p>
          </table:table-cell>
        </table:table-row>
        <table:table-row table:style-name="ro16">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6">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6">
          <table:table-cell table:style-name="ce3" office:value-type="string" calcext:value-type="string">
            <text:p>SQUASH (Cucubirta moschata)</text:p>
          </table:table-cell>
          <table:table-cell table:style-name="ce12" office:value-type="string" calcext:value-type="string">
            <text:p>Edible</text:p>
          </table:table-cell>
        </table:table-row>
        <table:table-row table:style-name="ro16">
          <table:table-cell table:style-name="ce2" office:value-type="string" calcext:value-type="string">
            <text:p>GREENS (Brassica ssp &amp; Eruca sativa)</text:p>
          </table:table-cell>
          <table:table-cell table:style-name="ce12" office:value-type="string" calcext:value-type="string">
            <text:p>Edible</text:p>
          </table:table-cell>
        </table:table-row>
        <table:table-row table:style-name="ro16">
          <table:table-cell table:style-name="ce2" office:value-type="string" calcext:value-type="string">
            <text:p>BEAN, RUNNER (Phaseolus coccineus)</text:p>
          </table:table-cell>
          <table:table-cell table:style-name="ce12" office:value-type="string" calcext:value-type="string">
            <text:p>Edible</text:p>
          </table:table-cell>
        </table:table-row>
        <table:table-row table:style-name="ro16">
          <table:table-cell table:style-name="ce2" office:value-type="string" calcext:value-type="string">
            <text:p>AMARANTH (Amaranthus albus)</text:p>
          </table:table-cell>
          <table:table-cell table:style-name="ce12" office:value-type="string" calcext:value-type="string">
            <text:p>Edible</text:p>
          </table:table-cell>
        </table:table-row>
        <table:table-row table:style-name="ro16">
          <table:table-cell table:style-name="ce2" office:value-type="string" calcext:value-type="string">
            <text:p>AMARANTH (Amaranthus albus)</text:p>
          </table:table-cell>
          <table:table-cell table:style-name="ce12" office:value-type="string" calcext:value-type="string">
            <text:p>Edible</text:p>
          </table:table-cell>
        </table:table-row>
        <table:table-row table:style-name="ro16">
          <table:table-cell table:style-name="ce3" office:value-type="string" calcext:value-type="string">
            <text:p>Flax (Linaceae linum)</text:p>
          </table:table-cell>
          <table:table-cell table:style-name="ce12" office:value-type="string" calcext:value-type="string">
            <text:p>Edible</text:p>
          </table:table-cell>
        </table:table-row>
        <table:table-row table:style-name="ro16">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2" office:value-type="string" calcext:value-type="string">
            <text:p>BROCCOLI (Brassica oleracea)</text:p>
          </table:table-cell>
          <table:table-cell table:style-name="ce12" office:value-type="string" calcext:value-type="string">
            <text:p>Edible</text:p>
          </table:table-cell>
        </table:table-row>
        <table:table-row table:style-name="ro16">
          <table:table-cell table:style-name="ce3" office:value-type="string" calcext:value-type="string">
            <text:p>CABBAGE (Brassica oleracea)</text:p>
          </table:table-cell>
          <table:table-cell table:style-name="ce12" office:value-type="string" calcext:value-type="string">
            <text:p>Edible</text:p>
          </table:table-cell>
        </table:table-row>
        <table:table-row table:style-name="ro16">
          <table:table-cell table:style-name="ce2" office:value-type="string" calcext:value-type="string">
            <text:p>PEA Shell (Pisum sativum)</text:p>
          </table:table-cell>
          <table:table-cell table:style-name="ce12" office:value-type="string" calcext:value-type="string">
            <text:p>Edible</text:p>
          </table:table-cell>
        </table:table-row>
        <table:table-row table:style-name="ro16">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6">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2" office:value-type="string" calcext:value-type="string">
            <text:p>LETTUCE Green (Latuca sativa)</text:p>
          </table:table-cell>
          <table:table-cell table:style-name="ce12" office:value-type="string" calcext:value-type="string">
            <text:p>Edible</text:p>
          </table:table-cell>
        </table:table-row>
        <table:table-row table:style-name="ro16">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6">
          <table:table-cell table:style-name="ce3" office:value-type="string" calcext:value-type="string">
            <text:p>SWISS CHARD (Beta vulgaris)</text:p>
          </table:table-cell>
          <table:table-cell table:style-name="ce12" office:value-type="string" calcext:value-type="string">
            <text:p>Edible</text:p>
          </table:table-cell>
        </table:table-row>
        <table:table-row table:style-name="ro17">
          <table:table-cell table:style-name="ce2" office:value-type="string" calcext:value-type="string">
            <text:p>BROCCOLI (Brassica oleracea var botrytis)</text:p>
          </table:table-cell>
          <table:table-cell table:style-name="ce12" office:value-type="string" calcext:value-type="string">
            <text:p>Edible</text:p>
          </table:table-cell>
        </table:table-row>
        <table:table-row table:style-name="ro16">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6">
          <table:table-cell table:style-name="ce3" office:value-type="string" calcext:value-type="string">
            <text:p>AMARANTH (Amaranthus)</text:p>
          </table:table-cell>
          <table:table-cell table:style-name="ce12" office:value-type="string" calcext:value-type="string">
            <text:p>Edible</text:p>
          </table:table-cell>
        </table:table-row>
        <table:table-row table:style-name="ro16">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6">
          <table:table-cell table:style-name="ce2" office:value-type="string" calcext:value-type="string">
            <text:p>BEAN, GARBANZO (Cicer arietinum)</text:p>
          </table:table-cell>
          <table:table-cell table:style-name="ce12" office:value-type="string" calcext:value-type="string">
            <text:p>Edible</text:p>
          </table:table-cell>
        </table:table-row>
        <table:table-row table:style-name="ro16">
          <table:table-cell table:style-name="ce3" office:value-type="string" calcext:value-type="string">
            <text:p>CABBAGE (Brassica oleracea)</text:p>
          </table:table-cell>
          <table:table-cell table:style-name="ce12" office:value-type="string" calcext:value-type="string">
            <text:p>Edible</text:p>
          </table:table-cell>
        </table:table-row>
        <table:table-row table:style-name="ro16">
          <table:table-cell table:style-name="ce3" office:value-type="string" calcext:value-type="string">
            <text:p>LETTUCE Butterhead (Latuca sativa)</text:p>
          </table:table-cell>
          <table:table-cell table:style-name="ce12" office:value-type="string" calcext:value-type="string">
            <text:p>Edible</text:p>
          </table:table-cell>
        </table:table-row>
        <table:table-row table:style-name="ro16">
          <table:table-cell table:style-name="ce2" office:value-type="string" calcext:value-type="string">
            <text:p>CARROT (Bolero nantes)</text:p>
          </table:table-cell>
          <table:table-cell table:style-name="ce12" office:value-type="string" calcext:value-type="string">
            <text:p>Edible</text:p>
          </table:table-cell>
        </table:table-row>
        <table:table-row table:style-name="ro16">
          <table:table-cell table:style-name="ce3" office:value-type="string" calcext:value-type="string">
            <text:p>COLLARD GREENS (Brassica oleracea)</text:p>
          </table:table-cell>
          <table:table-cell table:style-name="ce12" office:value-type="string" calcext:value-type="string">
            <text:p>Edible</text:p>
          </table:table-cell>
        </table:table-row>
        <table:table-row table:style-name="ro16">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9">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20">
          <table:table-cell table:style-name="ce2" office:value-type="string" calcext:value-type="string">
            <text:p>AMARANTH (Amaranthus hypochondriacus)</text:p>
          </table:table-cell>
          <table:table-cell table:style-name="ce12" office:value-type="string" calcext:value-type="string">
            <text:p>Edible</text:p>
          </table:table-cell>
        </table:table-row>
        <table:table-row table:style-name="ro20">
          <table:table-cell table:style-name="ce2" office:value-type="string" calcext:value-type="string">
            <text:p>AMARANTH (Amaranthus hypochondriacus)</text:p>
          </table:table-cell>
          <table:table-cell table:style-name="ce12" office:value-type="string" calcext:value-type="string">
            <text:p>Edible</text:p>
          </table:table-cell>
        </table:table-row>
        <table:table-row table:style-name="ro19">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9">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9">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9">
          <table:table-cell table:style-name="ce3" office:value-type="string" calcext:value-type="string">
            <text:p>BROCCOLI (Brassica oleracea)</text:p>
          </table:table-cell>
          <table:table-cell table:style-name="ce12" office:value-type="string" calcext:value-type="string">
            <text:p>Edible</text:p>
          </table:table-cell>
        </table:table-row>
        <table:table-row table:style-name="ro19">
          <table:table-cell table:style-name="ce3" office:value-type="string" calcext:value-type="string">
            <text:p>Greens, Mixed</text:p>
          </table:table-cell>
          <table:table-cell table:style-name="ce12" office:value-type="string" calcext:value-type="string">
            <text:p>Edible</text:p>
          </table:table-cell>
        </table:table-row>
        <table:table-row table:style-name="ro19">
          <table:table-cell table:style-name="ce3" office:value-type="string" calcext:value-type="string">
            <text:p>FLOWER Marigold (Calendula officinalis)</text:p>
          </table:table-cell>
          <table:table-cell table:style-name="ce12" office:value-type="string" calcext:value-type="string">
            <text:p>Edible</text:p>
          </table:table-cell>
        </table:table-row>
        <table:table-row table:style-name="ro19">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2" office:value-type="string" calcext:value-type="string">
            <text:p>TURNIP (Brassica rapa)</text:p>
          </table:table-cell>
          <table:table-cell table:style-name="ce12" office:value-type="string" calcext:value-type="string">
            <text:p>Edible</text:p>
          </table:table-cell>
        </table:table-row>
        <table:table-row table:style-name="ro19">
          <table:table-cell table:style-name="ce2" office:value-type="string" calcext:value-type="string">
            <text:p>SWISS CHARD (Beta vulgaris)</text:p>
          </table:table-cell>
          <table:table-cell table:style-name="ce12" office:value-type="string" calcext:value-type="string">
            <text:p>Edible</text:p>
          </table:table-cell>
        </table:table-row>
        <table:table-row table:style-name="ro19">
          <table:table-cell table:style-name="ce2" office:value-type="string" calcext:value-type="string">
            <text:p>LETTUCE (Latuca sativa)</text:p>
          </table:table-cell>
          <table:table-cell table:style-name="ce12" office:value-type="string" calcext:value-type="string">
            <text:p>Edible</text:p>
          </table:table-cell>
        </table:table-row>
        <table:table-row table:style-name="ro19">
          <table:table-cell table:style-name="ce2" office:value-type="string" calcext:value-type="string">
            <text:p>ARUGULA (Diplotaxis Tenuifolia)</text:p>
          </table:table-cell>
          <table:table-cell table:style-name="ce12" office:value-type="string" calcext:value-type="string">
            <text:p>Edible</text:p>
          </table:table-cell>
        </table:table-row>
        <table:table-row table:style-name="ro19">
          <table:table-cell table:style-name="ce3" office:value-type="string" calcext:value-type="string">
            <text:p>ARUGULA (Diplotaxis Tenuifolia)</text:p>
          </table:table-cell>
          <table:table-cell table:style-name="ce12" office:value-type="string" calcext:value-type="string">
            <text:p>Edible</text:p>
          </table:table-cell>
        </table:table-row>
        <table:table-row table:style-name="ro19">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2" office:value-type="string" calcext:value-type="string">
            <text:p>PEA Shell (Pisum sativum)</text:p>
          </table:table-cell>
          <table:table-cell table:style-name="ce12" office:value-type="string" calcext:value-type="string">
            <text:p>Edible</text:p>
          </table:table-cell>
        </table:table-row>
        <table:table-row table:style-name="ro19">
          <table:table-cell table:style-name="ce3" office:value-type="string" calcext:value-type="string">
            <text:p>SQUASH Acorn (Cucubirta pepo)</text:p>
          </table:table-cell>
          <table:table-cell table:style-name="ce12" office:value-type="string" calcext:value-type="string">
            <text:p>Edible</text:p>
          </table:table-cell>
        </table:table-row>
        <table:table-row table:style-name="ro19">
          <table:table-cell table:style-name="ce2" office:value-type="string" calcext:value-type="string">
            <text:p>Celery (Apium graveolens)</text:p>
          </table:table-cell>
          <table:table-cell table:style-name="ce12" office:value-type="string" calcext:value-type="string">
            <text:p>Edible</text:p>
          </table:table-cell>
        </table:table-row>
        <table:table-row table:style-name="ro19">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3" office:value-type="string" calcext:value-type="string">
            <text:p>BROCCOLI (Brassica oleracea)</text:p>
          </table:table-cell>
          <table:table-cell table:style-name="ce12" office:value-type="string" calcext:value-type="string">
            <text:p>Edible</text:p>
          </table:table-cell>
        </table:table-row>
        <table:table-row table:style-name="ro19">
          <table:table-cell table:style-name="ce3" office:value-type="string" calcext:value-type="string">
            <text:p>MELON Kiwano (Cucumis metuliferus)</text:p>
          </table:table-cell>
          <table:table-cell table:style-name="ce12" office:value-type="string" calcext:value-type="string">
            <text:p>Edible</text:p>
          </table:table-cell>
        </table:table-row>
        <table:table-row table:style-name="ro19">
          <table:table-cell table:style-name="ce2" office:value-type="string" calcext:value-type="string">
            <text:p>SQUASH (Cucubirta pepo)</text:p>
          </table:table-cell>
          <table:table-cell table:style-name="ce12" office:value-type="string" calcext:value-type="string">
            <text:p>Edible</text:p>
          </table:table-cell>
        </table:table-row>
        <table:table-row table:style-name="ro19">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9">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9">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SQUASH (Cucurbirta moschata)</text:p>
          </table:table-cell>
          <table:table-cell table:style-name="ce12" office:value-type="string" calcext:value-type="string">
            <text:p>Edible</text:p>
          </table:table-cell>
        </table:table-row>
        <table:table-row table:style-name="ro19">
          <table:table-cell table:style-name="ce2" office:value-type="string" calcext:value-type="string">
            <text:p>GOURD (Lagenaria siceraria)</text:p>
          </table:table-cell>
          <table:table-cell table:style-name="ce12" office:value-type="string" calcext:value-type="string">
            <text:p>Edible</text:p>
          </table:table-cell>
        </table:table-row>
        <table:table-row table:style-name="ro19">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9">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19">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20">
          <table:table-cell table:style-name="ce3" office:value-type="string" calcext:value-type="string">
            <text:p>BEAN, HALF-RUNNER (Phaseolus coccineu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TOMATO (Solanaceae)</text:p>
          </table:table-cell>
          <table:table-cell table:style-name="ce12" office:value-type="string" calcext:value-type="string">
            <text:p>Edible</text:p>
          </table:table-cell>
        </table:table-row>
        <table:table-row table:style-name="ro19">
          <table:table-cell table:style-name="ce3" office:value-type="string" calcext:value-type="string">
            <text:p>HERB Caraway (Carum carvi)</text:p>
          </table:table-cell>
          <table:table-cell table:style-name="ce12" office:value-type="string" calcext:value-type="string">
            <text:p>Edible</text:p>
          </table:table-cell>
        </table:table-row>
        <table:table-row table:style-name="ro19">
          <table:table-cell table:style-name="ce2" office:value-type="string" calcext:value-type="string">
            <text:p>BEAN, LIMA (Phaseolus lunatus)</text:p>
          </table:table-cell>
          <table:table-cell table:style-name="ce12" office:value-type="string" calcext:value-type="string">
            <text:p>Edible</text:p>
          </table:table-cell>
        </table:table-row>
        <table:table-row table:style-name="ro19">
          <table:table-cell table:style-name="ce3" office:value-type="string" calcext:value-type="string">
            <text:p>SQUASH (Cucubirta pepo)</text:p>
          </table:table-cell>
          <table:table-cell table:style-name="ce12" office:value-type="string" calcext:value-type="string">
            <text:p>Edible</text:p>
          </table:table-cell>
        </table:table-row>
        <table:table-row table:style-name="ro19">
          <table:table-cell table:style-name="ce2" office:value-type="string" calcext:value-type="string">
            <text:p>TOMATO (Solanaceae lycopersicum)</text:p>
          </table:table-cell>
          <table:table-cell table:style-name="ce12" office:value-type="string" calcext:value-type="string">
            <text:p>Edible</text:p>
          </table:table-cell>
        </table:table-row>
        <table:table-row table:style-name="ro19">
          <table:table-cell table:style-name="ce2" office:value-type="string" calcext:value-type="string">
            <text:p>PEANUT (Arachis hypogaea)</text:p>
          </table:table-cell>
          <table:table-cell table:style-name="ce12" office:value-type="string" calcext:value-type="string">
            <text:p>Edible</text:p>
          </table:table-cell>
        </table:table-row>
        <table:table-row table:style-name="ro19">
          <table:table-cell table:style-name="ce2" office:value-type="string" calcext:value-type="string">
            <text:p>CELERIAC (Apium graveolens)</text:p>
          </table:table-cell>
          <table:table-cell table:style-name="ce12" office:value-type="string" calcext:value-type="string">
            <text:p>Edible</text:p>
          </table:table-cell>
        </table:table-row>
        <table:table-row table:style-name="ro19">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2" office:value-type="string" calcext:value-type="string">
            <text:p>MELON Ha Ogen (Cucumis melo)</text:p>
          </table:table-cell>
          <table:table-cell table:style-name="ce12" office:value-type="string" calcext:value-type="string">
            <text:p>Edible</text:p>
          </table:table-cell>
        </table:table-row>
        <table:table-row table:style-name="ro19">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TOMATO (Solanaceae lycopersicum)</text:p>
          </table:table-cell>
          <table:table-cell table:style-name="ce12" office:value-type="string" calcext:value-type="string">
            <text:p>Edible</text:p>
          </table:table-cell>
        </table:table-row>
        <table:table-row table:style-name="ro19">
          <table:table-cell table:style-name="ce2" office:value-type="string" calcext:value-type="string">
            <text:p>TOMATO (Solanaceae lycopersicum)</text:p>
          </table:table-cell>
          <table:table-cell table:style-name="ce12" office:value-type="string" calcext:value-type="string">
            <text:p>Edible</text:p>
          </table:table-cell>
        </table:table-row>
        <table:table-row table:style-name="ro19">
          <table:table-cell table:style-name="ce3" office:value-type="string" calcext:value-type="string">
            <text:p>PEANUT (Arachis hypogaea)</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SQUASH (Cucurbita maxima)</text:p>
          </table:table-cell>
          <table:table-cell table:style-name="ce12" office:value-type="string" calcext:value-type="string">
            <text:p>Edible</text:p>
          </table:table-cell>
        </table:table-row>
        <table:table-row table:style-name="ro19">
          <table:table-cell table:style-name="ce2" office:value-type="string" calcext:value-type="string">
            <text:p>GOURD (Lagenaria siceraria)</text:p>
          </table:table-cell>
          <table:table-cell table:style-name="ce12" office:value-type="string" calcext:value-type="string">
            <text:p>Edible</text:p>
          </table:table-cell>
        </table:table-row>
        <table:table-row table:style-name="ro19">
          <table:table-cell table:style-name="ce3" office:value-type="string" calcext:value-type="string">
            <text:p>Three Sisters</text:p>
          </table:table-cell>
          <table:table-cell table:style-name="ce12" office:value-type="string" calcext:value-type="string">
            <text:p>Edible</text:p>
          </table:table-cell>
        </table:table-row>
        <table:table-row table:style-name="ro19">
          <table:table-cell table:style-name="ce2" office:value-type="string" calcext:value-type="string">
            <text:p>Three Sisters</text:p>
          </table:table-cell>
          <table:table-cell table:style-name="ce12" office:value-type="string" calcext:value-type="string">
            <text:p>Edible</text:p>
          </table:table-cell>
        </table:table-row>
        <table:table-row table:style-name="ro19">
          <table:table-cell table:style-name="ce3" office:value-type="string" calcext:value-type="string">
            <text:p>MELON (Cucumis melo)</text:p>
          </table:table-cell>
          <table:table-cell table:style-name="ce12" office:value-type="string" calcext:value-type="string">
            <text:p>Edible</text:p>
          </table:table-cell>
        </table:table-row>
        <table:table-row table:style-name="ro19">
          <table:table-cell table:style-name="ce2" office:value-type="string" calcext:value-type="string">
            <text:p>MELON (Cucumis melo)</text:p>
          </table:table-cell>
          <table:table-cell table:style-name="ce12" office:value-type="string" calcext:value-type="string">
            <text:p>Edible</text:p>
          </table:table-cell>
        </table:table-row>
        <table:table-row table:style-name="ro19">
          <table:table-cell table:style-name="ce2" office:value-type="string" calcext:value-type="string">
            <text:p>SQUASH (Cucurbirta argyrosperma)</text:p>
          </table:table-cell>
          <table:table-cell table:style-name="ce12" office:value-type="string" calcext:value-type="string">
            <text:p>Edible</text:p>
          </table:table-cell>
        </table:table-row>
        <table:table-row table:style-name="ro19">
          <table:table-cell table:style-name="ce2" office:value-type="string" calcext:value-type="string">
            <text:p>GOURD LUFFA (Luffa aegytiaca)</text:p>
          </table:table-cell>
          <table:table-cell table:style-name="ce12" office:value-type="string" calcext:value-type="string">
            <text:p>Edible</text:p>
          </table:table-cell>
        </table:table-row>
        <table:table-row table:style-name="ro19">
          <table:table-cell table:style-name="ce3" office:value-type="string" calcext:value-type="string">
            <text:p>GOURD LUFFA (Curcubita cylindrica)</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FLOWER Hyssop (Agastache foeniculum)</text:p>
          </table:table-cell>
          <table:table-cell table:style-name="ce12" office:value-type="string" calcext:value-type="string">
            <text:p>Edible</text:p>
          </table:table-cell>
        </table:table-row>
        <table:table-row table:style-name="ro19">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9">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2" office:value-type="string" calcext:value-type="string">
            <text:p>PEPPER CHILE (Capsicum chinense)</text:p>
          </table:table-cell>
          <table:table-cell table:style-name="ce12" office:value-type="string" calcext:value-type="string">
            <text:p>Edible</text:p>
          </table:table-cell>
        </table:table-row>
        <table:table-row table:style-name="ro19">
          <table:table-cell table:style-name="ce2" office:value-type="string" calcext:value-type="string">
            <text:p>GOURD (Lagenaria siceraria)</text:p>
          </table:table-cell>
          <table:table-cell table:style-name="ce12" office:value-type="string" calcext:value-type="string">
            <text:p>Edible</text:p>
          </table:table-cell>
        </table:table-row>
        <table:table-row table:style-name="ro19">
          <table:table-cell table:style-name="ce2" office:value-type="string" calcext:value-type="string">
            <text:p>EGGPLANT (Solanum melongena)</text:p>
          </table:table-cell>
          <table:table-cell table:style-name="ce12" office:value-type="string" calcext:value-type="string">
            <text:p>Edible</text:p>
          </table:table-cell>
        </table:table-row>
        <table:table-row table:style-name="ro19">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Flax (Linum perenne)</text:p>
          </table:table-cell>
          <table:table-cell table:style-name="ce12" office:value-type="string" calcext:value-type="string">
            <text:p>Edible</text:p>
          </table:table-cell>
        </table:table-row>
        <table:table-row table:style-name="ro19">
          <table:table-cell table:style-name="ce3" office:value-type="string" calcext:value-type="string">
            <text:p>HERB Borage (Borage officinalis)</text:p>
          </table:table-cell>
          <table:table-cell table:style-name="ce12" office:value-type="string" calcext:value-type="string">
            <text:p>Edible</text:p>
          </table:table-cell>
        </table:table-row>
        <table:table-row table:style-name="ro19">
          <table:table-cell table:style-name="ce3" office:value-type="string" calcext:value-type="string">
            <text:p>HERB Dill (Anethum graveolens)</text:p>
          </table:table-cell>
          <table:table-cell table:style-name="ce12" office:value-type="string" calcext:value-type="string">
            <text:p>Edible</text:p>
          </table:table-cell>
        </table:table-row>
        <table:table-row table:style-name="ro19">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Quinoa (Chenopodium quinoa)</text:p>
          </table:table-cell>
          <table:table-cell table:style-name="ce12" office:value-type="string" calcext:value-type="string">
            <text:p>Edible</text:p>
          </table:table-cell>
        </table:table-row>
        <table:table-row table:style-name="ro19">
          <table:table-cell table:style-name="ce2" office:value-type="string" calcext:value-type="string">
            <text:p>CORN, SWEET (Zea mays)</text:p>
          </table:table-cell>
          <table:table-cell table:style-name="ce12" office:value-type="string" calcext:value-type="string">
            <text:p>Edible</text:p>
          </table:table-cell>
        </table:table-row>
        <table:table-row table:style-name="ro20">
          <table:table-cell table:style-name="ce3" office:value-type="string" calcext:value-type="string">
            <text:p>FLOWER Pot Marigold, (Calendula officinalis)</text:p>
          </table:table-cell>
          <table:table-cell table:style-name="ce12" office:value-type="string" calcext:value-type="string">
            <text:p>Edible</text:p>
          </table:table-cell>
        </table:table-row>
        <table:table-row table:style-name="ro19">
          <table:table-cell table:style-name="ce2" office:value-type="string" calcext:value-type="string">
            <text:p>HERB Stevia (Stevia rebaudiana)</text:p>
          </table:table-cell>
          <table:table-cell table:style-name="ce12" office:value-type="string" calcext:value-type="string">
            <text:p>Edible</text:p>
          </table:table-cell>
        </table:table-row>
        <table:table-row table:style-name="ro19">
          <table:table-cell table:style-name="ce3" office:value-type="string" calcext:value-type="string">
            <text:p>HERB BASIL (Ocimum basilicum)</text:p>
          </table:table-cell>
          <table:table-cell table:style-name="ce12" office:value-type="string" calcext:value-type="string">
            <text:p>Edible</text:p>
          </table:table-cell>
        </table:table-row>
        <table:table-row table:style-name="ro19">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0">
          <table:table-cell table:style-name="ce3" office:value-type="string" calcext:value-type="string">
            <text:p>FLOWER CARNATION (Dianthus caryophyllus)</text:p>
          </table:table-cell>
          <table:table-cell table:style-name="ce12" office:value-type="string" calcext:value-type="string">
            <text:p>Edible</text:p>
          </table:table-cell>
        </table:table-row>
        <table:table-row table:style-name="ro19">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9">
          <table:table-cell table:style-name="ce2" office:value-type="string" calcext:value-type="string">
            <text:p>BEAN, EDAMAME (Glycine max)</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0">
          <table:table-cell table:style-name="ce3" office:value-type="string" calcext:value-type="string">
            <text:p>TOMATO CHERRY (Solanum lycopersicum)</text:p>
          </table:table-cell>
          <table:table-cell table:style-name="ce12" office:value-type="string" calcext:value-type="string">
            <text:p>Edible</text:p>
          </table:table-cell>
        </table:table-row>
        <table:table-row table:style-name="ro19">
          <table:table-cell table:style-name="ce2" office:value-type="string" calcext:value-type="string">
            <text:p>HERB Lemon Balm (Melissa officinalis)</text:p>
          </table:table-cell>
          <table:table-cell table:style-name="ce12" office:value-type="string" calcext:value-type="string">
            <text:p>Edible</text:p>
          </table:table-cell>
        </table:table-row>
        <table:table-row table:style-name="ro19">
          <table:table-cell table:style-name="ce3" office:value-type="string" calcext:value-type="string">
            <text:p>HERB Marjoram (Origanum majorana)</text:p>
          </table:table-cell>
          <table:table-cell table:style-name="ce12" office:value-type="string" calcext:value-type="string">
            <text:p>Edible</text:p>
          </table:table-cell>
        </table:table-row>
        <table:table-row table:style-name="ro19">
          <table:table-cell table:style-name="ce2" office:value-type="string" calcext:value-type="string">
            <text:p>HERB Mint (Mentha sp)</text:p>
          </table:table-cell>
          <table:table-cell table:style-name="ce12" office:value-type="string" calcext:value-type="string">
            <text:p>Edible</text:p>
          </table:table-cell>
        </table:table-row>
        <table:table-row table:style-name="ro19">
          <table:table-cell table:style-name="ce3" office:value-type="string" calcext:value-type="string">
            <text:p>HERB Oregano (Origanum vulgare)</text:p>
          </table:table-cell>
          <table:table-cell table:style-name="ce12" office:value-type="string" calcext:value-type="string">
            <text:p>Edible</text:p>
          </table:table-cell>
        </table:table-row>
        <table:table-row table:style-name="ro19">
          <table:table-cell table:style-name="ce2" office:value-type="string" calcext:value-type="string">
            <text:p>Cover Crop</text:p>
          </table:table-cell>
          <table:table-cell table:style-name="ce12" office:value-type="string" calcext:value-type="string">
            <text:p>Edible</text:p>
          </table:table-cell>
        </table:table-row>
        <table:table-row table:style-name="ro19">
          <table:table-cell table:style-name="ce3" office:value-type="string" calcext:value-type="string">
            <text:p>GOURD (Lagenaria siceraria)</text:p>
          </table:table-cell>
          <table:table-cell table:style-name="ce12" office:value-type="string" calcext:value-type="string">
            <text:p>Edible</text:p>
          </table:table-cell>
        </table:table-row>
        <table:table-row table:style-name="ro19">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9">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9">
          <table:table-cell table:style-name="ce2" office:value-type="string" calcext:value-type="string">
            <text:p>HERB Basil (Ocimum spp.)</text:p>
          </table:table-cell>
          <table:table-cell table:style-name="ce12" office:value-type="string" calcext:value-type="string">
            <text:p>Edible</text:p>
          </table:table-cell>
        </table:table-row>
        <table:table-row table:style-name="ro19">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19">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FLOWER</text:p>
          </table:table-cell>
          <table:table-cell table:style-name="ce12" office:value-type="string" calcext:value-type="string">
            <text:p>Edible</text:p>
          </table:table-cell>
        </table:table-row>
        <table:table-row table:style-name="ro19">
          <table:table-cell table:style-name="ce3" office:value-type="string" calcext:value-type="string">
            <text:p>AMARANTH (Amaranthus tricolor)</text:p>
          </table:table-cell>
          <table:table-cell table:style-name="ce12" office:value-type="string" calcext:value-type="string">
            <text:p>Edible</text:p>
          </table:table-cell>
        </table:table-row>
        <table:table-row table:style-name="ro19">
          <table:table-cell table:style-name="ce3" office:value-type="string" calcext:value-type="string">
            <text:p>AMARANTH (Amaranthus tricolor)</text:p>
          </table:table-cell>
          <table:table-cell table:style-name="ce12" office:value-type="string" calcext:value-type="string">
            <text:p>Edible</text:p>
          </table:table-cell>
        </table:table-row>
        <table:table-row table:style-name="ro19">
          <table:table-cell table:style-name="ce3" office:value-type="string" calcext:value-type="string">
            <text:p>HERB Thyme (Thymus vulgari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3" office:value-type="string" calcext:value-type="string">
            <text:p>TOMATO Cherry (Solanum lycopersiucm)</text:p>
          </table:table-cell>
          <table:table-cell table:style-name="ce12" office:value-type="string" calcext:value-type="string">
            <text:p>Edible</text:p>
          </table:table-cell>
        </table:table-row>
        <table:table-row table:style-name="ro19">
          <table:table-cell table:style-name="ce2" office:value-type="string" calcext:value-type="string">
            <text:p>HERB Chives (Allium tuberosum)</text:p>
          </table:table-cell>
          <table:table-cell table:style-name="ce12" office:value-type="string" calcext:value-type="string">
            <text:p>Edible</text:p>
          </table:table-cell>
        </table:table-row>
        <table:table-row table:style-name="ro19">
          <table:table-cell table:style-name="ce3" office:value-type="string" calcext:value-type="string">
            <text:p>HERB Chamomile (Matricaria recutita)</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3" office:value-type="string" calcext:value-type="string">
            <text:p>TOMATO (Solanum lycopersiucm)</text:p>
          </table:table-cell>
          <table:table-cell table:style-name="ce12" office:value-type="string" calcext:value-type="string">
            <text:p>Edible</text:p>
          </table:table-cell>
        </table:table-row>
        <table:table-row table:style-name="ro19">
          <table:table-cell table:style-name="ce2" office:value-type="string" calcext:value-type="string">
            <text:p>TOMATILLO (Physalis philadelphica)</text:p>
          </table:table-cell>
          <table:table-cell table:style-name="ce12" office:value-type="string" calcext:value-type="string">
            <text:p>Edible</text:p>
          </table:table-cell>
        </table:table-row>
        <table:table-row table:style-name="ro19">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2" office:value-type="string" calcext:value-type="string">
            <text:p>PEPPER SWEET (Capsicum chinense)</text:p>
          </table:table-cell>
          <table:table-cell table:style-name="ce12" office:value-type="string" calcext:value-type="string">
            <text:p>Edible</text:p>
          </table:table-cell>
        </table:table-row>
        <table:table-row table:style-name="ro19">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3" office:value-type="string" calcext:value-type="string">
            <text:p>SQUASH (Cucurbita pepo)</text:p>
          </table:table-cell>
          <table:table-cell table:style-name="ce12" office:value-type="string" calcext:value-type="string">
            <text:p>Edible</text:p>
          </table:table-cell>
        </table:table-row>
        <table:table-row table:style-name="ro19">
          <table:table-cell table:style-name="ce2" office:value-type="string" calcext:value-type="string">
            <text:p>SQUASH (Cucurbirta moschata)</text:p>
          </table:table-cell>
          <table:table-cell table:style-name="ce12" office:value-type="string" calcext:value-type="string">
            <text:p>Edible</text:p>
          </table:table-cell>
        </table:table-row>
        <table:table-row table:style-name="ro19">
          <table:table-cell table:style-name="ce2" office:value-type="string" calcext:value-type="string">
            <text:p>AMARANTH (Amaranthus cruentus)</text:p>
          </table:table-cell>
          <table:table-cell table:style-name="ce12" office:value-type="string" calcext:value-type="string">
            <text:p>Edible</text:p>
          </table:table-cell>
        </table:table-row>
        <table:table-row table:style-name="ro19">
          <table:table-cell table:style-name="ce2" office:value-type="string" calcext:value-type="string">
            <text:p>AMARANTH (Amaranthus cruentus)</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SQUASH (Cucurbirta maxima)</text:p>
          </table:table-cell>
          <table:table-cell table:style-name="ce12" office:value-type="string" calcext:value-type="string">
            <text:p>Edible</text:p>
          </table:table-cell>
        </table:table-row>
        <table:table-row table:style-name="ro19">
          <table:table-cell table:style-name="ce2" office:value-type="string" calcext:value-type="string">
            <text:p>FLOWER BEE BALM (Monarda sp.)</text:p>
          </table:table-cell>
          <table:table-cell table:style-name="ce12" office:value-type="string" calcext:value-type="string">
            <text:p>Edible</text:p>
          </table:table-cell>
        </table:table-row>
        <table:table-row table:style-name="ro19">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19">
          <table:table-cell table:style-name="ce2" office:value-type="string" calcext:value-type="string">
            <text:p>EGGPLANT (Solanum melongena)</text:p>
          </table:table-cell>
          <table:table-cell table:style-name="ce12" office:value-type="string" calcext:value-type="string">
            <text:p>Edible</text:p>
          </table:table-cell>
        </table:table-row>
        <table:table-row table:style-name="ro19">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19">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20">
          <table:table-cell table:style-name="ce3" office:value-type="string" calcext:value-type="string">
            <text:p>HERB Tarragon (Artemesia dracunculoides)</text:p>
          </table:table-cell>
          <table:table-cell table:style-name="ce12" office:value-type="string" calcext:value-type="string">
            <text:p>Edible</text:p>
          </table:table-cell>
        </table:table-row>
        <table:table-row table:style-name="ro19">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9">
          <table:table-cell table:style-name="ce2" office:value-type="string" calcext:value-type="string">
            <text:p>RADISH Daikon (Raphanus sativus)</text:p>
          </table:table-cell>
          <table:table-cell table:style-name="ce12" office:value-type="string" calcext:value-type="string">
            <text:p>Edible</text:p>
          </table:table-cell>
        </table:table-row>
        <table:table-row table:style-name="ro19">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HERB Parsley (Petroselinium crispum)</text:p>
          </table:table-cell>
          <table:table-cell table:style-name="ce12" office:value-type="string" calcext:value-type="string">
            <text:p>Edible</text:p>
          </table:table-cell>
        </table:table-row>
        <table:table-row table:style-name="ro19">
          <table:table-cell table:style-name="ce3" office:value-type="string" calcext:value-type="string">
            <text:p>Pepper Chili (Capsicum annuum)</text:p>
          </table:table-cell>
          <table:table-cell table:style-name="ce12" office:value-type="string" calcext:value-type="string">
            <text:p>Edible</text:p>
          </table:table-cell>
        </table:table-row>
        <table:table-row table:style-name="ro20">
          <table:table-cell table:style-name="ce3" office:value-type="string" calcext:value-type="string">
            <text:p>FLOWER Calendula (Calendula officinalis)</text:p>
          </table:table-cell>
          <table:table-cell table:style-name="ce12" office:value-type="string" calcext:value-type="string">
            <text:p>Edible</text:p>
          </table:table-cell>
        </table:table-row>
        <table:table-row table:style-name="ro19">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20">
          <table:table-cell table:style-name="ce2" office:value-type="string" calcext:value-type="string">
            <text:p>BEAN, YARDLONG (Vigna unguiculate Sesquipedalis)</text:p>
          </table:table-cell>
          <table:table-cell table:style-name="ce12" office:value-type="string" calcext:value-type="string">
            <text:p>Edible</text:p>
          </table:table-cell>
        </table:table-row>
        <table:table-row table:style-name="ro19">
          <table:table-cell table:style-name="ce2" office:value-type="string" calcext:value-type="string">
            <text:p>BEAN, YARDLONG (Vigna unguiculate)</text:p>
          </table:table-cell>
          <table:table-cell table:style-name="ce12" office:value-type="string" calcext:value-type="string">
            <text:p>Edible</text:p>
          </table:table-cell>
        </table:table-row>
        <table:table-row table:style-name="ro19">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CORN, SWEET (Zea mays)</text:p>
          </table:table-cell>
          <table:table-cell table:style-name="ce12" office:value-type="string" calcext:value-type="string">
            <text:p>Edible</text:p>
          </table:table-cell>
        </table:table-row>
        <table:table-row table:style-name="ro19">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20">
          <table:table-cell table:style-name="ce3" office:value-type="string" calcext:value-type="string">
            <text:p>TOMATO CHERRY(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19">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9">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TOMATILLO (Physalis philadelphica)</text:p>
          </table:table-cell>
          <table:table-cell table:style-name="ce12" office:value-type="string" calcext:value-type="string">
            <text:p>Edible</text:p>
          </table:table-cell>
        </table:table-row>
        <table:table-row table:style-name="ro19">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20">
          <table:table-cell table:style-name="ce2" office:value-type="string" calcext:value-type="string">
            <text:p>TOMATO CHERRY(Solanum lycopersicum)</text:p>
          </table:table-cell>
          <table:table-cell table:style-name="ce12" office:value-type="string" calcext:value-type="string">
            <text:p>Edible</text:p>
          </table:table-cell>
        </table:table-row>
        <table:table-row table:style-name="ro19">
          <table:table-cell table:style-name="ce3" office:value-type="string" calcext:value-type="string">
            <text:p>RADISH (Raphanus sativus var. mougri)</text:p>
          </table:table-cell>
          <table:table-cell table:style-name="ce12" office:value-type="string" calcext:value-type="string">
            <text:p>Edible</text:p>
          </table:table-cell>
        </table:table-row>
        <table:table-row table:style-name="ro19">
          <table:table-cell table:style-name="ce3" office:value-type="string" calcext:value-type="string">
            <text:p>ONION (Allium cepa)</text:p>
          </table:table-cell>
          <table:table-cell table:style-name="ce12" office:value-type="string" calcext:value-type="string">
            <text:p>Edible</text:p>
          </table:table-cell>
        </table:table-row>
        <table:table-row table:style-name="ro19">
          <table:table-cell table:style-name="ce2" office:value-type="string" calcext:value-type="string">
            <text:p>TOMATO (Sloanum lycopersicum)</text:p>
          </table:table-cell>
          <table:table-cell table:style-name="ce12" office:value-type="string" calcext:value-type="string">
            <text:p>Edible</text:p>
          </table:table-cell>
        </table:table-row>
        <table:table-row table:style-name="ro19">
          <table:table-cell table:style-name="ce3" office:value-type="string" calcext:value-type="string">
            <text:p>OKRA (Abelmoschus esculentus)</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Flax (Linaceae grandiflor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HERB (Perilla frutescens)</text:p>
          </table:table-cell>
          <table:table-cell table:style-name="ce12" office:value-type="string" calcext:value-type="string">
            <text:p>Edible</text:p>
          </table:table-cell>
        </table:table-row>
        <table:table-row table:style-name="ro19">
          <table:table-cell table:style-name="ce3" office:value-type="string" calcext:value-type="string">
            <text:p>HERB Basil Blend (Ocimum basilicum)</text:p>
          </table:table-cell>
          <table:table-cell table:style-name="ce12" office:value-type="string" calcext:value-type="string">
            <text:p>Edible</text:p>
          </table:table-cell>
        </table:table-row>
        <table:table-row table:style-name="ro19">
          <table:table-cell table:style-name="ce2" office:value-type="string" calcext:value-type="string">
            <text:p>HERB Savory (Satureja hortensis)</text:p>
          </table:table-cell>
          <table:table-cell table:style-name="ce12" office:value-type="string" calcext:value-type="string">
            <text:p>Edible</text:p>
          </table:table-cell>
        </table:table-row>
        <table:table-row table:style-name="ro20">
          <table:table-cell table:style-name="ce3" office:value-type="string" calcext:value-type="string">
            <text:p>TOMATO Roma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0">
          <table:table-cell table:style-name="ce3" office:value-type="string" calcext:value-type="string">
            <text:p>HERB Oregano (Origanum vulgare hirtum)</text:p>
          </table:table-cell>
          <table:table-cell table:style-name="ce12" office:value-type="string" calcext:value-type="string">
            <text:p>Edible</text:p>
          </table:table-cell>
        </table:table-row>
        <table:table-row table:style-name="ro19">
          <table:table-cell table:style-name="ce3" office:value-type="string" calcext:value-type="string">
            <text:p>HERB Basil (Ocimum sp)</text:p>
          </table:table-cell>
          <table:table-cell table:style-name="ce12" office:value-type="string" calcext:value-type="string">
            <text:p>Edible</text:p>
          </table:table-cell>
        </table:table-row>
        <table:table-row table:style-name="ro20">
          <table:table-cell table:style-name="ce2" office:value-type="string" calcext:value-type="string">
            <text:p>HERB Basil (Ocimum basilicum O x africanum)</text:p>
          </table:table-cell>
          <table:table-cell table:style-name="ce12" office:value-type="string" calcext:value-type="string">
            <text:p>Edible</text:p>
          </table:table-cell>
        </table:table-row>
        <table:table-row table:style-name="ro19">
          <table:table-cell table:style-name="ce3" office:value-type="string" calcext:value-type="string">
            <text:p>BEAN, FAVA (Vicia faba)</text:p>
          </table:table-cell>
          <table:table-cell table:style-name="ce12" office:value-type="string" calcext:value-type="string">
            <text:p>Edible</text:p>
          </table:table-cell>
        </table:table-row>
        <table:table-row table:style-name="ro19">
          <table:table-cell table:style-name="ce3" office:value-type="string" calcext:value-type="string">
            <text:p>HERB Savory (Satureja montana)</text:p>
          </table:table-cell>
          <table:table-cell table:style-name="ce12" office:value-type="string" calcext:value-type="string">
            <text:p>Edible</text:p>
          </table:table-cell>
        </table:table-row>
        <table:table-row table:style-name="ro19">
          <table:table-cell table:style-name="ce3" office:value-type="string" calcext:value-type="string">
            <text:p>ONION Italian (Allium cepa)</text:p>
          </table:table-cell>
          <table:table-cell table:style-name="ce12" office:value-type="string" calcext:value-type="string">
            <text:p>Edible</text:p>
          </table:table-cell>
        </table:table-row>
        <table:table-row table:style-name="ro19">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HERB Mint (Mentha spicata)</text:p>
          </table:table-cell>
          <table:table-cell table:style-name="ce12" office:value-type="string" calcext:value-type="string">
            <text:p>Edible</text:p>
          </table:table-cell>
        </table:table-row>
        <table:table-row table:style-name="ro19">
          <table:table-cell table:style-name="ce3" office:value-type="string" calcext:value-type="string">
            <text:p>SQUASH (Cucurbirta moschata)</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HERB Basil (Ocimum basilicum “Thai”)</text:p>
          </table:table-cell>
          <table:table-cell table:style-name="ce12" office:value-type="string" calcext:value-type="string">
            <text:p>Edible</text:p>
          </table:table-cell>
        </table:table-row>
        <table:table-row table:style-name="ro19">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19">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HERB Sage (Salvia officinalis)</text:p>
          </table:table-cell>
          <table:table-cell table:style-name="ce12" office:value-type="string" calcext:value-type="string">
            <text:p>Edible</text:p>
          </table:table-cell>
        </table:table-row>
        <table:table-row table:style-name="ro19">
          <table:table-cell table:style-name="ce2" office:value-type="string" calcext:value-type="string">
            <text:p>SQUASH (Cucurbirta maxima)</text:p>
          </table:table-cell>
          <table:table-cell table:style-name="ce12" office:value-type="string" calcext:value-type="string">
            <text:p>Edible</text:p>
          </table:table-cell>
        </table:table-row>
        <table:table-row table:style-name="ro19">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19">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2" office:value-type="string" calcext:value-type="string">
            <text:p>OKRA (Abelmoschus esculentus)</text:p>
          </table:table-cell>
          <table:table-cell table:style-name="ce12" office:value-type="string" calcext:value-type="string">
            <text:p>Edible</text:p>
          </table:table-cell>
        </table:table-row>
        <table:table-row table:style-name="ro19">
          <table:table-cell table:style-name="ce3" office:value-type="string" calcext:value-type="string">
            <text:p>HERB Catnip (Nepeta cataria)</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9">
          <table:table-cell table:style-name="ce3" office:value-type="string" calcext:value-type="string">
            <text:p>HERB <text:span text:style-name="T1">Basil </text:span><text:span text:style-name="T2">(Ocimum basilicum)</text:span></text:p>
          </table:table-cell>
          <table:table-cell table:style-name="ce12" office:value-type="string" calcext:value-type="string">
            <text:p>Edible</text:p>
          </table:table-cell>
        </table:table-row>
        <table:table-row table:style-name="ro19">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9">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19">
          <table:table-cell table:style-name="ce3" office:value-type="string" calcext:value-type="string">
            <text:p>OKRA (Abelmoschus esculentus)</text:p>
          </table:table-cell>
          <table:table-cell table:style-name="ce12" office:value-type="string" calcext:value-type="string">
            <text:p>Edible</text:p>
          </table:table-cell>
        </table:table-row>
        <table:table-row table:style-name="ro19">
          <table:table-cell table:style-name="ce2" office:value-type="string" calcext:value-type="string">
            <text:p>HERB Dill (Anethum graveolens)</text:p>
          </table:table-cell>
          <table:table-cell table:style-name="ce12" office:value-type="string" calcext:value-type="string">
            <text:p>Edible</text:p>
          </table:table-cell>
        </table:table-row>
        <table:table-row table:style-name="ro19">
          <table:table-cell table:style-name="ce3" office:value-type="string" calcext:value-type="string">
            <text:p>HERB Chives (Allium tuberosum)</text:p>
          </table:table-cell>
          <table:table-cell table:style-name="ce12" office:value-type="string" calcext:value-type="string">
            <text:p>Edible</text:p>
          </table:table-cell>
        </table:table-row>
        <table:table-row table:style-name="ro20">
          <table:table-cell table:style-name="ce2" office:value-type="string" calcext:value-type="string">
            <text:p>HERB Basil (Ocimum basilicum “Genovese”)</text:p>
          </table:table-cell>
          <table:table-cell table:style-name="ce12" office:value-type="string" calcext:value-type="string">
            <text:p>Edible</text:p>
          </table:table-cell>
        </table:table-row>
        <table:table-row table:style-name="ro19">
          <table:table-cell table:style-name="ce2" office:value-type="string" calcext:value-type="string">
            <text:p>FLOWER Sunflower (Helianthus annuus)</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chinense)</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20">
          <table:table-cell table:style-name="ce2" office:value-type="string" calcext:value-type="string">
            <text:p>HERB Tarragon (Artemesia dracunculoides)</text:p>
          </table:table-cell>
          <table:table-cell table:style-name="ce12" office:value-type="string" calcext:value-type="string">
            <text:p>Edible</text:p>
          </table:table-cell>
        </table:table-row>
        <table:table-row table:style-name="ro19">
          <table:table-cell table:style-name="ce2" office:value-type="string" calcext:value-type="string">
            <text:p>CORN, SWEET (Zea mays)</text:p>
          </table:table-cell>
          <table:table-cell table:style-name="ce12" office:value-type="string" calcext:value-type="string">
            <text:p>Edible</text:p>
          </table:table-cell>
        </table:table-row>
        <table:table-row table:style-name="ro19">
          <table:table-cell table:style-name="ce3" office:value-type="string" calcext:value-type="string">
            <text:p>HERB Mint (Mentha sp)</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MELON Cantalope (Cucumis melo)</text:p>
          </table:table-cell>
          <table:table-cell table:style-name="ce12" office:value-type="string" calcext:value-type="string">
            <text:p>Edible</text:p>
          </table:table-cell>
        </table:table-row>
        <table:table-row table:style-name="ro19">
          <table:table-cell table:style-name="ce2" office:value-type="string" calcext:value-type="string">
            <text:p>CORN, SWEET (Zea mays)</text:p>
          </table:table-cell>
          <table:table-cell table:style-name="ce12" office:value-type="string" calcext:value-type="string">
            <text:p>Edible</text:p>
          </table:table-cell>
        </table:table-row>
        <table:table-row table:style-name="ro19">
          <table:table-cell table:style-name="ce3" office:value-type="string" calcext:value-type="string">
            <text:p>CORN, SWEET (Zea mays)</text:p>
          </table:table-cell>
          <table:table-cell table:style-name="ce12" office:value-type="string" calcext:value-type="string">
            <text:p>Edible</text:p>
          </table:table-cell>
        </table:table-row>
        <table:table-row table:style-name="ro19">
          <table:table-cell table:style-name="ce3" office:value-type="string" calcext:value-type="string">
            <text:p>FLOWER Sunflower (Helianthus annus)</text:p>
          </table:table-cell>
          <table:table-cell table:style-name="ce12" office:value-type="string" calcext:value-type="string">
            <text:p>Edible</text:p>
          </table:table-cell>
        </table:table-row>
        <table:table-row table:style-name="ro19">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ONION (Allium cepa)</text:p>
          </table:table-cell>
          <table:table-cell table:style-name="ce12" office:value-type="string" calcext:value-type="string">
            <text:p>Edible</text:p>
          </table:table-cell>
        </table:table-row>
        <table:table-row table:style-name="ro19">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GOURD (Lagenaria siceraria)</text:p>
          </table:table-cell>
          <table:table-cell table:style-name="ce12" office:value-type="string" calcext:value-type="string">
            <text:p>Edible</text:p>
          </table:table-cell>
        </table:table-row>
        <table:table-row table:style-name="ro20">
          <table:table-cell table:style-name="ce3" office:value-type="string" calcext:value-type="string">
            <text:p>FLOWER Pot Marigold, (Calendula officinalis)</text:p>
          </table:table-cell>
          <table:table-cell table:style-name="ce12" office:value-type="string" calcext:value-type="string">
            <text:p>Edible</text:p>
          </table:table-cell>
        </table:table-row>
        <table:table-row table:style-name="ro20">
          <table:table-cell table:style-name="ce2" office:value-type="string" calcext:value-type="string">
            <text:p>HERB Basil (Ocimum basilicum “Genovese”)</text:p>
          </table:table-cell>
          <table:table-cell table:style-name="ce12" office:value-type="string" calcext:value-type="string">
            <text:p>Edible</text:p>
          </table:table-cell>
        </table:table-row>
        <table:table-row table:style-name="ro19">
          <table:table-cell table:style-name="ce2" office:value-type="string" calcext:value-type="string">
            <text:p>ARTICHOKE (Cynara scolymus)</text:p>
          </table:table-cell>
          <table:table-cell table:style-name="ce12" office:value-type="string" calcext:value-type="string">
            <text:p>Edible</text:p>
          </table:table-cell>
        </table:table-row>
        <table:table-row table:style-name="ro19">
          <table:table-cell table:style-name="ce3" office:value-type="string" calcext:value-type="string">
            <text:p>HERB Basil (Ocimum spp)</text:p>
          </table:table-cell>
          <table:table-cell table:style-name="ce12" office:value-type="string" calcext:value-type="string">
            <text:p>Edible</text:p>
          </table:table-cell>
        </table:table-row>
        <table:table-row table:style-name="ro19">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9">
          <table:table-cell table:style-name="ce4"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3" office:value-type="string" calcext:value-type="string">
            <text:p>Pepper Chili (Capsicum annuum)</text:p>
          </table:table-cell>
          <table:table-cell table:style-name="ce12" office:value-type="string" calcext:value-type="string">
            <text:p>Edible</text:p>
          </table:table-cell>
        </table:table-row>
        <table:table-row table:style-name="ro19">
          <table:table-cell table:style-name="ce2" office:value-type="string" calcext:value-type="string">
            <text:p>SQUASH Acorn (Cucubirta pepo)</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2"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2" office:value-type="string" calcext:value-type="string">
            <text:p>HERB Cilantro (Coriandrum stivum)</text:p>
          </table:table-cell>
          <table:table-cell table:style-name="ce12" office:value-type="string" calcext:value-type="string">
            <text:p>Edible</text:p>
          </table:table-cell>
        </table:table-row>
        <table:table-row table:style-name="ro19">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2" office:value-type="string" calcext:value-type="string">
            <text:p>FLOWER Sunflower (Helianthus annuus)</text:p>
          </table:table-cell>
          <table:table-cell table:style-name="ce12" office:value-type="string" calcext:value-type="string">
            <text:p>Edible</text:p>
          </table:table-cell>
        </table:table-row>
        <table:table-row table:style-name="ro19">
          <table:table-cell table:style-name="ce3" office:value-type="string" calcext:value-type="string">
            <text:p>TOMATO (Solanaceae lycopersicum)</text:p>
          </table:table-cell>
          <table:table-cell table:style-name="ce12" office:value-type="string" calcext:value-type="string">
            <text:p>Edible</text:p>
          </table:table-cell>
        </table:table-row>
        <table:table-row table:style-name="ro19">
          <table:table-cell table:style-name="ce2" office:value-type="string" calcext:value-type="string">
            <text:p>CORN, POPCORN (Zea may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CORN, FLOUR (Zea may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3" office:value-type="string" calcext:value-type="string">
            <text:p>BEAN, LIMA (Phaseolus lunatus)</text:p>
          </table:table-cell>
          <table:table-cell table:style-name="ce12" office:value-type="string" calcext:value-type="string">
            <text:p>Edible</text:p>
          </table:table-cell>
        </table:table-row>
        <table:table-row table:style-name="ro19">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3" office:value-type="string" calcext:value-type="string">
            <text:p>GOURD (Lagenaria siceraria)</text:p>
          </table:table-cell>
          <table:table-cell table:style-name="ce12" office:value-type="string" calcext:value-type="string">
            <text:p>Edible</text:p>
          </table:table-cell>
        </table:table-row>
        <table:table-row table:style-name="ro19">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20">
          <table:table-cell table:style-name="ce2" office:value-type="string" calcext:value-type="string">
            <text:p>CORN, ANCIENT (Zea mays parvaglumis)</text:p>
          </table:table-cell>
          <table:table-cell table:style-name="ce12" office:value-type="string" calcext:value-type="string">
            <text:p>Edible</text:p>
          </table:table-cell>
        </table:table-row>
        <table:table-row table:style-name="ro19">
          <table:table-cell table:style-name="ce2" office:value-type="string" calcext:value-type="string">
            <text:p>MELON (Cucumis melo)</text:p>
          </table:table-cell>
          <table:table-cell table:style-name="ce12" office:value-type="string" calcext:value-type="string">
            <text:p>Edible</text:p>
          </table:table-cell>
        </table:table-row>
        <table:table-row table:style-name="ro19">
          <table:table-cell table:style-name="ce3" office:value-type="string" calcext:value-type="string">
            <text:p>TOMATO (Solanum lycopersiucm)</text:p>
          </table:table-cell>
          <table:table-cell table:style-name="ce12" office:value-type="string" calcext:value-type="string">
            <text:p>Edible</text:p>
          </table:table-cell>
        </table:table-row>
        <table:table-row table:style-name="ro19">
          <table:table-cell table:style-name="ce2" office:value-type="string" calcext:value-type="string">
            <text:p>SQUASH (Cucurbita maxima)</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BEAN, LIMA (Phaseolus lunatus)</text:p>
          </table:table-cell>
          <table:table-cell table:style-name="ce12" office:value-type="string" calcext:value-type="string">
            <text:p>Edible</text:p>
          </table:table-cell>
        </table:table-row>
        <table:table-row table:style-name="ro19">
          <table:table-cell table:style-name="ce4"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2" office:value-type="string" calcext:value-type="string">
            <text:p>GREENS (Basella rubra)</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SQUASH (Cucubita argyroserma)</text:p>
          </table:table-cell>
          <table:table-cell table:style-name="ce12" office:value-type="string" calcext:value-type="string">
            <text:p>Edible</text:p>
          </table:table-cell>
        </table:table-row>
        <table:table-row table:style-name="ro19">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9">
          <table:table-cell table:style-name="ce3" office:value-type="string" calcext:value-type="string">
            <text:p>CORN, SWEET (Zea mays)</text:p>
          </table:table-cell>
          <table:table-cell table:style-name="ce12" office:value-type="string" calcext:value-type="string">
            <text:p>Edible</text:p>
          </table:table-cell>
        </table:table-row>
        <table:table-row table:style-name="ro19">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2" office:value-type="string" calcext:value-type="string">
            <text:p>HERB Chia (Salvia tiliiforlia)</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2" office:value-type="string" calcext:value-type="string">
            <text:p>TOMATILLO (Physalis ixocarpa)</text:p>
          </table:table-cell>
          <table:table-cell table:style-name="ce12" office:value-type="string" calcext:value-type="string">
            <text:p>Edible</text:p>
          </table:table-cell>
        </table:table-row>
        <table:table-row table:style-name="ro20">
          <table:table-cell table:style-name="ce3" office:value-type="string" calcext:value-type="string">
            <text:p>HERB Oregano (Origanum vulgare hirtum)</text:p>
          </table:table-cell>
          <table:table-cell table:style-name="ce12" office:value-type="string" calcext:value-type="string">
            <text:p>Edible</text:p>
          </table:table-cell>
        </table:table-row>
        <table:table-row table:style-name="ro19">
          <table:table-cell table:style-name="ce3" office:value-type="string" calcext:value-type="string">
            <text:p>TURNIP (Brassica campestris)</text:p>
          </table:table-cell>
          <table:table-cell table:style-name="ce12" office:value-type="string" calcext:value-type="string">
            <text:p>Edible</text:p>
          </table:table-cell>
        </table:table-row>
        <table:table-row table:style-name="ro19">
          <table:table-cell table:style-name="ce2"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19">
          <table:table-cell table:style-name="ce3" office:value-type="string" calcext:value-type="string">
            <text:p>CORN, SWEET (Zea may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0">
          <table:table-cell table:style-name="ce2" office:value-type="string" calcext:value-type="string">
            <text:p>HERB Basil (Ocimum basilicum “Genovese”)</text:p>
          </table:table-cell>
          <table:table-cell table:style-name="ce12" office:value-type="string" calcext:value-type="string">
            <text:p>Edible</text:p>
          </table:table-cell>
        </table:table-row>
        <table:table-row table:style-name="ro19">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2" office:value-type="string" calcext:value-type="string">
            <text:p>OKRA (Abelmoschus esculentu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9">
          <table:table-cell table:style-name="ce2" office:value-type="string" calcext:value-type="string">
            <text:p>TOMATO (Solanaceae)</text:p>
          </table:table-cell>
          <table:table-cell table:style-name="ce12" office:value-type="string" calcext:value-type="string">
            <text:p>Edible</text:p>
          </table:table-cell>
        </table:table-row>
        <table:table-row table:style-name="ro19">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TOMATO (Solanaceae)</text:p>
          </table:table-cell>
          <table:table-cell table:style-name="ce12" office:value-type="string" calcext:value-type="string">
            <text:p>Edible</text:p>
          </table:table-cell>
        </table:table-row>
        <table:table-row table:style-name="ro19">
          <table:table-cell table:style-name="ce2" office:value-type="string" calcext:value-type="string">
            <text:p>HERB Dill (Anethum graveolens)</text:p>
          </table:table-cell>
          <table:table-cell table:style-name="ce12" office:value-type="string" calcext:value-type="string">
            <text:p>Edible</text:p>
          </table:table-cell>
        </table:table-row>
        <table:table-row table:style-name="ro19">
          <table:table-cell table:style-name="ce3" office:value-type="string" calcext:value-type="string">
            <text:p>HERB Basil (Ocimum africanum)</text:p>
          </table:table-cell>
          <table:table-cell table:style-name="ce12" office:value-type="string" calcext:value-type="string">
            <text:p>Edible</text:p>
          </table:table-cell>
        </table:table-row>
        <table:table-row table:style-name="ro19">
          <table:table-cell table:style-name="ce2" office:value-type="string" calcext:value-type="string">
            <text:p>HERB Lemon Balm (Melissa officinalis)</text:p>
          </table:table-cell>
          <table:table-cell table:style-name="ce12" office:value-type="string" calcext:value-type="string">
            <text:p>Edible</text:p>
          </table:table-cell>
        </table:table-row>
        <table:table-row table:style-name="ro19">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9">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9">
          <table:table-cell table:style-name="ce3" office:value-type="string" calcext:value-type="string">
            <text:p>Pepper Chili (Capsicum annuum)</text:p>
          </table:table-cell>
          <table:table-cell table:style-name="ce12" office:value-type="string" calcext:value-type="string">
            <text:p>Edible</text:p>
          </table:table-cell>
        </table:table-row>
        <table:table-row table:style-name="ro19">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OKRA (Abelmoschus esculentus)</text:p>
          </table:table-cell>
          <table:table-cell table:style-name="ce12" office:value-type="string" calcext:value-type="string">
            <text:p>Edible</text:p>
          </table:table-cell>
        </table:table-row>
        <table:table-row table:style-name="ro20">
          <table:table-cell table:style-name="ce2" office:value-type="string" calcext:value-type="string">
            <text:p>Melon - Muskmelon (Cucumis melo var. flexousus)</text:p>
          </table:table-cell>
          <table:table-cell table:style-name="ce12" office:value-type="string" calcext:value-type="string">
            <text:p>Edible</text:p>
          </table:table-cell>
        </table:table-row>
        <table:table-row table:style-name="ro19">
          <table:table-cell table:style-name="ce4" office:value-type="string" calcext:value-type="string">
            <text:p>BEAN, TEPARY (Phaseolus acutifolius)</text:p>
          </table:table-cell>
          <table:table-cell table:style-name="ce12" office:value-type="string" calcext:value-type="string">
            <text:p>Edible</text:p>
          </table:table-cell>
        </table:table-row>
        <table:table-row table:style-name="ro19">
          <table:table-cell table:style-name="ce3" office:value-type="string" calcext:value-type="string">
            <text:p>HERB Dill (Anethum graveolens)</text:p>
          </table:table-cell>
          <table:table-cell table:style-name="ce12" office:value-type="string" calcext:value-type="string">
            <text:p>Edible</text:p>
          </table:table-cell>
        </table:table-row>
        <table:table-row table:style-name="ro20">
          <table:table-cell table:style-name="ce2" office:value-type="string" calcext:value-type="string">
            <text:p>HERB Oregano (Origanum vulgare hirtum)</text:p>
          </table:table-cell>
          <table:table-cell table:style-name="ce12" office:value-type="string" calcext:value-type="string">
            <text:p>Edible</text:p>
          </table:table-cell>
        </table:table-row>
        <table:table-row table:style-name="ro19">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SQUASH (Cucubirta pepo)</text:p>
          </table:table-cell>
          <table:table-cell table:style-name="ce12" office:value-type="string" calcext:value-type="string">
            <text:p>Edible</text:p>
          </table:table-cell>
        </table:table-row>
        <table:table-row table:style-name="ro19">
          <table:table-cell table:style-name="ce3" office:value-type="string" calcext:value-type="string">
            <text:p>HERB Fennel (Foeniculum vulgare)</text:p>
          </table:table-cell>
          <table:table-cell table:style-name="ce12" office:value-type="string" calcext:value-type="string">
            <text:p>Edible</text:p>
          </table:table-cell>
        </table:table-row>
        <table:table-row table:style-name="ro19">
          <table:table-cell table:style-name="ce3" office:value-type="string" calcext:value-type="string">
            <text:p>CORN, POPCORN (Zea mays)</text:p>
          </table:table-cell>
          <table:table-cell table:style-name="ce12" office:value-type="string" calcext:value-type="string">
            <text:p>Edible</text:p>
          </table:table-cell>
        </table:table-row>
        <table:table-row table:style-name="ro20">
          <table:table-cell table:style-name="ce3" office:value-type="string" calcext:value-type="string">
            <text:p>GREENS Purslane (Portulacaceae verdolga)</text:p>
          </table:table-cell>
          <table:table-cell table:style-name="ce12" office:value-type="string" calcext:value-type="string">
            <text:p>Edible</text:p>
          </table:table-cell>
        </table:table-row>
        <table:table-row table:style-name="ro19">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9">
          <table:table-cell table:style-name="ce3" office:value-type="string" calcext:value-type="string">
            <text:p>CORN, FLOUR (Zea mays)</text:p>
          </table:table-cell>
          <table:table-cell table:style-name="ce12" office:value-type="string" calcext:value-type="string">
            <text:p>Edible</text:p>
          </table:table-cell>
        </table:table-row>
        <table:table-row table:style-name="ro20">
          <table:table-cell table:style-name="ce3" office:value-type="string" calcext:value-type="string">
            <text:p>HERB Oregano (Origanum vulgare hirtum)</text:p>
          </table:table-cell>
          <table:table-cell table:style-name="ce12" office:value-type="string" calcext:value-type="string">
            <text:p>Edible</text:p>
          </table:table-cell>
        </table:table-row>
        <table:table-row table:style-name="ro19">
          <table:table-cell table:style-name="ce3" office:value-type="string" calcext:value-type="string">
            <text:p>EGGPLANT (Solanum melongena)</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3" office:value-type="string" calcext:value-type="string">
            <text:p>SQUASH (Cucubirta pepo)</text:p>
          </table:table-cell>
          <table:table-cell table:style-name="ce12" office:value-type="string" calcext:value-type="string">
            <text:p>Edible</text:p>
          </table:table-cell>
        </table:table-row>
        <table:table-row table:style-name="ro19">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9">
          <table:table-cell table:style-name="ce2" office:value-type="string" calcext:value-type="string">
            <text:p>HERB Savory (Satureja hortensis)</text:p>
          </table:table-cell>
          <table:table-cell table:style-name="ce12" office:value-type="string" calcext:value-type="string">
            <text:p>Edible</text:p>
          </table:table-cell>
        </table:table-row>
        <table:table-row table:style-name="ro19">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9">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9">
          <table:table-cell table:style-name="ce3" office:value-type="string" calcext:value-type="string">
            <text:p>OKRA (Abelmoschus esculentus)</text:p>
          </table:table-cell>
          <table:table-cell table:style-name="ce12" office:value-type="string" calcext:value-type="string">
            <text:p>Edible</text:p>
          </table:table-cell>
        </table:table-row>
        <table:table-row table:style-name="ro19">
          <table:table-cell table:style-name="ce2" office:value-type="string" calcext:value-type="string">
            <text:p>PUMPKIN (Cucurbita maxima)</text:p>
          </table:table-cell>
          <table:table-cell table:style-name="ce12" office:value-type="string" calcext:value-type="string">
            <text:p>Edible</text:p>
          </table:table-cell>
        </table:table-row>
        <table:table-row table:style-name="ro19">
          <table:table-cell table:style-name="ce2" office:value-type="string" calcext:value-type="string">
            <text:p>FLOWER Salvia (Salvia splendens)</text:p>
          </table:table-cell>
          <table:table-cell table:style-name="ce12" office:value-type="string" calcext:value-type="string">
            <text:p>Edible</text:p>
          </table:table-cell>
        </table:table-row>
        <table:table-row table:style-name="ro20">
          <table:table-cell table:style-name="ce2" office:value-type="string" calcext:value-type="string">
            <text:p>FLOWER <text:s/>Nasturtium (Tropaeolum majus)</text:p>
          </table:table-cell>
          <table:table-cell table:style-name="ce12" office:value-type="string" calcext:value-type="string">
            <text:p>Edible</text:p>
          </table:table-cell>
        </table:table-row>
        <table:table-row table:style-name="ro19">
          <table:table-cell table:style-name="ce2" office:value-type="string" calcext:value-type="string">
            <text:p>PUMPKIN (Cucurbita maxima)</text:p>
          </table:table-cell>
          <table:table-cell table:style-name="ce12" office:value-type="string" calcext:value-type="string">
            <text:p>Edible</text:p>
          </table:table-cell>
        </table:table-row>
        <table:table-row table:style-name="ro19">
          <table:table-cell table:style-name="ce3" office:value-type="string" calcext:value-type="string">
            <text:p>FLOWER Nasturtium (Tropaeolum majus)</text:p>
          </table:table-cell>
          <table:table-cell table:style-name="ce12" office:value-type="string" calcext:value-type="string">
            <text:p>Edible</text:p>
          </table:table-cell>
        </table:table-row>
        <table:table-row table:style-name="ro19">
          <table:table-cell table:style-name="ce3" office:value-type="string" calcext:value-type="string">
            <text:p>PUMPKIN (Cucurbita maxima)</text:p>
          </table:table-cell>
          <table:table-cell table:style-name="ce12" office:value-type="string" calcext:value-type="string">
            <text:p>Edible</text:p>
          </table:table-cell>
        </table:table-row>
        <table:table-row table:style-name="ro19">
          <table:table-cell table:style-name="ce3" office:value-type="string" calcext:value-type="string">
            <text:p>MUSTARD (Brassica juncea)</text:p>
          </table:table-cell>
          <table:table-cell table:style-name="ce12" office:value-type="string" calcext:value-type="string">
            <text:p>Edible</text:p>
          </table:table-cell>
        </table:table-row>
        <table:table-row table:style-name="ro20">
          <table:table-cell table:style-name="ce3" office:value-type="string" calcext:value-type="string">
            <text:p>FLOWER Blanket Flower (Gaillardia x grandiflora)</text:p>
          </table:table-cell>
          <table:table-cell table:style-name="ce12" office:value-type="string" calcext:value-type="string">
            <text:p>Edible</text:p>
          </table:table-cell>
        </table:table-row>
        <table:table-row table:style-name="ro20">
          <table:table-cell table:style-name="ce2" office:value-type="string" calcext:value-type="string">
            <text:p>FLOWER <text:s/>Nasturtium (Tropaeolum majus)</text:p>
          </table:table-cell>
          <table:table-cell table:style-name="ce12" office:value-type="string" calcext:value-type="string">
            <text:p>Edible</text:p>
          </table:table-cell>
        </table:table-row>
        <table:table-row table:style-name="ro19">
          <table:table-cell table:style-name="ce2" office:value-type="string" calcext:value-type="string">
            <text:p>PUMPKIN (Cucurbita maxima)</text:p>
          </table:table-cell>
          <table:table-cell table:style-name="ce12" office:value-type="string" calcext:value-type="string">
            <text:p>Edible</text:p>
          </table:table-cell>
        </table:table-row>
        <table:table-row table:style-name="ro19">
          <table:table-cell table:style-name="ce3" office:value-type="string" calcext:value-type="string">
            <text:p>FLOWER Nasturtium (Tropaeolum majus)</text:p>
          </table:table-cell>
          <table:table-cell table:style-name="ce12" office:value-type="string" calcext:value-type="string">
            <text:p>Edible</text:p>
          </table:table-cell>
        </table:table-row>
        <table:table-row table:style-name="ro19">
          <table:table-cell table:style-name="ce3" office:value-type="string" calcext:value-type="string">
            <text:p>MUSTARD (Brassica juncea)</text:p>
          </table:table-cell>
          <table:table-cell table:style-name="ce12" office:value-type="string" calcext:value-type="string">
            <text:p>Edible</text:p>
          </table:table-cell>
        </table:table-row>
        <table:table-row table:style-name="ro20">
          <table:table-cell table:style-name="ce2" office:value-type="string" calcext:value-type="string">
            <text:p>FLOWER Penstemon (Penstemon strictus)</text:p>
          </table:table-cell>
          <table:table-cell table:style-name="ce12" office:value-type="string" calcext:value-type="string">
            <text:p>Edible</text:p>
          </table:table-cell>
        </table:table-row>
        <table:table-row table:style-name="ro20">
          <table:table-cell table:style-name="ce2" office:value-type="string" calcext:value-type="string">
            <text:p>FLOWER <text:s/>Nasturtium (Tropaeolum majus)</text:p>
          </table:table-cell>
          <table:table-cell table:style-name="ce12" office:value-type="string" calcext:value-type="string">
            <text:p>Edible</text:p>
          </table:table-cell>
        </table:table-row>
        <table:table-row table:style-name="ro19">
          <table:table-cell table:style-name="ce2" office:value-type="string" calcext:value-type="string">
            <text:p>HERB Thyme (Thymus vulgaris)</text:p>
          </table:table-cell>
          <table:table-cell table:style-name="ce12" office:value-type="string" calcext:value-type="string">
            <text:p>Edible</text:p>
          </table:table-cell>
        </table:table-row>
        <table:table-row table:style-name="ro19">
          <table:table-cell table:style-name="ce3" office:value-type="string" calcext:value-type="string">
            <text:p>PUMPKIN (Cucurbita maxima)</text:p>
          </table:table-cell>
          <table:table-cell table:style-name="ce12" office:value-type="string" calcext:value-type="string">
            <text:p>Edible</text:p>
          </table:table-cell>
        </table:table-row>
        <table:table-row table:style-name="ro19">
          <table:table-cell table:style-name="ce3" office:value-type="string" calcext:value-type="string">
            <text:p>PUMPKIN (Cucurbita pepo)</text:p>
          </table:table-cell>
          <table:table-cell table:style-name="ce12" office:value-type="string" calcext:value-type="string">
            <text:p>Edible</text:p>
          </table:table-cell>
        </table:table-row>
        <table:table-row table:style-name="ro19">
          <table:table-cell table:style-name="ce3" office:value-type="string" calcext:value-type="string">
            <text:p>TREE (Vitex agnus-castus)</text:p>
          </table:table-cell>
          <table:table-cell table:style-name="ce12" office:value-type="string" calcext:value-type="string">
            <text:p>Edible</text:p>
          </table:table-cell>
        </table:table-row>
        <table:table-row table:style-name="ro19">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2" office:value-type="string" calcext:value-type="string">
            <text:p>TREE (Albizia julibrissin)</text:p>
          </table:table-cell>
          <table:table-cell table:style-name="ce12" office:value-type="string" calcext:value-type="string">
            <text:p>Edible</text:p>
          </table:table-cell>
        </table:table-row>
        <table:table-row table:style-name="ro20">
          <table:table-cell table:style-name="ce3" office:value-type="string" calcext:value-type="string">
            <text:p>FLOWER Desert Marigold (Baileya multiradiata)</text:p>
          </table:table-cell>
          <table:table-cell table:style-name="ce12" office:value-type="string" calcext:value-type="string">
            <text:p>Edible</text:p>
          </table:table-cell>
        </table:table-row>
        <table:table-row table:style-name="ro20">
          <table:table-cell table:style-name="ce2" office:value-type="string" calcext:value-type="string">
            <text:p>FLOWER Penstemon (Penstemon strictus)</text:p>
          </table:table-cell>
          <table:table-cell table:style-name="ce12" office:value-type="string" calcext:value-type="string">
            <text:p>Edible</text:p>
          </table:table-cell>
        </table:table-row>
        <table:table-row table:style-name="ro19">
          <table:table-cell table:style-name="ce2" office:value-type="string" calcext:value-type="string">
            <text:p>FLOWER Firewheel (Gaillardia pulchella)</text:p>
          </table:table-cell>
          <table:table-cell table:style-name="ce12" office:value-type="string" calcext:value-type="string">
            <text:p>Edible</text:p>
          </table:table-cell>
        </table:table-row>
        <table:table-row table:style-name="ro20">
          <table:table-cell table:style-name="ce3" office:value-type="string" calcext:value-type="string">
            <text:p>FLOWER Globe Mallow (Sphaeralcea ambigua)</text:p>
          </table:table-cell>
          <table:table-cell table:style-name="ce12" office:value-type="string" calcext:value-type="string">
            <text:p>Edible</text:p>
          </table:table-cell>
        </table:table-row>
        <table:table-row table:style-name="ro19">
          <table:table-cell table:style-name="ce2" office:value-type="string" calcext:value-type="string">
            <text:p>MUSTARD (Brassica juncea)</text:p>
          </table:table-cell>
          <table:table-cell table:style-name="ce12" office:value-type="string" calcext:value-type="string">
            <text:p>Edible</text:p>
          </table:table-cell>
        </table:table-row>
        <table:table-row table:style-name="ro19">
          <table:table-cell table:style-name="ce3" office:value-type="string" calcext:value-type="string">
            <text:p>TREE (Vitex agnus-castus)</text:p>
          </table:table-cell>
          <table:table-cell table:style-name="ce12" office:value-type="string" calcext:value-type="string">
            <text:p>Edible</text:p>
          </table:table-cell>
        </table:table-row>
        <table:table-row table:style-name="ro19">
          <table:table-cell table:style-name="ce3" office:value-type="string" calcext:value-type="string">
            <text:p>FLOWER Salvia (Lamiaceae or Labiatae)</text:p>
          </table:table-cell>
          <table:table-cell table:style-name="ce12" office:value-type="string" calcext:value-type="string">
            <text:p>Edible</text:p>
          </table:table-cell>
        </table:table-row>
        <table:table-row table:style-name="ro19">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20">
          <table:table-cell table:style-name="ce2" office:value-type="string" calcext:value-type="string">
            <text:p>FLOWER Desert Lupine (Lupinus sparsiflorus)</text:p>
          </table:table-cell>
          <table:table-cell table:style-name="ce12" office:value-type="string" calcext:value-type="string">
            <text:p>Edible</text:p>
          </table:table-cell>
        </table:table-row>
        <table:table-row table:style-name="ro19">
          <table:table-cell table:style-name="ce2" office:value-type="string" calcext:value-type="string">
            <text:p>FLOWER Desert Senna (Cassia covessi)</text:p>
          </table:table-cell>
          <table:table-cell table:style-name="ce12" office:value-type="string" calcext:value-type="string">
            <text:p>Edible</text:p>
          </table:table-cell>
        </table:table-row>
        <table:table-row table:style-name="ro20">
          <table:table-cell table:style-name="ce2" office:value-type="string" calcext:value-type="string">
            <text:p>FLOWER Penstemon (Penstemon palmeri)</text:p>
          </table:table-cell>
          <table:table-cell table:style-name="ce12" office:value-type="string" calcext:value-type="string">
            <text:p>Edible</text:p>
          </table:table-cell>
        </table:table-row>
        <table:table-row table:style-name="ro19">
          <table:table-cell table:style-name="ce3" office:value-type="string" calcext:value-type="string">
            <text:p>FLOWER Penstemon (Penstemon parryi)</text:p>
          </table:table-cell>
          <table:table-cell table:style-name="ce12" office:value-type="string" calcext:value-type="string">
            <text:p>Edible</text:p>
          </table:table-cell>
        </table:table-row>
        <table:table-row table:style-name="ro19">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9">
          <table:table-cell table:style-name="ce2" office:value-type="string" calcext:value-type="string">
            <text:p>PUMPKIN (Cucurbita pepo)</text:p>
          </table:table-cell>
          <table:table-cell table:style-name="ce12" office:value-type="string" calcext:value-type="string">
            <text:p>Edible</text:p>
          </table:table-cell>
        </table:table-row>
        <table:table-row table:style-name="ro19">
          <table:table-cell table:style-name="ce2" office:value-type="string" calcext:value-type="string">
            <text:p>WATERCRESS (Nasturtium officinale)</text:p>
          </table:table-cell>
          <table:table-cell table:style-name="ce12" office:value-type="string" calcext:value-type="string">
            <text:p>Edible</text:p>
          </table:table-cell>
        </table:table-row>
        <table:table-row table:style-name="ro20">
          <table:table-cell table:style-name="ce3" office:value-type="string" calcext:value-type="string">
            <text:p>FLOWER <text:s/>ALYSSUM (Lobularia maritima)</text:p>
          </table:table-cell>
          <table:table-cell table:style-name="ce3"/>
        </table:table-row>
        <table:table-row table:style-name="ro20">
          <table:table-cell table:style-name="ce2" office:value-type="string" calcext:value-type="string">
            <text:p>FLOWER Bachelor’s Button (Centaurea cyanus)</text:p>
          </table:table-cell>
          <table:table-cell table:style-name="ce2"/>
        </table:table-row>
        <table:table-row table:style-name="ro20">
          <table:table-cell table:style-name="ce2" office:value-type="string" calcext:value-type="string">
            <text:p>FLOWER Bachelor’s Button (Centaurea cyanus)</text:p>
          </table:table-cell>
          <table:table-cell table:style-name="ce3"/>
        </table:table-row>
        <table:table-row table:style-name="ro19">
          <table:table-cell table:style-name="ce2" office:value-type="string" calcext:value-type="string">
            <text:p>Cover Crop</text:p>
          </table:table-cell>
          <table:table-cell table:style-name="ce2"/>
        </table:table-row>
        <table:table-row table:style-name="ro20">
          <table:table-cell table:style-name="ce2" office:value-type="string" calcext:value-type="string">
            <text:p>Cover Crop Soil Builder (Pisum sativum and Avina Sativa)</text:p>
          </table:table-cell>
          <table:table-cell table:style-name="ce2"/>
        </table:table-row>
        <table:table-row table:style-name="ro19">
          <table:table-cell table:style-name="ce2" office:value-type="string" calcext:value-type="string">
            <text:p>FLOWER (Sonoran Desert Revegetation)</text:p>
          </table:table-cell>
          <table:table-cell table:style-name="ce2"/>
        </table:table-row>
        <table:table-row table:style-name="ro20">
          <table:table-cell table:style-name="ce3" office:value-type="string" calcext:value-type="string">
            <text:p>FLOWER Snapdragon (Antirrhinum majus)</text:p>
          </table:table-cell>
          <table:table-cell table:style-name="ce3"/>
        </table:table-row>
        <table:table-row table:style-name="ro19">
          <table:table-cell table:style-name="ce2" office:value-type="string" calcext:value-type="string">
            <text:p>FLOWER Sweet Pea (Lathyrus odoratus)</text:p>
          </table:table-cell>
          <table:table-cell table:style-name="ce2"/>
        </table:table-row>
        <table:table-row table:style-name="ro20">
          <table:table-cell table:style-name="ce2" office:value-type="string" calcext:value-type="string">
            <text:p>FLOWER African Daisy (Dimorphotheca sinuata)</text:p>
          </table:table-cell>
          <table:table-cell table:style-name="ce2"/>
        </table:table-row>
        <table:table-row table:style-name="ro19">
          <table:table-cell table:style-name="ce3" office:value-type="string" calcext:value-type="string">
            <text:p>FLOWER Sweet Pea (Lathyrus odoratus)</text:p>
          </table:table-cell>
          <table:table-cell table:style-name="ce3"/>
        </table:table-row>
        <table:table-row table:style-name="ro19">
          <table:table-cell table:style-name="ce2" office:value-type="string" calcext:value-type="string">
            <text:p>FLOWER Sweet Pea (Lathyrus odoratus)</text:p>
          </table:table-cell>
          <table:table-cell table:style-name="ce2"/>
        </table:table-row>
        <table:table-row table:style-name="ro20">
          <table:table-cell table:style-name="ce3" office:value-type="string" calcext:value-type="string">
            <text:p>COVER CROP Flower Crimson Clover (Trifolium incarnatum)</text:p>
          </table:table-cell>
          <table:table-cell table:style-name="ce3"/>
        </table:table-row>
        <table:table-row table:style-name="ro19">
          <table:table-cell table:style-name="ce3" office:value-type="string" calcext:value-type="string">
            <text:p>FLOWER Sweet Pea (Lathyrus odoratus)</text:p>
          </table:table-cell>
          <table:table-cell table:style-name="ce3"/>
        </table:table-row>
        <table:table-row table:style-name="ro20">
          <table:table-cell table:style-name="ce2" office:value-type="string" calcext:value-type="string">
            <text:p>FLOWER Snapdragon (Antirrhinum majus)</text:p>
          </table:table-cell>
          <table:table-cell table:style-name="ce2"/>
        </table:table-row>
        <table:table-row table:style-name="ro19">
          <table:table-cell table:style-name="ce2" office:value-type="string" calcext:value-type="string">
            <text:p>FLOWER Sweet Pea (Lathyrus odoratus)</text:p>
          </table:table-cell>
          <table:table-cell table:style-name="ce2"/>
        </table:table-row>
        <table:table-row table:style-name="ro20">
          <table:table-cell table:style-name="ce3" office:value-type="string" calcext:value-type="string">
            <text:p>FLOWER Snapdragon (Antirrhinum majus)</text:p>
          </table:table-cell>
          <table:table-cell table:style-name="ce3"/>
        </table:table-row>
        <table:table-row table:style-name="ro19">
          <table:table-cell table:style-name="ce3" office:value-type="string" calcext:value-type="string">
            <text:p>FLOWER Sweet Pea (Lathyrus odoratus)</text:p>
          </table:table-cell>
          <table:table-cell table:style-name="ce3"/>
        </table:table-row>
        <table:table-row table:style-name="ro20">
          <table:table-cell table:style-name="ce2" office:value-type="string" calcext:value-type="string">
            <text:p>FLOWER <text:s/>ALYSSUM (Lobularia maritima)</text:p>
          </table:table-cell>
          <table:table-cell table:style-name="ce2"/>
        </table:table-row>
        <table:table-row table:style-name="ro20">
          <table:table-cell table:style-name="ce3" office:value-type="string" calcext:value-type="string">
            <text:p>FLOWER <text:s/>ALYSSUM (Lobularia maritima)</text:p>
          </table:table-cell>
          <table:table-cell table:style-name="ce3"/>
        </table:table-row>
        <table:table-row table:style-name="ro20">
          <table:table-cell table:style-name="ce3" office:value-type="string" calcext:value-type="string">
            <text:p>FLOWER Pansy (Viola tricolor var. hortensis)</text:p>
          </table:table-cell>
          <table:table-cell table:style-name="ce3"/>
        </table:table-row>
        <table:table-row table:style-name="ro20">
          <table:table-cell table:style-name="ce2" office:value-type="string" calcext:value-type="string">
            <text:p>FLOWER Pansy (Viola tricolor var. hortensis)</text:p>
          </table:table-cell>
          <table:table-cell table:style-name="ce2"/>
        </table:table-row>
        <table:table-row table:style-name="ro20">
          <table:table-cell table:style-name="ce2" office:value-type="string" calcext:value-type="string">
            <text:p>FLOWER <text:s/>ALYSSUM (Lobularia maritima)</text:p>
          </table:table-cell>
          <table:table-cell table:style-name="ce2"/>
        </table:table-row>
        <table:table-row table:style-name="ro19">
          <table:table-cell table:style-name="ce2" office:value-type="string" calcext:value-type="string">
            <text:p>FLOWER Stock (Matthiola incana)</text:p>
          </table:table-cell>
          <table:table-cell table:style-name="ce2"/>
        </table:table-row>
        <table:table-row table:style-name="ro19">
          <table:table-cell table:style-name="ce3" office:value-type="string" calcext:value-type="string">
            <text:p>FLOWER Statice (Limonium sinuatum)</text:p>
          </table:table-cell>
          <table:table-cell table:style-name="ce3"/>
        </table:table-row>
        <table:table-row table:style-name="ro19">
          <table:table-cell table:style-name="ce2" office:value-type="string" calcext:value-type="string">
            <text:p>CACTUS (Opuntia microdasys)</text:p>
          </table:table-cell>
          <table:table-cell table:style-name="ce2"/>
        </table:table-row>
        <table:table-row table:style-name="ro20">
          <table:table-cell table:style-name="ce2" office:value-type="string" calcext:value-type="string">
            <text:p>FLOWER (Cyelosia argentea var. Plumosa)</text:p>
          </table:table-cell>
          <table:table-cell table:style-name="ce2"/>
        </table:table-row>
        <table:table-row table:style-name="ro19">
          <table:table-cell table:style-name="ce3" office:value-type="string" calcext:value-type="string">
            <text:p>FLOWER A Seed Library Variety</text:p>
          </table:table-cell>
          <table:table-cell table:style-name="ce3"/>
        </table:table-row>
        <table:table-row table:style-name="ro19">
          <table:table-cell table:style-name="ce2" office:value-type="string" calcext:value-type="string">
            <text:p>Flower (Lantana camara)</text:p>
          </table:table-cell>
          <table:table-cell table:style-name="ce2"/>
        </table:table-row>
        <table:table-row table:style-name="ro19">
          <table:table-cell table:style-name="ce2" office:value-type="string" calcext:value-type="string">
            <text:p>Flower (Lantana camara)</text:p>
          </table:table-cell>
          <table:table-cell table:style-name="ce2"/>
        </table:table-row>
        <table:table-row table:style-name="ro19">
          <table:table-cell table:style-name="ce3" office:value-type="string" calcext:value-type="string">
            <text:p>FLOWER <text:s/>Poppy (Papaver orientale)</text:p>
          </table:table-cell>
          <table:table-cell table:style-name="ce3"/>
        </table:table-row>
        <table:table-row table:style-name="ro20">
          <table:table-cell table:style-name="ce2" office:value-type="string" calcext:value-type="string">
            <text:p>FLOWER Shasta Daisy (Leucanthemum superbum)</text:p>
          </table:table-cell>
          <table:table-cell table:style-name="ce2"/>
        </table:table-row>
        <table:table-row table:style-name="ro19">
          <table:table-cell table:style-name="ce3" office:value-type="string" calcext:value-type="string">
            <text:p>FLOWER Marigold (Tagetes erecta)</text:p>
          </table:table-cell>
          <table:table-cell table:style-name="ce3"/>
        </table:table-row>
        <table:table-row table:style-name="ro19">
          <table:table-cell table:style-name="ce3" office:value-type="string" calcext:value-type="string">
            <text:p>FLOWER Marigold (Tagetes erecta)</text:p>
          </table:table-cell>
          <table:table-cell table:style-name="ce2"/>
        </table:table-row>
        <table:table-row table:style-name="ro19">
          <table:table-cell table:style-name="ce2" office:value-type="string" calcext:value-type="string">
            <text:p>FLOWER Sunflower (Tithonia)</text:p>
          </table:table-cell>
          <table:table-cell table:style-name="ce2"/>
        </table:table-row>
        <table:table-row table:style-name="ro20">
          <table:table-cell table:style-name="ce3" office:value-type="string" calcext:value-type="string">
            <text:p>FLOWER Sunflower (Helianthus uniflorus Giganteus)</text:p>
          </table:table-cell>
          <table:table-cell table:style-name="ce3"/>
        </table:table-row>
        <table:table-row table:style-name="ro19">
          <table:table-cell table:style-name="ce3" office:value-type="string" calcext:value-type="string">
            <text:p>FLOWER Marigold (Tagetes erecta)</text:p>
          </table:table-cell>
          <table:table-cell table:style-name="ce2"/>
        </table:table-row>
        <table:table-row table:style-name="ro19">
          <table:table-cell table:style-name="ce2" office:value-type="string" calcext:value-type="string">
            <text:p>FLOWER Snapdragon (Antirrhinum)</text:p>
          </table:table-cell>
          <table:table-cell table:style-name="ce2"/>
        </table:table-row>
        <table:table-row table:style-name="ro19">
          <table:table-cell table:style-name="ce3" office:value-type="string" calcext:value-type="string">
            <text:p>FLOWER <text:s/>Poppy Corn (Papaver rhoeas)</text:p>
          </table:table-cell>
          <table:table-cell table:style-name="ce3"/>
        </table:table-row>
        <table:table-row table:style-name="ro19">
          <table:table-cell table:style-name="ce2" office:value-type="string" calcext:value-type="string">
            <text:p>FLOWER <text:s/>Poppy Corn (Papaver rhoeas)</text:p>
          </table:table-cell>
          <table:table-cell table:style-name="ce2"/>
        </table:table-row>
        <table:table-row table:style-name="ro19">
          <table:table-cell table:style-name="ce3" office:value-type="string" calcext:value-type="string">
            <text:p>FLOWER Sweet Pea (Lathyrus odoratus)</text:p>
          </table:table-cell>
          <table:table-cell table:style-name="ce3"/>
        </table:table-row>
        <table:table-row table:style-name="ro20">
          <table:table-cell table:style-name="ce3" office:value-type="string" calcext:value-type="string">
            <text:p>FLOWER Scabiosa Pincushion (Sixalix atropurpurea)</text:p>
          </table:table-cell>
          <table:table-cell table:style-name="ce3"/>
        </table:table-row>
        <table:table-row table:style-name="ro20">
          <table:table-cell table:style-name="ce2" office:value-type="string" calcext:value-type="string">
            <text:p>FLOWER Poppy Breadseed (Papaver Somniferum)</text:p>
          </table:table-cell>
          <table:table-cell table:style-name="ce2"/>
        </table:table-row>
        <table:table-row table:style-name="ro19">
          <table:table-cell table:style-name="ce3" office:value-type="string" calcext:value-type="string">
            <text:p>FLOWER <text:s/>(Rudbeckia hirta)</text:p>
          </table:table-cell>
          <table:table-cell table:style-name="ce3"/>
        </table:table-row>
        <table:table-row table:style-name="ro19">
          <table:table-cell table:style-name="ce3" office:value-type="string" calcext:value-type="string">
            <text:p>FLOWER Salvia (Salvia farinacea)</text:p>
          </table:table-cell>
          <table:table-cell table:style-name="ce3"/>
        </table:table-row>
        <table:table-row table:style-name="ro19">
          <table:table-cell table:style-name="ce2" office:value-type="string" calcext:value-type="string">
            <text:p>FLOWER (Phacelia companularia)</text:p>
          </table:table-cell>
          <table:table-cell table:style-name="ce2"/>
        </table:table-row>
        <table:table-row table:style-name="ro19">
          <table:table-cell table:style-name="ce2" office:value-type="string" calcext:value-type="string">
            <text:p>FLOWER Verbena (Verbena bonariensis)</text:p>
          </table:table-cell>
          <table:table-cell table:style-name="ce2"/>
        </table:table-row>
        <table:table-row table:style-name="ro19">
          <table:table-cell table:style-name="ce2" office:value-type="string" calcext:value-type="string">
            <text:p>FLOWER Cosmos (Cosmos sulphureus)</text:p>
          </table:table-cell>
          <table:table-cell table:style-name="ce2"/>
        </table:table-row>
        <table:table-row table:style-name="ro20">
          <table:table-cell table:style-name="ce3" office:value-type="string" calcext:value-type="string">
            <text:p>FLOWER <text:s/>Poppy Oriental (Papaver orientale)</text:p>
          </table:table-cell>
          <table:table-cell table:style-name="ce3"/>
        </table:table-row>
        <table:table-row table:style-name="ro19">
          <table:table-cell table:style-name="ce3" office:value-type="string" calcext:value-type="string">
            <text:p>FLOWER, Mixed Seed</text:p>
          </table:table-cell>
          <table:table-cell table:style-name="ce3"/>
        </table:table-row>
        <table:table-row table:style-name="ro19">
          <table:table-cell table:style-name="ce3" office:value-type="string" calcext:value-type="string">
            <text:p>FLOWER Flower Mix (Assorted species)</text:p>
          </table:table-cell>
          <table:table-cell table:style-name="ce3"/>
        </table:table-row>
        <table:table-row table:style-name="ro20">
          <table:table-cell table:style-name="ce2" office:value-type="string" calcext:value-type="string">
            <text:p>FLOWER Delphinium (Delphinium grandiflorum)</text:p>
          </table:table-cell>
          <table:table-cell table:style-name="ce2"/>
        </table:table-row>
        <table:table-row table:style-name="ro19">
          <table:table-cell table:style-name="ce3" office:value-type="string" calcext:value-type="string">
            <text:p>FLOWER Milkweed (Asclepias tuberosa)</text:p>
          </table:table-cell>
          <table:table-cell table:style-name="ce3"/>
        </table:table-row>
        <table:table-row table:style-name="ro19">
          <table:table-cell table:style-name="ce3" office:value-type="string" calcext:value-type="string">
            <text:p>FLOWER, Mixed Seed</text:p>
          </table:table-cell>
          <table:table-cell table:style-name="ce3"/>
        </table:table-row>
        <table:table-row table:style-name="ro19">
          <table:table-cell table:style-name="ce2" office:value-type="string" calcext:value-type="string">
            <text:p>FLOWER Flower Mix (Assorted species)</text:p>
          </table:table-cell>
          <table:table-cell table:style-name="ce2"/>
        </table:table-row>
        <table:table-row table:style-name="ro19">
          <table:table-cell table:style-name="ce3" office:value-type="string" calcext:value-type="string">
            <text:p>FLOWER Cosmos (Cosmos bipinnatus)</text:p>
          </table:table-cell>
          <table:table-cell table:style-name="ce3"/>
        </table:table-row>
        <table:table-row table:style-name="ro19">
          <table:table-cell table:style-name="ce2" office:value-type="string" calcext:value-type="string">
            <text:p>FLOWER Lobelia Trailing (Lobelia erinus)</text:p>
          </table:table-cell>
          <table:table-cell table:style-name="ce2"/>
        </table:table-row>
        <table:table-row table:style-name="ro19">
          <table:table-cell table:style-name="ce3" office:value-type="string" calcext:value-type="string">
            <text:p>FLOWER Aster (Callistephus chinensis)</text:p>
          </table:table-cell>
          <table:table-cell table:style-name="ce3"/>
        </table:table-row>
        <table:table-row table:style-name="ro20">
          <table:table-cell table:style-name="ce3" office:value-type="string" calcext:value-type="string">
            <text:p>FLOWER Chocolate Flower (Berlandiera lyrata)</text:p>
          </table:table-cell>
          <table:table-cell table:style-name="ce3"/>
        </table:table-row>
        <table:table-row table:style-name="ro19">
          <table:table-cell table:style-name="ce2" office:value-type="string" calcext:value-type="string">
            <text:p>FLOWER Yarrow (Achillea millefolium)</text:p>
          </table:table-cell>
          <table:table-cell table:style-name="ce2"/>
        </table:table-row>
        <table:table-row table:style-name="ro19">
          <table:table-cell table:style-name="ce2" office:value-type="string" calcext:value-type="string">
            <text:p>FLOWER Milkweed (Asclepias tuberosa)</text:p>
          </table:table-cell>
          <table:table-cell table:style-name="ce2"/>
        </table:table-row>
        <table:table-row table:style-name="ro19">
          <table:table-cell table:style-name="ce3" office:value-type="string" calcext:value-type="string">
            <text:p>FLOWER Lobelia (Lobelia erinus)</text:p>
          </table:table-cell>
          <table:table-cell table:style-name="ce3"/>
        </table:table-row>
        <table:table-row table:style-name="ro19">
          <table:table-cell table:style-name="ce3" office:value-type="string" calcext:value-type="string">
            <text:p>FLOWER Zinnia (Zinnia elegans)</text:p>
          </table:table-cell>
          <table:table-cell table:style-name="ce3"/>
        </table:table-row>
        <table:table-row table:style-name="ro19">
          <table:table-cell table:style-name="ce3" office:value-type="string" calcext:value-type="string">
            <text:p>FLOWER Dahlia</text:p>
          </table:table-cell>
          <table:table-cell table:style-name="ce3"/>
        </table:table-row>
        <table:table-row table:style-name="ro19">
          <table:table-cell table:style-name="ce2" office:value-type="string" calcext:value-type="string">
            <text:p>FLOWER Cosmos (Cosmos sulphureus)</text:p>
          </table:table-cell>
          <table:table-cell table:style-name="ce2"/>
        </table:table-row>
        <table:table-row table:style-name="ro20">
          <table:table-cell table:style-name="ce2" office:value-type="string" calcext:value-type="string">
            <text:p>FLOWER Sweet William (Dianthus barbatus)</text:p>
          </table:table-cell>
          <table:table-cell table:style-name="ce2"/>
        </table:table-row>
        <table:table-row table:style-name="ro19">
          <table:table-cell table:style-name="ce3" office:value-type="string" calcext:value-type="string">
            <text:p>FLOWER Cosmos (Cosmos bipinnatus)</text:p>
          </table:table-cell>
          <table:table-cell table:style-name="ce3"/>
        </table:table-row>
        <table:table-row table:style-name="ro20">
          <table:table-cell table:style-name="ce3" office:value-type="string" calcext:value-type="string">
            <text:p>FLOWER Coreopsis (Coreopsis lanceolata)</text:p>
          </table:table-cell>
          <table:table-cell table:style-name="ce3"/>
        </table:table-row>
        <table:table-row table:style-name="ro19">
          <table:table-cell table:style-name="ce3" office:value-type="string" calcext:value-type="string">
            <text:p>FLOWER (Assorted species)</text:p>
          </table:table-cell>
          <table:table-cell table:style-name="ce3"/>
        </table:table-row>
        <table:table-row table:style-name="ro19">
          <table:table-cell table:style-name="ce3" office:value-type="string" calcext:value-type="string">
            <text:p>FLOWER Cleome (Cleome houtteana)</text:p>
          </table:table-cell>
          <table:table-cell table:style-name="ce3"/>
        </table:table-row>
        <table:table-row table:style-name="ro19">
          <table:table-cell table:style-name="ce2" office:value-type="string" calcext:value-type="string">
            <text:p>FLOWER</text:p>
          </table:table-cell>
          <table:table-cell table:style-name="ce2"/>
        </table:table-row>
        <table:table-row table:style-name="ro19">
          <table:table-cell table:style-name="ce3" office:value-type="string" calcext:value-type="string">
            <text:p>FLOWER Marigold (Tagetes patula)</text:p>
          </table:table-cell>
          <table:table-cell table:style-name="ce3"/>
        </table:table-row>
        <table:table-row table:style-name="ro19">
          <table:table-cell table:style-name="ce3" office:value-type="string" calcext:value-type="string">
            <text:p>FLOWER Marigold (Tagetes erecta)</text:p>
          </table:table-cell>
          <table:table-cell table:style-name="ce2"/>
        </table:table-row>
        <table:table-row table:style-name="ro19">
          <table:table-cell table:style-name="ce3" office:value-type="string" calcext:value-type="string">
            <text:p>FLOWER Marigold (Tagetes patula)</text:p>
          </table:table-cell>
          <table:table-cell table:style-name="ce3"/>
        </table:table-row>
        <table:table-row table:style-name="ro19">
          <table:table-cell table:style-name="ce2" office:value-type="string" calcext:value-type="string">
            <text:p>FLOWER Marigold (Tagetes patula)</text:p>
          </table:table-cell>
          <table:table-cell table:style-name="ce2"/>
        </table:table-row>
        <table:table-row table:style-name="ro19">
          <table:table-cell table:style-name="ce2" office:value-type="string" calcext:value-type="string">
            <text:p>FLOWER Larkspur (Consolida regalis)</text:p>
          </table:table-cell>
          <table:table-cell table:style-name="ce2"/>
        </table:table-row>
        <table:table-row table:style-name="ro19">
          <table:table-cell table:style-name="ce2" office:value-type="string" calcext:value-type="string">
            <text:p>FLOWER Foxglove (Digitalis purpurea)</text:p>
          </table:table-cell>
          <table:table-cell table:style-name="ce2"/>
        </table:table-row>
        <table:table-row table:style-name="ro20">
          <table:table-cell table:style-name="ce3" office:value-type="string" calcext:value-type="string">
            <text:p>FLOWER Poppy Breadseed (Papaver somniferum)</text:p>
          </table:table-cell>
          <table:table-cell table:style-name="ce3"/>
        </table:table-row>
        <table:table-row table:style-name="ro20">
          <table:table-cell table:style-name="ce2" office:value-type="string" calcext:value-type="string">
            <text:p>FLOWER Livingstone Daisy (Cleretum bellidiforme)</text:p>
          </table:table-cell>
          <table:table-cell table:style-name="ce2"/>
        </table:table-row>
        <table:table-row table:style-name="ro19">
          <table:table-cell table:style-name="ce3" office:value-type="string" calcext:value-type="string">
            <text:p>FLOWER Larkspur (Consolida regalis)</text:p>
          </table:table-cell>
          <table:table-cell table:style-name="ce3"/>
        </table:table-row>
        <table:table-row table:style-name="ro19">
          <table:table-cell table:style-name="ce3" office:value-type="string" calcext:value-type="string">
            <text:p>FLOWER Nicotiana (Nicotiana sylvestris)</text:p>
          </table:table-cell>
          <table:table-cell table:style-name="ce3"/>
        </table:table-row>
        <table:table-row table:style-name="ro19">
          <table:table-cell table:style-name="ce3" office:value-type="string" calcext:value-type="string">
            <text:p>FLOWER Marigold (Tagetes erecta)</text:p>
          </table:table-cell>
          <table:table-cell table:style-name="ce3"/>
        </table:table-row>
        <table:table-row table:style-name="ro19">
          <table:table-cell table:style-name="ce3" office:value-type="string" calcext:value-type="string">
            <text:p>FLOWER Hyssop (Agastache foeniculum)</text:p>
          </table:table-cell>
          <table:table-cell table:style-name="ce3"/>
        </table:table-row>
        <table:table-row table:style-name="ro19">
          <table:table-cell table:style-name="ce3" office:value-type="string" calcext:value-type="string">
            <text:p>FLOWER ZINNIA (Zinnia elegans)</text:p>
          </table:table-cell>
          <table:table-cell table:style-name="ce3"/>
        </table:table-row>
        <table:table-row table:style-name="ro19">
          <table:table-cell table:style-name="ce2" office:value-type="string" calcext:value-type="string">
            <text:p>FLOWER Flower Mix (Assorted species)</text:p>
          </table:table-cell>
          <table:table-cell table:style-name="ce2"/>
        </table:table-row>
        <table:table-row table:style-name="ro20">
          <table:table-cell table:style-name="ce3" office:value-type="string" calcext:value-type="string">
            <text:p>FLOWER Heliotrope (Heliotropium arborescens)</text:p>
          </table:table-cell>
          <table:table-cell table:style-name="ce3"/>
        </table:table-row>
        <table:table-row table:style-name="ro19">
          <table:table-cell table:style-name="ce3" office:value-type="string" calcext:value-type="string">
            <text:p>FLOWER Columbine (Aquilegia cultorum)</text:p>
          </table:table-cell>
          <table:table-cell table:style-name="ce3"/>
        </table:table-row>
        <table:table-row table:style-name="ro20">
          <table:table-cell table:style-name="ce3" office:value-type="string" calcext:value-type="string">
            <text:p>FLOWER Impatiens (Impatiens walleriana hybrid)</text:p>
          </table:table-cell>
          <table:table-cell table:style-name="ce3"/>
        </table:table-row>
        <table:table-row table:style-name="ro20">
          <table:table-cell table:style-name="ce3" office:value-type="string" calcext:value-type="string">
            <text:p>FLOWER <text:s/>Poppy California (Eschscholzia californica)</text:p>
          </table:table-cell>
          <table:table-cell table:style-name="ce3"/>
        </table:table-row>
        <table:table-row table:style-name="ro20">
          <table:table-cell table:style-name="ce3" office:value-type="string" calcext:value-type="string">
            <text:p>FLOWER Love-In-A-Mist (Nigella damascena)</text:p>
          </table:table-cell>
          <table:table-cell table:style-name="ce3"/>
        </table:table-row>
        <table:table-row table:style-name="ro20">
          <table:table-cell table:style-name="ce2" office:value-type="string" calcext:value-type="string">
            <text:p>FLOWER <text:s/>Poppy California (Eschscholzia californica)</text:p>
          </table:table-cell>
          <table:table-cell table:style-name="ce2"/>
        </table:table-row>
        <table:table-row table:style-name="ro19">
          <table:table-cell table:style-name="ce2" office:value-type="string" calcext:value-type="string">
            <text:p>FLOWER Portulaca (Portulaca grandflora)</text:p>
          </table:table-cell>
          <table:table-cell table:style-name="ce2"/>
        </table:table-row>
        <table:table-row table:style-name="ro19">
          <table:table-cell table:style-name="ce3" office:value-type="string" calcext:value-type="string">
            <text:p>FLOWER <text:s/>Poppy Corn (Papaver rhoeas)</text:p>
          </table:table-cell>
          <table:table-cell table:style-name="ce3"/>
        </table:table-row>
        <table:table-row table:style-name="ro19">
          <table:table-cell table:style-name="ce3" office:value-type="string" calcext:value-type="string">
            <text:p>FLOWER Lavender (Consolida regalis)</text:p>
          </table:table-cell>
          <table:table-cell table:style-name="ce3"/>
        </table:table-row>
        <table:table-row table:style-name="ro20">
          <table:table-cell table:style-name="ce3" office:value-type="string" calcext:value-type="string">
            <text:p>FLOWER Milkweed (Asclepias fascicularis)</text:p>
          </table:table-cell>
          <table:table-cell table:style-name="ce3"/>
        </table:table-row>
        <table:table-row table:style-name="ro19">
          <table:table-cell table:style-name="ce2" office:value-type="string" calcext:value-type="string">
            <text:p>FLOWER Zinnia (Zinnia elegans)</text:p>
          </table:table-cell>
          <table:table-cell table:style-name="ce2"/>
        </table:table-row>
        <table:table-row table:style-name="ro20">
          <table:table-cell table:style-name="ce2" office:value-type="string" calcext:value-type="string">
            <text:p>FLOWER <text:s/>Poppy Iceland (Papaver nudicaule)</text:p>
          </table:table-cell>
          <table:table-cell table:style-name="ce2"/>
        </table:table-row>
        <table:table-row table:style-name="ro20">
          <table:table-cell table:style-name="ce3" office:value-type="string" calcext:value-type="string">
            <text:p>FLOWER Delphinium (Delphinium elatum)</text:p>
          </table:table-cell>
          <table:table-cell table:style-name="ce3"/>
        </table:table-row>
        <table:table-row table:style-name="ro20">
          <table:table-cell table:style-name="ce2" office:value-type="string" calcext:value-type="string">
            <text:p>FLOWER Peony Double (Papaver somniferum)</text:p>
          </table:table-cell>
          <table:table-cell table:style-name="ce2"/>
        </table:table-row>
        <table:table-row table:style-name="ro19">
          <table:table-cell table:style-name="ce3" office:value-type="string" calcext:value-type="string">
            <text:p>FLOWER Zinnia (Zinnia elegans)</text:p>
          </table:table-cell>
          <table:table-cell table:style-name="ce3"/>
        </table:table-row>
        <table:table-row table:style-name="ro19">
          <table:table-cell table:style-name="ce2" office:value-type="string" calcext:value-type="string">
            <text:p>FLOWER Zinnia (Zinnia haageana)</text:p>
          </table:table-cell>
          <table:table-cell table:style-name="ce2"/>
        </table:table-row>
        <table:table-row table:style-name="ro19">
          <table:table-cell table:style-name="ce2" office:value-type="string" calcext:value-type="string">
            <text:p>FLOWER Lupine (Lupinus nanus)</text:p>
          </table:table-cell>
          <table:table-cell table:style-name="ce2"/>
        </table:table-row>
        <table:table-row table:style-name="ro19">
          <table:table-cell table:style-name="ce3" office:value-type="string" calcext:value-type="string">
            <text:p>FLOWER (Assorted species)</text:p>
          </table:table-cell>
          <table:table-cell table:style-name="ce3"/>
        </table:table-row>
        <table:table-row table:style-name="ro20">
          <table:table-cell table:style-name="ce3" office:value-type="string" calcext:value-type="string">
            <text:p>FLOWER Echinacea (Echinacea purpurea)</text:p>
          </table:table-cell>
          <table:table-cell table:style-name="ce3"/>
        </table:table-row>
        <table:table-row table:style-name="ro19">
          <table:table-cell table:style-name="ce2" office:value-type="string" calcext:value-type="string">
            <text:p>Gomphrena (Gomphrena haageana)</text:p>
          </table:table-cell>
          <table:table-cell table:style-name="ce2"/>
        </table:table-row>
        <table:table-row table:style-name="ro19">
          <table:table-cell table:style-name="ce2" office:value-type="string" calcext:value-type="string">
            <text:p>FLOWER Columbine (Aquilegia coerulea)</text:p>
          </table:table-cell>
          <table:table-cell table:style-name="ce2"/>
        </table:table-row>
        <table:table-row table:style-name="ro20">
          <table:table-cell table:style-name="ce2" office:value-type="string" calcext:value-type="string">
            <text:p>FLOWER Sunflower (Helianthus annus—hybrid)</text:p>
          </table:table-cell>
          <table:table-cell table:style-name="ce2"/>
        </table:table-row>
        <table:table-row table:style-name="ro19">
          <table:table-cell table:style-name="ce2" office:value-type="string" calcext:value-type="string">
            <text:p>FLOWER Cosmos (Cosmos bipinnatus)</text:p>
          </table:table-cell>
          <table:table-cell table:style-name="ce2"/>
        </table:table-row>
        <table:table-row table:style-name="ro19">
          <table:table-cell table:style-name="ce2" office:value-type="string" calcext:value-type="string">
            <text:p>FLOWER (Assorted species)</text:p>
          </table:table-cell>
          <table:table-cell table:style-name="ce2"/>
        </table:table-row>
        <table:table-row table:style-name="ro19">
          <table:table-cell table:style-name="ce3" office:value-type="string" calcext:value-type="string">
            <text:p>FLOWER <text:s/>Cosmos (Cosmos bipinnatus)</text:p>
          </table:table-cell>
          <table:table-cell table:style-name="ce3"/>
        </table:table-row>
        <table:table-row table:style-name="ro19">
          <table:table-cell table:style-name="ce2" office:value-type="string" calcext:value-type="string">
            <text:p>FLOWER Larkspur (Consolida regalis)</text:p>
          </table:table-cell>
          <table:table-cell table:style-name="ce2"/>
        </table:table-row>
        <table:table-row table:style-name="ro19">
          <table:table-cell table:style-name="ce2" office:value-type="string" calcext:value-type="string">
            <text:p>FLOWER Milkweed (Asclepias speciosa)</text:p>
          </table:table-cell>
          <table:table-cell table:style-name="ce2"/>
        </table:table-row>
        <table:table-row table:style-name="ro20">
          <table:table-cell table:style-name="ce2" office:value-type="string" calcext:value-type="string">
            <text:p>FLOWER <text:s/>Poppy California (Eschscholzia californica)</text:p>
          </table:table-cell>
          <table:table-cell table:style-name="ce2"/>
        </table:table-row>
        <table:table-row table:style-name="ro19">
          <table:table-cell table:style-name="ce2" office:value-type="string" calcext:value-type="string">
            <text:p>FLOWER Blue Bonnet (Lupinus perennis)</text:p>
          </table:table-cell>
          <table:table-cell table:style-name="ce2"/>
        </table:table-row>
        <table:table-row table:style-name="ro19">
          <table:table-cell table:style-name="ce3" office:value-type="string" calcext:value-type="string">
            <text:p>FLOWER Blue Bonnet (Lupinus texensis)</text:p>
          </table:table-cell>
          <table:table-cell table:style-name="ce3"/>
        </table:table-row>
        <table:table-row table:style-name="ro19">
          <table:table-cell table:style-name="ce2" office:value-type="string" calcext:value-type="string">
            <text:p>FLOWER ZINNIA (Zinnia elegans)</text:p>
          </table:table-cell>
          <table:table-cell table:style-name="ce2"/>
        </table:table-row>
        <table:table-row table:style-name="ro19">
          <table:table-cell table:style-name="ce2" office:value-type="string" calcext:value-type="string">
            <text:p>FLOWER Aster (Callistephus chinensis)</text:p>
          </table:table-cell>
          <table:table-cell table:style-name="ce2"/>
        </table:table-row>
        <table:table-row table:style-name="ro19">
          <table:table-cell table:style-name="ce2" office:value-type="string" calcext:value-type="string">
            <text:p>FLOWER Sunflower (Helianthus debilis)</text:p>
          </table:table-cell>
          <table:table-cell table:style-name="ce2"/>
        </table:table-row>
        <table:table-row table:style-name="ro20">
          <table:table-cell table:style-name="ce2" office:value-type="string" calcext:value-type="string">
            <text:p>FLOWER Echinacea (Echinacea purpurea)</text:p>
          </table:table-cell>
          <table:table-cell table:style-name="ce2"/>
        </table:table-row>
        <table:table-row table:style-name="ro19">
          <table:table-cell table:style-name="ce3" office:value-type="string" calcext:value-type="string">
            <text:p>FLOWER Cosmos (Cosmos bipinnatus)</text:p>
          </table:table-cell>
          <table:table-cell table:style-name="ce3"/>
        </table:table-row>
        <table:table-row table:style-name="ro19">
          <table:table-cell table:style-name="ce2" office:value-type="string" calcext:value-type="string">
            <text:p>FLOWER Lavender (Consolida regalis)</text:p>
          </table:table-cell>
          <table:table-cell table:style-name="ce2"/>
        </table:table-row>
        <table:table-row table:style-name="ro19">
          <table:table-cell table:style-name="ce2" office:value-type="string" calcext:value-type="string">
            <text:p>FLOWER Thunbergia (Rudbeckia hirta)</text:p>
          </table:table-cell>
          <table:table-cell table:style-name="ce2"/>
        </table:table-row>
        <table:table-row table:style-name="ro19">
          <table:table-cell table:style-name="ce2" office:value-type="string" calcext:value-type="string">
            <text:p>FLOWER Sunflower (Helianthus annuus)</text:p>
          </table:table-cell>
          <table:table-cell table:style-name="ce2"/>
        </table:table-row>
        <table:table-row table:style-name="ro19">
          <table:table-cell table:style-name="ce3" office:value-type="string" calcext:value-type="string">
            <text:p>FLOWER Marigold (Tagetes erecta)</text:p>
          </table:table-cell>
          <table:table-cell table:style-name="ce2"/>
        </table:table-row>
        <table:table-row table:style-name="ro19">
          <table:table-cell table:style-name="ce3" office:value-type="string" calcext:value-type="string">
            <text:p>FLOWER Zinnia (Zinnia elegans)</text:p>
          </table:table-cell>
          <table:table-cell table:style-name="ce3"/>
        </table:table-row>
        <table:table-row table:style-name="ro19">
          <table:table-cell table:style-name="ce3" office:value-type="string" calcext:value-type="string">
            <text:p>FLOWER Zinnia (Zinnia elegans)</text:p>
          </table:table-cell>
          <table:table-cell table:style-name="ce3"/>
        </table:table-row>
        <table:table-row table:style-name="ro19">
          <table:table-cell table:style-name="ce2" office:value-type="string" calcext:value-type="string">
            <text:p>FLOWER Zinnia (Zinnia elegans)</text:p>
          </table:table-cell>
          <table:table-cell table:style-name="ce2"/>
        </table:table-row>
        <table:table-row table:style-name="ro19">
          <table:table-cell table:style-name="ce2" office:value-type="string" calcext:value-type="string">
            <text:p>FLOWER Zinnia (Zinnia elegans)</text:p>
          </table:table-cell>
          <table:table-cell table:style-name="ce2"/>
        </table:table-row>
        <table:table-row table:style-name="ro19">
          <table:table-cell table:style-name="ce2" office:value-type="string" calcext:value-type="string">
            <text:p>FLOWER Sunflower (Helianthus annuus)</text:p>
          </table:table-cell>
          <table:table-cell table:style-name="ce2"/>
        </table:table-row>
        <table:table-row table:style-name="ro19">
          <table:table-cell table:style-name="ce2" office:value-type="string" calcext:value-type="string">
            <text:p>FLOWER Sunflower (Helianthus annuus)</text:p>
          </table:table-cell>
          <table:table-cell table:style-name="ce3"/>
        </table:table-row>
        <table:table-row table:style-name="ro20">
          <table:table-cell table:style-name="ce2" office:value-type="string" calcext:value-type="string">
            <text:p>FLOWER Coleus (Plectranthus scutellarioides)</text:p>
          </table:table-cell>
          <table:table-cell table:style-name="ce2"/>
        </table:table-row>
        <table:table-row table:style-name="ro20">
          <table:table-cell table:style-name="ce3" office:value-type="string" calcext:value-type="string">
            <text:p>FLOWER Sweet William (Dianthus barbatus)</text:p>
          </table:table-cell>
          <table:table-cell table:style-name="ce3"/>
        </table:table-row>
        <table:table-row table:style-name="ro19">
          <table:table-cell table:style-name="ce2" office:value-type="string" calcext:value-type="string">
            <text:p>FLOWER Zinnia (Zinnia elegans)</text:p>
          </table:table-cell>
          <table:table-cell table:style-name="ce2"/>
        </table:table-row>
        <table:table-row table:style-name="ro19">
          <table:table-cell table:style-name="ce3" office:value-type="string" calcext:value-type="string">
            <text:p>FLOWER Sunflower (Helianthus annus)</text:p>
          </table:table-cell>
          <table:table-cell table:style-name="ce3"/>
        </table:table-row>
        <table:table-row table:style-name="ro19">
          <table:table-cell table:style-name="ce3" office:value-type="string" calcext:value-type="string">
            <text:p>FLOWER Wisteria (Wisteria frutescens)</text:p>
          </table:table-cell>
          <table:table-cell table:style-name="ce3"/>
        </table:table-row>
        <table:table-row table:style-name="ro19">
          <table:table-cell table:style-name="ce3" office:value-type="string" calcext:value-type="string">
            <text:p>FLOWER (Lasianthaca podocephala)</text:p>
          </table:table-cell>
          <table:table-cell table:style-name="ce3"/>
        </table:table-row>
        <table:table-row table:style-name="ro19">
          <table:table-cell table:style-name="ce2" office:value-type="string" calcext:value-type="string">
            <text:p>GRASS (Boutelour eludens) </text:p>
          </table:table-cell>
          <table:table-cell table:style-name="ce2"/>
        </table:table-row>
        <table:table-row table:style-name="ro19">
          <table:table-cell table:style-name="ce2" office:value-type="string" calcext:value-type="string">
            <text:p>FLOWER (Helianthus annua)</text:p>
          </table:table-cell>
          <table:table-cell table:style-name="ce2"/>
        </table:table-row>
        <table:table-row table:style-name="ro19">
          <table:table-cell table:style-name="ce2" office:value-type="string" calcext:value-type="string">
            <text:p>FLOWER (Macroptillium supinum)</text:p>
          </table:table-cell>
          <table:table-cell table:style-name="ce2"/>
        </table:table-row>
        <table:table-row table:style-name="ro19">
          <table:table-cell table:style-name="ce3" office:value-type="string" calcext:value-type="string">
            <text:p>GRASS (Elionunus barbiculmis)</text:p>
          </table:table-cell>
          <table:table-cell table:style-name="ce3"/>
        </table:table-row>
        <table:table-row table:style-name="ro19">
          <table:table-cell table:style-name="ce3" office:value-type="string" calcext:value-type="string">
            <text:p>FLOWER (Zinnia peruviana)</text:p>
          </table:table-cell>
          <table:table-cell table:style-name="ce3"/>
        </table:table-row>
        <table:table-row table:style-name="ro19">
          <table:table-cell table:style-name="ce3" office:value-type="string" calcext:value-type="string">
            <text:p>SHRUB <text:s/>(Caesalpinia pulcherrima)</text:p>
          </table:table-cell>
          <table:table-cell table:style-name="ce3"/>
        </table:table-row>
        <table:table-row table:style-name="ro19">
          <table:table-cell table:style-name="ce3" office:value-type="string" calcext:value-type="string">
            <text:p>FLOWER (Cosmos sulphureus)</text:p>
          </table:table-cell>
          <table:table-cell table:style-name="ce3"/>
        </table:table-row>
        <table:table-row table:style-name="ro19">
          <table:table-cell table:style-name="ce2" office:value-type="string" calcext:value-type="string">
            <text:p>FLOWER Sunflower (Helianthus annuus)</text:p>
          </table:table-cell>
          <table:table-cell table:style-name="ce2"/>
        </table:table-row>
        <table:table-row table:style-name="ro19">
          <table:table-cell table:style-name="ce2" office:value-type="string" calcext:value-type="string">
            <text:p>FLOWER Sunflower (Helianthus annus)</text:p>
          </table:table-cell>
          <table:table-cell table:style-name="ce2"/>
        </table:table-row>
        <table:table-row table:style-name="ro19">
          <table:table-cell table:style-name="ce2" office:value-type="string" calcext:value-type="string">
            <text:p>FLOWER (Helianthus annua)</text:p>
          </table:table-cell>
          <table:table-cell table:style-name="ce3"/>
        </table:table-row>
        <table:table-row table:style-name="ro19">
          <table:table-cell table:style-name="ce3" office:value-type="string" calcext:value-type="string">
            <text:p>FLOWER Marigold (Baileyaiata multira)</text:p>
          </table:table-cell>
          <table:table-cell table:style-name="ce3"/>
        </table:table-row>
        <table:table-row table:style-name="ro20">
          <table:table-cell table:style-name="ce3" office:value-type="string" calcext:value-type="string">
            <text:p>FLOWER Coneflower (Ratibida columnaris)</text:p>
          </table:table-cell>
          <table:table-cell table:style-name="ce3"/>
        </table:table-row>
        <table:table-row table:style-name="ro19">
          <table:table-cell table:style-name="ce2" office:value-type="string" calcext:value-type="string">
            <text:p>FLOWER Sunflower (Helianthus annuus)</text:p>
          </table:table-cell>
          <table:table-cell table:style-name="ce2"/>
        </table:table-row>
        <table:table-row table:style-name="ro19">
          <table:table-cell table:style-name="ce2" office:value-type="string" calcext:value-type="string">
            <text:p>FLOWER (DIANTHUS CRINITUS)</text:p>
          </table:table-cell>
          <table:table-cell table:style-name="ce2"/>
        </table:table-row>
        <table:table-row table:style-name="ro19">
          <table:table-cell table:style-name="ce3" office:value-type="string" calcext:value-type="string">
            <text:p>SHRUB <text:s/>(Gossypium thurberi) </text:p>
          </table:table-cell>
          <table:table-cell table:style-name="ce3"/>
        </table:table-row>
        <table:table-row table:style-name="ro20">
          <table:table-cell table:style-name="ce2" office:value-type="string" calcext:value-type="string">
            <text:p>FLOWER Scabiosa Pincushion (Sixalix atropurpurea)</text:p>
          </table:table-cell>
          <table:table-cell table:style-name="ce2"/>
        </table:table-row>
        <table:table-row table:style-name="ro19">
          <table:table-cell table:style-name="ce3" office:value-type="string" calcext:value-type="string">
            <text:p>CORN, DECORATIVE (Zea mays)</text:p>
          </table:table-cell>
          <table:table-cell table:style-name="ce3"/>
        </table:table-row>
        <table:table-row table:style-name="ro20">
          <table:table-cell table:style-name="ce3" office:value-type="string" calcext:value-type="string">
            <text:p>FLOWER Black-eyed Susan (Rudbeckia hirta)</text:p>
          </table:table-cell>
          <table:table-cell table:style-name="ce3"/>
        </table:table-row>
        <table:table-row table:style-name="ro19">
          <table:table-cell table:style-name="ce3" office:value-type="string" calcext:value-type="string">
            <text:p>FLOWER Marigold (Tagetes erecta)</text:p>
          </table:table-cell>
          <table:table-cell table:style-name="ce3"/>
        </table:table-row>
        <table:table-row table:style-name="ro19">
          <table:table-cell table:style-name="ce2" office:value-type="string" calcext:value-type="string">
            <text:p>SHRUB <text:s/>(Caesalpinia pulcherrima)</text:p>
          </table:table-cell>
          <table:table-cell table:style-name="ce2"/>
        </table:table-row>
        <table:table-row table:style-name="ro19">
          <table:table-cell table:style-name="ce3" office:value-type="string" calcext:value-type="string">
            <text:p>CORN, DECORATIVE (Zea mays)</text:p>
          </table:table-cell>
          <table:table-cell table:style-name="ce3"/>
        </table:table-row>
        <table:table-row table:style-name="ro19">
          <table:table-cell table:style-name="ce2" office:value-type="string" calcext:value-type="string">
            <text:p>CORN, DECORATIVE (Zea mays)</text:p>
          </table:table-cell>
          <table:table-cell table:style-name="ce2"/>
        </table:table-row>
        <table:table-row table:style-name="ro19">
          <table:table-cell table:style-name="ce2" office:value-type="string" calcext:value-type="string">
            <text:p>SHRUB <text:s/>(Hesperaloe parviflora)</text:p>
          </table:table-cell>
          <table:table-cell table:style-name="ce2"/>
        </table:table-row>
        <table:table-row table:style-name="ro19">
          <table:table-cell table:style-name="ce2" office:value-type="string" calcext:value-type="string">
            <text:p>CORN, DECORATIVE (Zea mays)</text:p>
          </table:table-cell>
          <table:table-cell table:style-name="ce2"/>
        </table:table-row>
        <table:table-row table:style-name="ro19">
          <table:table-cell table:style-name="ce2" office:value-type="string" calcext:value-type="string">
            <text:p>CANE (Saccharum officinarum)</text:p>
          </table:table-cell>
          <table:table-cell table:style-name="ce2"/>
        </table:table-row>
        <table:table-row table:style-name="ro19">
          <table:table-cell table:style-name="ce3" office:value-type="string" calcext:value-type="string">
            <text:p>CANE (Saccharum officinarum)</text:p>
          </table:table-cell>
          <table:table-cell table:style-name="ce3"/>
        </table:table-row>
        <table:table-row table:style-name="ro20">
          <table:table-cell table:style-name="ce3" office:value-type="string" calcext:value-type="string">
            <text:p>BEAN, YARDLONG (Vigna unguiculate Sesquipedalis)</text:p>
          </table:table-cell>
          <table:table-cell table:style-name="ce3"/>
        </table:table-row>
        <table:table-row table:style-name="ro19">
          <table:table-cell table:style-name="ce2" office:value-type="string" calcext:value-type="string">
            <text:p>FLOWER Brittlebush (Encelia farinosa)</text:p>
          </table:table-cell>
          <table:table-cell table:style-name="ce2"/>
        </table:table-row>
        <table:table-row table:style-name="ro19" table:number-rows-repeated="1047828">
          <table:table-cell table:number-columns-repeated="2"/>
        </table:table-row>
        <table:table-row table:style-name="ro19">
          <table:table-cell table:number-columns-repeated="2"/>
        </table:table-row>
      </table:table>
      <table:named-expressions/>
      <table:database-ranges>
        <table:database-range table:name="__Anonymous_Sheet_DB__0" table:target-range-address="'Parsed Database'.A1:'Parsed Database'.Q692" table:display-filter-buttons="tru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loext:blank-width-char=")">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loext:blank-width-char=")">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loext:blank-width-char=")">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loext:blank-width-char=")">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loext:blank-width-char=")1">-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loext:blank-width-char=")1">- </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2">00/00/0000</text:date>, <text:time style:data-style-name="N2" text:time-value="09:48:21.89566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Parsed_20_Database" style:display-name="PageStyle_Parsed Database" style:page-layout-name="Mpm4">
      <style:header style:display="false"/>
      <style:header-left style:display="false"/>
      <style:header-first style:display="false"/>
      <style:footer style:display="false"/>
      <style:footer-left style:display="false"/>
      <style:footer-first style:display="false"/>
    </style:master-page>
    <style:master-page style:name="PageStyle_5f_Original_20_Labels" style:display-name="PageStyle_Original Label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penpyxl</meta:initial-creator>
    <meta:creation-date>2026-05-19T23:13:40</meta:creation-date>
    <dc:date>2026-06-02T09:51:27.295399000</dc:date>
    <meta:generator>LibreOffice/26.2.3.2$MacOSX_AARCH64 LibreOffice_project/70e089b17412e4cb7773e41413306b17a2328c34</meta:generator>
    <meta:editing-duration>PT10M26S</meta:editing-duration>
    <meta:editing-cycles>6</meta:editing-cycles>
    <meta:document-statistic meta:table-count="3" meta:cell-count="10170" meta:object-count="0"/>
    <meta:user-defined meta:name=""/>
    <meta:user-defined meta:name="AppVersion">16.0300</meta:user-defined>
  </office:meta>
</office:document-meta>
</file>